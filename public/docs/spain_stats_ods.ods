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4">
      <style:table-cell-properties style:vertical-align="middle" fo:wrap-option="wrap"/>
    </style:style>
    <style:style style:name="ce10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23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4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2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28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29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0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2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3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49" style:family="table-cell" style:parent-style-name="Default" style:data-style-name="N0"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51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36"/>
    <style:style style:name="ce53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5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55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6" style:family="table-cell" style:parent-style-name="Default" style:data-style-name="N37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8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2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64" style:family="table-cell" style:parent-style-name="Default" style:data-style-name="N2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5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8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9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70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7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3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74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5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9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8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2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3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4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8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91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36">
      <style:table-cell-properties fo:border="thin solid #000000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4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8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1" style:family="table-cell" style:parent-style-name="Default" style:data-style-name="N39"/>
    <style:style style:name="ce102" style:family="table-cell" style:parent-style-name="Default" style:data-style-name="N0">
      <style:text-properties fo:color="#FF0000"/>
    </style:style>
    <style:style style:name="ce10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0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6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8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9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10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1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2" style:family="table-cell" style:parent-style-name="Default" style:data-style-name="N3">
      <style:table-cell-properties style:vertical-align="middle" fo:wrap-option="wrap"/>
    </style:style>
    <style:style style:name="ce113" style:family="table-cell" style:parent-style-name="Default" style:data-style-name="N22"/>
    <style:style style:name="ce114" style:family="table-cell" style:parent-style-name="Default" style:data-style-name="N14">
      <style:table-cell-properties style:vertical-align="middle" fo:wrap-option="wrap"/>
      <style:paragraph-properties fo:margin-left="0cm" style:writing-mode="lr"/>
    </style:style>
    <style:style style:name="ce115" style:family="table-cell" style:parent-style-name="Default" style:data-style-name="N40">
      <style:table-cell-properties style:vertical-align="middle" fo:wrap-option="wrap"/>
    </style:style>
    <style:style style:name="ce116" style:family="table-cell" style:parent-style-name="Default" style:data-style-name="N4"/>
    <style:style style:name="ce117" style:family="table-cell" style:parent-style-name="Default" style:data-style-name="N4">
      <style:table-cell-properties style:vertical-align="middle" fo:wrap-option="wrap"/>
      <style:paragraph-properties fo:margin-left="0cm" style:writing-mode="lr"/>
    </style:style>
    <style:style style:name="ce11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9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0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1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2" style:family="table-cell" style:parent-style-name="Default" style:data-style-name="N1"/>
    <style:style style:name="ce12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4" style:family="table-cell" style:parent-style-name="Default" style:data-style-name="N1">
      <style:table-cell-properties fo:border="thin solid #000000" fo:background-color="#FFFFF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6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8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9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1" style:family="table-cell" style:parent-style-name="Normal_32_2" style:data-style-name="N15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2" style:family="table-cell" style:parent-style-name="Normal_32_2" style:data-style-name="N15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3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4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68111111111111cm" style:use-optimal-column-width="true"/>
    </style:style>
    <style:style style:name="co5" style:family="table-column">
      <style:table-column-properties fo:break-before="auto" style:column-width="3.08680555555556cm" style:use-optimal-column-width="true"/>
    </style:style>
    <style:style style:name="co6" style:family="table-column">
      <style:table-column-properties fo:break-before="auto" style:column-width="2.82222222222222cm" style:use-optimal-column-width="true"/>
    </style:style>
    <style:style style:name="co7" style:family="table-column">
      <style:table-column-properties fo:break-before="auto" style:column-width="2.29305555555556cm"/>
    </style:style>
    <style:style style:name="co8" style:family="table-column">
      <style:table-column-properties fo:break-before="auto" style:column-width="2.73402777777778cm"/>
    </style:style>
    <style:style style:name="co9" style:family="table-column">
      <style:table-column-properties fo:break-before="auto" style:column-width="2.25777777777778cm" style:use-optimal-column-width="true"/>
    </style:style>
    <style:style style:name="co10" style:family="table-column">
      <style:table-column-properties fo:break-before="auto" style:column-width="2.99861111111111cm"/>
    </style:style>
    <style:style style:name="co11" style:family="table-column">
      <style:table-column-properties fo:break-before="auto" style:column-width="3.22791666666667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72180555555556cm"/>
    </style:style>
    <style:style style:name="co15" style:family="table-column">
      <style:table-column-properties fo:break-before="auto" style:column-width="2.20486111111111cm"/>
    </style:style>
    <style:style style:name="co16" style:family="table-column">
      <style:table-column-properties fo:break-before="auto" style:column-width="2.50472222222222cm"/>
    </style:style>
    <style:style style:name="co17" style:family="table-column">
      <style:table-column-properties fo:break-before="auto" style:column-width="2.41652777777778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15736111111111cm"/>
    </style:style>
    <style:style style:name="co21" style:family="table-column">
      <style:table-column-properties fo:break-before="auto" style:column-width="1.99319444444444cm"/>
    </style:style>
    <style:style style:name="co22" style:family="table-column">
      <style:table-column-properties fo:break-before="auto" style:column-width="3.35138888888889cm"/>
    </style:style>
    <style:style style:name="co23" style:family="table-column">
      <style:table-column-properties fo:break-before="auto" style:column-width="2.94569444444444cm"/>
    </style:style>
    <style:style style:name="co24" style:family="table-column">
      <style:table-column-properties fo:break-before="auto" style:column-width="2.52236111111111cm"/>
    </style:style>
    <style:style style:name="co25" style:family="table-column">
      <style:table-column-properties fo:break-before="auto" style:column-width="2.55763888888889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1.97555555555556cm" style:use-optimal-column-width="true"/>
    </style:style>
    <style:style style:name="co29" style:family="table-column">
      <style:table-column-properties fo:break-before="auto" style:column-width="2.18722222222222cm"/>
    </style:style>
    <style:style style:name="co30" style:family="table-column">
      <style:table-column-properties fo:break-before="auto" style:column-width="2.34597222222222cm"/>
    </style:style>
    <style:style style:name="co31" style:family="table-column">
      <style:table-column-properties fo:break-before="auto" style:column-width="2.39888888888889cm" style:use-optimal-column-width="true"/>
    </style:style>
    <style:style style:name="co32" style:family="table-column">
      <style:table-column-properties fo:break-before="auto" style:column-width="3.51013888888889cm" style:use-optimal-column-width="true"/>
    </style:style>
    <style:style style:name="co33" style:family="table-column">
      <style:table-column-properties fo:break-before="auto" style:column-width="2.96333333333333cm" style:use-optimal-column-width="true"/>
    </style:style>
    <style:style style:name="co34" style:family="table-column">
      <style:table-column-properties fo:break-before="auto" style:column-width="2.04611111111111cm"/>
    </style:style>
    <style:style style:name="co35" style:family="table-column">
      <style:table-column-properties fo:break-before="auto" style:column-width="2.91041666666667cm"/>
    </style:style>
    <style:style style:name="co36" style:family="table-column">
      <style:table-column-properties fo:break-before="auto" style:column-width="3.13972222222222cm"/>
    </style:style>
    <style:style style:name="co37" style:family="table-column">
      <style:table-column-properties fo:break-before="auto" style:column-width="2.06375cm"/>
    </style:style>
    <style:style style:name="co38" style:family="table-column">
      <style:table-column-properties fo:break-before="auto" style:column-width="2.71638888888889cm"/>
    </style:style>
    <style:style style:name="co39" style:family="table-column">
      <style:table-column-properties fo:break-before="auto" style:column-width="2.62819444444444cm"/>
    </style:style>
    <style:style style:name="co40" style:family="table-column">
      <style:table-column-properties fo:break-before="auto" style:column-width="1.97555555555556cm"/>
    </style:style>
    <style:style style:name="co41" style:family="table-column">
      <style:table-column-properties fo:break-before="auto" style:column-width="2.39888888888889cm"/>
    </style:style>
    <style:style style:name="co42" style:family="table-column">
      <style:table-column-properties fo:break-before="auto" style:column-width="2.57527777777778cm"/>
    </style:style>
    <style:style style:name="co43" style:family="table-column">
      <style:table-column-properties fo:break-before="auto" style:column-width="1.69333333333333cm"/>
    </style:style>
    <style:style style:name="co44" style:family="table-column">
      <style:table-column-properties fo:break-before="auto" style:column-width="1.99319444444444cm" style:use-optimal-column-width="true"/>
    </style:style>
    <style:style style:name="co45" style:family="table-column">
      <style:table-column-properties fo:break-before="auto" style:column-width="2.48708333333333cm"/>
    </style:style>
    <style:style style:name="co46" style:family="table-column">
      <style:table-column-properties fo:break-before="auto" style:column-width="2.24013888888889cm"/>
    </style:style>
    <style:style style:name="co47" style:family="table-column">
      <style:table-column-properties fo:break-before="auto" style:column-width="3.31611111111111cm"/>
    </style:style>
    <style:style style:name="co48" style:family="table-column">
      <style:table-column-properties fo:break-before="auto" style:column-width="1.74625cm"/>
    </style:style>
    <style:style style:name="ro1" style:family="table-row">
      <style:table-row-properties style:row-height="4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37pt" style:use-optimal-row-height="fals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7" table:default-cell-style-name="ce1"/>
        <table:table-column table:style-name="co19" table:number-columns-repeated="2" table:default-cell-style-name="ce1"/>
        <table:table-column table:style-name="co7" table:default-cell-style-name="ce1"/>
        <table:table-column table:style-name="co20" table:number-columns-repeated="2" table:default-cell-style-name="ce1"/>
        <table:table-column table:style-name="co21" table:number-columns-repeated="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0" table:number-columns-repeated="17" table:default-cell-style-name="ce1"/>
        <table:table-column table:style-name="co25" table:default-cell-style-name="ce1"/>
        <table:table-column table:style-name="co17" table:number-columns-repeated="3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15" table:default-cell-style-name="ce1"/>
        <table:table-column table:style-name="co28" table:default-cell-style-name="ce1"/>
        <table:table-column table:style-name="co29" table:default-cell-style-name="ce1"/>
        <table:table-column table:style-name="co15" table:default-cell-style-name="ce1"/>
        <table:table-column table:style-name="co30" table:default-cell-style-name="ce1"/>
        <table:table-column table:style-name="co4" table:default-cell-style-name="ce1"/>
        <table:table-column table:style-name="co6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2" table:default-cell-style-name="ce1"/>
        <table:table-column table:style-name="co10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36" table:number-columns-repeated="4" table:default-cell-style-name="ce1"/>
        <table:table-column table:style-name="co37" table:number-columns-repeated="3" table:default-cell-style-name="ce1"/>
        <table:table-column table:style-name="co38" table:default-cell-style-name="ce1"/>
        <table:table-column table:style-name="co34" table:default-cell-style-name="ce2"/>
        <table:table-column table:style-name="co39" table:default-cell-style-name="ce1"/>
        <table:table-column table:style-name="co40" table:number-columns-repeated="2" table:default-cell-style-name="ce1"/>
        <table:table-column table:style-name="co28" table:default-cell-style-name="ce1"/>
        <table:table-column table:style-name="co8" table:default-cell-style-name="ce1"/>
        <table:table-column table:style-name="co41" table:default-cell-style-name="ce1"/>
        <table:table-column table:style-name="co15" table:default-cell-style-name="ce1"/>
        <table:table-column table:style-name="co30" table:default-cell-style-name="ce1"/>
        <table:table-column table:style-name="co17" table:default-cell-style-name="ce1"/>
        <table:table-column table:style-name="co2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1" table:number-columns-repeated="2" table:default-cell-style-name="ce1"/>
        <table:table-column table:style-name="co44" table:default-cell-style-name="ce1"/>
        <table:table-column table:style-name="co21" table:number-columns-repeated="2" table:default-cell-style-name="ce1"/>
        <table:table-column table:style-name="co45" table:default-cell-style-name="ce1"/>
        <table:table-column table:style-name="co43" table:number-columns-repeated="16261" table:default-cell-style-name="ce1"/>
        <table:table-row table:style-name="ro1">
          <table:table-cell office:value-type="string" table:style-name="ce14">
            <text:p>Year</text:p>
          </table:table-cell>
          <table:table-cell office:value-type="string" table:style-name="ce66">
            <text:p>Total_population</text:p>
          </table:table-cell>
          <table:table-cell office:value-type="string" table:style-name="ce66">
            <text:p>Population_25_50</text:p>
          </table:table-cell>
          <table:table-cell office:value-type="string" table:style-name="ce66">
            <text:p>Population_25_60</text:p>
          </table:table-cell>
          <table:table-cell office:value-type="string" table:style-name="ce79">
            <text:p>Population_over18</text:p>
          </table:table-cell>
          <table:table-cell office:value-type="string" table:style-name="ce15">
            <text:p>Home_sales</text:p>
          </table:table-cell>
          <table:table-cell office:value-type="string" table:style-name="ce15">
            <text:p>Inheritances</text:p>
          </table:table-cell>
          <table:table-cell office:value-type="string" table:style-name="ce16">
            <text:p>Donations</text:p>
          </table:table-cell>
          <table:table-cell office:value-type="string" table:style-name="ce16">
            <text:p>Swaps</text:p>
          </table:table-cell>
          <table:table-cell office:value-type="string" table:style-name="ce16">
            <text:p>Others</text:p>
          </table:table-cell>
          <table:table-cell office:value-type="string" table:style-name="ce16">
            <text:p>Approved</text:p>
          </table:table-cell>
          <table:table-cell office:value-type="string" table:style-name="ce16">
            <text:p>Releases</text:p>
          </table:table-cell>
          <table:table-cell office:value-type="string" table:style-name="ce15">
            <text:p>Total_amount</text:p>
          </table:table-cell>
          <table:table-cell office:value-type="string" table:style-name="ce15">
            <text:p>Average_amount</text:p>
          </table:table-cell>
          <table:table-cell office:value-type="string" table:style-name="ce15">
            <text:p>Creditor_subrogation</text:p>
          </table:table-cell>
          <table:table-cell office:value-type="string" table:style-name="ce15">
            <text:p>Consumer_subrogation</text:p>
          </table:table-cell>
          <table:table-cell office:value-type="string" table:style-name="ce66">
            <text:p>Ratio_subrogations</text:p>
          </table:table-cell>
          <table:table-cell office:value-type="string" table:style-name="ce66">
            <text:p>Loan_to_value</text:p>
          </table:table-cell>
          <table:table-cell office:value-type="string" table:style-name="ce61">
            <text:p>Real_credit_movement</text:p>
          </table:table-cell>
          <table:table-cell office:value-type="string" table:style-name="ce130">
            <text:p>Saldo_vivo</text:p>
          </table:table-cell>
          <table:table-cell office:value-type="string" table:style-name="ce15">
            <text:p>Average_mortgage_rate</text:p>
          </table:table-cell>
          <table:table-cell office:value-type="string" table:style-name="ce15">
            <text:p>Fixed_mortgages</text:p>
          </table:table-cell>
          <table:table-cell office:value-type="string" table:style-name="ce15">
            <text:p>Variable_mortgages</text:p>
          </table:table-cell>
          <table:table-cell office:value-type="string" table:style-name="ce15">
            <text:p>Years_mortgage</text:p>
          </table:table-cell>
          <table:table-cell office:value-type="string" table:style-name="ce107">
            <text:p>Euribor_1year</text:p>
          </table:table-cell>
          <table:table-cell office:value-type="string" table:style-name="ce66">
            <text:p>EURUSD_year_ave</text:p>
          </table:table-cell>
          <table:table-cell office:value-type="string" table:style-name="ce66">
            <text:p>Euro_M3</text:p>
          </table:table-cell>
          <table:table-cell office:value-type="string" table:style-name="ce66">
            <text:p>Euro_M3_stock_per</text:p>
          </table:table-cell>
          <table:table-cell office:value-type="string" table:style-name="ce66">
            <text:p>BTCEUR_year_ave</text:p>
          </table:table-cell>
          <table:table-cell office:value-type="string" table:style-name="ce66">
            <text:p>AUEUR_year_ave</text:p>
          </table:table-cell>
          <table:table-cell office:value-type="string" table:style-name="ce66">
            <text:p>GDP_spain</text:p>
          </table:table-cell>
          <table:table-cell office:value-type="string" table:style-name="ce66">
            <text:p>Market_cap</text:p>
          </table:table-cell>
          <table:table-cell office:value-type="string" table:style-name="ce66">
            <text:p>Market_cap_basic</text:p>
          </table:table-cell>
          <table:table-cell office:value-type="string" table:style-name="ce66">
            <text:p>Household_net_income</text:p>
          </table:table-cell>
          <table:table-cell office:value-type="string" table:style-name="ce15">
            <text:p>Disposable_income_over18</text:p>
          </table:table-cell>
          <table:table-cell office:value-type="string" table:style-name="ce66">
            <text:p>Income_constant_inflation</text:p>
          </table:table-cell>
          <table:table-cell office:value-type="string" table:style-name="ce66">
            <text:p>Income_constant_mortgage</text:p>
          </table:table-cell>
          <table:table-cell office:value-type="string" table:style-name="ce66">
            <text:p>Income_constant_housing</text:p>
          </table:table-cell>
          <table:table-cell office:value-type="string" table:style-name="ce66">
            <text:p>Income_vs_livingstandard</text:p>
          </table:table-cell>
          <table:table-cell office:value-type="string" table:style-name="ce66">
            <text:p>Housing_affordability</text:p>
          </table:table-cell>
          <table:table-cell office:value-type="string" table:style-name="ce15">
            <text:p>Wage_norm_IPVVR</text:p>
          </table:table-cell>
          <table:table-cell office:value-type="string" table:style-name="ce66">
            <text:p>Dif_Wage_IPVVR</text:p>
          </table:table-cell>
          <table:table-cell office:value-type="string" table:style-name="ce15">
            <text:p>Ideal_wage</text:p>
          </table:table-cell>
          <table:table-cell office:value-type="string" table:style-name="ce15">
            <text:p>Price_urban_land</text:p>
          </table:table-cell>
          <table:table-cell office:value-type="string" table:style-name="ce15">
            <text:p>Price_nonurban_land</text:p>
          </table:table-cell>
          <table:table-cell office:value-type="string" table:style-name="ce15">
            <text:p>Tx_land</text:p>
          </table:table-cell>
          <table:table-cell office:value-type="string" table:style-name="ce19">
            <text:p>Tx_juridicas_m2</text:p>
          </table:table-cell>
          <table:table-cell office:value-type="string" table:style-name="ce19">
            <text:p>Tx_fisica_m2</text:p>
          </table:table-cell>
          <table:table-cell office:value-type="string" table:style-name="ce19">
            <text:p>Free_urbanland_km2</text:p>
          </table:table-cell>
          <table:table-cell office:value-type="string" table:style-name="ce19">
            <text:p>Urbanland_km2</text:p>
          </table:table-cell>
          <table:table-cell office:value-type="string" table:style-name="ce19">
            <text:p>Building_permits</text:p>
          </table:table-cell>
          <table:table-cell office:value-type="string" table:style-name="ce16">
            <text:p>Build</text:p>
          </table:table-cell>
          <table:table-cell office:value-type="string" table:style-name="ce16">
            <text:p>Reform</text:p>
          </table:table-cell>
          <table:table-cell office:value-type="string" table:style-name="ce16">
            <text:p>Demolish</text:p>
          </table:table-cell>
          <table:table-cell office:value-type="string" table:style-name="ce66">
            <text:p>Permits_legalentity</text:p>
          </table:table-cell>
          <table:table-cell office:value-type="string" table:style-name="ce66">
            <text:p>Permits_individuals</text:p>
          </table:table-cell>
          <table:table-cell office:value-type="string" table:style-name="ce66">
            <text:p>Permits_publicadmin</text:p>
          </table:table-cell>
          <table:table-cell office:value-type="string" table:style-name="ce15">
            <text:p>Single_family</text:p>
          </table:table-cell>
          <table:table-cell office:value-type="string" table:style-name="ce15">
            <text:p>Single_family_m2</text:p>
          </table:table-cell>
          <table:table-cell office:value-type="string" table:style-name="ce15">
            <text:p>SF_cost</text:p>
          </table:table-cell>
          <table:table-cell office:value-type="string" table:style-name="ce15">
            <text:p>SF_cost_ave</text:p>
          </table:table-cell>
          <table:table-cell office:value-type="string" table:style-name="ce15">
            <text:p>SF_cost_m2</text:p>
          </table:table-cell>
          <table:table-cell office:value-type="string" table:style-name="ce15">
            <text:p>Condominiums</text:p>
          </table:table-cell>
          <table:table-cell office:value-type="string" table:style-name="ce15">
            <text:p>Condos_m2</text:p>
          </table:table-cell>
          <table:table-cell office:value-type="string" table:style-name="ce15">
            <text:p>Condos_cost</text:p>
          </table:table-cell>
          <table:table-cell office:value-type="string" table:style-name="ce15">
            <text:p>Condos_cost_ave</text:p>
          </table:table-cell>
          <table:table-cell office:value-type="string" table:style-name="ce15">
            <text:p>Condos_cost_m2</text:p>
          </table:table-cell>
          <table:table-cell office:value-type="string" table:style-name="ce15">
            <text:p>Ratio_price_cost</text:p>
          </table:table-cell>
          <table:table-cell office:value-type="string" table:style-name="ce15">
            <text:p>Cost_production_ave</text:p>
          </table:table-cell>
          <table:table-cell office:value-type="string" table:style-name="ce15">
            <text:p>Cost_edification</text:p>
          </table:table-cell>
          <table:table-cell office:value-type="string" table:style-name="ce15">
            <text:p>Total_homes</text:p>
          </table:table-cell>
          <table:table-cell office:value-type="string" table:style-name="ce15">
            <text:p>New_homes</text:p>
          </table:table-cell>
          <table:table-cell office:value-type="string" table:style-name="ce66">
            <text:p>Private_housing</text:p>
          </table:table-cell>
          <table:table-cell office:value-type="string" table:style-name="ce66">
            <text:p>Public_housing</text:p>
          </table:table-cell>
          <table:table-cell office:value-type="string" table:style-name="ce15">
            <text:p>Inhabitants_per_home</text:p>
          </table:table-cell>
          <table:table-cell office:value-type="string" table:style-name="ce15">
            <text:p>Average_people_home</text:p>
          </table:table-cell>
          <table:table-cell office:value-type="string" table:style-name="ce66">
            <text:p>Fertility_rate</text:p>
          </table:table-cell>
          <table:table-cell office:value-type="string" table:style-name="ce15">
            <text:p>Per_new_homes</text:p>
          </table:table-cell>
          <table:table-cell office:value-type="string" table:style-name="ce66">
            <text:p>Pop_abs_yoy</text:p>
          </table:table-cell>
          <table:table-cell office:value-type="string" table:style-name="ce16">
            <text:p>Population_yoy</text:p>
          </table:table-cell>
          <table:table-cell office:value-type="string" table:style-name="ce66">
            <text:p>Balance_hogares</text:p>
          </table:table-cell>
          <table:table-cell office:value-type="string" table:style-name="ce66">
            <text:p>Employed_constr</text:p>
          </table:table-cell>
          <table:table-cell office:value-type="string" table:style-name="ce62">
            <text:p>Cement_mt</text:p>
          </table:table-cell>
          <table:table-cell office:value-type="string" table:style-name="ce19">
            <text:p>Legal_entity</text:p>
          </table:table-cell>
          <table:table-cell office:value-type="string" table:style-name="ce20">
            <text:p>Nationals</text:p>
          </table:table-cell>
          <table:table-cell office:value-type="string" table:style-name="ce16">
            <text:p>Foreigners</text:p>
          </table:table-cell>
          <table:table-cell office:value-type="string" table:style-name="ce16">
            <text:p>Owned_per</text:p>
          </table:table-cell>
          <table:table-cell office:value-type="string" table:style-name="ce15">
            <text:p>Rented_per</text:p>
          </table:table-cell>
          <table:table-cell office:value-type="string" table:style-name="ce15">
            <text:p>Freely_loaned_per</text:p>
          </table:table-cell>
          <table:table-cell office:value-type="string" table:style-name="ce66">
            <text:p>Rent_price_IPVA</text:p>
          </table:table-cell>
          <table:table-cell office:value-type="string" table:style-name="ce66">
            <text:p>Idealista_rent_100</text:p>
          </table:table-cell>
          <table:table-cell office:value-type="string" table:style-name="ce15">
            <text:p>Rent_price_eum2</text:p>
          </table:table-cell>
          <table:table-cell office:value-type="string" table:style-name="ce16">
            <text:p>Price_per</text:p>
          </table:table-cell>
          <table:table-cell office:value-type="string" table:style-name="ce15">
            <text:p>Rent_ROI_gross</text:p>
          </table:table-cell>
          <table:table-cell office:value-type="string" table:style-name="ce15">
            <text:p>Rent_ROI_net</text:p>
          </table:table-cell>
          <table:table-cell office:value-type="string" table:style-name="ce15">
            <text:p>Idealista_price</text:p>
          </table:table-cell>
          <table:table-cell office:value-type="string" table:style-name="ce66">
            <text:p>Idealista_mortgage_86m</text:p>
          </table:table-cell>
          <table:table-cell office:value-type="string" table:style-name="ce66">
            <text:p>Idealista_house_100</text:p>
          </table:table-cell>
          <table:table-cell office:value-type="string" table:style-name="ce66">
            <text:p>Idealista_rent_86m</text:p>
          </table:table-cell>
          <table:table-cell office:value-type="string" table:style-name="ce15">
            <text:p>Price_eum2</text:p>
          </table:table-cell>
          <table:table-cell office:value-type="string" table:style-name="ce15">
            <text:p>Price_IPVVR</text:p>
          </table:table-cell>
          <table:table-cell office:value-type="string" table:style-name="ce66">
            <text:p>Price_IPV</text:p>
          </table:table-cell>
          <table:table-cell office:value-type="string" table:style-name="ce15">
            <text:p>Inflation_CPI</text:p>
          </table:table-cell>
          <table:table-cell office:value-type="string" table:style-name="ce15">
            <text:p>CPI_1985</text:p>
          </table:table-cell>
          <table:table-cell office:value-type="string" table:style-name="ce21">
            <text:p>Overrated_inflation</text:p>
          </table:table-cell>
          <table:table-cell office:value-type="string" table:style-name="ce21">
            <text:p>Real_price_over</text:p>
          </table:table-cell>
          <table:table-cell office:value-type="string" table:style-name="ce21">
            <text:p>Real_price</text:p>
          </table:table-cell>
          <table:table-cell office:value-type="string" table:style-name="ce15">
            <text:p>IR_yoy_per</text:p>
          </table:table-cell>
          <table:table-cell office:value-type="string" table:style-name="ce15">
            <text:p>Nominal_price_yoy_per</text:p>
          </table:table-cell>
          <table:table-cell office:value-type="string" table:style-name="ce15">
            <text:p>Real_price_yoy_per</text:p>
          </table:table-cell>
          <table:table-cell office:value-type="string" table:style-name="ce16">
            <text:p>Sales_yoy_per</text:p>
          </table:table-cell>
          <table:table-cell office:value-type="string" table:style-name="ce15">
            <text:p>Credit_yoy_per</text:p>
          </table:table-cell>
          <table:table-cell office:value-type="string" table:style-name="ce15">
            <text:p>Unemployment_yoy_per</text:p>
          </table:table-cell>
          <table:table-cell office:value-type="string" table:style-name="ce15">
            <text:p>Price_risk</text:p>
          </table:table-cell>
          <table:table-cell office:value-type="string" table:style-name="ce15">
            <text:p>Mortgage_risk</text:p>
          </table:table-cell>
          <table:table-cell office:value-type="string" table:style-name="ce15">
            <text:p>Sales_risk</text:p>
          </table:table-cell>
          <table:table-cell office:value-type="string" table:style-name="ce66">
            <text:p>Wage_risk</text:p>
          </table:table-cell>
          <table:table-cell office:value-type="string" table:style-name="ce66">
            <text:p>Production_risk</text:p>
          </table:table-cell>
          <table:table-cell office:value-type="string" table:style-name="ce66">
            <text:p>Scarcity_risk</text:p>
          </table:table-cell>
          <table:table-cell office:value-type="string" table:style-name="ce15">
            <text:p>Labor_risk</text:p>
          </table:table-cell>
          <table:table-cell office:value-type="string" table:style-name="ce15">
            <text:p>Rent_risk</text:p>
          </table:table-cell>
          <table:table-cell office:value-type="string" table:style-name="ce15">
            <text:p>Average_risk</text:p>
          </table:table-cell>
          <table:table-cell office:value-type="string" table:style-name="ce15">
            <text:p>Rainbow_curve</text:p>
          </table:table-cell>
          <table:table-cell table:number-columns-repeated="16261"/>
        </table:table-row>
        <table:table-row table:style-name="ro2">
          <table:table-cell office:value-type="float" office:value="1900" table:style-name="ce66">
            <text:p>1900</text:p>
          </table:table-cell>
          <table:table-cell office:value-type="float" office:value="18618086" table:style-name="ce76">
            <text:p>1861808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102810.1592281885" table:formula="of:=[.BS3]-[.BT3]" table:style-name="ce24">
            <text:p>3102810</text:p>
          </table:table-cell>
          <table:table-cell office:value-type="float" office:value="33032.659661660553" table:formula="of:=[.CD2]/9" table:style-name="ce93">
            <text:p>3303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.0003948177838806" table:formula="of:=[.B2]/[.BS2]" table:style-name="ce54">
            <text:p>6.00</text:p>
          </table:table-cell>
          <table:table-cell office:value-type="float" office:value="4.9681249999999997" table:formula="of:=2+([.BY2]/1.6)" table:style-name="ce103">
            <text:p>4.97</text:p>
          </table:table-cell>
          <table:table-cell office:value-type="float" office:value="4.7489999999999997" table:style-name="ce103">
            <text:p>4.75</text:p>
          </table:table-cell>
          <table:table-cell office:value-type="string" table:style-name="ce118">
            <text:p>null</text:p>
          </table:table-cell>
          <table:table-cell office:value-type="float" office:value="90000" table:style-name="ce108">
            <text:p>90000</text:p>
          </table:table-cell>
          <table:table-cell office:value-type="string" table:style-name="ce25">
            <text:p>null</text:p>
          </table:table-cell>
          <table:table-cell office:value-type="float" office:value="14917.173436978203" table:formula="of:=[.BT2]-([.CA2]/[.BX2])" table:style-name="ce93">
            <text:p>14917</text:p>
          </table:table-cell>
          <table:table-cell office:value-type="float" office:value="297293.93695494498" table:style-name="ce93">
            <text:p>29729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1" table:style-name="ce66">
            <text:p>1901</text:p>
          </table:table-cell>
          <table:table-cell office:value-type="float" office:value="18738562.659827214" table:style-name="ce109">
            <text:p>1873856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140199.6933957404" table:formula="of:=[.BS4]-[.BT4]" table:style-name="ce24">
            <text:p>3140200</text:p>
          </table:table-cell>
          <table:table-cell office:value-type="float" office:value="37389.534167551952" table:formula="of:=[.CD3]/8" table:style-name="ce93">
            <text:p>3739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9673156134741738" table:formula="of:=[.B3]/[.BS3]" table:style-name="ce54">
            <text:p>5.97</text:p>
          </table:table-cell>
          <table:table-cell office:value-type="float" office:value="4.9437499999999996" table:formula="of:=2+([.BY3]/1.6)" table:style-name="ce103">
            <text:p>4.94</text:p>
          </table:table-cell>
          <table:table-cell office:value-type="float" office:value="4.71" table:style-name="ce103">
            <text:p>4.71</text:p>
          </table:table-cell>
          <table:table-cell office:value-type="string" table:style-name="ce118">
            <text:p>null</text:p>
          </table:table-cell>
          <table:table-cell office:value-type="float" office:value="120476.65982721373" table:formula="of:=([.B3]-[.B2])" table:style-name="ce108">
            <text:p>120477</text:p>
          </table:table-cell>
          <table:table-cell office:value-type="float" office:value="0.64709476488191342" table:formula="of:=([.B3]*100/[.B2])-100" table:style-name="ce54">
            <text:p>0.65</text:p>
          </table:table-cell>
          <table:table-cell office:value-type="float" office:value="13020.045454082676" table:formula="of:=[.BT3]-([.CA3]/[.BX3])" table:style-name="ce93">
            <text:p>13020</text:p>
          </table:table-cell>
          <table:table-cell office:value-type="float" office:value="299116.27334041562" table:style-name="ce93">
            <text:p>29911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2" table:style-name="ce66">
            <text:p>1902</text:p>
          </table:table-cell>
          <table:table-cell office:value-type="float" office:value="18849145.244060472" table:style-name="ce109">
            <text:p>188491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177845.0472239861" table:formula="of:=[.BS5]-[.BT5]" table:style-name="ce24">
            <text:p>3177845</text:p>
          </table:table-cell>
          <table:table-cell office:value-type="float" office:value="37645.353828245978" table:formula="of:=[.CD4]/8" table:style-name="ce93">
            <text:p>376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9314236421080961" table:formula="of:=[.B4]/[.BS4]" table:style-name="ce54">
            <text:p>5.93</text:p>
          </table:table-cell>
          <table:table-cell office:value-type="float" office:value="4.9375" table:formula="of:=2+([.BY4]/1.6)" table:style-name="ce103">
            <text:p>4.94</text:p>
          </table:table-cell>
          <table:table-cell office:value-type="float" office:value="4.7" table:style-name="ce103">
            <text:p>4.70</text:p>
          </table:table-cell>
          <table:table-cell office:value-type="string" table:style-name="ce118">
            <text:p>null</text:p>
          </table:table-cell>
          <table:table-cell office:value-type="float" office:value="110582.58423325792" table:formula="of:=([.B4]-[.B3])" table:style-name="ce108">
            <text:p>110583</text:p>
          </table:table-cell>
          <table:table-cell office:value-type="float" office:value="0.59013375914007327" table:formula="of:=([.B4]*100/[.B3])-100" table:style-name="ce54">
            <text:p>0.59</text:p>
          </table:table-cell>
          <table:table-cell office:value-type="float" office:value="15248.881072143107" table:formula="of:=[.BT4]-([.CA4]/[.BX4])" table:style-name="ce93">
            <text:p>15249</text:p>
          </table:table-cell>
          <table:table-cell office:value-type="float" office:value="301162.83062596782" table:style-name="ce93">
            <text:p>30116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3" table:style-name="ce66">
            <text:p>1903</text:p>
          </table:table-cell>
          <table:table-cell office:value-type="float" office:value="18939621.903887685" table:style-name="ce109">
            <text:p>1893962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15815.974277738" table:formula="of:=[.BS6]-[.BT6]" table:style-name="ce24">
            <text:p>3215816</text:p>
          </table:table-cell>
          <table:table-cell office:value-type="float" office:value="37970.927053751839" table:formula="of:=[.CD5]/8" table:style-name="ce93">
            <text:p>3797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889522925248067" table:formula="of:=[.B5]/[.BS5]" table:style-name="ce54">
            <text:p>5.89</text:p>
          </table:table-cell>
          <table:table-cell office:value-type="float" office:value="4.9249999999999998" table:formula="of:=2+([.BY5]/1.6)" table:style-name="ce103">
            <text:p>4.93</text:p>
          </table:table-cell>
          <table:table-cell office:value-type="float" office:value="4.68" table:style-name="ce103">
            <text:p>4.68</text:p>
          </table:table-cell>
          <table:table-cell office:value-type="string" table:style-name="ce118">
            <text:p>null</text:p>
          </table:table-cell>
          <table:table-cell office:value-type="float" office:value="90476.659827213734" table:formula="of:=([.B5]-[.B4])" table:style-name="ce108">
            <text:p>90477</text:p>
          </table:table-cell>
          <table:table-cell office:value-type="float" office:value="0.48000404610242242" table:formula="of:=([.B5]*100/[.B4])-100" table:style-name="ce54">
            <text:p>0.48</text:p>
          </table:table-cell>
          <table:table-cell office:value-type="float" office:value="19600.031657363263" table:formula="of:=[.BT5]-([.CA5]/[.BX5])" table:style-name="ce93">
            <text:p>19600</text:p>
          </table:table-cell>
          <table:table-cell office:value-type="float" office:value="303767.41643001471" table:style-name="ce93">
            <text:p>3037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4" table:style-name="ce66">
            <text:p>1904</text:p>
          </table:table-cell>
          <table:table-cell office:value-type="float" office:value="19110522.261339091" table:style-name="ce109">
            <text:p>1911052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54040.2329320782" table:formula="of:=[.BS7]-[.BT7]" table:style-name="ce24">
            <text:p>3254040</text:p>
          </table:table-cell>
          <table:table-cell office:value-type="float" office:value="38224.258654340374" table:formula="of:=[.CD6]/8" table:style-name="ce93">
            <text:p>3822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8728598583181642" table:formula="of:=[.B6]/[.BS6]" table:style-name="ce54">
            <text:p>5.87</text:p>
          </table:table-cell>
          <table:table-cell office:value-type="float" office:value="4.9187499999999993" table:formula="of:=2+([.BY6]/1.6)" table:style-name="ce103">
            <text:p>4.92</text:p>
          </table:table-cell>
          <table:table-cell office:value-type="float" office:value="4.67" table:style-name="ce103">
            <text:p>4.67</text:p>
          </table:table-cell>
          <table:table-cell office:value-type="string" table:style-name="ce118">
            <text:p>null</text:p>
          </table:table-cell>
          <table:table-cell office:value-type="float" office:value="170900.35745140538" table:formula="of:=([.B6]-[.B5])" table:style-name="ce108">
            <text:p>170900</text:p>
          </table:table-cell>
          <table:table-cell office:value-type="float" office:value="0.90234302626878105" table:formula="of:=([.B6]*100/[.B5])-100" table:style-name="ce54">
            <text:p>0.90</text:p>
          </table:table-cell>
          <table:table-cell office:value-type="float" office:value="3479.5862372820993" table:formula="of:=[.BT6]-([.CA6]/[.BX6])" table:style-name="ce93">
            <text:p>3480</text:p>
          </table:table-cell>
          <table:table-cell office:value-type="float" office:value="305794.06923472299" table:style-name="ce93">
            <text:p>30579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5" table:style-name="ce66">
            <text:p>1905</text:p>
          </table:table-cell>
          <table:table-cell office:value-type="float" office:value="19241210.7699784" table:style-name="ce109">
            <text:p>192412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92494.8408441539" table:formula="of:=[.BS8]-[.BT8]" table:style-name="ce24">
            <text:p>3292495</text:p>
          </table:table-cell>
          <table:table-cell office:value-type="float" office:value="38454.607912075815" table:formula="of:=[.CD7]/8" table:style-name="ce93">
            <text:p>3845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8439607957123476" table:formula="of:=[.B7]/[.BS7]" table:style-name="ce54">
            <text:p>5.84</text:p>
          </table:table-cell>
          <table:table-cell office:value-type="float" office:value="4.9124999999999996" table:formula="of:=2+([.BY7]/1.6)" table:style-name="ce103">
            <text:p>4.91</text:p>
          </table:table-cell>
          <table:table-cell office:value-type="float" office:value="4.66" table:style-name="ce103">
            <text:p>4.66</text:p>
          </table:table-cell>
          <table:table-cell office:value-type="string" table:style-name="ce118">
            <text:p>null</text:p>
          </table:table-cell>
          <table:table-cell office:value-type="float" office:value="130688.50863930956" table:formula="of:=([.B7]-[.B6])" table:style-name="ce108">
            <text:p>130689</text:p>
          </table:table-cell>
          <table:table-cell office:value-type="float" office:value="0.68385629054048991" table:formula="of:=([.B7]*100/[.B6])-100" table:style-name="ce54">
            <text:p>0.68</text:p>
          </table:table-cell>
          <table:table-cell office:value-type="float" office:value="11851.349155982265" table:formula="of:=[.BT7]-([.CA7]/[.BX7])" table:style-name="ce93">
            <text:p>11851</text:p>
          </table:table-cell>
          <table:table-cell office:value-type="float" office:value="307636.86329660652" table:style-name="ce93">
            <text:p>3076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6" table:style-name="ce66">
            <text:p>1906</text:p>
          </table:table-cell>
          <table:table-cell office:value-type="float" office:value="19381952.240820732" table:style-name="ce109">
            <text:p>193819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330928.772103095" table:formula="of:=[.BS9]-[.BT9]" table:style-name="ce24">
            <text:p>3330929</text:p>
          </table:table-cell>
          <table:table-cell office:value-type="float" office:value="38433.931258940866" table:formula="of:=[.CD8]/8" table:style-name="ce93">
            <text:p>3843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8187831583631491" table:formula="of:=[.B8]/[.BS8]" table:style-name="ce54">
            <text:p>5.82</text:p>
          </table:table-cell>
          <table:table-cell office:value-type="float" office:value="4.8812499999999996" table:formula="of:=2+([.BY8]/1.6)" table:style-name="ce103">
            <text:p>4.88</text:p>
          </table:table-cell>
          <table:table-cell office:value-type="float" office:value="4.6100000000000003" table:style-name="ce103">
            <text:p>4.61</text:p>
          </table:table-cell>
          <table:table-cell office:value-type="string" table:style-name="ce118">
            <text:p>null</text:p>
          </table:table-cell>
          <table:table-cell office:value-type="float" office:value="140741.47084233165" table:formula="of:=([.B8]-[.B7])" table:style-name="ce108">
            <text:p>140741</text:p>
          </table:table-cell>
          <table:table-cell office:value-type="float" office:value="0.73145849564689058" table:formula="of:=([.B8]*100/[.B7])-100" table:style-name="ce54">
            <text:p>0.73</text:p>
          </table:table-cell>
          <table:table-cell office:value-type="float" office:value="9600.8514448908463" table:formula="of:=[.BT8]-([.CA8]/[.BX8])" table:style-name="ce93">
            <text:p>9601</text:p>
          </table:table-cell>
          <table:table-cell office:value-type="float" office:value="307471.45007152692" table:style-name="ce93">
            <text:p>30747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7" table:style-name="ce66">
            <text:p>1907</text:p>
          </table:table-cell>
          <table:table-cell office:value-type="float" office:value="19512640.749460042" table:style-name="ce109">
            <text:p>1951264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369472.1683675009" table:formula="of:=[.BS10]-[.BT10]" table:style-name="ce24">
            <text:p>3369472</text:p>
          </table:table-cell>
          <table:table-cell office:value-type="float" office:value="38543.396264406038" table:formula="of:=[.CD9]/8" table:style-name="ce93">
            <text:p>3854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7910081384983982" table:formula="of:=[.B9]/[.BS9]" table:style-name="ce54">
            <text:p>5.79</text:p>
          </table:table-cell>
          <table:table-cell office:value-type="float" office:value="4.8562500000000002" table:formula="of:=2+([.BY9]/1.6)" table:style-name="ce103">
            <text:p>4.86</text:p>
          </table:table-cell>
          <table:table-cell office:value-type="float" office:value="4.57" table:style-name="ce103">
            <text:p>4.57</text:p>
          </table:table-cell>
          <table:table-cell office:value-type="string" table:style-name="ce118">
            <text:p>null</text:p>
          </table:table-cell>
          <table:table-cell office:value-type="float" office:value="130688.50863930956" table:formula="of:=([.B9]-[.B8])" table:style-name="ce108">
            <text:p>130689</text:p>
          </table:table-cell>
          <table:table-cell office:value-type="float" office:value="0.67427938638742546" table:formula="of:=([.B9]*100/[.B8])-100" table:style-name="ce54">
            <text:p>0.67</text:p>
          </table:table-cell>
          <table:table-cell office:value-type="float" office:value="11631.991653994806" table:formula="of:=[.BT9]-([.CA9]/[.BX9])" table:style-name="ce93">
            <text:p>11632</text:p>
          </table:table-cell>
          <table:table-cell office:value-type="float" office:value="308347.1701152483" table:style-name="ce93">
            <text:p>3083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8" table:style-name="ce66">
            <text:p>1908</text:p>
          </table:table-cell>
          <table:table-cell office:value-type="float" office:value="19663435.182505399" table:style-name="ce109">
            <text:p>1966343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408154.5949262353" table:formula="of:=[.BS11]-[.BT11]" table:style-name="ce24">
            <text:p>3408155</text:p>
          </table:table-cell>
          <table:table-cell office:value-type="float" office:value="38682.426558734383" table:formula="of:=[.CD10]/8" table:style-name="ce93">
            <text:p>3868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7695255995073156" table:formula="of:=[.B10]/[.BS10]" table:style-name="ce54">
            <text:p>5.77</text:p>
          </table:table-cell>
          <table:table-cell office:value-type="float" office:value="4.8249999999999993" table:formula="of:=2+([.BY10]/1.6)" table:style-name="ce103">
            <text:p>4.83</text:p>
          </table:table-cell>
          <table:table-cell office:value-type="float" office:value="4.5199999999999996" table:style-name="ce103">
            <text:p>4.52</text:p>
          </table:table-cell>
          <table:table-cell office:value-type="string" table:style-name="ce118">
            <text:p>null</text:p>
          </table:table-cell>
          <table:table-cell office:value-type="float" office:value="150794.43304535747" table:formula="of:=([.B10]-[.B9])" table:style-name="ce108">
            <text:p>150794</text:p>
          </table:table-cell>
          <table:table-cell office:value-type="float" office:value="0.77280381974709655" table:formula="of:=([.B10]*100/[.B9])-100" table:style-name="ce54">
            <text:p>0.77</text:p>
          </table:table-cell>
          <table:table-cell office:value-type="float" office:value="7429.6943213545928" table:formula="of:=[.BT10]-([.CA10]/[.BX10])" table:style-name="ce93">
            <text:p>7430</text:p>
          </table:table-cell>
          <table:table-cell office:value-type="float" office:value="309459.41246987507" table:style-name="ce93">
            <text:p>30945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09" table:style-name="ce66">
            <text:p>1909</text:p>
          </table:table-cell>
          <table:table-cell office:value-type="float" office:value="19804176.653347734" table:style-name="ce109">
            <text:p>1980417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446986.9641498053" table:formula="of:=[.BS12]-[.BT12]" table:style-name="ce24">
            <text:p>3446987</text:p>
          </table:table-cell>
          <table:table-cell office:value-type="float" office:value="38832.369223569898" table:formula="of:=[.CD11]/8" table:style-name="ce93">
            <text:p>3883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7453587319360251" table:formula="of:=[.B11]/[.BS11]" table:style-name="ce54">
            <text:p>5.75</text:p>
          </table:table-cell>
          <table:table-cell office:value-type="float" office:value="4.8000000000000007" table:formula="of:=2+([.BY11]/1.6)" table:style-name="ce103">
            <text:p>4.80</text:p>
          </table:table-cell>
          <table:table-cell office:value-type="float" office:value="4.4800000000000004" table:style-name="ce103">
            <text:p>4.48</text:p>
          </table:table-cell>
          <table:table-cell office:value-type="string" table:style-name="ce118">
            <text:p>null</text:p>
          </table:table-cell>
          <table:table-cell office:value-type="float" office:value="140741.47084233537" table:formula="of:=([.B11]-[.B10])" table:style-name="ce108">
            <text:p>140741</text:p>
          </table:table-cell>
          <table:table-cell office:value-type="float" office:value="0.71575220471932255" table:formula="of:=([.B11]*100/[.B10])-100" table:style-name="ce54">
            <text:p>0.72</text:p>
          </table:table-cell>
          <table:table-cell office:value-type="float" office:value="9511.2294647500348" table:formula="of:=[.BT11]-([.CA11]/[.BX11])" table:style-name="ce93">
            <text:p>9511</text:p>
          </table:table-cell>
          <table:table-cell office:value-type="float" office:value="310658.95378855919" table:style-name="ce93">
            <text:p>31065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0" table:style-name="ce66">
            <text:p>1910</text:p>
          </table:table-cell>
          <table:table-cell office:value-type="float" office:value="19995686" table:style-name="ce110">
            <text:p>1999568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485956.1140333838" table:formula="of:=[.BS13]-[.BT13]" table:style-name="ce24">
            <text:p>3485956</text:p>
          </table:table-cell>
          <table:table-cell office:value-type="float" office:value="38969.149883578757" table:formula="of:=[.CD12]/8" table:style-name="ce93">
            <text:p>3896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7360693439322246" table:formula="of:=[.B12]/[.BS12]" table:style-name="ce54">
            <text:p>5.74</text:p>
          </table:table-cell>
          <table:table-cell office:value-type="float" office:value="4.7587499999999991" table:formula="of:=2+([.BY12]/1.6)" table:style-name="ce103">
            <text:p>4.76</text:p>
          </table:table-cell>
          <table:table-cell office:value-type="float" office:value="4.4139999999999997" table:style-name="ce103">
            <text:p>4.41</text:p>
          </table:table-cell>
          <table:table-cell office:value-type="string" table:style-name="ce118">
            <text:p>null</text:p>
          </table:table-cell>
          <table:table-cell office:value-type="float" office:value="191509.34665226564" table:formula="of:=([.B12]-[.B11])" table:style-name="ce108">
            <text:p>191509</text:p>
          </table:table-cell>
          <table:table-cell office:value-type="float" office:value="0.96701493833570851" table:formula="of:=([.B12]*100/[.B11])-100" table:style-name="ce54">
            <text:p>0.97</text:p>
          </table:table-cell>
          <table:table-cell office:value-type="float" office:value="-1274.4743144282111" table:formula="of:=[.BT12]-([.CA12]/[.BX12])" table:style-name="ce93">
            <text:p>-1274</text:p>
          </table:table-cell>
          <table:table-cell office:value-type="float" office:value="311753.19906863006" table:style-name="ce93">
            <text:p>31175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1" table:style-name="ce66">
            <text:p>1911</text:p>
          </table:table-cell>
          <table:table-cell office:value-type="float" office:value="20105659.595032398" table:style-name="ce109">
            <text:p>201056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527786.1532317963" table:formula="of:=[.BS14]-[.BT14]" table:style-name="ce24">
            <text:p>3527786</text:p>
          </table:table-cell>
          <table:table-cell office:value-type="float" office:value="41830.039198412429" table:formula="of:=[.CD13]/7.5" table:style-name="ce93">
            <text:p>4183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6992285591386125" table:formula="of:=[.B13]/[.BS13]" table:style-name="ce54">
            <text:p>5.70</text:p>
          </table:table-cell>
          <table:table-cell office:value-type="float" office:value="4.7437499999999995" table:formula="of:=2+([.BY13]/1.6)" table:style-name="ce103">
            <text:p>4.74</text:p>
          </table:table-cell>
          <table:table-cell office:value-type="float" office:value="4.3899999999999997" table:style-name="ce103">
            <text:p>4.39</text:p>
          </table:table-cell>
          <table:table-cell office:value-type="string" table:style-name="ce118">
            <text:p>null</text:p>
          </table:table-cell>
          <table:table-cell office:value-type="float" office:value="109973.59503239766" table:formula="of:=([.B13]-[.B12])" table:style-name="ce108">
            <text:p>109974</text:p>
          </table:table-cell>
          <table:table-cell office:value-type="float" office:value="0.54998660727318338" table:formula="of:=([.B13]*100/[.B12])-100" table:style-name="ce54">
            <text:p>0.55</text:p>
          </table:table-cell>
          <table:table-cell office:value-type="float" office:value="18647.199665891181" table:formula="of:=[.BT13]-([.CA13]/[.BX13])" table:style-name="ce93">
            <text:p>18647</text:p>
          </table:table-cell>
          <table:table-cell office:value-type="float" office:value="313725.29398809321" table:style-name="ce93">
            <text:p>3137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2" table:style-name="ce66">
            <text:p>1912</text:p>
          </table:table-cell>
          <table:table-cell office:value-type="float" office:value="20196361.818769388" table:style-name="ce109">
            <text:p>2019636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569904.3724112478" table:formula="of:=[.BS15]-[.BT15]" table:style-name="ce24">
            <text:p>3569904</text:p>
          </table:table-cell>
          <table:table-cell office:value-type="float" office:value="42118.219179451255" table:formula="of:=[.CD14]/7.5" table:style-name="ce93">
            <text:p>4211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6573957484267305" table:formula="of:=[.B14]/[.BS14]" table:style-name="ce54">
            <text:p>5.66</text:p>
          </table:table-cell>
          <table:table-cell office:value-type="float" office:value="4.71875" table:formula="of:=2+([.BY14]/1.6)" table:style-name="ce103">
            <text:p>4.72</text:p>
          </table:table-cell>
          <table:table-cell office:value-type="float" office:value="4.3499999999999996" table:style-name="ce103">
            <text:p>4.35</text:p>
          </table:table-cell>
          <table:table-cell office:value-type="string" table:style-name="ce118">
            <text:p>null</text:p>
          </table:table-cell>
          <table:table-cell office:value-type="float" office:value="90702.223736990243" table:formula="of:=([.B14]-[.B13])" table:style-name="ce108">
            <text:p>90702</text:p>
          </table:table-cell>
          <table:table-cell office:value-type="float" office:value="0.45112781954888703" table:formula="of:=([.B14]*100/[.B13])-100" table:style-name="ce54">
            <text:p>0.45</text:p>
          </table:table-cell>
          <table:table-cell office:value-type="float" office:value="22896.555870950011" table:formula="of:=[.BT14]-([.CA14]/[.BX14])" table:style-name="ce93">
            <text:p>22897</text:p>
          </table:table-cell>
          <table:table-cell office:value-type="float" office:value="315886.64384588442" table:style-name="ce93">
            <text:p>31588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3" table:style-name="ce66">
            <text:p>1913</text:p>
          </table:table-cell>
          <table:table-cell office:value-type="float" office:value="20327376.141945038" table:style-name="ce109">
            <text:p>2032737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612353.7063727952" table:formula="of:=[.BS16]-[.BT16]" table:style-name="ce24">
            <text:p>3612354</text:p>
          </table:table-cell>
          <table:table-cell office:value-type="float" office:value="42449.333961547374" table:formula="of:=[.CD15]/7.5" table:style-name="ce93">
            <text:p>4244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6271832146680856" table:formula="of:=[.B15]/[.BS15]" table:style-name="ce54">
            <text:p>5.63</text:p>
          </table:table-cell>
          <table:table-cell office:value-type="float" office:value="4.6875" table:formula="of:=2+([.BY15]/1.6)" table:style-name="ce103">
            <text:p>4.69</text:p>
          </table:table-cell>
          <table:table-cell office:value-type="float" office:value="4.3" table:style-name="ce103">
            <text:p>4.30</text:p>
          </table:table-cell>
          <table:table-cell office:value-type="string" table:style-name="ce118">
            <text:p>null</text:p>
          </table:table-cell>
          <table:table-cell office:value-type="float" office:value="131014.32317565009" table:formula="of:=([.B15]-[.B14])" table:style-name="ce108">
            <text:p>131014</text:p>
          </table:table-cell>
          <table:table-cell office:value-type="float" office:value="0.64870259481037351" table:formula="of:=([.B15]*100/[.B14])-100" table:style-name="ce54">
            <text:p>0.65</text:p>
          </table:table-cell>
          <table:table-cell office:value-type="float" office:value="14499.611684075357" table:formula="of:=[.BT15]-([.CA15]/[.BX15])" table:style-name="ce93">
            <text:p>14500</text:p>
          </table:table-cell>
          <table:table-cell office:value-type="float" office:value="318370.00471160532" table:style-name="ce93">
            <text:p>31837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4" table:style-name="ce66">
            <text:p>1914</text:p>
          </table:table-cell>
          <table:table-cell office:value-type="float" office:value="20468468.489980351" table:style-name="ce109">
            <text:p>204684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655304.0189064946" table:formula="of:=[.BS17]-[.BT17]" table:style-name="ce24">
            <text:p>3655304</text:p>
          </table:table-cell>
          <table:table-cell office:value-type="float" office:value="42950.312533699485" table:formula="of:=[.CD16]/7.5" table:style-name="ce93">
            <text:p>4295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5996624040327054" table:formula="of:=[.B16]/[.BS16]" table:style-name="ce54">
            <text:p>5.60</text:p>
          </table:table-cell>
          <table:table-cell office:value-type="float" office:value="4.6624999999999996" table:formula="of:=2+([.BY16]/1.6)" table:style-name="ce103">
            <text:p>4.66</text:p>
          </table:table-cell>
          <table:table-cell office:value-type="float" office:value="4.26" table:style-name="ce103">
            <text:p>4.26</text:p>
          </table:table-cell>
          <table:table-cell office:value-type="string" table:style-name="ce118">
            <text:p>null</text:p>
          </table:table-cell>
          <table:table-cell office:value-type="float" office:value="141092.34803531319" table:formula="of:=([.B16]-[.B15])" table:style-name="ce108">
            <text:p>141092</text:p>
          </table:table-cell>
          <table:table-cell office:value-type="float" office:value="0.69410014873574255" table:formula="of:=([.B16]*100/[.B15])-100" table:style-name="ce54">
            <text:p>0.69</text:p>
          </table:table-cell>
          <table:table-cell office:value-type="float" office:value="12689.219121299873" table:formula="of:=[.BT16]-([.CA16]/[.BX16])" table:style-name="ce93">
            <text:p>12689</text:p>
          </table:table-cell>
          <table:table-cell office:value-type="float" office:value="322127.34400274616" table:style-name="ce93">
            <text:p>3221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5" table:style-name="ce66">
            <text:p>1915</text:p>
          </table:table-cell>
          <table:table-cell office:value-type="float" office:value="20589404.788296334" table:style-name="ce109">
            <text:p>2058940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698901.1999319079" table:formula="of:=[.BS18]-[.BT18]" table:style-name="ce24">
            <text:p>3698901</text:p>
          </table:table-cell>
          <table:table-cell office:value-type="float" office:value="43597.181025413141" table:formula="of:=[.CD17]/7.5" table:style-name="ce93">
            <text:p>4359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5663570545424026" table:formula="of:=[.B17]/[.BS17]" table:style-name="ce54">
            <text:p>5.57</text:p>
          </table:table-cell>
          <table:table-cell office:value-type="float" office:value="4.6374999999999993" table:formula="of:=2+([.BY17]/1.6)" table:style-name="ce103">
            <text:p>4.64</text:p>
          </table:table-cell>
          <table:table-cell office:value-type="float" office:value="4.22" table:style-name="ce103">
            <text:p>4.22</text:p>
          </table:table-cell>
          <table:table-cell office:value-type="string" table:style-name="ce118">
            <text:p>null</text:p>
          </table:table-cell>
          <table:table-cell office:value-type="float" office:value="120936.29831598327" table:formula="of:=([.B17]-[.B16])" table:style-name="ce108">
            <text:p>120936</text:p>
          </table:table-cell>
          <table:table-cell office:value-type="float" office:value="0.59084194977843651" table:formula="of:=([.B17]*100/[.B16])-100" table:style-name="ce54">
            <text:p>0.59</text:p>
          </table:table-cell>
          <table:table-cell office:value-type="float" office:value="17519.273032748282" table:formula="of:=[.BT17]-([.CA17]/[.BX17])" table:style-name="ce93">
            <text:p>17519</text:p>
          </table:table-cell>
          <table:table-cell office:value-type="float" office:value="326978.85769059858" table:style-name="ce93">
            <text:p>32697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6" table:style-name="ce66">
            <text:p>1916</text:p>
          </table:table-cell>
          <table:table-cell office:value-type="float" office:value="20770809.235770311" table:style-name="ce109">
            <text:p>2077080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743062.3358582244" table:formula="of:=[.BS19]-[.BT19]" table:style-name="ce24">
            <text:p>3743062</text:p>
          </table:table-cell>
          <table:table-cell office:value-type="float" office:value="44161.135926316325" table:formula="of:=[.CD18]/7.5" table:style-name="ce93">
            <text:p>4416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5491486307314988" table:formula="of:=[.B18]/[.BS18]" table:style-name="ce54">
            <text:p>5.55</text:p>
          </table:table-cell>
          <table:table-cell office:value-type="float" office:value="4.625" table:formula="of:=2+([.BY18]/1.6)" table:style-name="ce103">
            <text:p>4.63</text:p>
          </table:table-cell>
          <table:table-cell office:value-type="float" office:value="4.2" table:style-name="ce103">
            <text:p>4.20</text:p>
          </table:table-cell>
          <table:table-cell office:value-type="string" table:style-name="ce118">
            <text:p>null</text:p>
          </table:table-cell>
          <table:table-cell office:value-type="float" office:value="181404.44747397676" table:formula="of:=([.B18]-[.B17])" table:style-name="ce108">
            <text:p>181404</text:p>
          </table:table-cell>
          <table:table-cell office:value-type="float" office:value="0.88105726872247203" table:formula="of:=([.B18]*100/[.B17])-100" table:style-name="ce54">
            <text:p>0.88</text:p>
          </table:table-cell>
          <table:table-cell office:value-type="float" office:value="4938.552688699725" table:formula="of:=[.BT18]-([.CA18]/[.BX18])" table:style-name="ce93">
            <text:p>4939</text:p>
          </table:table-cell>
          <table:table-cell office:value-type="float" office:value="331208.51944737241" table:style-name="ce93">
            <text:p>33120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7" table:style-name="ce66">
            <text:p>1917</text:p>
          </table:table-cell>
          <table:table-cell office:value-type="float" office:value="20901823.558945961" table:style-name="ce109">
            <text:p>2090182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787650.690978074" table:formula="of:=[.BS20]-[.BT20]" table:style-name="ce24">
            <text:p>3787651</text:p>
          </table:table-cell>
          <table:table-cell office:value-type="float" office:value="44588.355119849533" table:formula="of:=[.CD19]/7.5" table:style-name="ce93">
            <text:p>4458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518413725091567" table:formula="of:=[.B19]/[.BS19]" table:style-name="ce54">
            <text:p>5.52</text:p>
          </table:table-cell>
          <table:table-cell office:value-type="float" office:value="4.6187500000000004" table:formula="of:=2+([.BY19]/1.6)" table:style-name="ce103">
            <text:p>4.62</text:p>
          </table:table-cell>
          <table:table-cell office:value-type="float" office:value="4.1900000000000004" table:style-name="ce103">
            <text:p>4.19</text:p>
          </table:table-cell>
          <table:table-cell office:value-type="string" table:style-name="ce118">
            <text:p>null</text:p>
          </table:table-cell>
          <table:table-cell office:value-type="float" office:value="131014.32317565009" table:formula="of:=([.B19]-[.B18])" table:style-name="ce108">
            <text:p>131014</text:p>
          </table:table-cell>
          <table:table-cell office:value-type="float" office:value="0.63076176613294876" table:formula="of:=([.B19]*100/[.B18])-100" table:style-name="ce54">
            <text:p>0.63</text:p>
          </table:table-cell>
          <table:table-cell office:value-type="float" office:value="16222.60179359241" table:formula="of:=[.BT19]-([.CA19]/[.BX19])" table:style-name="ce93">
            <text:p>16223</text:p>
          </table:table-cell>
          <table:table-cell office:value-type="float" office:value="334412.66339887149" table:style-name="ce93">
            <text:p>33441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8" table:style-name="ce66">
            <text:p>1918</text:p>
          </table:table-cell>
          <table:table-cell office:value-type="float" office:value="21073149.981560271" table:style-name="ce109">
            <text:p>2107315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832400.9735530661" table:formula="of:=[.BS21]-[.BT21]" table:style-name="ce24">
            <text:p>3832401</text:p>
          </table:table-cell>
          <table:table-cell office:value-type="float" office:value="44750.282574992161" table:formula="of:=[.CD20]/7.5" table:style-name="ce93">
            <text:p>4475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4986808862077643" table:formula="of:=[.B20]/[.BS20]" table:style-name="ce54">
            <text:p>5.50</text:p>
          </table:table-cell>
          <table:table-cell office:value-type="float" office:value="4.6062499999999993" table:formula="of:=2+([.BY20]/1.6)" table:style-name="ce103">
            <text:p>4.61</text:p>
          </table:table-cell>
          <table:table-cell office:value-type="float" office:value="4.17" table:style-name="ce103">
            <text:p>4.17</text:p>
          </table:table-cell>
          <table:table-cell office:value-type="string" table:style-name="ce118">
            <text:p>null</text:p>
          </table:table-cell>
          <table:table-cell office:value-type="float" office:value="171326.42261430994" table:formula="of:=([.B20]-[.B19])" table:style-name="ce108">
            <text:p>171326</text:p>
          </table:table-cell>
          <table:table-cell office:value-type="float" office:value="0.81967213114752724" table:formula="of:=([.B20]*100/[.B19])-100" table:style-name="ce54">
            <text:p>0.82</text:p>
          </table:table-cell>
          <table:table-cell office:value-type="float" office:value="7555.9438798909468" table:formula="of:=[.BT20]-([.CA20]/[.BX20])" table:style-name="ce93">
            <text:p>7556</text:p>
          </table:table-cell>
          <table:table-cell office:value-type="float" office:value="335627.11931244121" table:style-name="ce93">
            <text:p>3356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19" table:style-name="ce66">
            <text:p>1919</text:p>
          </table:table-cell>
          <table:table-cell office:value-type="float" office:value="21193852.205297299" table:style-name="ce109">
            <text:p>211938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877313.3911091327" table:formula="of:=[.BS22]-[.BT22]" table:style-name="ce24">
            <text:p>3877313</text:p>
          </table:table-cell>
          <table:table-cell office:value-type="float" office:value="44912.417556066379" table:formula="of:=[.CD21]/7.5" table:style-name="ce93">
            <text:p>4491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4661179191488181" table:formula="of:=[.B21]/[.BS21]" table:style-name="ce54">
            <text:p>5.47</text:p>
          </table:table-cell>
          <table:table-cell office:value-type="float" office:value="4.5999999999999996" table:formula="of:=2+([.BY21]/1.6)" table:style-name="ce103">
            <text:p>4.60</text:p>
          </table:table-cell>
          <table:table-cell office:value-type="float" office:value="4.16" table:style-name="ce103">
            <text:p>4.16</text:p>
          </table:table-cell>
          <table:table-cell office:value-type="string" table:style-name="ce118">
            <text:p>null</text:p>
          </table:table-cell>
          <table:table-cell office:value-type="float" office:value="120702.2237370275" table:formula="of:=([.B21]-[.B20])" table:style-name="ce108">
            <text:p>120702</text:p>
          </table:table-cell>
          <table:table-cell office:value-type="float" office:value="0.5727773201569164" table:formula="of:=([.B21]*100/[.B20])-100" table:style-name="ce54">
            <text:p>0.57</text:p>
          </table:table-cell>
          <table:table-cell office:value-type="float" office:value="18672.803700190834" table:formula="of:=[.BT21]-([.CA21]/[.BX21])" table:style-name="ce93">
            <text:p>18673</text:p>
          </table:table-cell>
          <table:table-cell office:value-type="float" office:value="336843.13167049782" table:style-name="ce93">
            <text:p>33684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0" table:style-name="ce66">
            <text:p>1920</text:p>
          </table:table-cell>
          <table:table-cell office:value-type="float" office:value="21389842" table:style-name="ce110">
            <text:p>2138984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922564.6151692877" table:formula="of:=[.BS23]-[.BT23]" table:style-name="ce24">
            <text:p>3922565</text:p>
          </table:table-cell>
          <table:table-cell office:value-type="float" office:value="45251.224060154949" table:formula="of:=[.CD22]/7.5" table:style-name="ce93">
            <text:p>4525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4530247678474177" table:formula="of:=[.B22]/[.BS22]" table:style-name="ce54">
            <text:p>5.45</text:p>
          </table:table-cell>
          <table:table-cell office:value-type="float" office:value="4.5874999999999995" table:formula="of:=2+([.BY22]/1.6)" table:style-name="ce103">
            <text:p>4.59</text:p>
          </table:table-cell>
          <table:table-cell office:value-type="float" office:value="4.1399999999999997" table:style-name="ce103">
            <text:p>4.14</text:p>
          </table:table-cell>
          <table:table-cell office:value-type="string" table:style-name="ce118">
            <text:p>null</text:p>
          </table:table-cell>
          <table:table-cell office:value-type="float" office:value="195989.79470270127" table:formula="of:=([.B22]-[.B21])" table:style-name="ce108">
            <text:p>195990</text:p>
          </table:table-cell>
          <table:table-cell office:value-type="float" office:value="0.92474833175307936" table:formula="of:=([.B22]*100/[.B21])-100" table:style-name="ce54">
            <text:p>0.92</text:p>
          </table:table-cell>
          <table:table-cell office:value-type="float" office:value="2528.6530077949938" table:formula="of:=[.BT22]-([.CA22]/[.BX22])" table:style-name="ce93">
            <text:p>2529</text:p>
          </table:table-cell>
          <table:table-cell office:value-type="float" office:value="339384.1804511621" table:style-name="ce93">
            <text:p>33938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1" table:style-name="ce66">
            <text:p>1921</text:p>
          </table:table-cell>
          <table:table-cell office:value-type="float" office:value="21632650.60583153" table:style-name="ce109">
            <text:p>2163265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972771.567954964" table:formula="of:=[.BS24]-[.BT24]" table:style-name="ce24">
            <text:p>3972772</text:p>
          </table:table-cell>
          <table:table-cell office:value-type="float" office:value="50206.952785676294" table:formula="of:=[.CD23]/7" table:style-name="ce93">
            <text:p>502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4452289128134339" table:formula="of:=[.B23]/[.BS23]" table:style-name="ce54">
            <text:p>5.45</text:p>
          </table:table-cell>
          <table:table-cell office:value-type="float" office:value="4.5687499999999996" table:formula="of:=2+([.BY23]/1.6)" table:style-name="ce103">
            <text:p>4.57</text:p>
          </table:table-cell>
          <table:table-cell office:value-type="float" office:value="4.1100000000000003" table:style-name="ce103">
            <text:p>4.11</text:p>
          </table:table-cell>
          <table:table-cell office:value-type="string" table:style-name="ce118">
            <text:p>null</text:p>
          </table:table-cell>
          <table:table-cell office:value-type="float" office:value="242808.60583152995" table:formula="of:=([.B23]-[.B22])" table:style-name="ce108">
            <text:p>242809</text:p>
          </table:table-cell>
          <table:table-cell office:value-type="float" office:value="1.1351584823839573" table:formula="of:=([.B23]*100/[.B22])-100" table:style-name="ce54">
            <text:p>1.14</text:p>
          </table:table-cell>
          <table:table-cell office:value-type="float" office:value="-2938.5696945491436" table:formula="of:=[.BT23]-([.CA23]/[.BX23])" table:style-name="ce93">
            <text:p>-2939</text:p>
          </table:table-cell>
          <table:table-cell office:value-type="float" office:value="351448.66949973407" table:style-name="ce93">
            <text:p>35144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2" table:style-name="ce66">
            <text:p>1922</text:p>
          </table:table-cell>
          <table:table-cell office:value-type="float" office:value="21876742.573175184" table:style-name="ce109">
            <text:p>2187674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024783.4849369857" table:formula="of:=[.BS25]-[.BT25]" table:style-name="ce24">
            <text:p>4024783</text:p>
          </table:table-cell>
          <table:table-cell office:value-type="float" office:value="52011.916982021685" table:formula="of:=[.CD24]/7" table:style-name="ce93">
            <text:p>5201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4355079360294329" table:formula="of:=[.B24]/[.BS24]" table:style-name="ce54">
            <text:p>5.44</text:p>
          </table:table-cell>
          <table:table-cell office:value-type="float" office:value="4.5612499999999994" table:formula="of:=2+([.BY24]/1.6)" table:style-name="ce103">
            <text:p>4.56</text:p>
          </table:table-cell>
          <table:table-cell office:value-type="float" office:value="4.0979999999999999" table:style-name="ce129">
            <text:p>4.10</text:p>
          </table:table-cell>
          <table:table-cell office:value-type="string" table:style-name="ce118">
            <text:p>null</text:p>
          </table:table-cell>
          <table:table-cell office:value-type="float" office:value="244091.96734365448" table:formula="of:=([.B24]-[.B23])" table:style-name="ce108">
            <text:p>244092</text:p>
          </table:table-cell>
          <table:table-cell office:value-type="float" office:value="1.1283497884343916" table:formula="of:=([.B24]*100/[.B23])-100" table:style-name="ce54">
            <text:p>1.13</text:p>
          </table:table-cell>
          <table:table-cell office:value-type="float" office:value="-1502.3537428135096" table:formula="of:=[.BT24]-([.CA24]/[.BX24])" table:style-name="ce93">
            <text:p>-1502</text:p>
          </table:table-cell>
          <table:table-cell office:value-type="float" office:value="364083.41887415177" table:style-name="ce93">
            <text:p>36408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3" table:style-name="ce66">
            <text:p>1923</text:p>
          </table:table-cell>
          <table:table-cell office:value-type="float" office:value="22110664.041879524" table:style-name="ce109">
            <text:p>2211066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078551.5818380094" table:formula="of:=[.BS26]-[.BT26]" table:style-name="ce24">
            <text:p>4078552</text:p>
          </table:table-cell>
          <table:table-cell office:value-type="float" office:value="53768.096901023826" table:formula="of:=[.CD25]/7" table:style-name="ce93">
            <text:p>537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4212049543125547" table:formula="of:=[.B25]/[.BS25]" table:style-name="ce54">
            <text:p>5.42</text:p>
          </table:table-cell>
          <table:table-cell office:value-type="float" office:value="4.5600000000000005" table:formula="of:=2+([.BY25]/1.6)" table:style-name="ce103">
            <text:p>4.56</text:p>
          </table:table-cell>
          <table:table-cell office:value-type="float" office:value="4.0960000000000001" table:style-name="ce129">
            <text:p>4.10</text:p>
          </table:table-cell>
          <table:table-cell office:value-type="string" table:style-name="ce118">
            <text:p>null</text:p>
          </table:table-cell>
          <table:table-cell office:value-type="float" office:value="233921.46870433912" table:formula="of:=([.B25]-[.B24])" table:style-name="ce108">
            <text:p>233921</text:p>
          </table:table-cell>
          <table:table-cell office:value-type="float" office:value="1.0692701069270214" table:formula="of:=([.B25]*100/[.B24])-100" table:style-name="ce54">
            <text:p>1.07</text:p>
          </table:table-cell>
          <table:table-cell office:value-type="float" office:value="2469.5292027038522" table:formula="of:=[.BT25]-([.CA25]/[.BX25])" table:style-name="ce93">
            <text:p>2470</text:p>
          </table:table-cell>
          <table:table-cell office:value-type="float" office:value="376376.67830716679" table:style-name="ce93">
            <text:p>37637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4" table:style-name="ce66">
            <text:p>1924</text:p>
          </table:table-cell>
          <table:table-cell office:value-type="float" office:value="22364926.507862497" table:style-name="ce109">
            <text:p>223649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134098.705124659" table:formula="of:=[.BS27]-[.BT27]" table:style-name="ce24">
            <text:p>4134099</text:p>
          </table:table-cell>
          <table:table-cell office:value-type="float" office:value="55547.123286649599" table:formula="of:=[.CD26]/7" table:style-name="ce93">
            <text:p>555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4098675680236594" table:formula="of:=[.B26]/[.BS26]" table:style-name="ce54">
            <text:p>5.41</text:p>
          </table:table-cell>
          <table:table-cell office:value-type="float" office:value="4.5031249999999998" table:formula="of:=2+([.BY26]/1.6)" table:style-name="ce103">
            <text:p>4.50</text:p>
          </table:table-cell>
          <table:table-cell office:value-type="float" office:value="4.0049999999999999" table:style-name="ce129">
            <text:p>4.01</text:p>
          </table:table-cell>
          <table:table-cell office:value-type="string" table:style-name="ce118">
            <text:p>null</text:p>
          </table:table-cell>
          <table:table-cell office:value-type="float" office:value="254262.46598297358" table:formula="of:=([.B26]-[.B25])" table:style-name="ce108">
            <text:p>254262</text:p>
          </table:table-cell>
          <table:table-cell office:value-type="float" office:value="1.1499540018399159" table:formula="of:=([.B26]*100/[.B25])-100" table:style-name="ce54">
            <text:p>1.15</text:p>
          </table:table-cell>
          <table:table-cell office:value-type="float" office:value="-916.43612664085958" table:formula="of:=[.BT26]-([.CA26]/[.BX26])" table:style-name="ce93">
            <text:p>-916</text:p>
          </table:table-cell>
          <table:table-cell office:value-type="float" office:value="388829.86300654721" table:style-name="ce93">
            <text:p>38883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5" table:style-name="ce66">
            <text:p>1925</text:p>
          </table:table-cell>
          <table:table-cell office:value-type="float" office:value="22537824.984730918" table:style-name="ce109">
            <text:p>225378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191552.4502069224" table:formula="of:=[.BS28]-[.BT28]" table:style-name="ce24">
            <text:p>4191552</text:p>
          </table:table-cell>
          <table:table-cell office:value-type="float" office:value="57453.745082263311" table:formula="of:=[.CD27]/7" table:style-name="ce93">
            <text:p>5745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3769636077483183" table:formula="of:=[.B27]/[.BS27]" table:style-name="ce54">
            <text:p>5.38</text:p>
          </table:table-cell>
          <table:table-cell office:value-type="float" office:value="4.4281249999999996" table:formula="of:=2+([.BY27]/1.6)" table:style-name="ce103">
            <text:p>4.43</text:p>
          </table:table-cell>
          <table:table-cell office:value-type="float" office:value="3.8849999999999998" table:style-name="ce129">
            <text:p>3.89</text:p>
          </table:table-cell>
          <table:table-cell office:value-type="string" table:style-name="ce118">
            <text:p>null</text:p>
          </table:table-cell>
          <table:table-cell office:value-type="float" office:value="172898.47686842084" table:formula="of:=([.B27]-[.B26])" table:style-name="ce108">
            <text:p>172898</text:p>
          </table:table-cell>
          <table:table-cell office:value-type="float" office:value="0.77307867212367398" table:formula="of:=([.B27]*100/[.B26])-100" table:style-name="ce54">
            <text:p>0.77</text:p>
          </table:table-cell>
          <table:table-cell office:value-type="float" office:value="18408.217490241666" table:formula="of:=[.BT27]-([.CA27]/[.BX27])" table:style-name="ce93">
            <text:p>18408</text:p>
          </table:table-cell>
          <table:table-cell office:value-type="float" office:value="402176.21557584318" table:style-name="ce93">
            <text:p>40217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6" table:style-name="ce66">
            <text:p>1926</text:p>
          </table:table-cell>
          <table:table-cell office:value-type="float" office:value="22781916.952074572" table:style-name="ce109">
            <text:p>2278191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251092.6449255804" table:formula="of:=[.BS29]-[.BT29]" table:style-name="ce24">
            <text:p>4251093</text:p>
          </table:table-cell>
          <table:table-cell office:value-type="float" office:value="59540.194718657978" table:formula="of:=[.CD28]/7" table:style-name="ce93">
            <text:p>5954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3590732677324171" table:formula="of:=[.B28]/[.BS28]" table:style-name="ce54">
            <text:p>5.36</text:p>
          </table:table-cell>
          <table:table-cell office:value-type="float" office:value="4.4574999999999996" table:formula="of:=2+([.BY28]/1.6)" table:style-name="ce103">
            <text:p>4.46</text:p>
          </table:table-cell>
          <table:table-cell office:value-type="float" office:value="3.9319999999999999" table:style-name="ce129">
            <text:p>3.93</text:p>
          </table:table-cell>
          <table:table-cell office:value-type="string" table:style-name="ce118">
            <text:p>null</text:p>
          </table:table-cell>
          <table:table-cell office:value-type="float" office:value="244091.96734365448" table:formula="of:=([.B28]-[.B27])" table:style-name="ce108">
            <text:p>244092</text:p>
          </table:table-cell>
          <table:table-cell office:value-type="float" office:value="1.0830324909747162" table:formula="of:=([.B28]*100/[.B27])-100" table:style-name="ce54">
            <text:p>1.08</text:p>
          </table:table-cell>
          <table:table-cell office:value-type="float" office:value="4780.3590835139476" table:formula="of:=[.BT28]-([.CA28]/[.BX28])" table:style-name="ce93">
            <text:p>4780</text:p>
          </table:table-cell>
          <table:table-cell office:value-type="float" office:value="416781.36303060583" table:style-name="ce93">
            <text:p>41678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7" table:style-name="ce66">
            <text:p>1927</text:p>
          </table:table-cell>
          <table:table-cell office:value-type="float" office:value="22995497.42350027" table:style-name="ce109">
            <text:p>2299549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312829.8539466923" table:formula="of:=[.BS30]-[.BT30]" table:style-name="ce24">
            <text:p>4312830</text:p>
          </table:table-cell>
          <table:table-cell office:value-type="float" office:value="61737.209021112118" table:formula="of:=[.CD29]/7" table:style-name="ce93">
            <text:p>617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331881433360274" table:formula="of:=[.B29]/[.BS29]" table:style-name="ce54">
            <text:p>5.33</text:p>
          </table:table-cell>
          <table:table-cell office:value-type="float" office:value="4.3318750000000001" table:formula="of:=2+([.BY29]/1.6)" table:style-name="ce103">
            <text:p>4.33</text:p>
          </table:table-cell>
          <table:table-cell office:value-type="float" office:value="3.7309999999999999" table:style-name="ce129">
            <text:p>3.73</text:p>
          </table:table-cell>
          <table:table-cell office:value-type="string" table:style-name="ce118">
            <text:p>null</text:p>
          </table:table-cell>
          <table:table-cell office:value-type="float" office:value="213580.47142569721" table:formula="of:=([.B29]-[.B28])" table:style-name="ce108">
            <text:p>213580</text:p>
          </table:table-cell>
          <table:table-cell office:value-type="float" office:value="0.9375" table:formula="of:=([.B29]*100/[.B28])-100" table:style-name="ce54">
            <text:p>0.94</text:p>
          </table:table-cell>
          <table:table-cell office:value-type="float" office:value="12432.815097996332" table:formula="of:=[.BT29]-([.CA29]/[.BX29])" table:style-name="ce93">
            <text:p>12433</text:p>
          </table:table-cell>
          <table:table-cell office:value-type="float" office:value="432160.46314778482" table:style-name="ce93">
            <text:p>4321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8" table:style-name="ce66">
            <text:p>1928</text:p>
          </table:table-cell>
          <table:table-cell office:value-type="float" office:value="23249759.889483243" table:style-name="ce109">
            <text:p>232497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376831.4842804968" table:formula="of:=[.BS31]-[.BT31]" table:style-name="ce24">
            <text:p>4376831</text:p>
          </table:table-cell>
          <table:table-cell office:value-type="float" office:value="64001.630333804816" table:formula="of:=[.CD30]/7" table:style-name="ce93">
            <text:p>6400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3120070930273089" table:formula="of:=[.B30]/[.BS30]" table:style-name="ce54">
            <text:p>5.31</text:p>
          </table:table-cell>
          <table:table-cell office:value-type="float" office:value="4.4012500000000001" table:formula="of:=2+([.BY30]/1.6)" table:style-name="ce103">
            <text:p>4.40</text:p>
          </table:table-cell>
          <table:table-cell office:value-type="float" office:value="3.8420000000000001" table:style-name="ce129">
            <text:p>3.84</text:p>
          </table:table-cell>
          <table:table-cell office:value-type="string" table:style-name="ce118">
            <text:p>null</text:p>
          </table:table-cell>
          <table:table-cell office:value-type="float" office:value="254262.46598297358" table:formula="of:=([.B30]-[.B29])" table:style-name="ce108">
            <text:p>254262</text:p>
          </table:table-cell>
          <table:table-cell office:value-type="float" office:value="1.10570544007075" table:formula="of:=([.B30]*100/[.B29])-100" table:style-name="ce54">
            <text:p>1.11</text:p>
          </table:table-cell>
          <table:table-cell office:value-type="float" office:value="6231.1183240408718" table:formula="of:=[.BT30]-([.CA30]/[.BX30])" table:style-name="ce93">
            <text:p>6231</text:p>
          </table:table-cell>
          <table:table-cell office:value-type="float" office:value="448011.41233663372" table:style-name="ce93">
            <text:p>4480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29" table:style-name="ce66">
            <text:p>1929</text:p>
          </table:table-cell>
          <table:table-cell office:value-type="float" office:value="23514192.85410554" table:style-name="ce109">
            <text:p>2351419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443167.9829502832" table:formula="of:=[.BS32]-[.BT32]" table:style-name="ce24">
            <text:p>4443168</text:p>
          </table:table-cell>
          <table:table-cell office:value-type="float" office:value="66336.498669786743" table:formula="of:=[.CD31]/7" table:style-name="ce93">
            <text:p>6633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2922133361458039" table:formula="of:=[.B31]/[.BS31]" table:style-name="ce54">
            <text:p>5.29</text:p>
          </table:table-cell>
          <table:table-cell office:value-type="float" office:value="4.3231250000000001" table:formula="of:=2+([.BY31]/1.6)" table:style-name="ce103">
            <text:p>4.32</text:p>
          </table:table-cell>
          <table:table-cell office:value-type="float" office:value="3.7170000000000001" table:style-name="ce129">
            <text:p>3.72</text:p>
          </table:table-cell>
          <table:table-cell office:value-type="string" table:style-name="ce118">
            <text:p>null</text:p>
          </table:table-cell>
          <table:table-cell office:value-type="float" office:value="264432.96462229639" table:formula="of:=([.B31]-[.B30])" table:style-name="ce108">
            <text:p>264433</text:p>
          </table:table-cell>
          <table:table-cell office:value-type="float" office:value="1.1373578302712275" table:formula="of:=([.B31]*100/[.B30])-100" table:style-name="ce54">
            <text:p>1.14</text:p>
          </table:table-cell>
          <table:table-cell office:value-type="float" office:value="5169.4112914906291" table:formula="of:=[.BT31]-([.CA31]/[.BX31])" table:style-name="ce93">
            <text:p>5169</text:p>
          </table:table-cell>
          <table:table-cell office:value-type="float" office:value="464355.49068850715" table:style-name="ce93">
            <text:p>46435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8.616444439242969" table:formula="of:=100-((([.CC31]-MIN([.CC2:.CC31]))/(MAX([.CC2:.CC31])-MIN([.CC2:.CC31])))*100)" table:style-name="ce128">
            <text:p>68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0" table:style-name="ce66">
            <text:p>1930</text:p>
          </table:table-cell>
          <table:table-cell office:value-type="float" office:value="23677794" table:style-name="ce110">
            <text:p>2367779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512077.8905666023" table:formula="of:=[.BS33]-[.BT33]" table:style-name="ce24">
            <text:p>4512078</text:p>
          </table:table-cell>
          <table:table-cell office:value-type="float" office:value="68909.907616319135" table:formula="of:=[.CD32]/7" table:style-name="ce93">
            <text:p>6891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2476474418810781" table:formula="of:=[.B32]/[.BS32]" table:style-name="ce54">
            <text:p>5.25</text:p>
          </table:table-cell>
          <table:table-cell office:value-type="float" office:value="4.3093749999999993" table:formula="of:=2+([.BY32]/1.6)" table:style-name="ce103">
            <text:p>4.31</text:p>
          </table:table-cell>
          <table:table-cell office:value-type="float" office:value="3.6949999999999998" table:style-name="ce129">
            <text:p>3.70</text:p>
          </table:table-cell>
          <table:table-cell office:value-type="string" table:style-name="ce118">
            <text:p>null</text:p>
          </table:table-cell>
          <table:table-cell office:value-type="float" office:value="163601.14589446038" table:formula="of:=([.B32]-[.B31])" table:style-name="ce108">
            <text:p>163601</text:p>
          </table:table-cell>
          <table:table-cell office:value-type="float" office:value="0.6957548868869452" table:formula="of:=([.B32]*100/[.B31])-100" table:style-name="ce54">
            <text:p>0.70</text:p>
          </table:table-cell>
          <table:table-cell office:value-type="float" office:value="30945.89986706074" table:formula="of:=[.BT32]-([.CA32]/[.BX32])" table:style-name="ce93">
            <text:p>30946</text:p>
          </table:table-cell>
          <table:table-cell office:value-type="float" office:value="482369.35331423394" table:style-name="ce93">
            <text:p>48236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32]-MIN([.CC3:.CC32]))/(MAX([.CC3:.CC32])-MIN([.CC3:.CC32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1" table:style-name="ce66">
            <text:p>1931</text:p>
          </table:table-cell>
          <table:table-cell office:value-type="float" office:value="23937584.333333332" table:style-name="ce109">
            <text:p>2393758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588265.716544996" table:formula="of:=[.BS34]-[.BT34]" table:style-name="ce24">
            <text:p>4588266</text:p>
          </table:table-cell>
          <table:table-cell office:value-type="float" office:value="76187.82597839323" table:formula="of:=[.CD33]/6.6" table:style-name="ce93">
            <text:p>7618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2171312238992433" table:formula="of:=[.B33]/[.BS33]" table:style-name="ce54">
            <text:p>5.22</text:p>
          </table:table-cell>
          <table:table-cell office:value-type="float" office:value="4.2275" table:formula="of:=2+([.BY33]/1.6)" table:style-name="ce103">
            <text:p>4.23</text:p>
          </table:table-cell>
          <table:table-cell office:value-type="float" office:value="3.5640000000000001" table:style-name="ce129">
            <text:p>3.56</text:p>
          </table:table-cell>
          <table:table-cell office:value-type="string" table:style-name="ce118">
            <text:p>null</text:p>
          </table:table-cell>
          <table:table-cell office:value-type="float" office:value="259790.33333333209" table:formula="of:=([.B33]-[.B32])" table:style-name="ce108">
            <text:p>259790</text:p>
          </table:table-cell>
          <table:table-cell office:value-type="float" office:value="1.0971897691707682" table:formula="of:=([.B33]*100/[.B32])-100" table:style-name="ce54">
            <text:p>1.10</text:p>
          </table:table-cell>
          <table:table-cell office:value-type="float" office:value="14735.352097060982" table:formula="of:=[.BT33]-([.CA33]/[.BX33])" table:style-name="ce93">
            <text:p>14735</text:p>
          </table:table-cell>
          <table:table-cell office:value-type="float" office:value="502839.65145739529" table:style-name="ce93">
            <text:p>50284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7.840641980613555" table:formula="of:=100-((([.CC33]-MIN([.CC4:.CC33]))/(MAX([.CC4:.CC33])-MIN([.CC4:.CC33])))*100)" table:style-name="ce128">
            <text:p>47.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2" table:style-name="ce66">
            <text:p>1932</text:p>
          </table:table-cell>
          <table:table-cell office:value-type="float" office:value="24102963.507096738" table:style-name="ce109">
            <text:p>2410296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667790.2356015621" table:formula="of:=[.BS35]-[.BT35]" table:style-name="ce24">
            <text:p>4667790</text:p>
          </table:table-cell>
          <table:table-cell office:value-type="float" office:value="79524.519056565812" table:formula="of:=[.CD34]/6.6" table:style-name="ce93">
            <text:p>795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1636775198811957" table:formula="of:=[.B34]/[.BS34]" table:style-name="ce54">
            <text:p>5.16</text:p>
          </table:table-cell>
          <table:table-cell office:value-type="float" office:value="4.2662499999999994" table:formula="of:=2+([.BY34]/1.6)" table:style-name="ce103">
            <text:p>4.27</text:p>
          </table:table-cell>
          <table:table-cell office:value-type="float" office:value="3.6259999999999999" table:style-name="ce129">
            <text:p>3.63</text:p>
          </table:table-cell>
          <table:table-cell office:value-type="string" table:style-name="ce118">
            <text:p>null</text:p>
          </table:table-cell>
          <table:table-cell office:value-type="float" office:value="165379.17376340553" table:formula="of:=([.B34]-[.B33])" table:style-name="ce108">
            <text:p>165379</text:p>
          </table:table-cell>
          <table:table-cell office:value-type="float" office:value="0.69087662088406887" table:formula="of:=([.B34]*100/[.B33])-100" table:style-name="ce54">
            <text:p>0.69</text:p>
          </table:table-cell>
          <table:table-cell office:value-type="float" office:value="40759.989607188596" table:formula="of:=[.BT34]-([.CA34]/[.BX34])" table:style-name="ce93">
            <text:p>40760</text:p>
          </table:table-cell>
          <table:table-cell office:value-type="float" office:value="524861.82577333436" table:style-name="ce93">
            <text:p>52486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34]-MIN([.CC5:.CC34]))/(MAX([.CC5:.CC34])-MIN([.CC5:.CC34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3" table:style-name="ce66">
            <text:p>1933</text:p>
          </table:table-cell>
          <table:table-cell office:value-type="float" office:value="24336236.368888892" table:style-name="ce109">
            <text:p>2433623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750777.0585460477" table:formula="of:=[.BS36]-[.BT36]" table:style-name="ce24">
            <text:p>4750777</text:p>
          </table:table-cell>
          <table:table-cell office:value-type="float" office:value="82986.822944485335" table:formula="of:=[.CD35]/6.6" table:style-name="ce93">
            <text:p>8298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1225801735131054" table:formula="of:=[.B35]/[.BS35]" table:style-name="ce54">
            <text:p>5.12</text:p>
          </table:table-cell>
          <table:table-cell office:value-type="float" office:value="4.2312499999999993" table:formula="of:=2+([.BY35]/1.6)" table:style-name="ce103">
            <text:p>4.23</text:p>
          </table:table-cell>
          <table:table-cell office:value-type="float" office:value="3.57" table:style-name="ce129">
            <text:p>3.57</text:p>
          </table:table-cell>
          <table:table-cell office:value-type="string" table:style-name="ce118">
            <text:p>null</text:p>
          </table:table-cell>
          <table:table-cell office:value-type="float" office:value="233272.86179215461" table:formula="of:=([.B35]-[.B34])" table:style-name="ce108">
            <text:p>233273</text:p>
          </table:table-cell>
          <table:table-cell office:value-type="float" office:value="0.96781817606566278" table:formula="of:=([.B35]*100/[.B34])-100" table:style-name="ce54">
            <text:p>0.97</text:p>
          </table:table-cell>
          <table:table-cell office:value-type="float" office:value="27855.865947816586" table:formula="of:=[.BT35]-([.CA35]/[.BX35])" table:style-name="ce93">
            <text:p>27856</text:p>
          </table:table-cell>
          <table:table-cell office:value-type="float" office:value="547713.03143360314" table:style-name="ce93">
            <text:p>54771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9.529860630574291" table:formula="of:=100-((([.CC35]-MIN([.CC6:.CC35]))/(MAX([.CC6:.CC35])-MIN([.CC6:.CC35])))*100)" table:style-name="ce128">
            <text:p>29.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4" table:style-name="ce66">
            <text:p>1934</text:p>
          </table:table-cell>
          <table:table-cell office:value-type="float" office:value="24526811.25743686" table:style-name="ce109">
            <text:p>245268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837255.7774139093" table:formula="of:=[.BS37]-[.BT37]" table:style-name="ce24">
            <text:p>4837256</text:p>
          </table:table-cell>
          <table:table-cell office:value-type="float" office:value="86478.718867861346" table:formula="of:=[.CD36]/6.6" table:style-name="ce93">
            <text:p>8647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0703978425034553" table:formula="of:=[.B36]/[.BS36]" table:style-name="ce54">
            <text:p>5.07</text:p>
          </table:table-cell>
          <table:table-cell office:value-type="float" office:value="4.1018749999999997" table:formula="of:=2+([.BY36]/1.6)" table:style-name="ce103">
            <text:p>4.10</text:p>
          </table:table-cell>
          <table:table-cell office:value-type="float" office:value="3.363" table:style-name="ce129">
            <text:p>3.36</text:p>
          </table:table-cell>
          <table:table-cell office:value-type="string" table:style-name="ce118">
            <text:p>null</text:p>
          </table:table-cell>
          <table:table-cell office:value-type="float" office:value="190574.88854796812" table:formula="of:=([.B36]-[.B35])" table:style-name="ce108">
            <text:p>190575</text:p>
          </table:table-cell>
          <table:table-cell office:value-type="float" office:value="0.78309104850575295" table:formula="of:=([.B36]*100/[.B35])-100" table:style-name="ce54">
            <text:p>0.78</text:p>
          </table:table-cell>
          <table:table-cell office:value-type="float" office:value="40018.285883441262" table:formula="of:=[.BT36]-([.CA36]/[.BX36])" table:style-name="ce93">
            <text:p>40018</text:p>
          </table:table-cell>
          <table:table-cell office:value-type="float" office:value="570759.54452788481" table:style-name="ce93">
            <text:p>5707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.6973184828037091" table:formula="of:=100-((([.CC36]-MIN([.CC7:.CC36]))/(MAX([.CC7:.CC36])-MIN([.CC7:.CC36])))*100)" table:style-name="ce128">
            <text:p>1.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5" table:style-name="ce66">
            <text:p>1935</text:p>
          </table:table-cell>
          <table:table-cell office:value-type="float" office:value="24698768.005191326" table:style-name="ce109">
            <text:p>246987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927280.6804523673" table:formula="of:=[.BS38]-[.BT38]" table:style-name="ce24">
            <text:p>4927281</text:p>
          </table:table-cell>
          <table:table-cell office:value-type="float" office:value="90024.903038458331" table:formula="of:=[.CD37]/6.6" table:style-name="ce93">
            <text:p>900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0126570023049233" table:formula="of:=[.B37]/[.BS37]" table:style-name="ce54">
            <text:p>5.01</text:p>
          </table:table-cell>
          <table:table-cell office:value-type="float" office:value="4.05375" table:formula="of:=2+([.BY37]/1.6)" table:style-name="ce103">
            <text:p>4.05</text:p>
          </table:table-cell>
          <table:table-cell office:value-type="float" office:value="3.286" table:style-name="ce129">
            <text:p>3.29</text:p>
          </table:table-cell>
          <table:table-cell office:value-type="string" table:style-name="ce118">
            <text:p>null</text:p>
          </table:table-cell>
          <table:table-cell office:value-type="float" office:value="171956.74775446579" table:formula="of:=([.B37]-[.B36])" table:style-name="ce108">
            <text:p>171957</text:p>
          </table:table-cell>
          <table:table-cell office:value-type="float" office:value="0.70109704009047391" table:formula="of:=([.B37]*100/[.B36])-100" table:style-name="ce54">
            <text:p>0.70</text:p>
          </table:table-cell>
          <table:table-cell office:value-type="float" office:value="47605.723820582098" table:formula="of:=[.BT37]-([.CA37]/[.BX37])" table:style-name="ce93">
            <text:p>47606</text:p>
          </table:table-cell>
          <table:table-cell office:value-type="float" office:value="594164.36005382496" table:style-name="ce93">
            <text:p>59416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37]-MIN([.CC8:.CC37]))/(MAX([.CC8:.CC37])-MIN([.CC8:.CC37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6" table:style-name="ce66">
            <text:p>1936</text:p>
          </table:table-cell>
          <table:table-cell office:value-type="float" office:value="24892371.789872933" table:style-name="ce109">
            <text:p>2489237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015478.9677994009" table:formula="of:=[.BS39]-[.BT39]" table:style-name="ce24">
            <text:p>5015479</text:p>
          </table:table-cell>
          <table:table-cell office:value-type="float" office:value="88198.287347033445" table:formula="of:=[.CD38]/6.6" table:style-name="ce93">
            <text:p>8819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9631095952526243" table:formula="of:=[.B38]/[.BS38]" table:style-name="ce54">
            <text:p>4.96</text:p>
          </table:table-cell>
          <table:table-cell office:value-type="float" office:value="3.9637500000000001" table:formula="of:=2+([.BY38]/1.6)" table:style-name="ce103">
            <text:p>3.96</text:p>
          </table:table-cell>
          <table:table-cell office:value-type="float" office:value="3.1419999999999999" table:style-name="ce129">
            <text:p>3.14</text:p>
          </table:table-cell>
          <table:table-cell office:value-type="string" table:style-name="ce118">
            <text:p>null</text:p>
          </table:table-cell>
          <table:table-cell office:value-type="float" office:value="193603.78468160704" table:formula="of:=([.B38]-[.B37])" table:style-name="ce108">
            <text:p>193604</text:p>
          </table:table-cell>
          <table:table-cell office:value-type="float" office:value="0.78386008824777775" table:formula="of:=([.B38]*100/[.B37])-100" table:style-name="ce54">
            <text:p>0.78</text:p>
          </table:table-cell>
          <table:table-cell office:value-type="float" office:value="39354.696131238547" table:formula="of:=[.BT38]-([.CA38]/[.BX38])" table:style-name="ce93">
            <text:p>39355</text:p>
          </table:table-cell>
          <table:table-cell office:value-type="float" office:value="582108.69649042073" table:style-name="ce93">
            <text:p>58210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.324350615116373" table:formula="of:=100-((([.CC38]-MIN([.CC9:.CC38]))/(MAX([.CC9:.CC38])-MIN([.CC9:.CC38])))*100)" table:style-name="ce128">
            <text:p>16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7" table:style-name="ce66">
            <text:p>1937</text:p>
          </table:table-cell>
          <table:table-cell office:value-type="float" office:value="25029740.327585317" table:style-name="ce109">
            <text:p>2502974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101346.3927180152" table:formula="of:=[.BS40]-[.BT40]" table:style-name="ce24">
            <text:p>5101346</text:p>
          </table:table-cell>
          <table:table-cell office:value-type="float" office:value="85867.424918614619" table:formula="of:=[.CD39]/6.6" table:style-name="ce93">
            <text:p>858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906496912915844" table:formula="of:=[.B39]/[.BS39]" table:style-name="ce54">
            <text:p>4.91</text:p>
          </table:table-cell>
          <table:table-cell office:value-type="float" office:value="3.7874999999999996" table:formula="of:=2+([.BY39]/1.6)" table:style-name="ce103">
            <text:p>3.79</text:p>
          </table:table-cell>
          <table:table-cell office:value-type="float" office:value="2.86" table:style-name="ce129">
            <text:p>2.86</text:p>
          </table:table-cell>
          <table:table-cell office:value-type="string" table:style-name="ce118">
            <text:p>null</text:p>
          </table:table-cell>
          <table:table-cell office:value-type="float" office:value="137368.53771238402" table:formula="of:=([.B39]-[.B38])" table:style-name="ce108">
            <text:p>137369</text:p>
          </table:table-cell>
          <table:table-cell office:value-type="float" office:value="0.55184993568298069" table:formula="of:=([.B39]*100/[.B38])-100" table:style-name="ce54">
            <text:p>0.55</text:p>
          </table:table-cell>
          <table:table-cell office:value-type="float" office:value="49598.504070460418" table:formula="of:=[.BT39]-([.CA39]/[.BX39])" table:style-name="ce93">
            <text:p>49599</text:p>
          </table:table-cell>
          <table:table-cell office:value-type="float" office:value="566725.00446285645" table:style-name="ce93">
            <text:p>5667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39]-MIN([.CC10:.CC39]))/(MAX([.CC10:.CC39])-MIN([.CC10:.CC39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8" table:style-name="ce66">
            <text:p>1938</text:p>
          </table:table-cell>
          <table:table-cell office:value-type="float" office:value="25126743.201125175" table:style-name="ce109">
            <text:p>2512674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184631.8823053045" table:formula="of:=[.BS41]-[.BT41]" table:style-name="ce24">
            <text:p>5184632</text:p>
          </table:table-cell>
          <table:table-cell office:value-type="float" office:value="83285.489587288932" table:formula="of:=[.CD40]/6.6" table:style-name="ce93">
            <text:p>8328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8463890535566376" table:formula="of:=[.B40]/[.BS40]" table:style-name="ce54">
            <text:p>4.85</text:p>
          </table:table-cell>
          <table:table-cell office:value-type="float" office:value="3.59375" table:formula="of:=2+([.BY40]/1.6)" table:style-name="ce103">
            <text:p>3.59</text:p>
          </table:table-cell>
          <table:table-cell office:value-type="float" office:value="2.5499999999999998" table:style-name="ce129">
            <text:p>2.55</text:p>
          </table:table-cell>
          <table:table-cell office:value-type="string" table:style-name="ce118">
            <text:p>null</text:p>
          </table:table-cell>
          <table:table-cell office:value-type="float" office:value="97002.873539857566" table:formula="of:=([.B40]-[.B39])" table:style-name="ce108">
            <text:p>97003</text:p>
          </table:table-cell>
          <table:table-cell office:value-type="float" office:value="0.38755045905510599" table:formula="of:=([.B40]*100/[.B39])-100" table:style-name="ce54">
            <text:p>0.39</text:p>
          </table:table-cell>
          <table:table-cell office:value-type="float" office:value="56293.385645763352" table:formula="of:=[.BT40]-([.CA40]/[.BX40])" table:style-name="ce93">
            <text:p>56293</text:p>
          </table:table-cell>
          <table:table-cell office:value-type="float" office:value="549684.2312761069" table:style-name="ce93">
            <text:p>54968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40]-MIN([.CC11:.CC40]))/(MAX([.CC11:.CC40])-MIN([.CC11:.CC40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39" table:style-name="ce66">
            <text:p>1939</text:p>
          </table:table-cell>
          <table:table-cell office:value-type="float" office:value="25222013.936542656" table:style-name="ce109">
            <text:p>2522201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264581.6707897549" table:formula="of:=[.BS42]-[.BT42]" table:style-name="ce24">
            <text:p>5264582</text:p>
          </table:table-cell>
          <table:table-cell office:value-type="float" office:value="79949.788484450168" table:formula="of:=[.CD41]/6.6" table:style-name="ce93">
            <text:p>7995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790886629508595" table:formula="of:=[.B41]/[.BS41]" table:style-name="ce54">
            <text:p>4.79</text:p>
          </table:table-cell>
          <table:table-cell office:value-type="float" office:value="3.3250000000000002" table:formula="of:=2+([.BY41]/1.6)" table:style-name="ce103">
            <text:p>3.33</text:p>
          </table:table-cell>
          <table:table-cell office:value-type="float" office:value="2.12" table:style-name="ce129">
            <text:p>2.12</text:p>
          </table:table-cell>
          <table:table-cell office:value-type="string" table:style-name="ce118">
            <text:p>null</text:p>
          </table:table-cell>
          <table:table-cell office:value-type="float" office:value="95270.735417481512" table:formula="of:=([.B41]-[.B40])" table:style-name="ce108">
            <text:p>95271</text:p>
          </table:table-cell>
          <table:table-cell office:value-type="float" office:value="0.37916070003538493" table:formula="of:=([.B41]*100/[.B40])-100" table:style-name="ce54">
            <text:p>0.38</text:p>
          </table:table-cell>
          <table:table-cell office:value-type="float" office:value="51296.93572731287" table:formula="of:=[.BT41]-([.CA41]/[.BX41])" table:style-name="ce93">
            <text:p>51297</text:p>
          </table:table-cell>
          <table:table-cell office:value-type="float" office:value="527668.60399737104" table:style-name="ce93">
            <text:p>52766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.4353958766746331" table:formula="of:=100-((([.CC41]-MIN([.CC12:.CC41]))/(MAX([.CC12:.CC41])-MIN([.CC12:.CC41])))*100)" table:style-name="ce128">
            <text:p>8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0" table:style-name="ce66">
            <text:p>1940</text:p>
          </table:table-cell>
          <table:table-cell office:value-type="float" office:value="25415907" table:style-name="ce110">
            <text:p>2541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341217.8023233507" table:formula="of:=[.BS43]-[.BT43]" table:style-name="ce24">
            <text:p>5341218</text:p>
          </table:table-cell>
          <table:table-cell office:value-type="float" office:value="76636.131533595762" table:formula="of:=[.CD42]/6.6" table:style-name="ce93">
            <text:p>7663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7584479683536696" table:formula="of:=[.B42]/[.BS42]" table:style-name="ce54">
            <text:p>4.76</text:p>
          </table:table-cell>
          <table:table-cell office:value-type="float" office:value="3.9187499999999997" table:formula="of:=2+([.BY42]/1.6)" table:style-name="ce103">
            <text:p>3.92</text:p>
          </table:table-cell>
          <table:table-cell office:value-type="float" office:value="3.07" table:style-name="ce129">
            <text:p>3.07</text:p>
          </table:table-cell>
          <table:table-cell office:value-type="string" table:style-name="ce118">
            <text:p>null</text:p>
          </table:table-cell>
          <table:table-cell office:value-type="float" office:value="193893.06345734373" table:formula="of:=([.B42]-[.B41])" table:style-name="ce108">
            <text:p>193893</text:p>
          </table:table-cell>
          <table:table-cell office:value-type="float" office:value="0.7687453664293713" table:formula="of:=([.B42]*100/[.B41])-100" table:style-name="ce54">
            <text:p>0.77</text:p>
          </table:table-cell>
          <table:table-cell office:value-type="float" office:value="27157.837828372481" table:formula="of:=[.BT42]-([.CA42]/[.BX42])" table:style-name="ce93">
            <text:p>27158</text:p>
          </table:table-cell>
          <table:table-cell office:value-type="float" office:value="505798.468121732" table:style-name="ce93">
            <text:p>50579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9.188900906605049" table:formula="of:=100-((([.CC42]-MIN([.CC13:.CC42]))/(MAX([.CC13:.CC42])-MIN([.CC13:.CC42])))*100)" table:style-name="ce128">
            <text:p>49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1" table:style-name="ce66">
            <text:p>1941</text:p>
          </table:table-cell>
          <table:table-cell office:value-type="float" office:value="25615907" table:style-name="ce109">
            <text:p>2561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420166.5949499486" table:formula="of:=[.BS44]-[.BT44]" table:style-name="ce24">
            <text:p>5420167</text:p>
          </table:table-cell>
          <table:table-cell office:value-type="float" office:value="78948.792626597555" table:formula="of:=[.CD43]/6.6" table:style-name="ce93">
            <text:p>7894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72603683876926" table:formula="of:=[.B43]/[.BS43]" table:style-name="ce54">
            <text:p>4.73</text:p>
          </table:table-cell>
          <table:table-cell office:value-type="float" office:value="3.5343749999999998" table:formula="of:=2+([.BY43]/1.6)" table:style-name="ce103">
            <text:p>3.53</text:p>
          </table:table-cell>
          <table:table-cell office:value-type="float" office:value="2.4550000000000001" table:style-name="ce129">
            <text:p>2.46</text:p>
          </table:table-cell>
          <table:table-cell office:value-type="string" table:style-name="ce118">
            <text:p>null</text:p>
          </table:table-cell>
          <table:table-cell office:value-type="float" office:value="200000" table:formula="of:=([.B43]-[.B42])" table:style-name="ce108">
            <text:p>200000</text:p>
          </table:table-cell>
          <table:table-cell office:value-type="float" office:value="0.78690876544362709" table:formula="of:=([.B43]*100/[.B42])-100" table:style-name="ce54">
            <text:p>0.79</text:p>
          </table:table-cell>
          <table:table-cell office:value-type="float" office:value="22361.701556747859" table:formula="of:=[.BT43]-([.CA43]/[.BX43])" table:style-name="ce93">
            <text:p>22362</text:p>
          </table:table-cell>
          <table:table-cell office:value-type="float" office:value="521062.03133554384" table:style-name="ce93">
            <text:p>52106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7.286111684248304" table:formula="of:=100-((([.CC43]-MIN([.CC14:.CC43]))/(MAX([.CC14:.CC43])-MIN([.CC14:.CC43])))*100)" table:style-name="ce128">
            <text:p>57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2" table:style-name="ce66">
            <text:p>1942</text:p>
          </table:table-cell>
          <table:table-cell office:value-type="float" office:value="25865907" table:style-name="ce109">
            <text:p>2586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501603.7623223308" table:formula="of:=[.BS45]-[.BT45]" table:style-name="ce24">
            <text:p>5501604</text:p>
          </table:table-cell>
          <table:table-cell office:value-type="float" office:value="81437.167372382275" table:formula="of:=[.CD44]/6.6" table:style-name="ce93">
            <text:p>814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7015212504292592" table:formula="of:=[.B44]/[.BS44]" table:style-name="ce54">
            <text:p>4.70</text:p>
          </table:table-cell>
          <table:table-cell office:value-type="float" office:value="3.5762499999999999" table:formula="of:=2+([.BY44]/1.6)" table:style-name="ce103">
            <text:p>3.58</text:p>
          </table:table-cell>
          <table:table-cell office:value-type="float" office:value="2.5219999999999998" table:style-name="ce129">
            <text:p>2.52</text:p>
          </table:table-cell>
          <table:table-cell office:value-type="string" table:style-name="ce118">
            <text:p>null</text:p>
          </table:table-cell>
          <table:table-cell office:value-type="float" office:value="250000" table:formula="of:=([.B44]-[.B43])" table:style-name="ce108">
            <text:p>250000</text:p>
          </table:table-cell>
          <table:table-cell office:value-type="float" office:value="0.97595607291984265" table:formula="of:=([.B44]*100/[.B43])-100" table:style-name="ce54">
            <text:p>0.98</text:p>
          </table:table-cell>
          <table:table-cell office:value-type="float" office:value="11531.539969376332" table:formula="of:=[.BT44]-([.CA44]/[.BX44])" table:style-name="ce93">
            <text:p>11532</text:p>
          </table:table-cell>
          <table:table-cell office:value-type="float" office:value="537485.30465772294" table:style-name="ce93">
            <text:p>53748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5.570433930825672" table:formula="of:=100-((([.CC44]-MIN([.CC15:.CC44]))/(MAX([.CC15:.CC44])-MIN([.CC15:.CC44])))*100)" table:style-name="ce128">
            <text:p>75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3" table:style-name="ce66">
            <text:p>1943</text:p>
          </table:table-cell>
          <table:table-cell office:value-type="float" office:value="26045907" table:style-name="ce109">
            <text:p>2604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586226.995415193" table:formula="of:=[.BS46]-[.BT46]" table:style-name="ce24">
            <text:p>5586227</text:p>
          </table:table-cell>
          <table:table-cell office:value-type="float" office:value="84623.233092862021" table:formula="of:=[.CD45]/6.6" table:style-name="ce93">
            <text:p>8462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6625221319106371" table:formula="of:=[.B45]/[.BS45]" table:style-name="ce54">
            <text:p>4.66</text:p>
          </table:table-cell>
          <table:table-cell office:value-type="float" office:value="3.7893749999999997" table:formula="of:=2+([.BY45]/1.6)" table:style-name="ce103">
            <text:p>3.79</text:p>
          </table:table-cell>
          <table:table-cell office:value-type="float" office:value="2.863" table:style-name="ce129">
            <text:p>2.86</text:p>
          </table:table-cell>
          <table:table-cell office:value-type="string" table:style-name="ce118">
            <text:p>null</text:p>
          </table:table-cell>
          <table:table-cell office:value-type="float" office:value="180000" table:formula="of:=([.B45]-[.B44])" table:style-name="ce108">
            <text:p>180000</text:p>
          </table:table-cell>
          <table:table-cell office:value-type="float" office:value="0.69589672614225151" table:formula="of:=([.B45]*100/[.B44])-100" table:style-name="ce54">
            <text:p>0.70</text:p>
          </table:table-cell>
          <table:table-cell office:value-type="float" office:value="37121.996081481513" table:formula="of:=[.BT45]-([.CA45]/[.BX45])" table:style-name="ce93">
            <text:p>37122</text:p>
          </table:table-cell>
          <table:table-cell office:value-type="float" office:value="558513.33841288928" table:style-name="ce93">
            <text:p>55851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.366632933412617" table:formula="of:=100-((([.CC45]-MIN([.CC16:.CC45]))/(MAX([.CC16:.CC45])-MIN([.CC16:.CC45])))*100)" table:style-name="ce128">
            <text:p>32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4" table:style-name="ce66">
            <text:p>1944</text:p>
          </table:table-cell>
          <table:table-cell office:value-type="float" office:value="26275907" table:style-name="ce109">
            <text:p>2627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674429.2737231757" table:formula="of:=[.BS47]-[.BT47]" table:style-name="ce24">
            <text:p>5674429</text:p>
          </table:table-cell>
          <table:table-cell office:value-type="float" office:value="88202.278307982793" table:formula="of:=[.CD46]/6.6" table:style-name="ce93">
            <text:p>8820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6305814615889167" table:formula="of:=[.B46]/[.BS46]" table:style-name="ce54">
            <text:p>4.63</text:p>
          </table:table-cell>
          <table:table-cell office:value-type="float" office:value="3.7637499999999999" table:formula="of:=2+([.BY46]/1.6)" table:style-name="ce103">
            <text:p>3.76</text:p>
          </table:table-cell>
          <table:table-cell office:value-type="float" office:value="2.8220000000000001" table:style-name="ce129">
            <text:p>2.82</text:p>
          </table:table-cell>
          <table:table-cell office:value-type="string" table:style-name="ce118">
            <text:p>null</text:p>
          </table:table-cell>
          <table:table-cell office:value-type="float" office:value="230000" table:formula="of:=([.B46]-[.B45])" table:style-name="ce108">
            <text:p>230000</text:p>
          </table:table-cell>
          <table:table-cell office:value-type="float" office:value="0.88305621301650206" table:formula="of:=([.B46]*100/[.B45])-100" table:style-name="ce54">
            <text:p>0.88</text:p>
          </table:table-cell>
          <table:table-cell office:value-type="float" office:value="27093.012283406242" table:formula="of:=[.BT46]-([.CA46]/[.BX46])" table:style-name="ce93">
            <text:p>27093</text:p>
          </table:table-cell>
          <table:table-cell office:value-type="float" office:value="582135.0368326864" table:style-name="ce93">
            <text:p>58213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9.298344440241223" table:formula="of:=100-((([.CC46]-MIN([.CC17:.CC46]))/(MAX([.CC17:.CC46])-MIN([.CC17:.CC46])))*100)" table:style-name="ce128">
            <text:p>49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5" table:style-name="ce66">
            <text:p>1945</text:p>
          </table:table-cell>
          <table:table-cell office:value-type="float" office:value="26515907" table:style-name="ce109">
            <text:p>2651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766398.5190788088" table:formula="of:=[.BS48]-[.BT48]" table:style-name="ce24">
            <text:p>5766399</text:p>
          </table:table-cell>
          <table:table-cell office:value-type="float" office:value="91969.245355633291" table:formula="of:=[.CD47]/6.6" table:style-name="ce93">
            <text:p>9196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5983479831074803" table:formula="of:=[.B47]/[.BS47]" table:style-name="ce54">
            <text:p>4.60</text:p>
          </table:table-cell>
          <table:table-cell office:value-type="float" office:value="3.805625" table:formula="of:=2+([.BY47]/1.6)" table:style-name="ce103">
            <text:p>3.81</text:p>
          </table:table-cell>
          <table:table-cell office:value-type="float" office:value="2.8889999999999998" table:style-name="ce129">
            <text:p>2.89</text:p>
          </table:table-cell>
          <table:table-cell office:value-type="string" table:style-name="ce118">
            <text:p>null</text:p>
          </table:table-cell>
          <table:table-cell office:value-type="float" office:value="240000" table:formula="of:=([.B47]-[.B46])" table:style-name="ce108">
            <text:p>240000</text:p>
          </table:table-cell>
          <table:table-cell office:value-type="float" office:value="0.91338426490852953" table:formula="of:=([.B47]*100/[.B46])-100" table:style-name="ce54">
            <text:p>0.91</text:p>
          </table:table-cell>
          <table:table-cell office:value-type="float" office:value="28904.702737797852" table:formula="of:=[.BT47]-([.CA47]/[.BX47])" table:style-name="ce93">
            <text:p>28905</text:p>
          </table:table-cell>
          <table:table-cell office:value-type="float" office:value="606997.01934717968" table:style-name="ce93">
            <text:p>60699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6.239707520384897" table:formula="of:=100-((([.CC47]-MIN([.CC18:.CC47]))/(MAX([.CC18:.CC47])-MIN([.CC18:.CC47])))*100)" table:style-name="ce128">
            <text:p>46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6" table:style-name="ce66">
            <text:p>1946</text:p>
          </table:table-cell>
          <table:table-cell office:value-type="float" office:value="26795907" table:style-name="ce109">
            <text:p>2679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862316.6266097231" table:formula="of:=[.BS49]-[.BT49]" table:style-name="ce24">
            <text:p>5862317</text:p>
          </table:table-cell>
          <table:table-cell office:value-type="float" office:value="95918.107530914247" table:formula="of:=[.CD48]/6.6" table:style-name="ce93">
            <text:p>9591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5708733776627355" table:formula="of:=[.B48]/[.BS48]" table:style-name="ce54">
            <text:p>4.57</text:p>
          </table:table-cell>
          <table:table-cell office:value-type="float" office:value="3.67875" table:formula="of:=2+([.BY48]/1.6)" table:style-name="ce103">
            <text:p>3.68</text:p>
          </table:table-cell>
          <table:table-cell office:value-type="float" office:value="2.6859999999999999" table:style-name="ce129">
            <text:p>2.69</text:p>
          </table:table-cell>
          <table:table-cell office:value-type="string" table:style-name="ce118">
            <text:p>null</text:p>
          </table:table-cell>
          <table:table-cell office:value-type="float" office:value="280000" table:formula="of:=([.B48]-[.B47])" table:style-name="ce108">
            <text:p>280000</text:p>
          </table:table-cell>
          <table:table-cell office:value-type="float" office:value="1.0559699127018405" table:formula="of:=([.B48]*100/[.B47])-100" table:style-name="ce54">
            <text:p>1.06</text:p>
          </table:table-cell>
          <table:table-cell office:value-type="float" office:value="19805.297473150058" table:formula="of:=[.BT48]-([.CA48]/[.BX48])" table:style-name="ce93">
            <text:p>19805</text:p>
          </table:table-cell>
          <table:table-cell office:value-type="float" office:value="633059.50970403396" table:style-name="ce93">
            <text:p>6330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1.60203215135121" table:formula="of:=100-((([.CC48]-MIN([.CC19:.CC48]))/(MAX([.CC19:.CC48])-MIN([.CC19:.CC48])))*100)" table:style-name="ce128">
            <text:p>61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7" table:style-name="ce66">
            <text:p>1947</text:p>
          </table:table-cell>
          <table:table-cell office:value-type="float" office:value="27025907" table:style-name="ce109">
            <text:p>2702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962405.7965527633" table:formula="of:=[.BS50]-[.BT50]" table:style-name="ce24">
            <text:p>5962406</text:p>
          </table:table-cell>
          <table:table-cell office:value-type="float" office:value="100089.16994303996" table:formula="of:=[.CD49]/6.6" table:style-name="ce93">
            <text:p>10008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5327184901814892" table:formula="of:=[.B49]/[.BS49]" table:style-name="ce54">
            <text:p>4.53</text:p>
          </table:table-cell>
          <table:table-cell office:value-type="float" office:value="3.6637499999999998" table:formula="of:=2+([.BY49]/1.6)" table:style-name="ce103">
            <text:p>3.66</text:p>
          </table:table-cell>
          <table:table-cell office:value-type="float" office:value="2.6619999999999999" table:style-name="ce129">
            <text:p>2.66</text:p>
          </table:table-cell>
          <table:table-cell office:value-type="string" table:style-name="ce118">
            <text:p>null</text:p>
          </table:table-cell>
          <table:table-cell office:value-type="float" office:value="230000" table:formula="of:=([.B49]-[.B48])" table:style-name="ce108">
            <text:p>230000</text:p>
          </table:table-cell>
          <table:table-cell office:value-type="float" office:value="0.8583400442463045" table:formula="of:=([.B49]*100/[.B48])-100" table:style-name="ce54">
            <text:p>0.86</text:p>
          </table:table-cell>
          <table:table-cell office:value-type="float" office:value="37311.960799402972" table:formula="of:=[.BT49]-([.CA49]/[.BX49])" table:style-name="ce93">
            <text:p>37312</text:p>
          </table:table-cell>
          <table:table-cell office:value-type="float" office:value="660588.52162406372" table:style-name="ce93">
            <text:p>66058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.045919702133943" table:formula="of:=100-((([.CC49]-MIN([.CC20:.CC49]))/(MAX([.CC20:.CC49])-MIN([.CC20:.CC49])))*100)" table:style-name="ce128">
            <text:p>32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8" table:style-name="ce66">
            <text:p>1948</text:p>
          </table:table-cell>
          <table:table-cell office:value-type="float" office:value="27295907" table:style-name="ce109">
            <text:p>2729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067338.1292866357" table:formula="of:=[.BS51]-[.BT51]" table:style-name="ce24">
            <text:p>6067338</text:p>
          </table:table-cell>
          <table:table-cell office:value-type="float" office:value="104932.33273387208" table:formula="of:=[.CD50]/6.6" table:style-name="ce93">
            <text:p>10493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4988273965224517" table:formula="of:=[.B50]/[.BS50]" table:style-name="ce54">
            <text:p>4.50</text:p>
          </table:table-cell>
          <table:table-cell office:value-type="float" office:value="3.796875" table:formula="of:=2+([.BY50]/1.6)" table:style-name="ce103">
            <text:p>3.80</text:p>
          </table:table-cell>
          <table:table-cell office:value-type="float" office:value="2.875" table:style-name="ce129">
            <text:p>2.88</text:p>
          </table:table-cell>
          <table:table-cell office:value-type="string" table:style-name="ce118">
            <text:p>null</text:p>
          </table:table-cell>
          <table:table-cell office:value-type="float" office:value="270000" table:formula="of:=([.B50]-[.B49])" table:style-name="ce108">
            <text:p>270000</text:p>
          </table:table-cell>
          <table:table-cell office:value-type="float" office:value="0.99904140127470953" table:formula="of:=([.B50]*100/[.B49])-100" table:style-name="ce54">
            <text:p>1.00</text:p>
          </table:table-cell>
          <table:table-cell office:value-type="float" office:value="33821.221622760975" table:formula="of:=[.BT50]-([.CA50]/[.BX50])" table:style-name="ce93">
            <text:p>33821</text:p>
          </table:table-cell>
          <table:table-cell office:value-type="float" office:value="692553.39604355569" table:style-name="ce93">
            <text:p>69255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7.939257439485743" table:formula="of:=100-((([.CC50]-MIN([.CC21:.CC50]))/(MAX([.CC21:.CC50])-MIN([.CC21:.CC50])))*100)" table:style-name="ce128">
            <text:p>37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49" table:style-name="ce66">
            <text:p>1949</text:p>
          </table:table-cell>
          <table:table-cell office:value-type="float" office:value="27675907" table:style-name="ce109">
            <text:p>276759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177522.9037470398" table:formula="of:=[.BS52]-[.BT52]" table:style-name="ce24">
            <text:p>6177523</text:p>
          </table:table-cell>
          <table:table-cell office:value-type="float" office:value="110184.77446040392" table:formula="of:=[.CD51]/6.6" table:style-name="ce93">
            <text:p>11018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480097837146487" table:formula="of:=[.B51]/[.BS51]" table:style-name="ce54">
            <text:p>4.48</text:p>
          </table:table-cell>
          <table:table-cell office:value-type="float" office:value="3.6656249999999999" table:formula="of:=2+([.BY51]/1.6)" table:style-name="ce103">
            <text:p>3.67</text:p>
          </table:table-cell>
          <table:table-cell office:value-type="float" office:value="2.665" table:style-name="ce129">
            <text:p>2.67</text:p>
          </table:table-cell>
          <table:table-cell office:value-type="string" table:style-name="ce118">
            <text:p>null</text:p>
          </table:table-cell>
          <table:table-cell office:value-type="float" office:value="380000" table:formula="of:=([.B51]-[.B50])" table:style-name="ce108">
            <text:p>380000</text:p>
          </table:table-cell>
          <table:table-cell office:value-type="float" office:value="1.3921501124692384" table:formula="of:=([.B51]*100/[.B50])-100" table:style-name="ce54">
            <text:p>1.39</text:p>
          </table:table-cell>
          <table:table-cell office:value-type="float" office:value="6518.9603086562565" table:formula="of:=[.BT51]-([.CA51]/[.BX51])" table:style-name="ce93">
            <text:p>6519</text:p>
          </table:table-cell>
          <table:table-cell office:value-type="float" office:value="727219.5114386658" table:style-name="ce93">
            <text:p>72722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4.03306129458683" table:formula="of:=100-((([.CC51]-MIN([.CC22:.CC51]))/(MAX([.CC22:.CC51])-MIN([.CC22:.CC51])))*100)" table:style-name="ce128">
            <text:p>84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0" table:style-name="ce66">
            <text:p>1950</text:p>
          </table:table-cell>
          <table:table-cell office:value-type="float" office:value="27976755" table:style-name="ce110">
            <text:p>2797675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287490" table:style-name="ce26">
            <text:p>6287490</text:p>
          </table:table-cell>
          <table:table-cell office:value-type="float" office:value="109967.0962529604" table:formula="of:=[.CD52]/6.9" table:style-name="ce93">
            <text:p>1099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449590377082111" table:formula="of:=[.B52]/[.BS52]" table:style-name="ce54">
            <text:p>4.45</text:p>
          </table:table-cell>
          <table:table-cell office:value-type="float" office:value="3.5456249999999998" table:formula="of:=2+([.BY52]/1.6)" table:style-name="ce103">
            <text:p>3.55</text:p>
          </table:table-cell>
          <table:table-cell office:value-type="float" office:value="2.4729999999999999" table:style-name="ce129">
            <text:p>2.47</text:p>
          </table:table-cell>
          <table:table-cell office:value-type="string" table:style-name="ce118">
            <text:p>null</text:p>
          </table:table-cell>
          <table:table-cell office:value-type="float" office:value="300848" table:formula="of:=([.B52]-[.B51])" table:style-name="ce108">
            <text:p>300848</text:p>
          </table:table-cell>
          <table:table-cell office:value-type="float" office:value="1.0870393515919829" table:formula="of:=([.B52]*100/[.B51])-100" table:style-name="ce54">
            <text:p>1.09</text:p>
          </table:table-cell>
          <table:table-cell office:value-type="float" office:value="25116.611500624771" table:formula="of:=[.BT52]-([.CA52]/[.BX52])" table:style-name="ce93">
            <text:p>25117</text:p>
          </table:table-cell>
          <table:table-cell office:value-type="float" office:value="758772.96414542675" table:style-name="ce93">
            <text:p>75877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2.635058164152952" table:formula="of:=100-((([.CC52]-MIN([.CC23:.CC52]))/(MAX([.CC23:.CC52])-MIN([.CC23:.CC52])))*100)" table:style-name="ce128">
            <text:p>52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1" table:style-name="ce66">
            <text:p>1951</text:p>
          </table:table-cell>
          <table:table-cell office:value-type="float" office:value="28208795.882523399" table:style-name="ce109">
            <text:p>2820879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396042.1601492334" table:formula="of:=[.BS54]-[.BT54]" table:style-name="ce24">
            <text:p>6396042</text:p>
          </table:table-cell>
          <table:table-cell office:value-type="float" office:value="108552.56376054278" table:formula="of:=[.CD53]/7.0342" table:style-name="ce93">
            <text:p>10855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41035177320739" table:formula="of:=[.B53]/[.BS53]" table:style-name="ce54">
            <text:p>4.41</text:p>
          </table:table-cell>
          <table:table-cell office:value-type="float" office:value="3.5343749999999998" table:formula="of:=2+([.BY53]/1.6)" table:style-name="ce103">
            <text:p>3.53</text:p>
          </table:table-cell>
          <table:table-cell office:value-type="float" office:value="2.4550000000000001" table:style-name="ce129">
            <text:p>2.46</text:p>
          </table:table-cell>
          <table:table-cell office:value-type="string" table:style-name="ce118">
            <text:p>null</text:p>
          </table:table-cell>
          <table:table-cell office:value-type="float" office:value="232040.88252339885" table:formula="of:=([.B53]-[.B52])" table:style-name="ce108">
            <text:p>232041</text:p>
          </table:table-cell>
          <table:table-cell office:value-type="float" office:value="0.82940599266568427" table:formula="of:=([.B53]*100/[.B52])-100" table:style-name="ce54">
            <text:p>0.83</text:p>
          </table:table-cell>
          <table:table-cell office:value-type="float" office:value="42899.971004143459" table:formula="of:=[.BT53]-([.CA53]/[.BX53])" table:style-name="ce93">
            <text:p>42900</text:p>
          </table:table-cell>
          <table:table-cell office:value-type="float" office:value="763580.44400441006" table:style-name="ce93">
            <text:p>76358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.173705853250254" table:formula="of:=100-((([.CC53]-MIN([.CC24:.CC53]))/(MAX([.CC24:.CC53])-MIN([.CC24:.CC53])))*100)" table:style-name="ce128">
            <text:p>23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2" table:style-name="ce66">
            <text:p>1952</text:p>
          </table:table-cell>
          <table:table-cell office:value-type="float" office:value="28477792.387856804" table:style-name="ce109">
            <text:p>2847779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507419.9970963895" table:formula="of:=[.BS55]-[.BT55]" table:style-name="ce24">
            <text:p>6507420</text:p>
          </table:table-cell>
          <table:table-cell office:value-type="float" office:value="111377.83694715572" table:formula="of:=[.CD54]/6.9" table:style-name="ce93">
            <text:p>11137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3762032265573136" table:formula="of:=[.B54]/[.BS54]" table:style-name="ce54">
            <text:p>4.38</text:p>
          </table:table-cell>
          <table:table-cell office:value-type="float" office:value="3.5906250000000002" table:formula="of:=2+([.BY54]/1.6)" table:style-name="ce103">
            <text:p>3.59</text:p>
          </table:table-cell>
          <table:table-cell office:value-type="float" office:value="2.5449999999999999" table:style-name="ce129">
            <text:p>2.55</text:p>
          </table:table-cell>
          <table:table-cell office:value-type="string" table:style-name="ce118">
            <text:p>null</text:p>
          </table:table-cell>
          <table:table-cell office:value-type="float" office:value="268996.50533340499" table:formula="of:=([.B54]-[.B53])" table:style-name="ce108">
            <text:p>268997</text:p>
          </table:table-cell>
          <table:table-cell office:value-type="float" office:value="0.95359088155925065" table:formula="of:=([.B54]*100/[.B53])-100" table:style-name="ce54">
            <text:p>0.95</text:p>
          </table:table-cell>
          <table:table-cell office:value-type="float" office:value="36461.49081426661" table:formula="of:=[.BT54]-([.CA54]/[.BX54])" table:style-name="ce93">
            <text:p>36461</text:p>
          </table:table-cell>
          <table:table-cell office:value-type="float" office:value="768507.07493537455" table:style-name="ce93">
            <text:p>7685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4.665192474105694" table:formula="of:=100-((([.CC54]-MIN([.CC25:.CC54]))/(MAX([.CC25:.CC54])-MIN([.CC25:.CC54])))*100)" table:style-name="ce128">
            <text:p>34.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3" table:style-name="ce66">
            <text:p>1953</text:p>
          </table:table-cell>
          <table:table-cell office:value-type="float" office:value="28757459.79788081" table:style-name="ce109">
            <text:p>287574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619718.8069776343" table:formula="of:=[.BS56]-[.BT56]" table:style-name="ce24">
            <text:p>6619719</text:p>
          </table:table-cell>
          <table:table-cell office:value-type="float" office:value="112298.80988124518" table:formula="of:=[.CD55]/6.9" table:style-name="ce93">
            <text:p>11229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3442116857846722" table:formula="of:=[.B55]/[.BS55]" table:style-name="ce54">
            <text:p>4.34</text:p>
          </table:table-cell>
          <table:table-cell office:value-type="float" office:value="3.5649999999999999" table:formula="of:=2+([.BY55]/1.6)" table:style-name="ce103">
            <text:p>3.57</text:p>
          </table:table-cell>
          <table:table-cell office:value-type="float" office:value="2.504" table:style-name="ce129">
            <text:p>2.50</text:p>
          </table:table-cell>
          <table:table-cell office:value-type="string" table:style-name="ce118">
            <text:p>null</text:p>
          </table:table-cell>
          <table:table-cell office:value-type="float" office:value="279667.41002400592" table:formula="of:=([.B55]-[.B54])" table:style-name="ce108">
            <text:p>279667</text:p>
          </table:table-cell>
          <table:table-cell office:value-type="float" office:value="0.98205438896050623" table:formula="of:=([.B55]*100/[.B54])-100" table:style-name="ce54">
            <text:p>0.98</text:p>
          </table:table-cell>
          <table:table-cell office:value-type="float" office:value="33850.728528087842" table:formula="of:=[.BT55]-([.CA55]/[.BX55])" table:style-name="ce93">
            <text:p>33851</text:p>
          </table:table-cell>
          <table:table-cell office:value-type="float" office:value="774861.78818059177" table:style-name="ce93">
            <text:p>77486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9.228678612141685" table:formula="of:=100-((([.CC55]-MIN([.CC26:.CC55]))/(MAX([.CC26:.CC55])-MIN([.CC26:.CC55])))*100)" table:style-name="ce128">
            <text:p>39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4" table:style-name="ce66">
            <text:p>1954</text:p>
          </table:table-cell>
          <table:table-cell office:value-type="float" office:value="29030917.662459984" table:style-name="ce109">
            <text:p>2903091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736319.4702859689" table:formula="of:=[.BS57]-[.BT57]" table:style-name="ce24">
            <text:p>6736319</text:p>
          </table:table-cell>
          <table:table-cell office:value-type="float" office:value="116600.66330833425" table:formula="of:=[.CD56]/6.7" table:style-name="ce93">
            <text:p>11660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309611174249663" table:formula="of:=[.B56]/[.BS56]" table:style-name="ce54">
            <text:p>4.31</text:p>
          </table:table-cell>
          <table:table-cell office:value-type="float" office:value="3.5225" table:formula="of:=2+([.BY56]/1.6)" table:style-name="ce103">
            <text:p>3.52</text:p>
          </table:table-cell>
          <table:table-cell office:value-type="float" office:value="2.4359999999999999" table:style-name="ce129">
            <text:p>2.44</text:p>
          </table:table-cell>
          <table:table-cell office:value-type="string" table:style-name="ce118">
            <text:p>null</text:p>
          </table:table-cell>
          <table:table-cell office:value-type="float" office:value="273457.86457917467" table:formula="of:=([.B56]-[.B55])" table:style-name="ce108">
            <text:p>273458</text:p>
          </table:table-cell>
          <table:table-cell office:value-type="float" office:value="0.95091105577873236" table:formula="of:=([.B56]*100/[.B55])-100" table:style-name="ce54">
            <text:p>0.95</text:p>
          </table:table-cell>
          <table:table-cell office:value-type="float" office:value="38968.906153139164" table:formula="of:=[.BT56]-([.CA56]/[.BX56])" table:style-name="ce93">
            <text:p>38969</text:p>
          </table:table-cell>
          <table:table-cell office:value-type="float" office:value="781224.44416583946" table:style-name="ce93">
            <text:p>78122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3.63125921496561" table:formula="of:=100-((([.CC56]-MIN([.CC27:.CC56]))/(MAX([.CC27:.CC56])-MIN([.CC27:.CC56])))*100)" table:style-name="ce128">
            <text:p>33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5" table:style-name="ce66">
            <text:p>1955</text:p>
          </table:table-cell>
          <table:table-cell office:value-type="float" office:value="29327447.321320299" table:style-name="ce109">
            <text:p>293274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861073.8568600956" table:formula="of:=[.BS58]-[.BT58]" table:style-name="ce24">
            <text:p>6861074</text:p>
          </table:table-cell>
          <table:table-cell office:value-type="float" office:value="124754.38657412678" table:formula="of:=[.CD57]/6.5" table:style-name="ce93">
            <text:p>12475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2744689728120377" table:formula="of:=[.B57]/[.BS57]" table:style-name="ce54">
            <text:p>4.27</text:p>
          </table:table-cell>
          <table:table-cell office:value-type="float" office:value="3.5681249999999998" table:formula="of:=2+([.BY57]/1.6)" table:style-name="ce103">
            <text:p>3.57</text:p>
          </table:table-cell>
          <table:table-cell office:value-type="float" office:value="2.5089999999999999" table:style-name="ce129">
            <text:p>2.51</text:p>
          </table:table-cell>
          <table:table-cell office:value-type="string" table:style-name="ce118">
            <text:p>null</text:p>
          </table:table-cell>
          <table:table-cell office:value-type="float" office:value="296529.65886031464" table:formula="of:=([.B57]-[.B56])" table:style-name="ce108">
            <text:p>296530</text:p>
          </table:table-cell>
          <table:table-cell office:value-type="float" office:value="1.0214270947547703" table:formula="of:=([.B57]*100/[.B56])-100" table:style-name="ce54">
            <text:p>1.02</text:p>
          </table:table-cell>
          <table:table-cell office:value-type="float" office:value="41649.209804726983" table:formula="of:=[.BT57]-([.CA57]/[.BX57])" table:style-name="ce93">
            <text:p>41649</text:p>
          </table:table-cell>
          <table:table-cell office:value-type="float" office:value="810903.51273182407" table:style-name="ce93">
            <text:p>81090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8.428102207002041" table:formula="of:=100-((([.CC57]-MIN([.CC28:.CC57]))/(MAX([.CC28:.CC57])-MIN([.CC28:.CC57])))*100)" table:style-name="ce128">
            <text:p>28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6" table:style-name="ce66">
            <text:p>1956</text:p>
          </table:table-cell>
          <table:table-cell office:value-type="float" office:value="29587064.981538087" table:style-name="ce109">
            <text:p>2958706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002031.9142811466" table:formula="of:=[.BS59]-[.BT59]" table:style-name="ce24">
            <text:p>7002032</text:p>
          </table:table-cell>
          <table:table-cell office:value-type="float" office:value="140958.05742105137" table:formula="of:=[.CD58]/6" table:style-name="ce93">
            <text:p>14095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2254970191142869" table:formula="of:=[.B58]/[.BS58]" table:style-name="ce54">
            <text:p>4.23</text:p>
          </table:table-cell>
          <table:table-cell office:value-type="float" office:value="3.5818750000000001" table:formula="of:=2+([.BY58]/1.6)" table:style-name="ce103">
            <text:p>3.58</text:p>
          </table:table-cell>
          <table:table-cell office:value-type="float" office:value="2.5310000000000001" table:style-name="ce129">
            <text:p>2.53</text:p>
          </table:table-cell>
          <table:table-cell office:value-type="string" table:style-name="ce118">
            <text:p>null</text:p>
          </table:table-cell>
          <table:table-cell office:value-type="float" office:value="259617.66021778807" table:formula="of:=([.B58]-[.B57])" table:style-name="ce108">
            <text:p>259618</text:p>
          </table:table-cell>
          <table:table-cell office:value-type="float" office:value="0.88523783666998668" table:formula="of:=([.B58]*100/[.B57])-100" table:style-name="ce54">
            <text:p>0.89</text:p>
          </table:table-cell>
          <table:table-cell office:value-type="float" office:value="68477.1193040629" table:formula="of:=[.BT58]-([.CA58]/[.BX58])" table:style-name="ce93">
            <text:p>68477</text:p>
          </table:table-cell>
          <table:table-cell office:value-type="float" office:value="845748.34452630824" table:style-name="ce93">
            <text:p>84574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58]-MIN([.CC29:.CC58]))/(MAX([.CC29:.CC58])-MIN([.CC29:.CC58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7" table:style-name="ce66">
            <text:p>1957</text:p>
          </table:table-cell>
          <table:table-cell office:value-type="float" office:value="29869786.956429664" table:style-name="ce109">
            <text:p>2986978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155886.0231037047" table:formula="of:=[.BS60]-[.BT60]" table:style-name="ce24">
            <text:p>7155886</text:p>
          </table:table-cell>
          <table:table-cell office:value-type="float" office:value="153854.10882255816" table:formula="of:=[.CD59]/5.7" table:style-name="ce93">
            <text:p>15385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17415633228243" table:formula="of:=[.B59]/[.BS59]" table:style-name="ce54">
            <text:p>4.17</text:p>
          </table:table-cell>
          <table:table-cell office:value-type="float" office:value="3.67875" table:formula="of:=2+([.BY59]/1.6)" table:style-name="ce103">
            <text:p>3.68</text:p>
          </table:table-cell>
          <table:table-cell office:value-type="float" office:value="2.6859999999999999" table:style-name="ce129">
            <text:p>2.69</text:p>
          </table:table-cell>
          <table:table-cell office:value-type="string" table:style-name="ce118">
            <text:p>null</text:p>
          </table:table-cell>
          <table:table-cell office:value-type="float" office:value="282721.97489157692" table:formula="of:=([.B59]-[.B58])" table:style-name="ce108">
            <text:p>282722</text:p>
          </table:table-cell>
          <table:table-cell office:value-type="float" office:value="0.95555938065498935" table:formula="of:=([.B59]*100/[.B58])-100" table:style-name="ce54">
            <text:p>0.96</text:p>
          </table:table-cell>
          <table:table-cell office:value-type="float" office:value="77001.380343706129" table:formula="of:=[.BT59]-([.CA59]/[.BX59])" table:style-name="ce93">
            <text:p>77001</text:p>
          </table:table-cell>
          <table:table-cell office:value-type="float" office:value="876968.42028858163" table:style-name="ce93">
            <text:p>8769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59]-MIN([.CC30:.CC59]))/(MAX([.CC30:.CC59])-MIN([.CC30:.CC59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8" table:style-name="ce66">
            <text:p>1958</text:p>
          </table:table-cell>
          <table:table-cell office:value-type="float" office:value="30105420.924883801" table:style-name="ce109">
            <text:p>3010542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322429.5824193852" table:formula="of:=[.BS61]-[.BT61]" table:style-name="ce24">
            <text:p>7322430</text:p>
          </table:table-cell>
          <table:table-cell office:value-type="float" office:value="166543.55931568099" table:formula="of:=[.CD60]/5.5" table:style-name="ce93">
            <text:p>16654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1113978067013033" table:formula="of:=[.B60]/[.BS60]" table:style-name="ce54">
            <text:p>4.11</text:p>
          </table:table-cell>
          <table:table-cell office:value-type="float" office:value="3.6974999999999998" table:formula="of:=2+([.BY60]/1.6)" table:style-name="ce103">
            <text:p>3.70</text:p>
          </table:table-cell>
          <table:table-cell office:value-type="float" office:value="2.7160000000000002" table:style-name="ce129">
            <text:p>2.72</text:p>
          </table:table-cell>
          <table:table-cell office:value-type="string" table:style-name="ce118">
            <text:p>null</text:p>
          </table:table-cell>
          <table:table-cell office:value-type="float" office:value="235633.96845413744" table:formula="of:=([.B60]-[.B59])" table:style-name="ce108">
            <text:p>235634</text:p>
          </table:table-cell>
          <table:table-cell office:value-type="float" office:value="0.78887060292009892" table:formula="of:=([.B60]*100/[.B59])-100" table:style-name="ce54">
            <text:p>0.79</text:p>
          </table:table-cell>
          <table:table-cell office:value-type="float" office:value="102815.64357419689" table:formula="of:=[.BT60]-([.CA60]/[.BX60])" table:style-name="ce93">
            <text:p>102816</text:p>
          </table:table-cell>
          <table:table-cell office:value-type="float" office:value="915989.57623624546" table:style-name="ce93">
            <text:p>91599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0]-MIN([.CC31:.CC60]))/(MAX([.CC31:.CC60])-MIN([.CC31:.CC60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59" table:style-name="ce66">
            <text:p>1959</text:p>
          </table:table-cell>
          <table:table-cell office:value-type="float" office:value="30309290.9524698" table:style-name="ce109">
            <text:p>3030929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509441.0352119813" table:formula="of:=[.BS62]-[.BT62]" table:style-name="ce24">
            <text:p>7509441</text:p>
          </table:table-cell>
          <table:table-cell office:value-type="float" office:value="187011.45279259572" table:formula="of:=[.CD61]/4.9" table:style-name="ce93">
            <text:p>1870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0361580589485522" table:formula="of:=[.B61]/[.BS61]" table:style-name="ce54">
            <text:p>4.04</text:p>
          </table:table-cell>
          <table:table-cell office:value-type="float" office:value="3.7081249999999999" table:formula="of:=2+([.BY61]/1.6)" table:style-name="ce103">
            <text:p>3.71</text:p>
          </table:table-cell>
          <table:table-cell office:value-type="float" office:value="2.7330000000000001" table:style-name="ce129">
            <text:p>2.73</text:p>
          </table:table-cell>
          <table:table-cell office:value-type="string" table:style-name="ce118">
            <text:p>null</text:p>
          </table:table-cell>
          <table:table-cell office:value-type="float" office:value="203870.02758599818" table:formula="of:=([.B61]-[.B60])" table:style-name="ce108">
            <text:p>203870</text:p>
          </table:table-cell>
          <table:table-cell office:value-type="float" office:value="0.67718710226532153" table:formula="of:=([.B61]*100/[.B60])-100" table:style-name="ce54">
            <text:p>0.68</text:p>
          </table:table-cell>
          <table:table-cell office:value-type="float" office:value="132032.17685502669" table:formula="of:=[.BT61]-([.CA61]/[.BX61])" table:style-name="ce93">
            <text:p>132032</text:p>
          </table:table-cell>
          <table:table-cell office:value-type="float" office:value="916356.11868371908" table:style-name="ce93">
            <text:p>91635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1]-MIN([.CC32:.CC61]))/(MAX([.CC32:.CC61])-MIN([.CC32:.CC61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60" table:style-name="ce66">
            <text:p>1960</text:p>
          </table:table-cell>
          <table:table-cell office:value-type="float" office:value="30528539" table:style-name="ce110">
            <text:p>3052853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710522" table:style-name="ce26">
            <text:p>7710522</text:p>
          </table:table-cell>
          <table:table-cell office:value-type="float" office:value="201080.96478801861" table:formula="of:=[.CD62]/4.5" table:style-name="ce93">
            <text:p>20108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9593349192181799" table:formula="of:=[.B62]/[.BS62]" table:style-name="ce54">
            <text:p>3.96</text:p>
          </table:table-cell>
          <table:table-cell office:value-type="float" office:value="3.745625" table:formula="of:=2+([.BY62]/1.6)" table:style-name="ce103">
            <text:p>3.75</text:p>
          </table:table-cell>
          <table:table-cell office:value-type="float" office:value="2.7930000000000001" table:style-name="ce129">
            <text:p>2.79</text:p>
          </table:table-cell>
          <table:table-cell office:value-type="string" table:style-name="ce118">
            <text:p>null</text:p>
          </table:table-cell>
          <table:table-cell office:value-type="float" office:value="219248.04753020033" table:formula="of:=([.B62]-[.B61])" table:style-name="ce108">
            <text:p>219248</text:p>
          </table:table-cell>
          <table:table-cell office:value-type="float" office:value="0.72336910775649699" table:formula="of:=([.B62]*100/[.B61])-100" table:style-name="ce54">
            <text:p>0.72</text:p>
          </table:table-cell>
          <table:table-cell office:value-type="float" office:value="142546.52860441766" table:formula="of:=[.BT62]-([.CA62]/[.BX62])" table:style-name="ce93">
            <text:p>142547</text:p>
          </table:table-cell>
          <table:table-cell office:value-type="float" office:value="904864.3415460838" table:style-name="ce93">
            <text:p>90486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2]-MIN([.CC33:.CC62]))/(MAX([.CC33:.CC62])-MIN([.CC33:.CC62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61" table:style-name="ce66">
            <text:p>1961</text:p>
          </table:table-cell>
          <table:table-cell office:value-type="float" office:value="30762645.152486" table:style-name="ce109">
            <text:p>307626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958608.1385434736" table:formula="of:=[.BS64]-[.BT64]" table:style-name="ce24">
            <text:p>7958608</text:p>
          </table:table-cell>
          <table:table-cell office:value-type="float" office:value="244018.1486016704" table:formula="of:=[.CD63]/3.835524" table:style-name="ce93">
            <text:p>24401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8653297934726507" table:formula="of:=[.B63]/[.BS63]" table:style-name="ce54">
            <text:p>3.87</text:p>
          </table:table-cell>
          <table:table-cell office:value-type="float" office:value="3.7324999999999999" table:formula="of:=2+([.BY63]/1.6)" table:style-name="ce103">
            <text:p>3.73</text:p>
          </table:table-cell>
          <table:table-cell office:value-type="float" office:value="2.7719999999999998" table:style-name="ce129">
            <text:p>2.77</text:p>
          </table:table-cell>
          <table:table-cell office:value-type="string" table:style-name="ce118">
            <text:p>null</text:p>
          </table:table-cell>
          <table:table-cell office:value-type="float" office:value="234106.15248600021" table:formula="of:=([.B63]-[.B62])" table:style-name="ce108">
            <text:p>234106</text:p>
          </table:table-cell>
          <table:table-cell office:value-type="float" office:value="0.76684361634862341" table:formula="of:=([.B63]*100/[.B62])-100" table:style-name="ce54">
            <text:p>0.77</text:p>
          </table:table-cell>
          <table:table-cell office:value-type="float" office:value="181297.14324708225" table:formula="of:=[.BT63]-([.CA63]/[.BX63])" table:style-name="ce93">
            <text:p>181297</text:p>
          </table:table-cell>
          <table:table-cell office:value-type="float" office:value="935937.46539727319" table:style-name="ce93">
            <text:p>9359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3]-MIN([.CC34:.CC63]))/(MAX([.CC34:.CC63])-MIN([.CC34:.CC63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62" table:style-name="ce66">
            <text:p>1962</text:p>
          </table:table-cell>
          <table:table-cell office:value-type="float" office:value="31092552.5617585" table:style-name="ce109">
            <text:p>3109255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203669.2679415867" table:formula="of:=[.BS65]-[.BT65]" table:style-name="ce24">
            <text:p>8203669</text:p>
          </table:table-cell>
          <table:table-cell office:value-type="float" office:value="245061.12939811288" table:formula="of:=[.CD64]/4" table:style-name="ce93">
            <text:p>24506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7900787496714927" table:formula="of:=[.B64]/[.BS64]" table:style-name="ce54">
            <text:p>3.79</text:p>
          </table:table-cell>
          <table:table-cell office:value-type="float" office:value="3.756875" table:formula="of:=2+([.BY64]/1.6)" table:style-name="ce103">
            <text:p>3.76</text:p>
          </table:table-cell>
          <table:table-cell office:value-type="float" office:value="2.8109999999999999" table:style-name="ce129">
            <text:p>2.81</text:p>
          </table:table-cell>
          <table:table-cell office:value-type="string" table:style-name="ce118">
            <text:p>null</text:p>
          </table:table-cell>
          <table:table-cell office:value-type="float" office:value="329907.40927249938" table:formula="of:=([.B64]-[.B63])" table:style-name="ce108">
            <text:p>329907</text:p>
          </table:table-cell>
          <table:table-cell office:value-type="float" office:value="1.0724286147605113" table:formula="of:=([.B64]*100/[.B63])-100" table:style-name="ce54">
            <text:p>1.07</text:p>
          </table:table-cell>
          <table:table-cell office:value-type="float" office:value="157246.81317186117" table:formula="of:=[.BT64]-([.CA64]/[.BX64])" table:style-name="ce93">
            <text:p>157247</text:p>
          </table:table-cell>
          <table:table-cell office:value-type="float" office:value="980244.51759245154" table:style-name="ce93">
            <text:p>9802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.76048753390117" table:formula="of:=100-((([.CC64]-MIN([.CC35:.CC64]))/(MAX([.CC35:.CC64])-MIN([.CC35:.CC64])))*100)" table:style-name="ce128">
            <text:p>13.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63" table:style-name="ce66">
            <text:p>1963</text:p>
          </table:table-cell>
          <table:table-cell office:value-type="float" office:value="31412266.71741315" table:style-name="ce109">
            <text:p>314122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458622.5860836096" table:formula="of:=[.BS66]-[.BT66]" table:style-name="ce24">
            <text:p>8458623</text:p>
          </table:table-cell>
          <table:table-cell office:value-type="float" office:value="254953.31814202326" table:formula="of:=[.CD65]/4" table:style-name="ce93">
            <text:p>25495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7136385265721152" table:formula="of:=[.B65]/[.BS65]" table:style-name="ce54">
            <text:p>3.71</text:p>
          </table:table-cell>
          <table:table-cell office:value-type="float" office:value="3.8024999999999998" table:formula="of:=2+([.BY65]/1.6)" table:style-name="ce103">
            <text:p>3.80</text:p>
          </table:table-cell>
          <table:table-cell office:value-type="float" office:value="2.8839999999999999" table:style-name="ce129">
            <text:p>2.88</text:p>
          </table:table-cell>
          <table:table-cell office:value-type="string" table:style-name="ce118">
            <text:p>null</text:p>
          </table:table-cell>
          <table:table-cell office:value-type="float" office:value="319714.15565465018" table:formula="of:=([.B65]-[.B64])" table:style-name="ce108">
            <text:p>319714</text:p>
          </table:table-cell>
          <table:table-cell office:value-type="float" office:value="1.028266029363806" table:formula="of:=([.B65]*100/[.B64])-100" table:style-name="ce54">
            <text:p>1.03</text:p>
          </table:table-cell>
          <table:table-cell office:value-type="float" office:value="170873.32980417967" table:formula="of:=[.BT65]-([.CA65]/[.BX65])" table:style-name="ce93">
            <text:p>170873</text:p>
          </table:table-cell>
          <table:table-cell office:value-type="float" office:value="1019813.272568093" table:style-name="ce93">
            <text:p>101981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9640243808776034" table:formula="of:=100-((([.CC65]-MIN([.CC36:.CC65]))/(MAX([.CC36:.CC65])-MIN([.CC36:.CC65])))*100)" table:style-name="ce128">
            <text:p>6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table:number-columns-repeated="16261"/>
        </table:table-row>
        <table:table-row table:style-name="ro2">
          <table:table-cell office:value-type="float" office:value="1964" table:style-name="ce15">
            <text:p>1964</text:p>
          </table:table-cell>
          <table:table-cell office:value-type="float" office:value="31723000" table:style-name="ce7">
            <text:p>31723000</text:p>
          </table:table-cell>
          <table:table-cell office:value-type="float" office:value="10776830.482691837" table:formula="of:=[.C67]*[.B66]/[.B67]" table:style-name="ce24">
            <text:p>10776830</text:p>
          </table:table-cell>
          <table:table-cell office:value-type="float" office:value="13841838.871252781" table:formula="of:=[.D67]*[.C66]/[.C67]" table:style-name="ce24">
            <text:p>1384183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300000000" table:style-name="ce125">
            <text:p>15300000000</text:p>
          </table:table-cell>
          <table:table-cell office:value-type="string" table:style-name="ce118">
            <text:p>null</text:p>
          </table:table-cell>
          <table:table-cell office:value-type="float" office:value="90449943058.994888" table:formula="of:=([.CV66]*[.BS66]*86)" table:style-name="ce125">
            <text:p>9044994305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726149.6775232982" table:formula="of:=[.BS67]-[.BT67]" table:style-name="ce24">
            <text:p>8726150</text:p>
          </table:table-cell>
          <table:table-cell office:value-type="float" office:value="267527.09143968869" table:formula="of:=[.CD66]/4" table:style-name="ce93">
            <text:p>2675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635394896068731" table:formula="of:=[.B66]/[.BS66]" table:style-name="ce54">
            <text:p>3.64</text:p>
          </table:table-cell>
          <table:table-cell office:value-type="float" office:value="3.8875000000000002" table:formula="of:=2+([.BY66]/1.6)" table:style-name="ce103">
            <text:p>3.89</text:p>
          </table:table-cell>
          <table:table-cell office:value-type="float" office:value="3.02" table:style-name="ce129">
            <text:p>3.02</text:p>
          </table:table-cell>
          <table:table-cell office:value-type="string" table:style-name="ce118">
            <text:p>null</text:p>
          </table:table-cell>
          <table:table-cell office:value-type="float" office:value="310733.28258685023" table:formula="of:=([.B66]-[.B65])" table:style-name="ce108">
            <text:p>310733</text:p>
          </table:table-cell>
          <table:table-cell office:value-type="float" office:value="0.98920999678955468" table:formula="of:=([.B66]*100/[.B65])-100" table:style-name="ce54">
            <text:p>0.99</text:p>
          </table:table-cell>
          <table:table-cell office:value-type="float" office:value="187595.70042056323" table:formula="of:=[.BT66]-([.CA66]/[.BX66])" table:style-name="ce93">
            <text:p>187596</text:p>
          </table:table-cell>
          <table:table-cell office:value-type="float" office:value="1070108.3657587548" table:style-name="ce93">
            <text:p>1070108</text:p>
          </table:table-cell>
          <table:table-cell office:value-type="float" office:value="9917.2000000000007" table:style-name="ce8">
            <text:p>991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0.52778863636365" table:formula="of:=[.DB66]*(1+([.CY66]/100))" table:style-name="ce93">
            <text:p>12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.95" table:style-name="ce25">
            <text:p>6.9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2.69545454545455" table:formula="of:=[.CE66]/88" table:style-name="ce22">
            <text:p>112.7</text:p>
          </table:table-cell>
          <table:table-cell office:value-type="float" office:value="112.69545454545455" table:style-name="ce22">
            <text:p>112.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6]-MIN([.CC37:.CC66]))/(MAX([.CC37:.CC66])-MIN([.CC37:.CC66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8.44" table:formula="of:=-0.06*(([.A66]-1963)^2)+8.5*([.A66]-1963)+140" table:style-name="ce23">
            <text:p>148.4</text:p>
          </table:table-cell>
          <table:table-cell table:number-columns-repeated="16261"/>
        </table:table-row>
        <table:table-row table:style-name="ro2">
          <table:table-cell office:value-type="float" office:value="1965" table:style-name="ce15">
            <text:p>1965</text:p>
          </table:table-cell>
          <table:table-cell office:value-type="float" office:value="32056000" table:style-name="ce7">
            <text:p>32056000</text:p>
          </table:table-cell>
          <table:table-cell office:value-type="float" office:value="10889956.11868895" table:formula="of:=[.C68]*[.B67]/[.B68]" table:style-name="ce24">
            <text:p>10889956</text:p>
          </table:table-cell>
          <table:table-cell office:value-type="float" office:value="13987138.254795548" table:formula="of:=[.D68]*[.C67]/[.C68]" table:style-name="ce24">
            <text:p>1398713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200000000" table:style-name="ce125">
            <text:p>17200000000</text:p>
          </table:table-cell>
          <table:table-cell office:value-type="string" table:style-name="ce118">
            <text:p>null</text:p>
          </table:table-cell>
          <table:table-cell office:value-type="float" office:value="113662456521.29198" table:formula="of:=([.CV67]*[.BS67]*86)" table:style-name="ce125">
            <text:p>1.13662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011828.3983404189" table:formula="of:=[.BS68]-[.BT68]" table:style-name="ce24">
            <text:p>9011828</text:p>
          </table:table-cell>
          <table:table-cell office:value-type="float" office:value="285678.72081712063" table:formula="of:=[.CD67]/4" table:style-name="ce93">
            <text:p>28567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5571027967979618" table:formula="of:=[.B67]/[.BS67]" table:style-name="ce54">
            <text:p>3.56</text:p>
          </table:table-cell>
          <table:table-cell office:value-type="float" office:value="3.8406249999999997" table:formula="of:=2+([.BY67]/1.6)" table:style-name="ce103">
            <text:p>3.84</text:p>
          </table:table-cell>
          <table:table-cell office:value-type="float" office:value="2.9449999999999998" table:style-name="ce129">
            <text:p>2.95</text:p>
          </table:table-cell>
          <table:table-cell office:value-type="string" table:style-name="ce118">
            <text:p>null</text:p>
          </table:table-cell>
          <table:table-cell office:value-type="float" office:value="333000" table:formula="of:=([.B67]-[.B66])" table:style-name="ce108">
            <text:p>333000</text:p>
          </table:table-cell>
          <table:table-cell office:value-type="float" office:value="1.0497115657409495" table:formula="of:=([.B67]*100/[.B66])-100" table:style-name="ce54">
            <text:p>1.05</text:p>
          </table:table-cell>
          <table:table-cell office:value-type="float" office:value="198974.08290011494" table:formula="of:=[.BT67]-([.CA67]/[.BX67])" table:style-name="ce93">
            <text:p>198974</text:p>
          </table:table-cell>
          <table:table-cell office:value-type="float" office:value="1142714.8832684825" table:style-name="ce93">
            <text:p>1142715</text:p>
          </table:table-cell>
          <table:table-cell office:value-type="float" office:value="11388.9" table:style-name="ce8">
            <text:p>1138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6.65797136363634" table:formula="of:=[.DB67]*(1+([.CY67]/100))" table:style-name="ce93">
            <text:p>1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.32" table:style-name="ce25">
            <text:p>13.3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9.41931818181817" table:formula="of:=[.CE67]/88" table:style-name="ce22">
            <text:p>129.4</text:p>
          </table:table-cell>
          <table:table-cell office:value-type="float" office:value="129.41931818181817" table:style-name="ce22">
            <text:p>129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7]-MIN([.CC38:.CC67]))/(MAX([.CC38:.CC67])-MIN([.CC38:.CC67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6.76" table:formula="of:=-0.06*(([.A67]-1963)^2)+8.5*([.A67]-1963)+140" table:style-name="ce23">
            <text:p>156.8</text:p>
          </table:table-cell>
          <table:table-cell table:number-columns-repeated="16261"/>
        </table:table-row>
        <table:table-row table:style-name="ro2">
          <table:table-cell office:value-type="float" office:value="1966" table:style-name="ce15">
            <text:p>1966</text:p>
          </table:table-cell>
          <table:table-cell office:value-type="float" office:value="32414000" table:style-name="ce7">
            <text:p>32414000</text:p>
          </table:table-cell>
          <table:table-cell office:value-type="float" office:value="11011574.670301462" table:formula="of:=[.C69]*[.B68]/[.B69]" table:style-name="ce24">
            <text:p>11011575</text:p>
          </table:table-cell>
          <table:table-cell office:value-type="float" office:value="14143346.000466149" table:formula="of:=[.D69]*[.C68]/[.C69]" table:style-name="ce24">
            <text:p>1414334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9600000000" table:style-name="ce125">
            <text:p>19600000000</text:p>
          </table:table-cell>
          <table:table-cell office:value-type="string" table:style-name="ce118">
            <text:p>null</text:p>
          </table:table-cell>
          <table:table-cell office:value-type="float" office:value="126170069354.94856" table:formula="of:=([.CV68]*[.BS68]*86)" table:style-name="ce125">
            <text:p>1.2617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308677.3526205737" table:formula="of:=[.BS69]-[.BT69]" table:style-name="ce24">
            <text:p>9308677</text:p>
          </table:table-cell>
          <table:table-cell office:value-type="float" office:value="296848.95428015565" table:formula="of:=[.CD68]/4" table:style-name="ce93">
            <text:p>29684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4821273497974263" table:formula="of:=[.B68]/[.BS68]" table:style-name="ce54">
            <text:p>3.48</text:p>
          </table:table-cell>
          <table:table-cell office:value-type="float" office:value="3.8324999999999996" table:formula="of:=2+([.BY68]/1.6)" table:style-name="ce103">
            <text:p>3.83</text:p>
          </table:table-cell>
          <table:table-cell office:value-type="float" office:value="2.9319999999999999" table:style-name="ce129">
            <text:p>2.93</text:p>
          </table:table-cell>
          <table:table-cell office:value-type="string" table:style-name="ce118">
            <text:p>null</text:p>
          </table:table-cell>
          <table:table-cell office:value-type="float" office:value="358000" table:formula="of:=([.B68]-[.B67])" table:style-name="ce108">
            <text:p>358000</text:p>
          </table:table-cell>
          <table:table-cell office:value-type="float" office:value="1.1167956076865551" table:formula="of:=([.B68]*100/[.B67])-100" table:style-name="ce54">
            <text:p>1.12</text:p>
          </table:table-cell>
          <table:table-cell office:value-type="float" office:value="203437.34306032525" table:formula="of:=[.BT68]-([.CA68]/[.BX68])" table:style-name="ce93">
            <text:p>203437</text:p>
          </table:table-cell>
          <table:table-cell office:value-type="float" office:value="1187395.8171206226" table:style-name="ce93">
            <text:p>1187396</text:p>
          </table:table-cell>
          <table:table-cell office:value-type="float" office:value="13053.4" table:style-name="ce8">
            <text:p>1305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7.60497159090909" table:formula="of:=[.DB68]*(1+([.CY68]/100))" table:style-name="ce93">
            <text:p>15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.25" table:style-name="ce25">
            <text:p>6.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8.33409090909092" table:formula="of:=[.CE68]/88" table:style-name="ce22">
            <text:p>148.3</text:p>
          </table:table-cell>
          <table:table-cell office:value-type="float" office:value="148.33409090909092" table:style-name="ce22">
            <text:p>148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8]-MIN([.CC39:.CC68]))/(MAX([.CC39:.CC68])-MIN([.CC39:.CC68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4.96" table:formula="of:=-0.06*(([.A68]-1963)^2)+8.5*([.A68]-1963)+140" table:style-name="ce23">
            <text:p>165.0</text:p>
          </table:table-cell>
          <table:table-cell table:number-columns-repeated="16261"/>
        </table:table-row>
        <table:table-row table:style-name="ro2">
          <table:table-cell office:value-type="float" office:value="1967" table:style-name="ce15">
            <text:p>1967</text:p>
          </table:table-cell>
          <table:table-cell office:value-type="float" office:value="32804000" table:style-name="ce7">
            <text:p>32804000</text:p>
          </table:table-cell>
          <table:table-cell office:value-type="float" office:value="11144064.153901681" table:formula="of:=[.C70]*[.B69]/[.B70]" table:style-name="ce24">
            <text:p>11144064</text:p>
          </table:table-cell>
          <table:table-cell office:value-type="float" office:value="14313516.449660379" table:formula="of:=[.D70]*[.C69]/[.C70]" table:style-name="ce24">
            <text:p>1431351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400000000" table:style-name="ce125">
            <text:p>21400000000</text:p>
          </table:table-cell>
          <table:table-cell office:value-type="string" table:style-name="ce118">
            <text:p>null</text:p>
          </table:table-cell>
          <table:table-cell office:value-type="float" office:value="140806729717.2233" table:formula="of:=([.CV69]*[.BS69]*86)" table:style-name="ce125">
            <text:p>1.40807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624308.0520119742" table:formula="of:=[.BS70]-[.BT70]" table:style-name="ce24">
            <text:p>9624308</text:p>
          </table:table-cell>
          <table:table-cell office:value-type="float" office:value="315630.69939139974" table:formula="of:=[.CD69]/3.9" table:style-name="ce93">
            <text:p>31563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4084528282677198" table:formula="of:=[.B69]/[.BS69]" table:style-name="ce54">
            <text:p>3.41</text:p>
          </table:table-cell>
          <table:table-cell office:value-type="float" office:value="3.8687500000000004" table:formula="of:=2+([.BY69]/1.6)" table:style-name="ce103">
            <text:p>3.87</text:p>
          </table:table-cell>
          <table:table-cell office:value-type="float" office:value="2.99" table:style-name="ce129">
            <text:p>2.99</text:p>
          </table:table-cell>
          <table:table-cell office:value-type="string" table:style-name="ce118">
            <text:p>null</text:p>
          </table:table-cell>
          <table:table-cell office:value-type="float" office:value="390000" table:formula="of:=([.B69]-[.B68])" table:style-name="ce108">
            <text:p>390000</text:p>
          </table:table-cell>
          <table:table-cell office:value-type="float" office:value="1.2031838094650453" table:formula="of:=([.B69]*100/[.B68])-100" table:style-name="ce54">
            <text:p>1.20</text:p>
          </table:table-cell>
          <table:table-cell office:value-type="float" office:value="214822.94494875032" table:formula="of:=[.BT69]-([.CA69]/[.BX69])" table:style-name="ce93">
            <text:p>214823</text:p>
          </table:table-cell>
          <table:table-cell office:value-type="float" office:value="1230959.727626459" table:style-name="ce93">
            <text:p>1230960</text:p>
          </table:table-cell>
          <table:table-cell office:value-type="float" office:value="14071.399999999996" table:style-name="ce8">
            <text:p>1407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0.12002795454541" table:formula="of:=[.DB69]*(1+([.CY69]/100))" table:style-name="ce93">
            <text:p>17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.39" table:style-name="ce25">
            <text:p>6.3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9.90227272727267" table:formula="of:=[.CE69]/88" table:style-name="ce22">
            <text:p>159.9</text:p>
          </table:table-cell>
          <table:table-cell office:value-type="float" office:value="159.90227272727267" table:style-name="ce22">
            <text:p>159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69]-MIN([.CC40:.CC69]))/(MAX([.CC40:.CC69])-MIN([.CC40:.CC69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3.04" table:formula="of:=-0.06*(([.A69]-1963)^2)+8.5*([.A69]-1963)+140" table:style-name="ce23">
            <text:p>173.0</text:p>
          </table:table-cell>
          <table:table-cell table:number-columns-repeated="16261"/>
        </table:table-row>
        <table:table-row table:style-name="ro2">
          <table:table-cell office:value-type="float" office:value="1968" table:style-name="ce15">
            <text:p>1968</text:p>
          </table:table-cell>
          <table:table-cell office:value-type="float" office:value="33179000" table:style-name="ce7">
            <text:p>33179000</text:p>
          </table:table-cell>
          <table:table-cell office:value-type="float" office:value="11271457.888132663" table:formula="of:=[.C71]*[.B70]/[.B71]" table:style-name="ce24">
            <text:p>11271458</text:p>
          </table:table-cell>
          <table:table-cell office:value-type="float" office:value="14477141.881577911" table:formula="of:=[.D71]*[.C70]/[.C71]" table:style-name="ce24">
            <text:p>1447714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400000000" table:style-name="ce125">
            <text:p>23400000000</text:p>
          </table:table-cell>
          <table:table-cell office:value-type="string" table:style-name="ce118">
            <text:p>null</text:p>
          </table:table-cell>
          <table:table-cell office:value-type="float" office:value="180782102521.16757" table:formula="of:=([.CV70]*[.BS70]*86)" table:style-name="ce125">
            <text:p>1.80782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956769.4742933586" table:formula="of:=[.BS71]-[.BT71]" table:style-name="ce24">
            <text:p>9956769</text:p>
          </table:table-cell>
          <table:table-cell office:value-type="float" office:value="332461.42228138441" table:formula="of:=[.CD70]/3.8" table:style-name="ce93">
            <text:p>33246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3323057328646994" table:formula="of:=[.B70]/[.BS70]" table:style-name="ce54">
            <text:p>3.33</text:p>
          </table:table-cell>
          <table:table-cell office:value-type="float" office:value="3.8331249999999999" table:formula="of:=2+([.BY70]/1.6)" table:style-name="ce103">
            <text:p>3.83</text:p>
          </table:table-cell>
          <table:table-cell office:value-type="float" office:value="2.9329999999999998" table:style-name="ce129">
            <text:p>2.93</text:p>
          </table:table-cell>
          <table:table-cell office:value-type="string" table:style-name="ce118">
            <text:p>null</text:p>
          </table:table-cell>
          <table:table-cell office:value-type="float" office:value="375000" table:formula="of:=([.B70]-[.B69])" table:style-name="ce108">
            <text:p>375000</text:p>
          </table:table-cell>
          <table:table-cell office:value-type="float" office:value="1.1431532739909755" table:formula="of:=([.B70]*100/[.B69])-100" table:style-name="ce54">
            <text:p>1.14</text:p>
          </table:table-cell>
          <table:table-cell office:value-type="float" office:value="234630.01840073871" table:formula="of:=[.BT70]-([.CA70]/[.BX70])" table:style-name="ce93">
            <text:p>234630</text:p>
          </table:table-cell>
          <table:table-cell office:value-type="float" office:value="1263353.4046692606" table:style-name="ce93">
            <text:p>1263353</text:p>
          </table:table-cell>
          <table:table-cell office:value-type="float" office:value="15284.300000000001" table:style-name="ce8">
            <text:p>1528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1.12444921052634" table:formula="of:=[.DB70]*(1+([.CY70]/100))" table:style-name="ce93">
            <text:p>2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9800000000000004" table:style-name="ce25">
            <text:p>4.9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01.10921052631579" table:formula="of:=[.CE70]/76" table:style-name="ce22">
            <text:p>201.1</text:p>
          </table:table-cell>
          <table:table-cell office:value-type="float" office:value="201.10921052631579" table:style-name="ce22">
            <text:p>201.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70]-MIN([.CC41:.CC70]))/(MAX([.CC41:.CC70])-MIN([.CC41:.CC70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81" table:formula="of:=-0.06*(([.A70]-1963)^2)+8.5*([.A70]-1963)+140" table:style-name="ce23">
            <text:p>181.0</text:p>
          </table:table-cell>
          <table:table-cell table:number-columns-repeated="16261"/>
        </table:table-row>
        <table:table-row table:style-name="ro2">
          <table:table-cell office:value-type="float" office:value="1969" table:style-name="ce15">
            <text:p>1969</text:p>
          </table:table-cell>
          <table:table-cell office:value-type="float" office:value="33604000" table:style-name="ce77">
            <text:p>33604000</text:p>
          </table:table-cell>
          <table:table-cell office:value-type="float" office:value="11415837.453594442" table:formula="of:=[.C72]*[.B71]/[.B72]" table:style-name="ce24">
            <text:p>11415837</text:p>
          </table:table-cell>
          <table:table-cell office:value-type="float" office:value="14662584.037751112" table:formula="of:=[.D72]*[.C71]/[.C72]" table:style-name="ce24">
            <text:p>1466258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2.24" table:style-name="ce73">
            <text:p>22</text:p>
          </table:table-cell>
          <table:table-cell office:value-type="float" office:value="26900000000" table:style-name="ce125">
            <text:p>26900000000</text:p>
          </table:table-cell>
          <table:table-cell office:value-type="string" table:style-name="ce118">
            <text:p>null</text:p>
          </table:table-cell>
          <table:table-cell office:value-type="float" office:value="193210673683.45663" table:formula="of:=([.CV71]*[.BS71]*86)" table:style-name="ce125">
            <text:p>1.93211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302744.813445741" table:formula="of:=[.BS72]-[.BT72]" table:style-name="ce24">
            <text:p>10302745</text:p>
          </table:table-cell>
          <table:table-cell office:value-type="float" office:value="345975.33915238199" table:formula="of:=[.CD71]/3.7" table:style-name="ce93">
            <text:p>34597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2616550840068008" table:formula="of:=[.B71]/[.BS71]" table:style-name="ce54">
            <text:p>3.26</text:p>
          </table:table-cell>
          <table:table-cell office:value-type="float" office:value="3.8274999999999997" table:formula="of:=2+([.BY71]/1.6)" table:style-name="ce103">
            <text:p>3.83</text:p>
          </table:table-cell>
          <table:table-cell office:value-type="float" office:value="2.9239999999999999" table:style-name="ce129">
            <text:p>2.92</text:p>
          </table:table-cell>
          <table:table-cell office:value-type="string" table:style-name="ce118">
            <text:p>null</text:p>
          </table:table-cell>
          <table:table-cell office:value-type="float" office:value="425000" table:formula="of:=([.B71]-[.B70])" table:style-name="ce108">
            <text:p>425000</text:p>
          </table:table-cell>
          <table:table-cell office:value-type="float" office:value="1.2809307091835223" table:formula="of:=([.B71]*100/[.B70])-100" table:style-name="ce54">
            <text:p>1.28</text:p>
          </table:table-cell>
          <table:table-cell office:value-type="float" office:value="234936.80224839767" table:formula="of:=[.BT71]-([.CA71]/[.BX71])" table:style-name="ce93">
            <text:p>234937</text:p>
          </table:table-cell>
          <table:table-cell office:value-type="float" office:value="1280108.7548638135" table:style-name="ce93">
            <text:p>1280109</text:p>
          </table:table-cell>
          <table:table-cell office:value-type="float" office:value="16222.3" table:style-name="ce8">
            <text:p>1622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8.06186421052632" table:formula="of:=[.DB71]*(1+([.CY71]/100))" table:style-name="ce93">
            <text:p>21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16" table:style-name="ce25">
            <text:p>2.1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3.45131578947368" table:formula="of:=[.CE71]/76" table:style-name="ce22">
            <text:p>213.5</text:p>
          </table:table-cell>
          <table:table-cell office:value-type="float" office:value="213.45131578947368" table:style-name="ce22">
            <text:p>213.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71]-MIN([.CC42:.CC71]))/(MAX([.CC42:.CC71])-MIN([.CC42:.CC71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88.84" table:formula="of:=-0.06*(([.A71]-1963)^2)+8.5*([.A71]-1963)+140" table:style-name="ce23">
            <text:p>188.8</text:p>
          </table:table-cell>
          <table:table-cell table:number-columns-repeated="16261"/>
        </table:table-row>
        <table:table-row table:style-name="ro2">
          <table:table-cell office:value-type="float" office:value="1970" table:style-name="ce15">
            <text:p>1970</text:p>
          </table:table-cell>
          <table:table-cell office:value-type="float" office:value="34040642" table:style-name="ce7">
            <text:p>34040642</text:p>
          </table:table-cell>
          <table:table-cell office:value-type="float" office:value="11564172" table:style-name="ce26">
            <text:p>11564172</text:p>
          </table:table-cell>
          <table:table-cell office:value-type="float" office:value="14853106" table:style-name="ce26">
            <text:p>14853106</text:p>
          </table:table-cell>
          <table:table-cell office:value-type="float" office:value="22935614" table:style-name="ce118">
            <text:p>2293561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.789166666666663" table:style-name="ce73">
            <text:p>24</text:p>
          </table:table-cell>
          <table:table-cell office:value-type="float" office:value="30400000000" table:style-name="ce125">
            <text:p>30400000000</text:p>
          </table:table-cell>
          <table:table-cell office:value-type="string" table:style-name="ce118">
            <text:p>null</text:p>
          </table:table-cell>
          <table:table-cell office:value-type="float" office:value="226235767089.76089" table:formula="of:=([.CV72]*[.BS72]*86)" table:style-name="ce125">
            <text:p>2.26236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659882" table:style-name="ce18">
            <text:p>10659882</text:p>
          </table:table-cell>
          <table:table-cell office:value-type="float" office:value="357137.18655425846" table:formula="of:=[.CD72]/3.6" table:style-name="ce93">
            <text:p>3571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1933413521838236" table:formula="of:=([.B72]/[.BS72])" table:style-name="ce34">
            <text:p>3.19</text:p>
          </table:table-cell>
          <table:table-cell office:value-type="float" office:value="3.8131249999999999" table:formula="of:=2+([.BY72]/1.6)" table:style-name="ce103">
            <text:p>3.81</text:p>
          </table:table-cell>
          <table:table-cell office:value-type="float" office:value="2.9009999999999998" table:style-name="ce129">
            <text:p>2.90</text:p>
          </table:table-cell>
          <table:table-cell office:value-type="string" table:style-name="ce118">
            <text:p>null</text:p>
          </table:table-cell>
          <table:table-cell office:value-type="float" office:value="436642" table:formula="of:=([.B72]-[.B71])" table:style-name="ce108">
            <text:p>436642</text:p>
          </table:table-cell>
          <table:table-cell office:value-type="float" office:value="1.2993750743959112" table:formula="of:=([.B72]*100/[.B71])-100" table:style-name="ce54">
            <text:p>1.30</text:p>
          </table:table-cell>
          <table:table-cell office:value-type="float" office:value="242626.90955048858" table:formula="of:=[.BT72]-([.CA72]/[.BX72])" table:style-name="ce93">
            <text:p>242627</text:p>
          </table:table-cell>
          <table:table-cell office:value-type="float" office:value="1285693.8715953305" table:style-name="ce93">
            <text:p>1285694</text:p>
          </table:table-cell>
          <table:table-cell office:value-type="float" office:value="16573.400000000001" table:style-name="ce8">
            <text:p>1657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6.78026028169012" table:formula="of:=[.DB72]*(1+([.CY72]/100))" table:style-name="ce93">
            <text:p>2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72" table:style-name="ce25">
            <text:p>5.7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3.42816901408452" table:formula="of:=[.CE72]/71" table:style-name="ce22">
            <text:p>233.4</text:p>
          </table:table-cell>
          <table:table-cell office:value-type="float" office:value="233.42816901408452" table:style-name="ce22">
            <text:p>233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72]-MIN([.CC43:.CC72]))/(MAX([.CC43:.CC72])-MIN([.CC43:.CC72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96.56" table:formula="of:=-0.06*(([.A72]-1963)^2)+8.5*([.A72]-1963)+140" table:style-name="ce23">
            <text:p>196.6</text:p>
          </table:table-cell>
          <table:table-cell table:number-columns-repeated="16261"/>
        </table:table-row>
        <table:table-row table:style-name="ro2">
          <table:table-cell office:value-type="float" office:value="1971" table:style-name="ce15">
            <text:p>1971</text:p>
          </table:table-cell>
          <table:table-cell office:value-type="float" office:value="34408338" table:style-name="ce7">
            <text:p>34408338</text:p>
          </table:table-cell>
          <table:table-cell office:value-type="float" office:value="11620299" table:style-name="ce7">
            <text:p>11620299</text:p>
          </table:table-cell>
          <table:table-cell office:value-type="float" office:value="14954376" table:style-name="ce7">
            <text:p>14954376</text:p>
          </table:table-cell>
          <table:table-cell office:value-type="float" office:value="23195909" table:style-name="ce118">
            <text:p>2319590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6.610833333333336" table:style-name="ce73">
            <text:p>27</text:p>
          </table:table-cell>
          <table:table-cell office:value-type="float" office:value="34900000000" table:style-name="ce125">
            <text:p>34900000000</text:p>
          </table:table-cell>
          <table:table-cell office:value-type="string" table:style-name="ce118">
            <text:p>null</text:p>
          </table:table-cell>
          <table:table-cell office:value-type="float" office:value="247367251056.29391" table:formula="of:=([.CV73]*[.BS73]*86)" table:style-name="ce125">
            <text:p>2.47367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042601.752" table:style-name="ce24">
            <text:p>11042602</text:p>
          </table:table-cell>
          <table:table-cell office:value-type="float" office:value="382719.75200000033" table:formula="of:=[.BS73]-[.BS72]" table:style-name="ce24">
            <text:p>38272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1159629562632802" table:formula="of:=([.B73]/[.BS73])" table:style-name="ce34">
            <text:p>3.12</text:p>
          </table:table-cell>
          <table:table-cell office:value-type="float" office:value="3.82" table:style-name="ce71">
            <text:p>3.82</text:p>
          </table:table-cell>
          <table:table-cell office:value-type="float" office:value="2.9159999999999999" table:style-name="ce129">
            <text:p>2.92</text:p>
          </table:table-cell>
          <table:table-cell office:value-type="float" office:value="3.5902813183110283" table:formula="of:=([.BS73]*100/[.BS72])-100" table:style-name="ce23">
            <text:p>3.6</text:p>
          </table:table-cell>
          <table:table-cell office:value-type="float" office:value="367696" table:formula="of:=([.B73]-[.B72])" table:style-name="ce73">
            <text:p>367696</text:p>
          </table:table-cell>
          <table:table-cell office:value-type="float" office:value="1.0801676419616228" table:formula="of:=([.B73]*100/[.B72])-100" table:style-name="ce25">
            <text:p>1.08</text:p>
          </table:table-cell>
          <table:table-cell office:value-type="float" office:value="286464.2546178014" table:formula="of:=[.BT73]-([.CA73]/[.BX73])" table:style-name="ce76">
            <text:p>286464</text:p>
          </table:table-cell>
          <table:table-cell office:value-type="float" office:value="1314736.4785992217" table:style-name="ce93">
            <text:p>1314736</text:p>
          </table:table-cell>
          <table:table-cell office:value-type="float" office:value="16604.8" table:style-name="ce8">
            <text:p>1660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60.47877565217391" table:formula="of:=[.DB73]*(1+([.CY73]/100))" table:style-name="ce93">
            <text:p>2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.24" table:style-name="ce25">
            <text:p>8.2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0.64927536231883" table:formula="of:=[.CE73]/69" table:style-name="ce22">
            <text:p>240.6</text:p>
          </table:table-cell>
          <table:table-cell office:value-type="float" office:value="240.649275362319" table:style-name="ce22">
            <text:p>240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73]-MIN([.CC44:.CC73]))/(MAX([.CC44:.CC73])-MIN([.CC44:.CC73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04.16" table:formula="of:=-0.06*(([.A73]-1963)^2)+8.5*([.A73]-1963)+140" table:style-name="ce23">
            <text:p>204.2</text:p>
          </table:table-cell>
          <table:table-cell table:number-columns-repeated="16261"/>
        </table:table-row>
        <table:table-row table:style-name="ro2">
          <table:table-cell office:value-type="float" office:value="1972" table:style-name="ce15">
            <text:p>1972</text:p>
          </table:table-cell>
          <table:table-cell office:value-type="float" office:value="34800600" table:style-name="ce7">
            <text:p>34800600</text:p>
          </table:table-cell>
          <table:table-cell office:value-type="float" office:value="11702665" table:style-name="ce7">
            <text:p>11702665</text:p>
          </table:table-cell>
          <table:table-cell office:value-type="float" office:value="15102979" table:style-name="ce7">
            <text:p>15102979</text:p>
          </table:table-cell>
          <table:table-cell office:value-type="float" office:value="23464963" table:style-name="ce118">
            <text:p>2346496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5.909999999999997" table:style-name="ce73">
            <text:p>36</text:p>
          </table:table-cell>
          <table:table-cell office:value-type="float" office:value="44600000000" table:style-name="ce125">
            <text:p>44600000000</text:p>
          </table:table-cell>
          <table:table-cell office:value-type="string" table:style-name="ce118">
            <text:p>null</text:p>
          </table:table-cell>
          <table:table-cell office:value-type="float" office:value="291908330900.36493" table:formula="of:=([.CV74]*[.BS74]*86)" table:style-name="ce125">
            <text:p>2.91908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462220.618576001" table:style-name="ce24">
            <text:p>11462221</text:p>
          </table:table-cell>
          <table:table-cell office:value-type="float" office:value="419618.86657600105" table:formula="of:=[.BS74]-[.BS73]" table:style-name="ce24">
            <text:p>41961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.0361132592057385" table:formula="of:=([.B74]/[.BS74])" table:style-name="ce34">
            <text:p>3.04</text:p>
          </table:table-cell>
          <table:table-cell office:value-type="float" office:value="3.7969999999999997" table:formula="of:=[.BX73]-(([.$BX$73]-[.$BX$83])/10)" table:style-name="ce103">
            <text:p>3.80</text:p>
          </table:table-cell>
          <table:table-cell office:value-type="float" office:value="2.8879999999999999" table:style-name="ce129">
            <text:p>2.89</text:p>
          </table:table-cell>
          <table:table-cell office:value-type="float" office:value="3.8000000000000114" table:formula="of:=([.BS74]*100/[.BS73])-100" table:style-name="ce23">
            <text:p>3.8</text:p>
          </table:table-cell>
          <table:table-cell office:value-type="float" office:value="392262" table:formula="of:=([.B74]-[.B73])" table:style-name="ce73">
            <text:p>392262</text:p>
          </table:table-cell>
          <table:table-cell office:value-type="float" office:value="1.1400201892924855" table:formula="of:=([.B74]*100/[.B73])-100" table:style-name="ce25">
            <text:p>1.14</text:p>
          </table:table-cell>
          <table:table-cell office:value-type="float" office:value="316310.4652064988" table:formula="of:=[.BT74]-([.CA74]/[.BX74])" table:style-name="ce76">
            <text:p>316310</text:p>
          </table:table-cell>
          <table:table-cell office:value-type="float" office:value="1330374.8054474706" table:style-name="ce93">
            <text:p>1330375</text:p>
          </table:table-cell>
          <table:table-cell office:value-type="float" office:value="18872.100000000002" table:style-name="ce8">
            <text:p>1887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96.12786478260875" table:formula="of:=[.DB74]*(1+([.CY74]/100))" table:style-name="ce93">
            <text:p>29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.27" table:style-name="ce25">
            <text:p>8.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73.50869565217397" table:formula="of:=[.CE74]/69" table:style-name="ce22">
            <text:p>273.5</text:p>
          </table:table-cell>
          <table:table-cell office:value-type="float" office:value="273.50869565217397" table:style-name="ce22">
            <text:p>273.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74]-MIN([.CC45:.CC74]))/(MAX([.CC45:.CC74])-MIN([.CC45:.CC74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1.64" table:formula="of:=-0.06*(([.A74]-1963)^2)+8.5*([.A74]-1963)+140" table:style-name="ce23">
            <text:p>211.6</text:p>
          </table:table-cell>
          <table:table-cell table:number-columns-repeated="16261"/>
        </table:table-row>
        <table:table-row table:style-name="ro2">
          <table:table-cell office:value-type="float" office:value="1973" table:style-name="ce15">
            <text:p>1973</text:p>
          </table:table-cell>
          <table:table-cell office:value-type="float" office:value="35177294" table:style-name="ce7">
            <text:p>35177294</text:p>
          </table:table-cell>
          <table:table-cell office:value-type="float" office:value="11800401" table:style-name="ce7">
            <text:p>11800401</text:p>
          </table:table-cell>
          <table:table-cell office:value-type="float" office:value="15283175" table:style-name="ce7">
            <text:p>15283175</text:p>
          </table:table-cell>
          <table:table-cell office:value-type="float" office:value="23732817" table:style-name="ce118">
            <text:p>2373281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6.747500000000002" table:style-name="ce73">
            <text:p>57</text:p>
          </table:table-cell>
          <table:table-cell office:value-type="float" office:value="57100000000" table:style-name="ce125">
            <text:p>57100000000</text:p>
          </table:table-cell>
          <table:table-cell office:value-type="string" table:style-name="ce118">
            <text:p>null</text:p>
          </table:table-cell>
          <table:table-cell office:value-type="float" office:value="357184284945.52667" table:formula="of:=([.CV75]*[.BS75]*86)" table:style-name="ce125">
            <text:p>3.57184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909247.222700465" table:style-name="ce24">
            <text:p>11909247</text:p>
          </table:table-cell>
          <table:table-cell office:value-type="float" office:value="447026.60412446409" table:formula="of:=[.BS75]-[.BS74]" table:style-name="ce24">
            <text:p>4470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9537798101082178" table:formula="of:=([.B75]/[.BS75])" table:style-name="ce34">
            <text:p>2.95</text:p>
          </table:table-cell>
          <table:table-cell office:value-type="float" office:value="3.7739999999999996" table:formula="of:=[.BX74]-(([.$BX$73]-[.$BX$83])/10)" table:style-name="ce103">
            <text:p>3.77</text:p>
          </table:table-cell>
          <table:table-cell office:value-type="float" office:value="2.859" table:style-name="ce129">
            <text:p>2.86</text:p>
          </table:table-cell>
          <table:table-cell office:value-type="float" office:value="3.8999999999999915" table:formula="of:=([.BS75]*100/[.BS74])-100" table:style-name="ce23">
            <text:p>3.9</text:p>
          </table:table-cell>
          <table:table-cell office:value-type="float" office:value="376694" table:formula="of:=([.B75]-[.B74])" table:style-name="ce73">
            <text:p>376694</text:p>
          </table:table-cell>
          <table:table-cell office:value-type="float" office:value="1.0824353603098729" table:formula="of:=([.B75]*100/[.B74])-100" table:style-name="ce25">
            <text:p>1.08</text:p>
          </table:table-cell>
          <table:table-cell office:value-type="float" office:value="347213.67354682763" table:formula="of:=[.BT75]-([.CA75]/[.BX75])" table:style-name="ce76">
            <text:p>347214</text:p>
          </table:table-cell>
          <table:table-cell office:value-type="float" office:value="1367236.5758754862" table:style-name="ce93">
            <text:p>1367237</text:p>
          </table:table-cell>
          <table:table-cell office:value-type="float" office:value="21606.800000000003" table:style-name="ce8">
            <text:p>2160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48.74627768115943" table:formula="of:=[.DB75]*(1+([.CY75]/100))" table:style-name="ce93">
            <text:p>34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.37" table:style-name="ce25">
            <text:p>11.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13.1420289855073" table:formula="of:=[.CE75]/69" table:style-name="ce22">
            <text:p>313.1</text:p>
          </table:table-cell>
          <table:table-cell office:value-type="float" office:value="313.1420289855073" table:style-name="ce22">
            <text:p>313.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100-((([.CC75]-MIN([.CC46:.CC75]))/(MAX([.CC46:.CC75])-MIN([.CC46:.CC75])))*100)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9" table:formula="of:=-0.06*(([.A75]-1963)^2)+8.5*([.A75]-1963)+140" table:style-name="ce23">
            <text:p>219.0</text:p>
          </table:table-cell>
          <table:table-cell table:number-columns-repeated="16261"/>
        </table:table-row>
        <table:table-row table:style-name="ro2">
          <table:table-cell office:value-type="float" office:value="1974" table:style-name="ce15">
            <text:p>1974</text:p>
          </table:table-cell>
          <table:table-cell office:value-type="float" office:value="35569375" table:style-name="ce7">
            <text:p>35569375</text:p>
          </table:table-cell>
          <table:table-cell office:value-type="float" office:value="11872022" table:style-name="ce7">
            <text:p>11872022</text:p>
          </table:table-cell>
          <table:table-cell office:value-type="float" office:value="15433335" table:style-name="ce7">
            <text:p>15433335</text:p>
          </table:table-cell>
          <table:table-cell office:value-type="float" office:value="24002419" table:style-name="ce118">
            <text:p>2400241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5.59416666666668" table:style-name="ce73">
            <text:p>96</text:p>
          </table:table-cell>
          <table:table-cell office:value-type="float" office:value="63800000000" table:style-name="ce125">
            <text:p>63800000000</text:p>
          </table:table-cell>
          <table:table-cell office:value-type="string" table:style-name="ce118">
            <text:p>null</text:p>
          </table:table-cell>
          <table:table-cell office:value-type="float" office:value="393530137762.24268" table:formula="of:=([.CV76]*[.BS76]*86)" table:style-name="ce125">
            <text:p>3.9353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326070.875494981" table:style-name="ce24">
            <text:p>12326071</text:p>
          </table:table-cell>
          <table:table-cell office:value-type="float" office:value="416823.65279451571" table:formula="of:=[.BS76]-[.BS75]" table:style-name="ce24">
            <text:p>41682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8857026184000123" table:formula="of:=([.B76]/[.BS76])" table:style-name="ce34">
            <text:p>2.89</text:p>
          </table:table-cell>
          <table:table-cell office:value-type="float" office:value="3.7509999999999994" table:formula="of:=[.BX75]-(([.$BX$73]-[.$BX$83])/10)" table:style-name="ce103">
            <text:p>3.75</text:p>
          </table:table-cell>
          <table:table-cell office:value-type="float" office:value="2.8959999999999999" table:style-name="ce129">
            <text:p>2.90</text:p>
          </table:table-cell>
          <table:table-cell office:value-type="float" office:value="3.4999999999999858" table:formula="of:=([.BS76]*100/[.BS75])-100" table:style-name="ce23">
            <text:p>3.5</text:p>
          </table:table-cell>
          <table:table-cell office:value-type="float" office:value="392081" table:formula="of:=([.B76]-[.B75])" table:style-name="ce73">
            <text:p>392081</text:p>
          </table:table-cell>
          <table:table-cell office:value-type="float" office:value="1.1145854482155499" table:formula="of:=([.B76]*100/[.B75])-100" table:style-name="ce25">
            <text:p>1.11</text:p>
          </table:table-cell>
          <table:table-cell office:value-type="float" office:value="312296.59334370261" table:formula="of:=[.BT76]-([.CA76]/[.BX76])" table:style-name="ce76">
            <text:p>312297</text:p>
          </table:table-cell>
          <table:table-cell office:value-type="float" office:value="1390694.0661478597" table:style-name="ce93">
            <text:p>1390694</text:p>
          </table:table-cell>
          <table:table-cell office:value-type="float" office:value="22147.3" table:style-name="ce8">
            <text:p>221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71.240104057971" table:formula="of:=[.DB76]*(1+([.CY76]/100))" table:style-name="ce93">
            <text:p>37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.66" table:style-name="ce25">
            <text:p>15.6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0.97536231884055" table:formula="of:=[.CE76]/69" table:style-name="ce22">
            <text:p>321.0</text:p>
          </table:table-cell>
          <table:table-cell office:value-type="float" office:value="320.97536231884055" table:style-name="ce22">
            <text:p>321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.248788386309755" table:formula="of:=100-((([.CC76]-MIN([.CC47:.CC76]))/(MAX([.CC47:.CC76])-MIN([.CC47:.CC76])))*100)" table:style-name="ce128">
            <text:p>10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26.24" table:formula="of:=-0.06*(([.A76]-1963)^2)+8.5*([.A76]-1963)+140" table:style-name="ce23">
            <text:p>226.2</text:p>
          </table:table-cell>
          <table:table-cell table:number-columns-repeated="16261"/>
        </table:table-row>
        <table:table-row table:style-name="ro2">
          <table:table-cell office:value-type="float" office:value="1975" table:style-name="ce15">
            <text:p>1975</text:p>
          </table:table-cell>
          <table:table-cell office:value-type="float" office:value="35946425" table:style-name="ce7">
            <text:p>35946425</text:p>
          </table:table-cell>
          <table:table-cell office:value-type="float" office:value="11926333" table:style-name="ce7">
            <text:p>11926333</text:p>
          </table:table-cell>
          <table:table-cell office:value-type="float" office:value="15569725" table:style-name="ce7">
            <text:p>15569725</text:p>
          </table:table-cell>
          <table:table-cell office:value-type="float" office:value="24306457" table:style-name="ce118">
            <text:p>2430645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2.156666666666652" table:style-name="ce73">
            <text:p>92</text:p>
          </table:table-cell>
          <table:table-cell office:value-type="float" office:value="67300000000" table:style-name="ce125">
            <text:p>67300000000</text:p>
          </table:table-cell>
          <table:table-cell office:value-type="string" table:style-name="ce118">
            <text:p>null</text:p>
          </table:table-cell>
          <table:table-cell office:value-type="float" office:value="422835419280.28711" table:formula="of:=([.CV77]*[.BS77]*86)" table:style-name="ce125">
            <text:p>4.22835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695853.001759831" table:style-name="ce24">
            <text:p>12695853</text:p>
          </table:table-cell>
          <table:table-cell office:value-type="float" office:value="369782.12626484968" table:formula="of:=[.BS77]-[.BS76]" table:style-name="ce24">
            <text:p>36978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8313517016160552" table:formula="of:=([.B77]/[.BS77])" table:style-name="ce34">
            <text:p>2.83</text:p>
          </table:table-cell>
          <table:table-cell office:value-type="float" office:value="3.7279999999999993" table:formula="of:=[.BX76]-(([.$BX$73]-[.$BX$83])/10)" table:style-name="ce103">
            <text:p>3.73</text:p>
          </table:table-cell>
          <table:table-cell office:value-type="float" office:value="2.7650000000000001" table:style-name="ce129">
            <text:p>2.77</text:p>
          </table:table-cell>
          <table:table-cell office:value-type="float" office:value="3.0000000000000142" table:formula="of:=([.BS77]*100/[.BS76])-100" table:style-name="ce23">
            <text:p>3.0</text:p>
          </table:table-cell>
          <table:table-cell office:value-type="float" office:value="377050" table:formula="of:=([.B77]-[.B76])" table:style-name="ce73">
            <text:p>377050</text:p>
          </table:table-cell>
          <table:table-cell office:value-type="float" office:value="1.0600411168315418" table:formula="of:=([.B77]*100/[.B76])-100" table:style-name="ce25">
            <text:p>1.06</text:p>
          </table:table-cell>
          <table:table-cell office:value-type="float" office:value="268642.10480562219" table:formula="of:=[.BT77]-([.CA77]/[.BX77])" table:style-name="ce76">
            <text:p>268642</text:p>
          </table:table-cell>
          <table:table-cell office:value-type="float" office:value="1350481.2256809338" table:style-name="ce93">
            <text:p>1350481</text:p>
          </table:table-cell>
          <table:table-cell office:value-type="float" office:value="20849.3" table:style-name="ce8">
            <text:p>2084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87.26747396825397" table:formula="of:=[.DB77]*(1+([.CY77]/100))" table:style-name="ce93">
            <text:p>38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.02" table:style-name="ce25">
            <text:p>17.0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30.94126984126984" table:formula="of:=[.CE77]/63" table:style-name="ce22">
            <text:p>330.9</text:p>
          </table:table-cell>
          <table:table-cell office:value-type="float" office:value="330.94126984126984" table:style-name="ce22">
            <text:p>330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0" table:formula="of:=(([.DC77]-MIN([.DC63:.DC77]))/(MAX([.DC63:.DC77])-MIN([.DC63:.DC77])))*100" table:style-name="ce128">
            <text:p>10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.062162601354473" table:formula="of:=100-((([.CC77]-MIN([.CC48:.CC77]))/(MAX([.CC48:.CC77])-MIN([.CC48:.CC77])))*100)" table:style-name="ce128">
            <text:p>23.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1.531081300677236" table:formula="of:=AVERAGE([.DJ77:.DP77])" table:style-name="ce128">
            <text:p>61.5</text:p>
          </table:table-cell>
          <table:table-cell office:value-type="float" office:value="233.36" table:formula="of:=-0.06*(([.A77]-1963)^2)+8.5*([.A77]-1963)+140" table:style-name="ce23">
            <text:p>233.4</text:p>
          </table:table-cell>
          <table:table-cell table:number-columns-repeated="16261"/>
        </table:table-row>
        <table:table-row table:style-name="ro2">
          <table:table-cell office:value-type="float" office:value="1976" table:style-name="ce15">
            <text:p>1976</text:p>
          </table:table-cell>
          <table:table-cell office:value-type="float" office:value="36329199" table:style-name="ce7">
            <text:p>36329199</text:p>
          </table:table-cell>
          <table:table-cell office:value-type="float" office:value="11966578" table:style-name="ce7">
            <text:p>11966578</text:p>
          </table:table-cell>
          <table:table-cell office:value-type="float" office:value="15701262" table:style-name="ce7">
            <text:p>15701262</text:p>
          </table:table-cell>
          <table:table-cell office:value-type="float" office:value="24618168" table:style-name="ce118">
            <text:p>246181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2.542500000000004" table:style-name="ce73">
            <text:p>83</text:p>
          </table:table-cell>
          <table:table-cell office:value-type="float" office:value="93200000000" table:style-name="ce125">
            <text:p>93200000000</text:p>
          </table:table-cell>
          <table:table-cell office:value-type="string" table:style-name="ce118">
            <text:p>null</text:p>
          </table:table-cell>
          <table:table-cell office:value-type="float" office:value="426116358798.28479" table:formula="of:=([.CV78]*[.BS78]*86)" table:style-name="ce125">
            <text:p>4.26116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064032.738810865" table:style-name="ce24">
            <text:p>13064033</text:p>
          </table:table-cell>
          <table:table-cell office:value-type="float" office:value="368179.73705103435" table:formula="of:=[.BS78]-[.BS77]" table:style-name="ce24">
            <text:p>36818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7808563960554507" table:formula="of:=([.B78]/[.BS78])" table:style-name="ce34">
            <text:p>2.78</text:p>
          </table:table-cell>
          <table:table-cell office:value-type="float" office:value="3.7049999999999992" table:formula="of:=[.BX77]-(([.$BX$73]-[.$BX$83])/10)" table:style-name="ce103">
            <text:p>3.71</text:p>
          </table:table-cell>
          <table:table-cell office:value-type="float" office:value="2.77" table:style-name="ce129">
            <text:p>2.77</text:p>
          </table:table-cell>
          <table:table-cell office:value-type="float" office:value="2.9000000000000057" table:formula="of:=([.BS78]*100/[.BS77])-100" table:style-name="ce23">
            <text:p>2.9</text:p>
          </table:table-cell>
          <table:table-cell office:value-type="float" office:value="382774" table:formula="of:=([.B78]-[.B77])" table:style-name="ce73">
            <text:p>382774</text:p>
          </table:table-cell>
          <table:table-cell office:value-type="float" office:value="1.0648458087278527" table:formula="of:=([.B78]*100/[.B77])-100" table:style-name="ce25">
            <text:p>1.06</text:p>
          </table:table-cell>
          <table:table-cell office:value-type="float" office:value="264866.91653821385" table:formula="of:=[.BT78]-([.CA78]/[.BX78])" table:style-name="ce76">
            <text:p>264867</text:p>
          </table:table-cell>
          <table:table-cell office:value-type="float" office:value="1346013.13229572" table:style-name="ce93">
            <text:p>1346013</text:p>
          </table:table-cell>
          <table:table-cell office:value-type="float" office:value="21293" table:style-name="ce8">
            <text:p>2129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79.27349696969696" table:formula="of:=[.DB78]*(1+([.CY78]/100))" table:style-name="ce93">
            <text:p>37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.559999999999999" table:style-name="ce25">
            <text:p>17.5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2.62121212121212" table:formula="of:=[.CE78]/66" table:style-name="ce22">
            <text:p>322.6</text:p>
          </table:table-cell>
          <table:table-cell office:value-type="float" office:value="322.62121212121212" table:style-name="ce22">
            <text:p>322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6.187758418744238" table:formula="of:=(([.DC78]-MIN([.DC64:.DC78]))/(MAX([.DC64:.DC78])-MIN([.DC64:.DC78])))*100" table:style-name="ce128">
            <text:p>96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.170247969491427" table:formula="of:=100-((([.CC78]-MIN([.CC49:.CC78]))/(MAX([.CC49:.CC78])-MIN([.CC49:.CC78])))*100)" table:style-name="ce128">
            <text:p>24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0.179003194117833" table:formula="of:=AVERAGE([.DJ78:.DP78])" table:style-name="ce128">
            <text:p>60.2</text:p>
          </table:table-cell>
          <table:table-cell office:value-type="float" office:value="240.36" table:formula="of:=-0.06*(([.A78]-1963)^2)+8.5*([.A78]-1963)+140" table:style-name="ce23">
            <text:p>240.4</text:p>
          </table:table-cell>
          <table:table-cell table:number-columns-repeated="16261"/>
        </table:table-row>
        <table:table-row table:style-name="ro2">
          <table:table-cell office:value-type="float" office:value="1977" table:style-name="ce15">
            <text:p>1977</text:p>
          </table:table-cell>
          <table:table-cell office:value-type="float" office:value="36694077" table:style-name="ce7">
            <text:p>36694077</text:p>
          </table:table-cell>
          <table:table-cell office:value-type="float" office:value="12024081" table:style-name="ce7">
            <text:p>12024081</text:p>
          </table:table-cell>
          <table:table-cell office:value-type="float" office:value="15869335" table:style-name="ce7">
            <text:p>15869335</text:p>
          </table:table-cell>
          <table:table-cell office:value-type="float" office:value="24935072" table:style-name="ce118">
            <text:p>2493507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2.25166666666667" table:style-name="ce73">
            <text:p>102</text:p>
          </table:table-cell>
          <table:table-cell office:value-type="float" office:value="104500000000" table:style-name="ce125">
            <text:p>1.045E+11</text:p>
          </table:table-cell>
          <table:table-cell office:value-type="string" table:style-name="ce118">
            <text:p>null</text:p>
          </table:table-cell>
          <table:table-cell office:value-type="float" office:value="452209374417.78021" table:formula="of:=([.CV79]*[.BS79]*86)" table:style-name="ce125">
            <text:p>4.52209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429825.65549757" table:style-name="ce24">
            <text:p>13429826</text:p>
          </table:table-cell>
          <table:table-cell office:value-type="float" office:value="365792.91668670438" table:formula="of:=[.BS79]-[.BS78]" table:style-name="ce24">
            <text:p>36579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7322824540897215" table:formula="of:=([.B79]/[.BS79])" table:style-name="ce34">
            <text:p>2.73</text:p>
          </table:table-cell>
          <table:table-cell office:value-type="float" office:value="3.6819999999999991" table:formula="of:=[.BX78]-(([.$BX$73]-[.$BX$83])/10)" table:style-name="ce103">
            <text:p>3.68</text:p>
          </table:table-cell>
          <table:table-cell office:value-type="float" office:value="2.653" table:style-name="ce129">
            <text:p>2.65</text:p>
          </table:table-cell>
          <table:table-cell office:value-type="float" office:value="2.8000000000000114" table:formula="of:=([.BS79]*100/[.BS78])-100" table:style-name="ce23">
            <text:p>2.8</text:p>
          </table:table-cell>
          <table:table-cell office:value-type="float" office:value="364878" table:formula="of:=([.B79]-[.B78])" table:style-name="ce73">
            <text:p>364878</text:p>
          </table:table-cell>
          <table:table-cell office:value-type="float" office:value="1.0043656619018719" table:formula="of:=([.B79]*100/[.B78])-100" table:style-name="ce25">
            <text:p>1.00</text:p>
          </table:table-cell>
          <table:table-cell office:value-type="float" office:value="266695.14373722038" table:formula="of:=[.BT79]-([.CA79]/[.BX79])" table:style-name="ce76">
            <text:p>266695</text:p>
          </table:table-cell>
          <table:table-cell office:value-type="float" office:value="1417502.6264591438" table:style-name="ce93">
            <text:p>1417503</text:p>
          </table:table-cell>
          <table:table-cell office:value-type="float" office:value="21710" table:style-name="ce8">
            <text:p>2171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91.53513043478262" table:formula="of:=[.DB79]*(1+([.CY79]/100))" table:style-name="ce93">
            <text:p>39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.44" table:style-name="ce25">
            <text:p>24.4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14.63768115942031" table:formula="of:=[.CE79]/69" table:style-name="ce22">
            <text:p>314.6</text:p>
          </table:table-cell>
          <table:table-cell office:value-type="float" office:value="314.63768115942031" table:style-name="ce22">
            <text:p>314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2.52971303951405" table:formula="of:=(([.DC79]-MIN([.DC65:.DC79]))/(MAX([.DC65:.DC79])-MIN([.DC65:.DC79])))*100" table:style-name="ce128">
            <text:p>92.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.63363054398755" table:formula="of:=100-((([.CC79]-MIN([.CC50:.CC79]))/(MAX([.CC50:.CC79])-MIN([.CC50:.CC79])))*100)" table:style-name="ce128">
            <text:p>23.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8.0816717917508" table:formula="of:=AVERAGE([.DJ79:.DP79])" table:style-name="ce128">
            <text:p>58.1</text:p>
          </table:table-cell>
          <table:table-cell office:value-type="float" office:value="247.24" table:formula="of:=-0.06*(([.A79]-1963)^2)+8.5*([.A79]-1963)+140" table:style-name="ce23">
            <text:p>247.2</text:p>
          </table:table-cell>
          <table:table-cell table:number-columns-repeated="16261"/>
        </table:table-row>
        <table:table-row table:style-name="ro2">
          <table:table-cell office:value-type="float" office:value="1978" table:style-name="ce15">
            <text:p>1978</text:p>
          </table:table-cell>
          <table:table-cell office:value-type="float" office:value="37035719" table:style-name="ce7">
            <text:p>37035719</text:p>
          </table:table-cell>
          <table:table-cell office:value-type="float" office:value="12074990" table:style-name="ce7">
            <text:p>12074990</text:p>
          </table:table-cell>
          <table:table-cell office:value-type="float" office:value="16022180" table:style-name="ce7">
            <text:p>16022180</text:p>
          </table:table-cell>
          <table:table-cell office:value-type="float" office:value="25266202" table:style-name="ce118">
            <text:p>2526620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5.8875" table:style-name="ce73">
            <text:p>126</text:p>
          </table:table-cell>
          <table:table-cell office:value-type="float" office:value="121800000000" table:style-name="ce125">
            <text:p>1.218E+11</text:p>
          </table:table-cell>
          <table:table-cell office:value-type="string" table:style-name="ce118">
            <text:p>null</text:p>
          </table:table-cell>
          <table:table-cell office:value-type="float" office:value="412486370196.66547" table:formula="of:=([.CV80]*[.BS80]*86)" table:style-name="ce125">
            <text:p>4.12486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792430.948196003" table:style-name="ce24">
            <text:p>13792431</text:p>
          </table:table-cell>
          <table:table-cell office:value-type="float" office:value="362605.29269843362" table:formula="of:=[.BS80]-[.BS79]" table:style-name="ce24">
            <text:p>36260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6852205487999292" table:formula="of:=([.B80]/[.BS80])" table:style-name="ce34">
            <text:p>2.69</text:p>
          </table:table-cell>
          <table:table-cell office:value-type="float" office:value="3.6589999999999989" table:formula="of:=[.BX79]-(([.$BX$73]-[.$BX$83])/10)" table:style-name="ce103">
            <text:p>3.66</text:p>
          </table:table-cell>
          <table:table-cell office:value-type="float" office:value="2.5419999999999998" table:style-name="ce129">
            <text:p>2.54</text:p>
          </table:table-cell>
          <table:table-cell office:value-type="float" office:value="2.7000000000000028" table:formula="of:=([.BS80]*100/[.BS79])-100" table:style-name="ce23">
            <text:p>2.7</text:p>
          </table:table-cell>
          <table:table-cell office:value-type="float" office:value="341642" table:formula="of:=([.B80]-[.B79])" table:style-name="ce73">
            <text:p>341642</text:p>
          </table:table-cell>
          <table:table-cell office:value-type="float" office:value="0.93105489477225944" table:formula="of:=([.B80]*100/[.B79])-100" table:style-name="ce25">
            <text:p>0.93</text:p>
          </table:table-cell>
          <table:table-cell office:value-type="float" office:value="269234.97293893644" table:formula="of:=[.BT80]-([.CA80]/[.BX80])" table:style-name="ce76">
            <text:p>269235</text:p>
          </table:table-cell>
          <table:table-cell office:value-type="float" office:value="1329257.7821011674" table:style-name="ce93">
            <text:p>1329258</text:p>
          </table:table-cell>
          <table:table-cell office:value-type="float" office:value="22028" table:style-name="ce8">
            <text:p>2202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47.75255789473687" table:formula="of:=[.DB80]*(1+([.CY80]/100))" table:style-name="ce93">
            <text:p>34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9.98" table:style-name="ce25">
            <text:p>19.9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89.84210526315792" table:formula="of:=[.CE80]/76" table:style-name="ce22">
            <text:p>289.8</text:p>
          </table:table-cell>
          <table:table-cell office:value-type="float" office:value="289.84210526315792" table:style-name="ce22">
            <text:p>289.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1.168406586671466" table:formula="of:=(([.DC80]-MIN([.DC66:.DC80]))/(MAX([.DC66:.DC80])-MIN([.DC66:.DC80])))*100" table:style-name="ce128">
            <text:p>81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2.888145186267735" table:formula="of:=100-((([.CC80]-MIN([.CC51:.CC80]))/(MAX([.CC51:.CC80])-MIN([.CC51:.CC80])))*100)" table:style-name="ce128">
            <text:p>22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2.028275886469601" table:formula="of:=AVERAGE([.DJ80:.DP80])" table:style-name="ce128">
            <text:p>52.0</text:p>
          </table:table-cell>
          <table:table-cell office:value-type="float" office:value="254" table:formula="of:=-0.06*(([.A80]-1963)^2)+8.5*([.A80]-1963)+140" table:style-name="ce23">
            <text:p>254.0</text:p>
          </table:table-cell>
          <table:table-cell table:number-columns-repeated="16261"/>
        </table:table-row>
        <table:table-row table:style-name="ro2">
          <table:table-cell office:value-type="float" office:value="1979" table:style-name="ce15">
            <text:p>1979</text:p>
          </table:table-cell>
          <table:table-cell office:value-type="float" office:value="37346940" table:style-name="ce7">
            <text:p>37346940</text:p>
          </table:table-cell>
          <table:table-cell office:value-type="float" office:value="12092821" table:style-name="ce7">
            <text:p>12092821</text:p>
          </table:table-cell>
          <table:table-cell office:value-type="float" office:value="16153923" table:style-name="ce7">
            <text:p>16153923</text:p>
          </table:table-cell>
          <table:table-cell office:value-type="float" office:value="25597503" table:style-name="ce118">
            <text:p>2559750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.516500000000001" table:style-name="ce64">
            <text:p>17.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93.33666666666667" table:style-name="ce73">
            <text:p>193</text:p>
          </table:table-cell>
          <table:table-cell office:value-type="float" office:value="154000000000" table:style-name="ce125">
            <text:p>1.54E+11</text:p>
          </table:table-cell>
          <table:table-cell office:value-type="string" table:style-name="ce118">
            <text:p>null</text:p>
          </table:table-cell>
          <table:table-cell office:value-type="float" office:value="384420946570.28198" table:formula="of:=([.CV81]*[.BS81]*86)" table:style-name="ce125">
            <text:p>3.84421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137241.721900903" table:style-name="ce24">
            <text:p>14137242</text:p>
          </table:table-cell>
          <table:table-cell office:value-type="float" office:value="344810.77370489947" table:formula="of:=[.BS81]-[.BS80]" table:style-name="ce24">
            <text:p>3448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6417416306989696" table:formula="of:=([.B81]/[.BS81])" table:style-name="ce34">
            <text:p>2.64</text:p>
          </table:table-cell>
          <table:table-cell office:value-type="float" office:value="3.6359999999999988" table:formula="of:=[.BX80]-(([.$BX$73]-[.$BX$83])/10)" table:style-name="ce103">
            <text:p>3.64</text:p>
          </table:table-cell>
          <table:table-cell office:value-type="float" office:value="2.37" table:style-name="ce129">
            <text:p>2.37</text:p>
          </table:table-cell>
          <table:table-cell office:value-type="float" office:value="2.4999999999999858" table:formula="of:=([.BS81]*100/[.BS80])-100" table:style-name="ce23">
            <text:p>2.5</text:p>
          </table:table-cell>
          <table:table-cell office:value-type="float" office:value="311221" table:formula="of:=([.B81]-[.B80])" table:style-name="ce73">
            <text:p>311221</text:p>
          </table:table-cell>
          <table:table-cell office:value-type="float" office:value="0.84032660470288079" table:formula="of:=([.B81]*100/[.B80])-100" table:style-name="ce25">
            <text:p>0.84</text:p>
          </table:table-cell>
          <table:table-cell office:value-type="float" office:value="259216.4392714561" table:formula="of:=[.BT81]-([.CA81]/[.BX81])" table:style-name="ce76">
            <text:p>259216</text:p>
          </table:table-cell>
          <table:table-cell office:value-type="float" office:value="1249949.1245136186" table:style-name="ce93">
            <text:p>1249949</text:p>
          </table:table-cell>
          <table:table-cell office:value-type="float" office:value="20773" table:style-name="ce8">
            <text:p>2077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16.18692631578949" table:formula="of:=[.DB81]*(1+([.CY81]/100))" table:style-name="ce93">
            <text:p>31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.68" table:style-name="ce25">
            <text:p>15.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73.32894736842104" table:formula="of:=[.CE81]/76" table:style-name="ce22">
            <text:p>273.3</text:p>
          </table:table-cell>
          <table:table-cell office:value-type="float" office:value="273.32894736842104" table:style-name="ce22">
            <text:p>273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1.411391166850734" table:formula="of:=(([.DC81]-MIN([.DC67:.DC81]))/(MAX([.DC67:.DC81])-MIN([.DC67:.DC81])))*100" table:style-name="ce128">
            <text:p>71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7.320098394051428" table:formula="of:=100-((([.CC81]-MIN([.CC52:.CC81]))/(MAX([.CC52:.CC81])-MIN([.CC52:.CC81])))*100)" table:style-name="ce128">
            <text:p>27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9.365744780451081" table:formula="of:=AVERAGE([.DJ81:.DP81])" table:style-name="ce128">
            <text:p>49.4</text:p>
          </table:table-cell>
          <table:table-cell office:value-type="float" office:value="260.64" table:formula="of:=-0.06*(([.A81]-1963)^2)+8.5*([.A81]-1963)+140" table:style-name="ce23">
            <text:p>260.6</text:p>
          </table:table-cell>
          <table:table-cell table:number-columns-repeated="16261"/>
        </table:table-row>
        <table:table-row table:style-name="ro2">
          <table:table-cell office:value-type="float" office:value="1980" table:style-name="ce15">
            <text:p>1980</text:p>
          </table:table-cell>
          <table:table-cell office:value-type="float" office:value="37635389" table:style-name="ce7">
            <text:p>37635389</text:p>
          </table:table-cell>
          <table:table-cell office:value-type="float" office:value="12135566" table:style-name="ce7">
            <text:p>12135566</text:p>
          </table:table-cell>
          <table:table-cell office:value-type="float" office:value="16310425" table:style-name="ce7">
            <text:p>16310425</text:p>
          </table:table-cell>
          <table:table-cell office:value-type="float" office:value="26206134" table:style-name="ce118">
            <text:p>2620613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.841749999999999" table:style-name="ce64">
            <text:p>15.84</text:p>
          </table:table-cell>
          <table:table-cell office:value-type="string" table:style-name="ce118">
            <text:p>null</text:p>
          </table:table-cell>
          <table:table-cell office:value-type="float" office:value="1230451000000" table:style-name="ce85">
            <text:p>1.23E+1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74.74166666666662" table:style-name="ce73">
            <text:p>375</text:p>
          </table:table-cell>
          <table:table-cell office:value-type="float" office:value="159100000000" table:style-name="ce125">
            <text:p>1.591E+11</text:p>
          </table:table-cell>
          <table:table-cell office:value-type="string" table:style-name="ce118">
            <text:p>null</text:p>
          </table:table-cell>
          <table:table-cell office:value-type="float" office:value="373496705120.4549" table:formula="of:=([.CV82]*[.BS82]*86)" table:style-name="ce125">
            <text:p>3.73497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476535.523226524" table:style-name="ce24">
            <text:p>14476536</text:p>
          </table:table-cell>
          <table:table-cell office:value-type="float" office:value="339293.80132562108" table:formula="of:=[.BS82]-[.BS81]" table:style-name="ce24">
            <text:p>33929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5997510895902423" table:formula="of:=([.B82]/[.BS82])" table:style-name="ce34">
            <text:p>2.60</text:p>
          </table:table-cell>
          <table:table-cell office:value-type="float" office:value="3.6129999999999987" table:formula="of:=[.BX81]-(([.$BX$73]-[.$BX$83])/10)" table:style-name="ce103">
            <text:p>3.61</text:p>
          </table:table-cell>
          <table:table-cell office:value-type="float" office:value="2.2160000000000002" table:style-name="ce129">
            <text:p>2.22</text:p>
          </table:table-cell>
          <table:table-cell office:value-type="float" office:value="2.3999999999999915" table:formula="of:=([.BS82]*100/[.BS81])-100" table:style-name="ce23">
            <text:p>2.4</text:p>
          </table:table-cell>
          <table:table-cell office:value-type="float" office:value="288449" table:formula="of:=([.B82]-[.B81])" table:style-name="ce73">
            <text:p>288449</text:p>
          </table:table-cell>
          <table:table-cell office:value-type="float" office:value="0.77234975609782452" table:formula="of:=([.B82]*100/[.B81])-100" table:style-name="ce25">
            <text:p>0.77</text:p>
          </table:table-cell>
          <table:table-cell office:value-type="float" office:value="259457.37730126455" table:formula="of:=[.BT82]-([.CA82]/[.BX82])" table:style-name="ce76">
            <text:p>259457</text:p>
          </table:table-cell>
          <table:table-cell office:value-type="float" office:value="1148299.9999999998" table:style-name="ce93">
            <text:p>1148300</text:p>
          </table:table-cell>
          <table:table-cell office:value-type="float" office:value="19725" table:style-name="ce8">
            <text:p>197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00.0016776315789" table:formula="of:=[.DB82]*(1+([.CY82]/100))" table:style-name="ce93">
            <text:p>30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.59" table:style-name="ce25">
            <text:p>15.5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9.53947368421052" table:formula="of:=[.CE82]/76" table:style-name="ce22">
            <text:p>259.5</text:p>
          </table:table-cell>
          <table:table-cell office:value-type="float" office:value="259.53947368421052" table:style-name="ce22">
            <text:p>259.5</text:p>
          </table:table-cell>
          <table:table-cell office:value-type="float" office:value="-1.6747500000000013" table:formula="of:=([.Y82]-[.Y81])" table:style-name="ce25">
            <text:p>-1.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0.898691620673773" table:formula="of:=(([.DC82]-MIN([.DC68:.DC82]))/(MAX([.DC68:.DC82])-MIN([.DC68:.DC82])))*100" table:style-name="ce128">
            <text:p>60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8.004681995924912" table:formula="of:=100-((([.CC82]-MIN([.CC53:.CC82]))/(MAX([.CC53:.CC82])-MIN([.CC53:.CC82])))*100)" table:style-name="ce128">
            <text:p>28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4.451686808299343" table:formula="of:=AVERAGE([.DJ82:.DP82])" table:style-name="ce128">
            <text:p>44.5</text:p>
          </table:table-cell>
          <table:table-cell office:value-type="float" office:value="267.15999999999997" table:formula="of:=-0.06*(([.A82]-1963)^2)+8.5*([.A82]-1963)+140" table:style-name="ce23">
            <text:p>267.2</text:p>
          </table:table-cell>
          <table:table-cell table:number-columns-repeated="16261"/>
        </table:table-row>
        <table:table-row table:style-name="ro2">
          <table:table-cell office:value-type="float" office:value="1981" table:style-name="ce15">
            <text:p>1981</text:p>
          </table:table-cell>
          <table:table-cell office:value-type="float" office:value="37881873" table:style-name="ce7">
            <text:p>37881873</text:p>
          </table:table-cell>
          <table:table-cell office:value-type="float" office:value="12166940" table:style-name="ce7">
            <text:p>12166940</text:p>
          </table:table-cell>
          <table:table-cell office:value-type="float" office:value="16431393" table:style-name="ce7">
            <text:p>16431393</text:p>
          </table:table-cell>
          <table:table-cell office:value-type="float" office:value="26577052" table:style-name="ce118">
            <text:p>265770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.862454545454543" table:style-name="ce64">
            <text:p>16.86</text:p>
          </table:table-cell>
          <table:table-cell office:value-type="string" table:style-name="ce118">
            <text:p>null</text:p>
          </table:table-cell>
          <table:table-cell office:value-type="float" office:value="1356895000000" table:style-name="ce85">
            <text:p>1.36E+12</text:p>
          </table:table-cell>
          <table:table-cell office:value-type="float" office:value="10.276232048248971" table:formula="of:=([.AA83]*100/[.AA82])-100" table:style-name="ce70">
            <text:p>10.28</text:p>
          </table:table-cell>
          <table:table-cell office:value-type="string" table:style-name="ce118">
            <text:p>null</text:p>
          </table:table-cell>
          <table:table-cell office:value-type="float" office:value="356.03" table:style-name="ce73">
            <text:p>356</text:p>
          </table:table-cell>
          <table:table-cell office:value-type="float" office:value="173339000000" table:style-name="ce125">
            <text:p>1.73339E+11</text:p>
          </table:table-cell>
          <table:table-cell office:value-type="string" table:style-name="ce118">
            <text:p>null</text:p>
          </table:table-cell>
          <table:table-cell office:value-type="float" office:value="304789513994.76361" table:formula="of:=([.CV83]*[.BS83]*86)" table:style-name="ce125">
            <text:p>3.0479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726000" table:style-name="ce18">
            <text:p>14726000</text:p>
          </table:table-cell>
          <table:table-cell office:value-type="float" office:value="249464.47677347623" table:formula="of:=[.BS83]-[.BS82]" table:style-name="ce24">
            <text:p>24946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5724482547874508" table:formula="of:=([.B83]/[.BS83])" table:style-name="ce34">
            <text:p>2.57</text:p>
          </table:table-cell>
          <table:table-cell office:value-type="float" office:value="3.59" table:style-name="ce71">
            <text:p>3.59</text:p>
          </table:table-cell>
          <table:table-cell office:value-type="float" office:value="2.0379999999999998" table:style-name="ce129">
            <text:p>2.04</text:p>
          </table:table-cell>
          <table:table-cell office:value-type="float" office:value="1.7232332720299581" table:formula="of:=([.BS83]*100/[.BS82])-100" table:style-name="ce23">
            <text:p>1.7</text:p>
          </table:table-cell>
          <table:table-cell office:value-type="float" office:value="246484" table:formula="of:=([.B83]-[.B82])" table:style-name="ce73">
            <text:p>246484</text:p>
          </table:table-cell>
          <table:table-cell office:value-type="float" office:value="0.65492613879983708" table:formula="of:=([.B83]*100/[.B82])-100" table:style-name="ce25">
            <text:p>0.65</text:p>
          </table:table-cell>
          <table:table-cell office:value-type="float" office:value="180805.9809517492" table:formula="of:=[.BT83]-([.CA83]/[.BX83])" table:style-name="ce76">
            <text:p>180806</text:p>
          </table:table-cell>
          <table:table-cell office:value-type="float" office:value="1061463.3449375345" table:style-name="ce93">
            <text:p>1061463</text:p>
          </table:table-cell>
          <table:table-cell office:value-type="float" office:value="18487" table:style-name="ce8">
            <text:p>1848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0.66712727272727" table:formula="of:=[.DB83]*(1+([.CY83]/100))" table:style-name="ce93">
            <text:p>24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.56" table:style-name="ce25">
            <text:p>14.5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0.07954545454547" table:formula="of:=[.CE83]/88" table:style-name="ce22">
            <text:p>210.1</text:p>
          </table:table-cell>
          <table:table-cell office:value-type="float" office:value="210.07954545454547" table:style-name="ce22">
            <text:p>210.1</text:p>
          </table:table-cell>
          <table:table-cell office:value-type="float" office:value="1.020704545454544" table:formula="of:=([.Y83]-[.Y82])" table:style-name="ce25">
            <text:p>1.0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9.336744002205378" table:formula="of:=(([.DC83]-MIN([.DC69:.DC83]))/(MAX([.DC69:.DC83])-MIN([.DC69:.DC83])))*100" table:style-name="ce128">
            <text:p>29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3.103819465676423" table:formula="of:=100-((([.CC83]-MIN([.CC54:.CC83]))/(MAX([.CC54:.CC83])-MIN([.CC54:.CC83])))*100)" table:style-name="ce128">
            <text:p>53.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1.220281733940901" table:formula="of:=AVERAGE([.DJ83:.DP83])" table:style-name="ce128">
            <text:p>41.2</text:p>
          </table:table-cell>
          <table:table-cell office:value-type="float" office:value="273.56" table:formula="of:=-0.06*(([.A83]-1963)^2)+8.5*([.A83]-1963)+140" table:style-name="ce23">
            <text:p>273.6</text:p>
          </table:table-cell>
          <table:table-cell table:number-columns-repeated="16261"/>
        </table:table-row>
        <table:table-row table:style-name="ro2">
          <table:table-cell office:value-type="float" office:value="1982" table:style-name="ce15">
            <text:p>1982</text:p>
          </table:table-cell>
          <table:table-cell office:value-type="float" office:value="38090151" table:style-name="ce7">
            <text:p>38090151</text:p>
          </table:table-cell>
          <table:table-cell office:value-type="float" office:value="12255611" table:style-name="ce7">
            <text:p>12255611</text:p>
          </table:table-cell>
          <table:table-cell office:value-type="float" office:value="16581082" table:style-name="ce7">
            <text:p>16581082</text:p>
          </table:table-cell>
          <table:table-cell office:value-type="float" office:value="26970364" table:style-name="ce118">
            <text:p>2697036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.58909090909091" table:style-name="ce64">
            <text:p>16.59</text:p>
          </table:table-cell>
          <table:table-cell office:value-type="string" table:style-name="ce118">
            <text:p>null</text:p>
          </table:table-cell>
          <table:table-cell office:value-type="float" office:value="1511643000000" table:style-name="ce85">
            <text:p>1.51E+12</text:p>
          </table:table-cell>
          <table:table-cell office:value-type="float" office:value="11.40456704461289" table:formula="of:=([.AA84]*100/[.AA83])-100" table:style-name="ce70">
            <text:p>11.40</text:p>
          </table:table-cell>
          <table:table-cell office:value-type="string" table:style-name="ce118">
            <text:p>null</text:p>
          </table:table-cell>
          <table:table-cell office:value-type="float" office:value="348.6608333333333" table:style-name="ce73">
            <text:p>349</text:p>
          </table:table-cell>
          <table:table-cell office:value-type="float" office:value="190291000000" table:style-name="ce125">
            <text:p>1.90291E+11</text:p>
          </table:table-cell>
          <table:table-cell office:value-type="string" table:style-name="ce118">
            <text:p>null</text:p>
          </table:table-cell>
          <table:table-cell office:value-type="float" office:value="309798093479.42029" table:formula="of:=([.CV84]*[.BS84]*86)" table:style-name="ce125">
            <text:p>3.09798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951835.891732119" table:style-name="ce24">
            <text:p>14951836</text:p>
          </table:table-cell>
          <table:table-cell office:value-type="float" office:value="225835.89173211902" table:formula="of:=[.BS84]-[.BS83]" table:style-name="ce24">
            <text:p>22583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5475233460168338" table:formula="of:=([.B84]/[.BS84])" table:style-name="ce34">
            <text:p>2.55</text:p>
          </table:table-cell>
          <table:table-cell office:value-type="float" office:value="3.5569999999999999" table:formula="of:=[.BX83]-(([.$BX$83]-[.$BX$93])/10)" table:style-name="ce103">
            <text:p>3.56</text:p>
          </table:table-cell>
          <table:table-cell office:value-type="float" office:value="1.9419999999999999" table:style-name="ce129">
            <text:p>1.94</text:p>
          </table:table-cell>
          <table:table-cell office:value-type="float" office:value="1.5335861179690227" table:formula="of:=([.BS84]*100/[.BS83])-100" table:style-name="ce23">
            <text:p>1.5</text:p>
          </table:table-cell>
          <table:table-cell office:value-type="float" office:value="208278" table:formula="of:=([.B84]-[.B83])" table:style-name="ce73">
            <text:p>208278</text:p>
          </table:table-cell>
          <table:table-cell office:value-type="float" office:value="0.54980913958505084" table:formula="of:=([.B84]*100/[.B83])-100" table:style-name="ce25">
            <text:p>0.55</text:p>
          </table:table-cell>
          <table:table-cell office:value-type="float" office:value="167281.49195702764" table:formula="of:=[.BT84]-([.CA84]/[.BX84])" table:style-name="ce76">
            <text:p>167281</text:p>
          </table:table-cell>
          <table:table-cell office:value-type="float" office:value="1044934.0084215659" table:style-name="ce93">
            <text:p>1044934</text:p>
          </table:table-cell>
          <table:table-cell office:value-type="float" office:value="18528" table:style-name="ce8">
            <text:p>1852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0.92716363636359" table:formula="of:=[.DB84]*(1+([.CY84]/100))" table:style-name="ce93">
            <text:p>24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.43" table:style-name="ce25">
            <text:p>14.4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10.54545454545453" table:formula="of:=[.CE84]/88" table:style-name="ce22">
            <text:p>210.5</text:p>
          </table:table-cell>
          <table:table-cell office:value-type="float" office:value="210.54545454545453" table:style-name="ce22">
            <text:p>210.5</text:p>
          </table:table-cell>
          <table:table-cell office:value-type="float" office:value="-0.27336363636363359" table:formula="of:=([.Y84]-[.Y83])" table:style-name="ce25">
            <text:p>-0.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.2680384713360819" table:formula="of:=(([.DC84]-MIN([.DC70:.DC84]))/(MAX([.DC70:.DC84])-MIN([.DC70:.DC84])))*100" table:style-name="ce128">
            <text:p>7.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7.41973786308386" table:formula="of:=100-((([.CC84]-MIN([.CC55:.CC84]))/(MAX([.CC55:.CC84])-MIN([.CC55:.CC84])))*100)" table:style-name="ce128">
            <text:p>57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2.343888167209968" table:formula="of:=AVERAGE([.DJ84:.DP84])" table:style-name="ce128">
            <text:p>32.3</text:p>
          </table:table-cell>
          <table:table-cell office:value-type="float" office:value="279.84000000000003" table:formula="of:=-0.06*(([.A84]-1963)^2)+8.5*([.A84]-1963)+140" table:style-name="ce23">
            <text:p>279.8</text:p>
          </table:table-cell>
          <table:table-cell table:number-columns-repeated="16261"/>
        </table:table-row>
        <table:table-row table:style-name="ro2">
          <table:table-cell office:value-type="float" office:value="1983" table:style-name="ce15">
            <text:p>1983</text:p>
          </table:table-cell>
          <table:table-cell office:value-type="float" office:value="38252899" table:style-name="ce7">
            <text:p>38252899</text:p>
          </table:table-cell>
          <table:table-cell office:value-type="float" office:value="12336331" table:style-name="ce7">
            <text:p>12336331</text:p>
          </table:table-cell>
          <table:table-cell office:value-type="float" office:value="16716165" table:style-name="ce7">
            <text:p>16716165</text:p>
          </table:table-cell>
          <table:table-cell office:value-type="float" office:value="27326956" table:style-name="ce118">
            <text:p>2732695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8.514333333333337" table:style-name="ce64">
            <text:p>18.51</text:p>
          </table:table-cell>
          <table:table-cell office:value-type="string" table:style-name="ce118">
            <text:p>null</text:p>
          </table:table-cell>
          <table:table-cell office:value-type="float" office:value="1647621000000" table:style-name="ce85">
            <text:p>1.65E+12</text:p>
          </table:table-cell>
          <table:table-cell office:value-type="float" office:value="8.9953778769193491" table:formula="of:=([.AA85]*100/[.AA84])-100" table:style-name="ce70">
            <text:p>9.00</text:p>
          </table:table-cell>
          <table:table-cell office:value-type="string" table:style-name="ce118">
            <text:p>null</text:p>
          </table:table-cell>
          <table:table-cell office:value-type="float" office:value="437.62833333333333" table:style-name="ce73">
            <text:p>438</text:p>
          </table:table-cell>
          <table:table-cell office:value-type="float" office:value="182781000000" table:style-name="ce125">
            <text:p>1.82781E+11</text:p>
          </table:table-cell>
          <table:table-cell office:value-type="string" table:style-name="ce118">
            <text:p>null</text:p>
          </table:table-cell>
          <table:table-cell office:value-type="float" office:value="298113815870.94055" table:formula="of:=([.CV85]*[.BS85]*86)" table:style-name="ce125">
            <text:p>2.98114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25" table:style-name="ce129">
            <text:p>0.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170301.157183452" table:style-name="ce24">
            <text:p>15170301</text:p>
          </table:table-cell>
          <table:table-cell office:value-type="float" office:value="218465.26545133255" table:formula="of:=[.BS85]-[.BS84]" table:style-name="ce24">
            <text:p>21846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5215649052482032" table:formula="of:=([.B85]/[.BS85])" table:style-name="ce34">
            <text:p>2.52</text:p>
          </table:table-cell>
          <table:table-cell office:value-type="float" office:value="3.524" table:formula="of:=[.BX84]-(([.$BX$83]-[.$BX$93])/10)" table:style-name="ce103">
            <text:p>3.52</text:p>
          </table:table-cell>
          <table:table-cell office:value-type="float" office:value="1.798" table:style-name="ce129">
            <text:p>1.80</text:p>
          </table:table-cell>
          <table:table-cell office:value-type="float" office:value="1.4611266939609493" table:formula="of:=([.BS85]*100/[.BS84])-100" table:style-name="ce23">
            <text:p>1.5</text:p>
          </table:table-cell>
          <table:table-cell office:value-type="float" office:value="162748" table:formula="of:=([.B85]-[.B84])" table:style-name="ce73">
            <text:p>162748</text:p>
          </table:table-cell>
          <table:table-cell office:value-type="float" office:value="0.42727055610779985" table:formula="of:=([.B85]*100/[.B84])-100" table:style-name="ce25">
            <text:p>0.43</text:p>
          </table:table-cell>
          <table:table-cell office:value-type="float" office:value="172282.51857278546" table:formula="of:=[.BT85]-([.CA85]/[.BX85])" table:style-name="ce76">
            <text:p>172283</text:p>
          </table:table-cell>
          <table:table-cell office:value-type="float" office:value="1015020.9466746274" table:style-name="ce93">
            <text:p>1015021</text:p>
          </table:table-cell>
          <table:table-cell office:value-type="float" office:value="17923.3" table:style-name="ce8">
            <text:p>1792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28.50170761363631" table:formula="of:=[.DB85]*(1+([.CY85]/100))" table:style-name="ce93">
            <text:p>22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.19" table:style-name="ce25">
            <text:p>12.1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03.67386363636362" table:formula="of:=[.CE85]/88" table:style-name="ce22">
            <text:p>203.7</text:p>
          </table:table-cell>
          <table:table-cell office:value-type="float" office:value="203.67386363636362" table:style-name="ce22">
            <text:p>203.7</text:p>
          </table:table-cell>
          <table:table-cell office:value-type="float" office:value="1.9252424242424269" table:formula="of:=([.Y85]-[.Y84])" table:style-name="ce25">
            <text:p>1.9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(([.DC85]-MIN([.DC71:.DC85]))/(MAX([.DC71:.DC85])-MIN([.DC71:.DC85])))*100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6.750729770092448" table:formula="of:=100-((([.CC85]-MIN([.CC56:.CC85]))/(MAX([.CC56:.CC85])-MIN([.CC56:.CC85])))*100)" table:style-name="ce128">
            <text:p>56.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8.375364885046224" table:formula="of:=AVERAGE([.DJ85:.DP85])" table:style-name="ce128">
            <text:p>28.4</text:p>
          </table:table-cell>
          <table:table-cell office:value-type="float" office:value="286" table:formula="of:=-0.06*(([.A85]-1963)^2)+8.5*([.A85]-1963)+140" table:style-name="ce23">
            <text:p>286.0</text:p>
          </table:table-cell>
          <table:table-cell table:number-columns-repeated="16261"/>
        </table:table-row>
        <table:table-row table:style-name="ro2">
          <table:table-cell office:value-type="float" office:value="1984" table:style-name="ce15">
            <text:p>1984</text:p>
          </table:table-cell>
          <table:table-cell office:value-type="float" office:value="38407829" table:style-name="ce7">
            <text:p>38407829</text:p>
          </table:table-cell>
          <table:table-cell office:value-type="float" office:value="12422212" table:style-name="ce7">
            <text:p>12422212</text:p>
          </table:table-cell>
          <table:table-cell office:value-type="float" office:value="16858357" table:style-name="ce7">
            <text:p>16858357</text:p>
          </table:table-cell>
          <table:table-cell office:value-type="float" office:value="27685736" table:style-name="ce118">
            <text:p>2768573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.03825" table:style-name="ce64">
            <text:p>14.04</text:p>
          </table:table-cell>
          <table:table-cell office:value-type="string" table:style-name="ce118">
            <text:p>null</text:p>
          </table:table-cell>
          <table:table-cell office:value-type="float" office:value="1788789000000" table:style-name="ce85">
            <text:p>1.79E+12</text:p>
          </table:table-cell>
          <table:table-cell office:value-type="float" office:value="8.5679898471796605" table:formula="of:=([.AA86]*100/[.AA85])-100" table:style-name="ce70">
            <text:p>8.57</text:p>
          </table:table-cell>
          <table:table-cell office:value-type="string" table:style-name="ce118">
            <text:p>null</text:p>
          </table:table-cell>
          <table:table-cell office:value-type="float" office:value="424.69833333333332" table:style-name="ce73">
            <text:p>425</text:p>
          </table:table-cell>
          <table:table-cell office:value-type="float" office:value="207776000000" table:style-name="ce125">
            <text:p>2.07776E+11</text:p>
          </table:table-cell>
          <table:table-cell office:value-type="string" table:style-name="ce118">
            <text:p>null</text:p>
          </table:table-cell>
          <table:table-cell office:value-type="float" office:value="268511920915.34454" table:formula="of:=([.CV86]*[.BS86]*86)" table:style-name="ce125">
            <text:p>2.68512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27" table:style-name="ce129">
            <text:p>0.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368227.521006804" table:style-name="ce24">
            <text:p>15368228</text:p>
          </table:table-cell>
          <table:table-cell office:value-type="float" office:value="197926.36382335238" table:formula="of:=[.BS86]-[.BS85]" table:style-name="ce24">
            <text:p>19792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4991710298081156" table:formula="of:=([.B86]/[.BS86])" table:style-name="ce34">
            <text:p>2.50</text:p>
          </table:table-cell>
          <table:table-cell office:value-type="float" office:value="3.4910000000000001" table:formula="of:=[.BX85]-(([.$BX$83]-[.$BX$93])/10)" table:style-name="ce103">
            <text:p>3.49</text:p>
          </table:table-cell>
          <table:table-cell office:value-type="float" office:value="1.726" table:style-name="ce129">
            <text:p>1.73</text:p>
          </table:table-cell>
          <table:table-cell office:value-type="float" office:value="1.3046963390679309" table:formula="of:=([.BS86]*100/[.BS85])-100" table:style-name="ce23">
            <text:p>1.3</text:p>
          </table:table-cell>
          <table:table-cell office:value-type="float" office:value="154930" table:formula="of:=([.B86]-[.B85])" table:style-name="ce73">
            <text:p>154930</text:p>
          </table:table-cell>
          <table:table-cell office:value-type="float" office:value="0.40501505519881675" table:formula="of:=([.B86]*100/[.B85])-100" table:style-name="ce25">
            <text:p>0.41</text:p>
          </table:table-cell>
          <table:table-cell office:value-type="float" office:value="153546.52996485913" table:formula="of:=[.BT86]-([.CA86]/[.BX86])" table:style-name="ce76">
            <text:p>153547</text:p>
          </table:table-cell>
          <table:table-cell office:value-type="float" office:value="882912.34938249853" table:style-name="ce93">
            <text:p>882912</text:p>
          </table:table-cell>
          <table:table-cell office:value-type="float" office:value="16238.25" table:style-name="ce8">
            <text:p>1623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03.16146636186542" table:formula="of:=[.DB86]*(1+([.CY86]/100))" table:style-name="ce93">
            <text:p>20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.3" table:style-name="ce25">
            <text:p>11.3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82.53501020832474" table:formula="of:=([.DB87]*(([.CE86]*100/[.CE87])/100))" table:style-name="ce53">
            <text:p>182.5</text:p>
          </table:table-cell>
          <table:table-cell office:value-type="float" office:value="182.53501020832474" table:style-name="ce63">
            <text:p>182.5</text:p>
          </table:table-cell>
          <table:table-cell office:value-type="float" office:value="-4.476083333333337" table:formula="of:=([.Y86]-[.Y85])" table:style-name="ce25">
            <text:p>-4.4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(([.DC86]-MIN([.DC72:.DC86]))/(MAX([.DC72:.DC86])-MIN([.DC72:.DC86])))*100" table:style-name="ce128">
            <text:p>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3.380126474859139" table:formula="of:=100-((([.CC86]-MIN([.CC57:.CC86]))/(MAX([.CC57:.CC86])-MIN([.CC57:.CC86])))*100)" table:style-name="ce128">
            <text:p>63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1.69006323742957" table:formula="of:=AVERAGE([.DJ86:.DP86])" table:style-name="ce128">
            <text:p>31.7</text:p>
          </table:table-cell>
          <table:table-cell office:value-type="float" office:value="292.03999999999996" table:formula="of:=-0.06*(([.A86]-1963)^2)+8.5*([.A86]-1963)+140" table:style-name="ce23">
            <text:p>292.0</text:p>
          </table:table-cell>
          <table:table-cell table:number-columns-repeated="16261"/>
        </table:table-row>
        <table:table-row table:style-name="ro2">
          <table:table-cell office:value-type="float" office:value="1985" table:style-name="ce15">
            <text:p>1985</text:p>
          </table:table-cell>
          <table:table-cell office:value-type="float" office:value="38531195" table:style-name="ce10">
            <text:p>38531195</text:p>
          </table:table-cell>
          <table:table-cell office:value-type="float" office:value="12546626" table:style-name="ce7">
            <text:p>12546626</text:p>
          </table:table-cell>
          <table:table-cell office:value-type="float" office:value="17006710" table:style-name="ce7">
            <text:p>17006710</text:p>
          </table:table-cell>
          <table:table-cell office:value-type="float" office:value="28041203" table:style-name="ce118">
            <text:p>2804120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.096083333333333" table:style-name="ce64">
            <text:p>13.10</text:p>
          </table:table-cell>
          <table:table-cell office:value-type="float" office:value="0.7779454545454545" table:style-name="ce70">
            <text:p>0.78</text:p>
          </table:table-cell>
          <table:table-cell office:value-type="float" office:value="1927935000000" table:style-name="ce85">
            <text:p>1.93E+12</text:p>
          </table:table-cell>
          <table:table-cell office:value-type="float" office:value="7.7787821816882854" table:formula="of:=([.AA87]*100/[.AA86])-100" table:style-name="ce70">
            <text:p>7.78</text:p>
          </table:table-cell>
          <table:table-cell office:value-type="string" table:style-name="ce118">
            <text:p>null</text:p>
          </table:table-cell>
          <table:table-cell office:value-type="float" office:value="391.07166666666666" table:style-name="ce73">
            <text:p>391</text:p>
          </table:table-cell>
          <table:table-cell office:value-type="float" office:value="226288000000" table:style-name="ce125">
            <text:p>2.26288E+11</text:p>
          </table:table-cell>
          <table:table-cell office:value-type="string" table:style-name="ce118">
            <text:p>null</text:p>
          </table:table-cell>
          <table:table-cell office:value-type="float" office:value="273158268223.51392" table:formula="of:=([.CV87]*[.BS87]*86)" table:style-name="ce125">
            <text:p>2.73158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31" table:style-name="ce129">
            <text:p>0.3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569896.729566457" table:style-name="ce24">
            <text:p>15569897</text:p>
          </table:table-cell>
          <table:table-cell office:value-type="float" office:value="201669.20855965279" table:formula="of:=[.BS87]-[.BS86]" table:style-name="ce24">
            <text:p>20166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4747238642136389" table:formula="of:=([.B87]/[.BS87])" table:style-name="ce34">
            <text:p>2.47</text:p>
          </table:table-cell>
          <table:table-cell office:value-type="float" office:value="3.4580000000000002" table:formula="of:=[.BX86]-(([.$BX$83]-[.$BX$93])/10)" table:style-name="ce103">
            <text:p>3.46</text:p>
          </table:table-cell>
          <table:table-cell office:value-type="float" office:value="1.64" table:style-name="ce129">
            <text:p>1.64</text:p>
          </table:table-cell>
          <table:table-cell office:value-type="float" office:value="1.3122476764740298" table:formula="of:=([.BS87]*100/[.BS86])-100" table:style-name="ce23">
            <text:p>1.3</text:p>
          </table:table-cell>
          <table:table-cell office:value-type="float" office:value="123366" table:formula="of:=([.B87]-[.B86])" table:style-name="ce73">
            <text:p>123366</text:p>
          </table:table-cell>
          <table:table-cell office:value-type="float" office:value="0.32120013864881969" table:formula="of:=([.B87]*100/[.B86])-100" table:style-name="ce25">
            <text:p>0.32</text:p>
          </table:table-cell>
          <table:table-cell office:value-type="float" office:value="165993.67356832832" table:formula="of:=[.BT87]-([.CA87]/[.BX87])" table:style-name="ce76">
            <text:p>165994</text:p>
          </table:table-cell>
          <table:table-cell office:value-type="float" office:value="840362.7806103935" table:style-name="ce93">
            <text:p>840363</text:p>
          </table:table-cell>
          <table:table-cell office:value-type="float" office:value="16545.320000000003" table:style-name="ce8">
            <text:p>165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04" table:style-name="ce8">
            <text:p>20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.83" table:style-name="ce25">
            <text:p>8.83</text:p>
          </table:table-cell>
          <table:table-cell office:value-type="float" office:value="100" table:style-name="ce23">
            <text:p>100.0</text:p>
          </table:table-cell>
          <table:table-cell office:value-type="float" office:value="18.013199999999998" table:formula="of:=(([.CV87]*[.CY87])/100)" table:style-name="ce23">
            <text:p>18.0</text:p>
          </table:table-cell>
          <table:table-cell office:value-type="float" office:value="185.98680000000002" table:formula="of:=[.CV87]-[.DA87]" table:style-name="ce23">
            <text:p>186.0</text:p>
          </table:table-cell>
          <table:table-cell office:value-type="float" office:value="204" table:formula="of:=[.CV87]/[.CZ87]*[.$CZ$87]" table:style-name="ce23">
            <text:p>204.0</text:p>
          </table:table-cell>
          <table:table-cell office:value-type="float" office:value="-0.94216666666666704" table:formula="of:=([.Y87]-[.Y86])" table:style-name="ce25">
            <text:p>-0.9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.46366874602518" table:formula="of:=(([.DC87]-MIN([.DC73:.DC87]))/(MAX([.DC73:.DC87])-MIN([.DC73:.DC87])))*100" table:style-name="ce128">
            <text:p>14.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5.014795232298923" table:formula="of:=100-((([.CC87]-MIN([.CC58:.CC87]))/(MAX([.CC58:.CC87])-MIN([.CC58:.CC87])))*100)" table:style-name="ce128">
            <text:p>65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9.73923198916205" table:formula="of:=AVERAGE([.DJ87:.DP87])" table:style-name="ce128">
            <text:p>39.7</text:p>
          </table:table-cell>
          <table:table-cell office:value-type="float" office:value="297.96000000000004" table:formula="of:=-0.06*(([.A87]-1963)^2)+8.5*([.A87]-1963)+140" table:style-name="ce23">
            <text:p>298.0</text:p>
          </table:table-cell>
          <table:table-cell table:number-columns-repeated="16261"/>
        </table:table-row>
        <table:table-row table:style-name="ro2">
          <table:table-cell office:value-type="float" office:value="1986" table:style-name="ce15">
            <text:p>1986</text:p>
          </table:table-cell>
          <table:table-cell office:value-type="float" office:value="38638052" table:style-name="ce10">
            <text:p>38638052</text:p>
          </table:table-cell>
          <table:table-cell office:value-type="float" office:value="12668258" table:style-name="ce7">
            <text:p>12668258</text:p>
          </table:table-cell>
          <table:table-cell office:value-type="float" office:value="17144739" table:style-name="ce7">
            <text:p>17144739</text:p>
          </table:table-cell>
          <table:table-cell office:value-type="float" office:value="28378006" table:style-name="ce118">
            <text:p>2837800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.718999999999999" table:style-name="ce64">
            <text:p>11.72</text:p>
          </table:table-cell>
          <table:table-cell office:value-type="float" office:value="0.99354166666666666" table:style-name="ce70">
            <text:p>0.99</text:p>
          </table:table-cell>
          <table:table-cell office:value-type="float" office:value="2058939000000" table:style-name="ce85">
            <text:p>2.06E+12</text:p>
          </table:table-cell>
          <table:table-cell office:value-type="float" office:value="6.7950423639801159" table:formula="of:=([.AA88]*100/[.AA87])-100" table:style-name="ce70">
            <text:p>6.80</text:p>
          </table:table-cell>
          <table:table-cell office:value-type="string" table:style-name="ce118">
            <text:p>null</text:p>
          </table:table-cell>
          <table:table-cell office:value-type="float" office:value="347.98916666666668" table:style-name="ce73">
            <text:p>348</text:p>
          </table:table-cell>
          <table:table-cell office:value-type="float" office:value="243382000000" table:style-name="ce125">
            <text:p>2.43382E+11</text:p>
          </table:table-cell>
          <table:table-cell office:value-type="string" table:style-name="ce118">
            <text:p>null</text:p>
          </table:table-cell>
          <table:table-cell office:value-type="float" office:value="331383131646.73529" table:formula="of:=([.CV88]*[.BS88]*86)" table:style-name="ce125">
            <text:p>3.31383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34" table:style-name="ce129">
            <text:p>0.3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792181.264141027" table:style-name="ce24">
            <text:p>15792181</text:p>
          </table:table-cell>
          <table:table-cell office:value-type="float" office:value="222284.53457457013" table:formula="of:=[.BS88]-[.BS87]" table:style-name="ce24">
            <text:p>22228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4466570737593174" table:formula="of:=([.B88]/[.BS88])" table:style-name="ce34">
            <text:p>2.45</text:p>
          </table:table-cell>
          <table:table-cell office:value-type="float" office:value="3.4250000000000003" table:formula="of:=[.BX87]-(([.$BX$83]-[.$BX$93])/10)" table:style-name="ce103">
            <text:p>3.43</text:p>
          </table:table-cell>
          <table:table-cell office:value-type="float" office:value="1.556" table:style-name="ce129">
            <text:p>1.56</text:p>
          </table:table-cell>
          <table:table-cell office:value-type="float" office:value="1.427655805529298" table:formula="of:=([.BS88]*100/[.BS87])-100" table:style-name="ce23">
            <text:p>1.4</text:p>
          </table:table-cell>
          <table:table-cell office:value-type="float" office:value="106857" table:formula="of:=([.B88]-[.B87])" table:style-name="ce73">
            <text:p>106857</text:p>
          </table:table-cell>
          <table:table-cell office:value-type="float" office:value="0.27732594330386462" table:formula="of:=([.B88]*100/[.B87])-100" table:style-name="ce25">
            <text:p>0.28</text:p>
          </table:table-cell>
          <table:table-cell office:value-type="float" office:value="191085.41048697889" table:formula="of:=[.BT88]-([.CA88]/[.BX88])" table:style-name="ce76">
            <text:p>191085</text:p>
          </table:table-cell>
          <table:table-cell office:value-type="float" office:value="902267.35478839779" table:style-name="ce93">
            <text:p>902267</text:p>
          </table:table-cell>
          <table:table-cell office:value-type="float" office:value="18236.64" table:style-name="ce8">
            <text:p>182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4" table:style-name="ce8">
            <text:p>24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.8000000000000007" table:style-name="ce25">
            <text:p>8.80</text:p>
          </table:table-cell>
          <table:table-cell office:value-type="float" office:value="108.8" table:formula="of:=[.CZ87]+[.CY88]" table:style-name="ce23">
            <text:p>108.8</text:p>
          </table:table-cell>
          <table:table-cell office:value-type="float" office:value="39.485199999999999" table:formula="of:=(([.CV88]*[.CY88])/100)+[.DA87]" table:style-name="ce23">
            <text:p>39.5</text:p>
          </table:table-cell>
          <table:table-cell office:value-type="float" office:value="204.51480000000001" table:formula="of:=[.CV88]-[.DA88]" table:style-name="ce23">
            <text:p>204.5</text:p>
          </table:table-cell>
          <table:table-cell office:value-type="float" office:value="224.26470588235296" table:formula="of:=[.CV88]/[.CZ88]*[.$CZ$87]" table:style-name="ce23">
            <text:p>224.3</text:p>
          </table:table-cell>
          <table:table-cell office:value-type="float" office:value="-1.3770833333333332" table:formula="of:=([.Y88]-[.Y87])" table:style-name="ce25">
            <text:p>-1.38</text:p>
          </table:table-cell>
          <table:table-cell office:value-type="float" office:value="19.607843137254903" table:formula="of:=([.CV88]*100/[.CV87])-100" table:style-name="ce25">
            <text:p>19.61</text:p>
          </table:table-cell>
          <table:table-cell office:value-type="float" office:value="10.807843137254903" table:formula="of:=[.DE88]-[.CY88]" table:style-name="ce25">
            <text:p>10.8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0.975000000000001" table:style-name="ce23">
            <text:p>21.0</text:p>
          </table:table-cell>
          <table:table-cell office:value-type="float" office:value="28.118554956670121" table:formula="of:=(([.DC88]-MIN([.DC74:.DC88]))/(MAX([.DC74:.DC88])-MIN([.DC74:.DC88])))*100" table:style-name="ce128">
            <text:p>28.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7.779851985670192" table:formula="of:=100-((([.CC88]-MIN([.CC59:.CC88]))/(MAX([.CC59:.CC88])-MIN([.CC59:.CC88])))*100)" table:style-name="ce128">
            <text:p>57.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2.949203471170158" table:formula="of:=AVERAGE([.DJ88:.DP88])" table:style-name="ce128">
            <text:p>42.9</text:p>
          </table:table-cell>
          <table:table-cell office:value-type="float" office:value="303.76" table:formula="of:=-0.06*(([.A88]-1963)^2)+8.5*([.A88]-1963)+140" table:style-name="ce23">
            <text:p>303.8</text:p>
          </table:table-cell>
          <table:table-cell table:number-columns-repeated="16261"/>
        </table:table-row>
        <table:table-row table:style-name="ro2">
          <table:table-cell office:value-type="float" office:value="1987" table:style-name="ce15">
            <text:p>1987</text:p>
          </table:table-cell>
          <table:table-cell office:value-type="float" office:value="38731578" table:style-name="ce10">
            <text:p>38731578</text:p>
          </table:table-cell>
          <table:table-cell office:value-type="float" office:value="12781018" table:style-name="ce7">
            <text:p>12781018</text:p>
          </table:table-cell>
          <table:table-cell office:value-type="float" office:value="17276761" table:style-name="ce7">
            <text:p>17276761</text:p>
          </table:table-cell>
          <table:table-cell office:value-type="float" office:value="28723311" table:style-name="ce118">
            <text:p>287233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.569333333333331" table:style-name="ce64">
            <text:p>14.57</text:p>
          </table:table-cell>
          <table:table-cell office:value-type="float" office:value="1.1646333333333332" table:style-name="ce70">
            <text:p>1.16</text:p>
          </table:table-cell>
          <table:table-cell office:value-type="float" office:value="2221564000000" table:style-name="ce85">
            <text:p>2.22E+12</text:p>
          </table:table-cell>
          <table:table-cell office:value-type="float" office:value="7.8984855792230917" table:formula="of:=([.AA89]*100/[.AA88])-100" table:style-name="ce70">
            <text:p>7.90</text:p>
          </table:table-cell>
          <table:table-cell office:value-type="string" table:style-name="ce118">
            <text:p>null</text:p>
          </table:table-cell>
          <table:table-cell office:value-type="float" office:value="365.61166666666662" table:style-name="ce73">
            <text:p>366</text:p>
          </table:table-cell>
          <table:table-cell office:value-type="float" office:value="263138000000" table:style-name="ce125">
            <text:p>2.63138E+11</text:p>
          </table:table-cell>
          <table:table-cell office:value-type="string" table:style-name="ce118">
            <text:p>null</text:p>
          </table:table-cell>
          <table:table-cell office:value-type="float" office:value="424836604990.68311" table:formula="of:=([.CV89]*[.BS89]*86)" table:style-name="ce125">
            <text:p>4.24837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39" table:style-name="ce129">
            <text:p>0.3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038832.867361942" table:style-name="ce24">
            <text:p>16038833</text:p>
          </table:table-cell>
          <table:table-cell office:value-type="float" office:value="246651.60322091542" table:formula="of:=[.BS89]-[.BS88]" table:style-name="ce24">
            <text:p>2466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4148626225051841" table:formula="of:=([.B89]/[.BS89])" table:style-name="ce34">
            <text:p>2.41</text:p>
          </table:table-cell>
          <table:table-cell office:value-type="float" office:value="3.3920000000000003" table:formula="of:=[.BX88]-(([.$BX$83]-[.$BX$93])/10)" table:style-name="ce103">
            <text:p>3.39</text:p>
          </table:table-cell>
          <table:table-cell office:value-type="float" office:value="1.494" table:style-name="ce129">
            <text:p>1.49</text:p>
          </table:table-cell>
          <table:table-cell office:value-type="float" office:value="1.5618589927218096" table:formula="of:=([.BS89]*100/[.BS88])-100" table:style-name="ce23">
            <text:p>1.6</text:p>
          </table:table-cell>
          <table:table-cell office:value-type="float" office:value="93526" table:formula="of:=([.B89]-[.B88])" table:style-name="ce73">
            <text:p>93526</text:p>
          </table:table-cell>
          <table:table-cell office:value-type="float" office:value="0.24205671652390492" table:formula="of:=([.B89]*100/[.B88])-100" table:style-name="ce25">
            <text:p>0.24</text:p>
          </table:table-cell>
          <table:table-cell office:value-type="float" office:value="219079.07963600976" table:formula="of:=[.BT89]-([.CA89]/[.BX89])" table:style-name="ce76">
            <text:p>219079</text:p>
          </table:table-cell>
          <table:table-cell office:value-type="float" office:value="1009348.6939078209" table:style-name="ce93">
            <text:p>1009349</text:p>
          </table:table-cell>
          <table:table-cell office:value-type="float" office:value="20235.759999999998" table:style-name="ce8">
            <text:p>2023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08" table:style-name="ce8">
            <text:p>30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26" table:style-name="ce25">
            <text:p>5.26</text:p>
          </table:table-cell>
          <table:table-cell office:value-type="float" office:value="114.06" table:formula="of:=[.CZ88]+[.CY89]" table:style-name="ce23">
            <text:p>114.1</text:p>
          </table:table-cell>
          <table:table-cell office:value-type="float" office:value="55.686" table:formula="of:=(([.CV89]*[.CY89])/100)+[.DA88]" table:style-name="ce23">
            <text:p>55.7</text:p>
          </table:table-cell>
          <table:table-cell office:value-type="float" office:value="252.31399999999999" table:formula="of:=[.CV89]-[.DA89]" table:style-name="ce23">
            <text:p>252.3</text:p>
          </table:table-cell>
          <table:table-cell office:value-type="float" office:value="270.03331579870246" table:formula="of:=[.CV89]/[.CZ89]*[.$CZ$87]" table:style-name="ce23">
            <text:p>270.0</text:p>
          </table:table-cell>
          <table:table-cell office:value-type="float" office:value="2.8503333333333316" table:formula="of:=([.Y89]-[.Y88])" table:style-name="ce25">
            <text:p>2.85</text:p>
          </table:table-cell>
          <table:table-cell office:value-type="float" office:value="26.229508196721312" table:formula="of:=([.CV89]*100/[.CV88])-100" table:style-name="ce25">
            <text:p>26.23</text:p>
          </table:table-cell>
          <table:table-cell office:value-type="float" office:value="20.969508196721314" table:formula="of:=[.DE89]-[.CY89]" table:style-name="ce25">
            <text:p>20.9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0.2225" table:style-name="ce23">
            <text:p>20.2</text:p>
          </table:table-cell>
          <table:table-cell office:value-type="float" office:value="58.958635442189752" table:formula="of:=(([.DC89]-MIN([.DC75:.DC89]))/(MAX([.DC75:.DC89])-MIN([.DC75:.DC89])))*100" table:style-name="ce128">
            <text:p>59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2.428652524395225" table:formula="of:=100-((([.CC89]-MIN([.CC60:.CC89]))/(MAX([.CC60:.CC89])-MIN([.CC60:.CC89])))*100)" table:style-name="ce128">
            <text:p>52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5.693643983292489" table:formula="of:=AVERAGE([.DJ89:.DP89])" table:style-name="ce128">
            <text:p>55.7</text:p>
          </table:table-cell>
          <table:table-cell office:value-type="float" office:value="309.44" table:formula="of:=-0.06*(([.A89]-1963)^2)+8.5*([.A89]-1963)+140" table:style-name="ce23">
            <text:p>309.4</text:p>
          </table:table-cell>
          <table:table-cell table:number-columns-repeated="16261"/>
        </table:table-row>
        <table:table-row table:style-name="ro2">
          <table:table-cell office:value-type="float" office:value="1988" table:style-name="ce15">
            <text:p>1988</text:p>
          </table:table-cell>
          <table:table-cell office:value-type="float" office:value="38802300" table:style-name="ce10">
            <text:p>38802300</text:p>
          </table:table-cell>
          <table:table-cell office:value-type="float" office:value="12966912" table:style-name="ce7">
            <text:p>12966912</text:p>
          </table:table-cell>
          <table:table-cell office:value-type="float" office:value="17431225" table:style-name="ce7">
            <text:p>17431225</text:p>
          </table:table-cell>
          <table:table-cell office:value-type="float" office:value="29062942" table:style-name="ce118">
            <text:p>2906294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.806583333333334" table:style-name="ce64">
            <text:p>11.81</text:p>
          </table:table-cell>
          <table:table-cell office:value-type="float" office:value="1.1783916666666665" table:style-name="ce70">
            <text:p>1.18</text:p>
          </table:table-cell>
          <table:table-cell office:value-type="float" office:value="2410010000000" table:style-name="ce85">
            <text:p>2.41E+12</text:p>
          </table:table-cell>
          <table:table-cell office:value-type="float" office:value="8.4825825409486271" table:formula="of:=([.AA90]*100/[.AA89])-100" table:style-name="ce70">
            <text:p>8.48</text:p>
          </table:table-cell>
          <table:table-cell office:value-type="string" table:style-name="ce118">
            <text:p>null</text:p>
          </table:table-cell>
          <table:table-cell office:value-type="float" office:value="349.53416666666664" table:style-name="ce73">
            <text:p>350</text:p>
          </table:table-cell>
          <table:table-cell office:value-type="float" office:value="302674000000" table:style-name="ce125">
            <text:p>3.02674E+11</text:p>
          </table:table-cell>
          <table:table-cell office:value-type="string" table:style-name="ce118">
            <text:p>null</text:p>
          </table:table-cell>
          <table:table-cell office:value-type="float" office:value="564767108639.26245" table:formula="of:=([.CV90]*[.BS90]*86)" table:style-name="ce125">
            <text:p>5.64767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44" table:style-name="ce129">
            <text:p>0.4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265162.6075099" table:style-name="ce24">
            <text:p>16265163</text:p>
          </table:table-cell>
          <table:table-cell office:value-type="float" office:value="226329.74014795758" table:formula="of:=[.BS90]-[.BS89]" table:style-name="ce24">
            <text:p>22633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3856078747152716" table:formula="of:=([.B90]/[.BS90])" table:style-name="ce34">
            <text:p>2.39</text:p>
          </table:table-cell>
          <table:table-cell office:value-type="float" office:value="3.3590000000000004" table:formula="of:=[.BX89]-(([.$BX$83]-[.$BX$93])/10)" table:style-name="ce103">
            <text:p>3.36</text:p>
          </table:table-cell>
          <table:table-cell office:value-type="float" office:value="1.448" table:style-name="ce129">
            <text:p>1.45</text:p>
          </table:table-cell>
          <table:table-cell office:value-type="float" office:value="1.4111359724218033" table:formula="of:=([.BS90]*100/[.BS89])-100" table:style-name="ce23">
            <text:p>1.4</text:p>
          </table:table-cell>
          <table:table-cell office:value-type="float" office:value="70722" table:formula="of:=([.B90]-[.B89])" table:style-name="ce73">
            <text:p>70722</text:p>
          </table:table-cell>
          <table:table-cell office:value-type="float" office:value="0.18259519403004276" table:formula="of:=([.B90]*100/[.B89])-100" table:style-name="ce25">
            <text:p>0.18</text:p>
          </table:table-cell>
          <table:table-cell office:value-type="float" office:value="205275.25964780874" table:formula="of:=[.BT90]-([.CA90]/[.BX90])" table:style-name="ce76">
            <text:p>205275</text:p>
          </table:table-cell>
          <table:table-cell office:value-type="float" office:value="1112389.3782086805" table:style-name="ce93">
            <text:p>1112389</text:p>
          </table:table-cell>
          <table:table-cell office:value-type="float" office:value="22670.61" table:style-name="ce8">
            <text:p>2267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03.75" table:style-name="ce8">
            <text:p>40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83" table:style-name="ce25">
            <text:p>4.83</text:p>
          </table:table-cell>
          <table:table-cell office:value-type="float" office:value="118.89" table:formula="of:=[.CZ89]+[.CY90]" table:style-name="ce23">
            <text:p>118.9</text:p>
          </table:table-cell>
          <table:table-cell office:value-type="float" office:value="75.187124999999995" table:formula="of:=(([.CV90]*[.CY90])/100)+[.DA89]" table:style-name="ce23">
            <text:p>75.2</text:p>
          </table:table-cell>
          <table:table-cell office:value-type="float" office:value="328.56287500000002" table:formula="of:=[.CV90]-[.DA90]" table:style-name="ce23">
            <text:p>328.6</text:p>
          </table:table-cell>
          <table:table-cell office:value-type="float" office:value="339.59962991000083" table:formula="of:=[.CV90]/[.CZ90]*[.$CZ$87]" table:style-name="ce23">
            <text:p>339.6</text:p>
          </table:table-cell>
          <table:table-cell office:value-type="float" office:value="-2.7627499999999969" table:formula="of:=([.Y90]-[.Y89])" table:style-name="ce25">
            <text:p>-2.76</text:p>
          </table:table-cell>
          <table:table-cell office:value-type="float" office:value="31.087662337662351" table:formula="of:=([.CV90]*100/[.CV89])-100" table:style-name="ce25">
            <text:p>31.09</text:p>
          </table:table-cell>
          <table:table-cell office:value-type="float" office:value="26.257662337662353" table:formula="of:=[.DE90]-[.CY90]" table:style-name="ce25">
            <text:p>26.2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9.237499999999997" table:style-name="ce23">
            <text:p>19.2</text:p>
          </table:table-cell>
          <table:table-cell office:value-type="float" office:value="100" table:formula="of:=(([.DC90]-MIN([.DC76:.DC90]))/(MAX([.DC76:.DC90])-MIN([.DC76:.DC90])))*100" table:style-name="ce128">
            <text:p>10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5.962183589750623" table:formula="of:=100-((([.CC90]-MIN([.CC61:.CC90]))/(MAX([.CC61:.CC90])-MIN([.CC61:.CC90])))*100)" table:style-name="ce128">
            <text:p>66.0</text:p>
          </table:table-cell>
          <table:table-cell office:value-type="float" office:value="30.762500000000003" table:formula="of:=MIN(100; MAX(0; ((IF(AND([.DI90]-[.DI89]&gt;=-0.3;[.DI90]-[.DI89]&lt;=0.3);100;IF(AND([.DI90]-[.DI89]&gt;-1;[.DI90]-[.DI89]&lt;-0.3);50;IF([.DI90]-[.DI89]&lt;=-1;25;75)))))-[.DI90]+(IF(([.DI90]-[.DI89])*([.DI89]-[.DI88])&lt;0;AVERAGE([.DI86:.DI90]);0))))" table:style-name="ce128">
            <text:p>30.8</text:p>
          </table:table-cell>
          <table:table-cell office:value-type="string" table:style-name="ce118">
            <text:p>null</text:p>
          </table:table-cell>
          <table:table-cell office:value-type="float" office:value="65.574894529916875" table:formula="of:=AVERAGE([.DJ90:.DP90])" table:style-name="ce128">
            <text:p>65.6</text:p>
          </table:table-cell>
          <table:table-cell office:value-type="float" office:value="315" table:formula="of:=-0.06*(([.A90]-1963)^2)+8.5*([.A90]-1963)+140" table:style-name="ce23">
            <text:p>315.0</text:p>
          </table:table-cell>
          <table:table-cell table:number-columns-repeated="16261"/>
        </table:table-row>
        <table:table-row table:style-name="ro2">
          <table:table-cell office:value-type="float" office:value="1989" table:style-name="ce15">
            <text:p>1989</text:p>
          </table:table-cell>
          <table:table-cell office:value-type="float" office:value="38853227" table:style-name="ce10">
            <text:p>38853227</text:p>
          </table:table-cell>
          <table:table-cell office:value-type="float" office:value="13222820" table:style-name="ce7">
            <text:p>13222820</text:p>
          </table:table-cell>
          <table:table-cell office:value-type="float" office:value="17583744" table:style-name="ce7">
            <text:p>17583744</text:p>
          </table:table-cell>
          <table:table-cell office:value-type="float" office:value="29398417" table:style-name="ce118">
            <text:p>2939841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.14775" table:style-name="ce64">
            <text:p>15.15</text:p>
          </table:table-cell>
          <table:table-cell office:value-type="float" office:value="1.1066833333333335" table:style-name="ce70">
            <text:p>1.11</text:p>
          </table:table-cell>
          <table:table-cell office:value-type="float" office:value="2659927000000" table:style-name="ce85">
            <text:p>2.66E+12</text:p>
          </table:table-cell>
          <table:table-cell office:value-type="float" office:value="10.369956971132893" table:formula="of:=([.AA91]*100/[.AA90])-100" table:style-name="ce70">
            <text:p>10.37</text:p>
          </table:table-cell>
          <table:table-cell office:value-type="string" table:style-name="ce118">
            <text:p>null</text:p>
          </table:table-cell>
          <table:table-cell office:value-type="float" office:value="322.01249999999999" table:style-name="ce73">
            <text:p>322</text:p>
          </table:table-cell>
          <table:table-cell office:value-type="float" office:value="357882000000" table:style-name="ce125">
            <text:p>3.57882E+11</text:p>
          </table:table-cell>
          <table:table-cell office:value-type="string" table:style-name="ce118">
            <text:p>null</text:p>
          </table:table-cell>
          <table:table-cell office:value-type="float" office:value="715312255445.38806" table:formula="of:=([.CV91]*[.BS91]*86)" table:style-name="ce125">
            <text:p>7.15312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47" table:style-name="ce129">
            <text:p>0.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552406.6977991" table:style-name="ce24">
            <text:p>16552407</text:p>
          </table:table-cell>
          <table:table-cell office:value-type="float" office:value="287244.09028919972" table:formula="of:=[.BS91]-[.BS90]" table:style-name="ce24">
            <text:p>28724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3472856672356981" table:formula="of:=([.B91]/[.BS91])" table:style-name="ce34">
            <text:p>2.35</text:p>
          </table:table-cell>
          <table:table-cell office:value-type="float" office:value="3.3260000000000005" table:formula="of:=[.BX90]-(([.$BX$83]-[.$BX$93])/10)" table:style-name="ce103">
            <text:p>3.33</text:p>
          </table:table-cell>
          <table:table-cell office:value-type="float" office:value="1.3979999999999999" table:style-name="ce129">
            <text:p>1.40</text:p>
          </table:table-cell>
          <table:table-cell office:value-type="float" office:value="1.7660081071465754" table:formula="of:=([.BS91]*100/[.BS90])-100" table:style-name="ce23">
            <text:p>1.8</text:p>
          </table:table-cell>
          <table:table-cell office:value-type="float" office:value="50927" table:formula="of:=([.B91]-[.B90])" table:style-name="ce73">
            <text:p>50927</text:p>
          </table:table-cell>
          <table:table-cell office:value-type="float" office:value="0.13124737451130386" table:formula="of:=([.B91]*100/[.B90])-100" table:style-name="ce25">
            <text:p>0.13</text:p>
          </table:table-cell>
          <table:table-cell office:value-type="float" office:value="271932.30436015583" table:formula="of:=[.BT91]-([.CA91]/[.BX91])" table:style-name="ce76">
            <text:p>271932</text:p>
          </table:table-cell>
          <table:table-cell office:value-type="float" office:value="1235842.9876368737" table:style-name="ce93">
            <text:p>1235843</text:p>
          </table:table-cell>
          <table:table-cell office:value-type="float" office:value="26027.3" table:style-name="ce8">
            <text:p>260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02.5" table:style-name="ce8">
            <text:p>50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.79" table:style-name="ce25">
            <text:p>6.79</text:p>
          </table:table-cell>
          <table:table-cell office:value-type="float" office:value="125.68" table:formula="of:=[.CZ90]+[.CY91]" table:style-name="ce23">
            <text:p>125.7</text:p>
          </table:table-cell>
          <table:table-cell office:value-type="float" office:value="109.30687499999999" table:formula="of:=(([.CV91]*[.CY91])/100)+[.DA90]" table:style-name="ce23">
            <text:p>109.3</text:p>
          </table:table-cell>
          <table:table-cell office:value-type="float" office:value="393.19312500000001" table:formula="of:=[.CV91]-[.DA91]" table:style-name="ce23">
            <text:p>393.2</text:p>
          </table:table-cell>
          <table:table-cell office:value-type="float" office:value="399.82495225970717" table:formula="of:=[.CV91]/[.CZ91]*[.$CZ$87]" table:style-name="ce23">
            <text:p>399.8</text:p>
          </table:table-cell>
          <table:table-cell office:value-type="float" office:value="3.3411666666666662" table:formula="of:=([.Y91]-[.Y90])" table:style-name="ce25">
            <text:p>3.34</text:p>
          </table:table-cell>
          <table:table-cell office:value-type="float" office:value="24.45820433436532" table:formula="of:=([.CV91]*100/[.CV90])-100" table:style-name="ce25">
            <text:p>24.46</text:p>
          </table:table-cell>
          <table:table-cell office:value-type="float" office:value="17.668204334365321" table:formula="of:=[.DE91]-[.CY91]" table:style-name="ce25">
            <text:p>17.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.240000000000002" table:style-name="ce23">
            <text:p>17.2</text:p>
          </table:table-cell>
          <table:table-cell office:value-type="float" office:value="100" table:formula="of:=(([.DC91]-MIN([.DC77:.DC91]))/(MAX([.DC77:.DC91])-MIN([.DC77:.DC91])))*100" table:style-name="ce128">
            <text:p>10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36.782341986475039" table:formula="of:=100-((([.CC91]-MIN([.CC62:.CC91]))/(MAX([.CC62:.CC91])-MIN([.CC62:.CC91])))*100)" table:style-name="ce128">
            <text:p>36.8</text:p>
          </table:table-cell>
          <table:table-cell office:value-type="float" office:value="7.759999999999998" table:formula="of:=MIN(100; MAX(0; ((IF(AND([.DI91]-[.DI90]&gt;=-0.3;[.DI91]-[.DI90]&lt;=0.3);100;IF(AND([.DI91]-[.DI90]&gt;-1;[.DI91]-[.DI90]&lt;-0.3);50;IF([.DI91]-[.DI90]&lt;=-1;25;75)))))-[.DI91]+(IF(([.DI91]-[.DI90])*([.DI90]-[.DI89])&lt;0;AVERAGE([.DI87:.DI91]);0))))" table:style-name="ce128">
            <text:p>7.8</text:p>
          </table:table-cell>
          <table:table-cell office:value-type="string" table:style-name="ce118">
            <text:p>null</text:p>
          </table:table-cell>
          <table:table-cell office:value-type="float" office:value="48.180780662158348" table:formula="of:=AVERAGE([.DJ91:.DP91])" table:style-name="ce128">
            <text:p>48.2</text:p>
          </table:table-cell>
          <table:table-cell office:value-type="float" office:value="320.44" table:formula="of:=-0.06*(([.A91]-1963)^2)+8.5*([.A91]-1963)+140" table:style-name="ce23">
            <text:p>320.4</text:p>
          </table:table-cell>
          <table:table-cell table:number-columns-repeated="16261"/>
        </table:table-row>
        <table:table-row table:style-name="ro2">
          <table:table-cell office:value-type="float" office:value="1990" table:style-name="ce15">
            <text:p>1990</text:p>
          </table:table-cell>
          <table:table-cell office:value-type="float" office:value="38881416" table:style-name="ce10">
            <text:p>38881416</text:p>
          </table:table-cell>
          <table:table-cell office:value-type="float" office:value="13511072" table:style-name="ce7">
            <text:p>13511072</text:p>
          </table:table-cell>
          <table:table-cell office:value-type="float" office:value="17725855" table:style-name="ce7">
            <text:p>17725855</text:p>
          </table:table-cell>
          <table:table-cell office:value-type="float" office:value="29737890" table:style-name="ce118">
            <text:p>2973789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.442833333333333" table:style-name="ce64">
            <text:p>15.44</text:p>
          </table:table-cell>
          <table:table-cell office:value-type="float" office:value="1.2770833333333333" table:style-name="ce70">
            <text:p>1.28</text:p>
          </table:table-cell>
          <table:table-cell office:value-type="float" office:value="2979949000000" table:style-name="ce85">
            <text:p>2.98E+12</text:p>
          </table:table-cell>
          <table:table-cell office:value-type="float" office:value="12.031232436078128" table:formula="of:=([.AA92]*100/[.AA91])-100" table:style-name="ce70">
            <text:p>12.03</text:p>
          </table:table-cell>
          <table:table-cell office:value-type="string" table:style-name="ce118">
            <text:p>null</text:p>
          </table:table-cell>
          <table:table-cell office:value-type="float" office:value="281.57" table:style-name="ce73">
            <text:p>282</text:p>
          </table:table-cell>
          <table:table-cell office:value-type="float" office:value="401686000000" table:style-name="ce125">
            <text:p>4.01686E+11</text:p>
          </table:table-cell>
          <table:table-cell office:value-type="string" table:style-name="ce118">
            <text:p>null</text:p>
          </table:table-cell>
          <table:table-cell office:value-type="float" office:value="831119484805.54712" table:formula="of:=([.CV92]*[.BS92]*86)" table:style-name="ce125">
            <text:p>8.31119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45" table:style-name="ce129">
            <text:p>0.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880663.853062801" table:style-name="ce24">
            <text:p>16880664</text:p>
          </table:table-cell>
          <table:table-cell office:value-type="float" office:value="328257.15526370145" table:formula="of:=[.BS92]-[.BS91]" table:style-name="ce24">
            <text:p>32825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.3033108376804399" table:formula="of:=([.B92]/[.BS92])" table:style-name="ce34">
            <text:p>2.30</text:p>
          </table:table-cell>
          <table:table-cell office:value-type="float" office:value="3.2930000000000006" table:formula="of:=[.BX91]-(([.$BX$83]-[.$BX$93])/10)" table:style-name="ce103">
            <text:p>3.29</text:p>
          </table:table-cell>
          <table:table-cell office:value-type="float" office:value="1.361" table:style-name="ce129">
            <text:p>1.36</text:p>
          </table:table-cell>
          <table:table-cell office:value-type="float" office:value="1.9831385324005453" table:formula="of:=([.BS92]*100/[.BS91])-100" table:style-name="ce23">
            <text:p>2.0</text:p>
          </table:table-cell>
          <table:table-cell office:value-type="float" office:value="28189" table:formula="of:=([.B92]-[.B91])" table:style-name="ce73">
            <text:p>28189</text:p>
          </table:table-cell>
          <table:table-cell office:value-type="float" office:value="7.255253212301227E-2" table:formula="of:=([.B92]*100/[.B91])-100" table:style-name="ce25">
            <text:p>0.07</text:p>
          </table:table-cell>
          <table:table-cell office:value-type="float" office:value="319696.87588319735" table:formula="of:=[.BT92]-([.CA92]/[.BX92])" table:style-name="ce76">
            <text:p>319697</text:p>
          </table:table-cell>
          <table:table-cell office:value-type="float" office:value="1276000" table:style-name="ce78">
            <text:p>1276000</text:p>
          </table:table-cell>
          <table:table-cell office:value-type="float" office:value="28571.669999999995" table:style-name="ce8">
            <text:p>2857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72.5" table:style-name="ce8">
            <text:p>57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.72" table:style-name="ce25">
            <text:p>6.72</text:p>
          </table:table-cell>
          <table:table-cell office:value-type="float" office:value="132.4" table:formula="of:=[.CZ91]+[.CY92]" table:style-name="ce23">
            <text:p>132.4</text:p>
          </table:table-cell>
          <table:table-cell office:value-type="float" office:value="147.778875" table:formula="of:=(([.CV92]*[.CY92])/100)+[.DA91]" table:style-name="ce23">
            <text:p>147.8</text:p>
          </table:table-cell>
          <table:table-cell office:value-type="float" office:value="424.72112500000003" table:formula="of:=[.CV92]-[.DA92]" table:style-name="ce23">
            <text:p>424.7</text:p>
          </table:table-cell>
          <table:table-cell office:value-type="float" office:value="432.40181268882168" table:formula="of:=[.CV92]/[.CZ92]*[.$CZ$87]" table:style-name="ce23">
            <text:p>432.4</text:p>
          </table:table-cell>
          <table:table-cell office:value-type="float" office:value="0.29508333333333248" table:formula="of:=([.Y92]-[.Y91])" table:style-name="ce25">
            <text:p>0.30</text:p>
          </table:table-cell>
          <table:table-cell office:value-type="float" office:value="13.930348258706474" table:formula="of:=([.CV92]*100/[.CV91])-100" table:style-name="ce25">
            <text:p>13.93</text:p>
          </table:table-cell>
          <table:table-cell office:value-type="float" office:value="7.2103482587064738" table:formula="of:=[.DE92]-[.CY92]" table:style-name="ce25">
            <text:p>7.2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.237500000000001" table:style-name="ce23">
            <text:p>16.2</text:p>
          </table:table-cell>
          <table:table-cell office:value-type="float" office:value="100" table:formula="of:=(([.DC92]-MIN([.DC78:.DC92]))/(MAX([.DC78:.DC92])-MIN([.DC78:.DC92])))*100" table:style-name="ce128">
            <text:p>100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.208294269587313" table:formula="of:=100-((([.CC92]-MIN([.CC63:.CC92]))/(MAX([.CC63:.CC92])-MIN([.CC63:.CC92])))*100)" table:style-name="ce128">
            <text:p>14.2</text:p>
          </table:table-cell>
          <table:table-cell office:value-type="float" office:value="8.7624999999999993" table:formula="of:=MIN(100; MAX(0; ((IF(AND([.DI92]-[.DI91]&gt;=-0.3;[.DI92]-[.DI91]&lt;=0.3);100;IF(AND([.DI92]-[.DI91]&gt;-1;[.DI92]-[.DI91]&lt;-0.3);50;IF([.DI92]-[.DI91]&lt;=-1;25;75)))))-[.DI92]+(IF(([.DI92]-[.DI91])*([.DI91]-[.DI90])&lt;0;AVERAGE([.DI88:.DI92]);0))))" table:style-name="ce128">
            <text:p>8.8</text:p>
          </table:table-cell>
          <table:table-cell office:value-type="string" table:style-name="ce118">
            <text:p>null</text:p>
          </table:table-cell>
          <table:table-cell office:value-type="float" office:value="40.990264756529108" table:formula="of:=AVERAGE([.DJ92:.DP92])" table:style-name="ce128">
            <text:p>41.0</text:p>
          </table:table-cell>
          <table:table-cell office:value-type="float" office:value="325.76" table:formula="of:=-0.06*(([.A92]-1963)^2)+8.5*([.A92]-1963)+140" table:style-name="ce23">
            <text:p>325.8</text:p>
          </table:table-cell>
          <table:table-cell table:number-columns-repeated="16261"/>
        </table:table-row>
        <table:table-row table:style-name="ro2">
          <table:table-cell office:value-type="float" office:value="1991" table:style-name="ce15">
            <text:p>1991</text:p>
          </table:table-cell>
          <table:table-cell office:value-type="float" office:value="39051336" table:style-name="ce10">
            <text:p>39051336</text:p>
          </table:table-cell>
          <table:table-cell office:value-type="float" office:value="13710030" table:style-name="ce7">
            <text:p>13710030</text:p>
          </table:table-cell>
          <table:table-cell office:value-type="float" office:value="17922998" table:style-name="ce7">
            <text:p>17922998</text:p>
          </table:table-cell>
          <table:table-cell office:value-type="float" office:value="30165015" table:style-name="ce118">
            <text:p>3016501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.081166666666668" table:style-name="ce64">
            <text:p>13.08</text:p>
          </table:table-cell>
          <table:table-cell office:value-type="float" office:value="1.2385166666666667" table:style-name="ce70">
            <text:p>1.24</text:p>
          </table:table-cell>
          <table:table-cell office:value-type="float" office:value="3204633000000" table:style-name="ce85">
            <text:p>3.20E+12</text:p>
          </table:table-cell>
          <table:table-cell office:value-type="float" office:value="7.539860581506602" table:formula="of:=([.AA93]*100/[.AA92])-100" table:style-name="ce70">
            <text:p>7.54</text:p>
          </table:table-cell>
          <table:table-cell office:value-type="string" table:style-name="ce118">
            <text:p>null</text:p>
          </table:table-cell>
          <table:table-cell office:value-type="float" office:value="276.57833333333338" table:style-name="ce73">
            <text:p>277</text:p>
          </table:table-cell>
          <table:table-cell office:value-type="float" office:value="443715000000" table:style-name="ce125">
            <text:p>4.43715E+11</text:p>
          </table:table-cell>
          <table:table-cell office:value-type="string" table:style-name="ce118">
            <text:p>null</text:p>
          </table:table-cell>
          <table:table-cell office:value-type="float" office:value="861472158750" table:formula="of:=([.CV93]*[.BS93]*86)" table:style-name="ce125">
            <text:p>8.61472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43" table:style-name="ce129">
            <text:p>0.4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1900" table:style-name="ce51">
            <text:p>81900</text:p>
          </table:table-cell>
          <table:table-cell office:value-type="float" office:value="55104" table:style-name="ce17">
            <text:p>55104</text:p>
          </table:table-cell>
          <table:table-cell office:value-type="float" office:value="26124" table:style-name="ce17">
            <text:p>26124</text:p>
          </table:table-cell>
          <table:table-cell office:value-type="float" office:value="672" table:style-name="ce17">
            <text:p>672</text:p>
          </table:table-cell>
          <table:table-cell office:value-type="float" office:value="164268" table:style-name="ce80">
            <text:p>164268</text:p>
          </table:table-cell>
          <table:table-cell office:value-type="float" office:value="88674" table:style-name="ce80">
            <text:p>88674</text:p>
          </table:table-cell>
          <table:table-cell office:value-type="float" office:value="5274" table:style-name="ce80">
            <text:p>5274</text:p>
          </table:table-cell>
          <table:table-cell office:value-type="float" office:value="61098" table:style-name="ce17">
            <text:p>61098</text:p>
          </table:table-cell>
          <table:table-cell office:value-type="float" office:value="162.39090328286042" table:style-name="ce124">
            <text:p>162</text:p>
          </table:table-cell>
          <table:table-cell office:value-type="float" office:value="2692233599.9999995" table:style-name="ce17">
            <text:p>2692233600</text:p>
          </table:table-cell>
          <table:table-cell office:value-type="float" office:value="44064.185407050958" table:formula="of:=[.BH93]/[.BF93]" table:style-name="ce51">
            <text:p>44064</text:p>
          </table:table-cell>
          <table:table-cell office:value-type="float" office:value="271.34639019956558" table:formula="of:=[.BI93]/[.BG93]" table:style-name="ce51">
            <text:p>271</text:p>
          </table:table-cell>
          <table:table-cell office:value-type="float" office:value="176142" table:style-name="ce17">
            <text:p>176142</text:p>
          </table:table-cell>
          <table:table-cell office:value-type="float" office:value="111.14777423345399" table:style-name="ce124">
            <text:p>111</text:p>
          </table:table-cell>
          <table:table-cell office:value-type="float" office:value="5773451400" table:style-name="ce17">
            <text:p>5773451400</text:p>
          </table:table-cell>
          <table:table-cell office:value-type="float" office:value="32777.255850393434" table:formula="of:=[.BM93]/[.BK93]" table:style-name="ce55">
            <text:p>32777</text:p>
          </table:table-cell>
          <table:table-cell office:value-type="float" office:value="294.89799572187854" table:formula="of:=[.BN93]/[.BL93]" table:style-name="ce55">
            <text:p>295</text:p>
          </table:table-cell>
          <table:table-cell office:value-type="float" office:value="2.056311778005929" table:formula="of:=[.CV93]/(([.BO93]+[.BJ93])/2)" table:style-name="ce58">
            <text:p>2.0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7206000" table:style-name="ce18">
            <text:p>17206000</text:p>
          </table:table-cell>
          <table:table-cell office:value-type="float" office:value="325336.14693719894" table:formula="of:=[.BS93]-[.BS92]" table:style-name="ce24">
            <text:p>325336</text:p>
          </table:table-cell>
          <table:table-cell office:value-type="float" office:value="227970" table:style-name="ce76">
            <text:p>227970</text:p>
          </table:table-cell>
          <table:table-cell office:value-type="float" office:value="44514" table:style-name="ce76">
            <text:p>44514</text:p>
          </table:table-cell>
          <table:table-cell office:value-type="float" office:value="2.2696347785656168" table:formula="of:=([.B93]/[.BS93])" table:style-name="ce34">
            <text:p>2.27</text:p>
          </table:table-cell>
          <table:table-cell office:value-type="float" office:value="3.26" table:style-name="ce71">
            <text:p>3.26</text:p>
          </table:table-cell>
          <table:table-cell office:value-type="float" office:value="1.327" table:style-name="ce129">
            <text:p>1.33</text:p>
          </table:table-cell>
          <table:table-cell office:value-type="float" office:value="1.9272710467377152" table:formula="of:=([.BS93]*100/[.BS92])-100" table:style-name="ce23">
            <text:p>1.9</text:p>
          </table:table-cell>
          <table:table-cell office:value-type="float" office:value="169920" table:formula="of:=([.B93]-[.B92])" table:style-name="ce73">
            <text:p>169920</text:p>
          </table:table-cell>
          <table:table-cell office:value-type="float" office:value="0.43702112083572331" table:formula="of:=([.B93]*100/[.B92])-100" table:style-name="ce25">
            <text:p>0.44</text:p>
          </table:table-cell>
          <table:table-cell office:value-type="float" office:value="273213.44755069586" table:formula="of:=[.BT93]-([.CA93]/[.BX93])" table:style-name="ce76">
            <text:p>273213</text:p>
          </table:table-cell>
          <table:table-cell office:value-type="float" office:value="1339000" table:style-name="ce78">
            <text:p>1339000</text:p>
          </table:table-cell>
          <table:table-cell office:value-type="float" office:value="28797.27" table:style-name="ce8">
            <text:p>2879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82.1875" table:style-name="ce8">
            <text:p>58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94" table:style-name="ce25">
            <text:p>5.94</text:p>
          </table:table-cell>
          <table:table-cell office:value-type="float" office:value="138.34" table:formula="of:=[.CZ92]+[.CY93]" table:style-name="ce23">
            <text:p>138.3</text:p>
          </table:table-cell>
          <table:table-cell office:value-type="float" office:value="182.36081250000001" table:formula="of:=(([.CV93]*[.CY93])/100)+[.DA92]" table:style-name="ce23">
            <text:p>182.4</text:p>
          </table:table-cell>
          <table:table-cell office:value-type="float" office:value="399.82668749999999" table:formula="of:=[.CV93]-[.DA93]" table:style-name="ce23">
            <text:p>399.8</text:p>
          </table:table-cell>
          <table:table-cell office:value-type="float" office:value="420.83815237819857" table:formula="of:=[.CV93]/[.CZ93]*[.$CZ$87]" table:style-name="ce23">
            <text:p>420.8</text:p>
          </table:table-cell>
          <table:table-cell office:value-type="float" office:value="-2.3616666666666646" table:formula="of:=([.Y93]-[.Y92])" table:style-name="ce25">
            <text:p>-2.36</text:p>
          </table:table-cell>
          <table:table-cell office:value-type="float" office:value="1.692139737991269" table:formula="of:=([.CV93]*100/[.CV92])-100" table:style-name="ce25">
            <text:p>1.69</text:p>
          </table:table-cell>
          <table:table-cell office:value-type="float" office:value="-4.2478602620087313" table:formula="of:=[.DE93]-[.CY93]" table:style-name="ce25">
            <text:p>-4.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6.3125" table:style-name="ce23">
            <text:p>16.3</text:p>
          </table:table-cell>
          <table:table-cell office:value-type="float" office:value="95.372070160650608" table:formula="of:=(([.DC93]-MIN([.DC79:.DC93]))/(MAX([.DC79:.DC93])-MIN([.DC79:.DC93])))*100" table:style-name="ce128">
            <text:p>95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4.077944501482222" table:formula="of:=MIN(100;MAX(0;(([.BP93]-1.8)/(2.2-1.8))*100))" table:style-name="ce128">
            <text:p>64.1</text:p>
          </table:table-cell>
          <table:table-cell office:value-type="float" office:value="38.210005387316315" table:formula="of:=100-((([.CC93]-MIN([.CC64:.CC93]))/(MAX([.CC64:.CC93])-MIN([.CC64:.CC93])))*100)" table:style-name="ce128">
            <text:p>38.2</text:p>
          </table:table-cell>
          <table:table-cell office:value-type="float" office:value="100" table:formula="of:=MIN(100; MAX(0; ((IF(AND([.DI93]-[.DI92]&gt;=-0.3;[.DI93]-[.DI92]&lt;=0.3);100;IF(AND([.DI93]-[.DI92]&gt;-1;[.DI93]-[.DI92]&lt;-0.3);50;IF([.DI93]-[.DI92]&lt;=-1;25;75)))))-[.DI93]+(IF(([.DI93]-[.DI92])*([.DI92]-[.DI91])&lt;0;AVERAGE([.DI89:.DI93]);0))))" table:style-name="ce128">
            <text:p>100.0</text:p>
          </table:table-cell>
          <table:table-cell office:value-type="string" table:style-name="ce118">
            <text:p>null</text:p>
          </table:table-cell>
          <table:table-cell office:value-type="float" office:value="74.415005012362286" table:formula="of:=AVERAGE([.DJ93:.DP93])" table:style-name="ce128">
            <text:p>74.4</text:p>
          </table:table-cell>
          <table:table-cell office:value-type="float" office:value="330.96000000000004" table:formula="of:=-0.06*(([.A93]-1963)^2)+8.5*([.A93]-1963)+140" table:style-name="ce23">
            <text:p>331.0</text:p>
          </table:table-cell>
          <table:table-cell table:number-columns-repeated="16261"/>
        </table:table-row>
        <table:table-row table:style-name="ro2">
          <table:table-cell office:value-type="float" office:value="1992" table:style-name="ce15">
            <text:p>1992</text:p>
          </table:table-cell>
          <table:table-cell office:value-type="float" office:value="39264034" table:style-name="ce10">
            <text:p>39264034</text:p>
          </table:table-cell>
          <table:table-cell office:value-type="float" office:value="14031422" table:style-name="ce7">
            <text:p>14031422</text:p>
          </table:table-cell>
          <table:table-cell office:value-type="float" office:value="18163607" table:style-name="ce7">
            <text:p>18163607</text:p>
          </table:table-cell>
          <table:table-cell office:value-type="float" office:value="30635510" table:style-name="ce118">
            <text:p>3063551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.308999999999999" table:style-name="ce64">
            <text:p>13.31</text:p>
          </table:table-cell>
          <table:table-cell office:value-type="float" office:value="1.2956166666666664" table:style-name="ce70">
            <text:p>1.30</text:p>
          </table:table-cell>
          <table:table-cell office:value-type="float" office:value="3433178000000" table:style-name="ce85">
            <text:p>3.43E+12</text:p>
          </table:table-cell>
          <table:table-cell office:value-type="float" office:value="7.1317058770848263" table:formula="of:=([.AA94]*100/[.AA93])-100" table:style-name="ce70">
            <text:p>7.13</text:p>
          </table:table-cell>
          <table:table-cell office:value-type="string" table:style-name="ce118">
            <text:p>null</text:p>
          </table:table-cell>
          <table:table-cell office:value-type="float" office:value="253.61166666666665" table:style-name="ce73">
            <text:p>254</text:p>
          </table:table-cell>
          <table:table-cell office:value-type="float" office:value="463263000000" table:style-name="ce125">
            <text:p>4.63263E+11</text:p>
          </table:table-cell>
          <table:table-cell office:value-type="string" table:style-name="ce118">
            <text:p>null</text:p>
          </table:table-cell>
          <table:table-cell office:value-type="float" office:value="870646643349.83533" table:formula="of:=([.CV94]*[.BS94]*86)" table:style-name="ce125">
            <text:p>8.70647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38" table:style-name="ce129">
            <text:p>0.3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1380" table:style-name="ce5">
            <text:p>81380</text:p>
          </table:table-cell>
          <table:table-cell office:value-type="float" office:value="52825" table:style-name="ce17">
            <text:p>52825</text:p>
          </table:table-cell>
          <table:table-cell office:value-type="float" office:value="27296" table:style-name="ce17">
            <text:p>27296</text:p>
          </table:table-cell>
          <table:table-cell office:value-type="float" office:value="1259" table:style-name="ce17">
            <text:p>1259</text:p>
          </table:table-cell>
          <table:table-cell office:value-type="float" office:value="148965" table:style-name="ce80">
            <text:p>148965</text:p>
          </table:table-cell>
          <table:table-cell office:value-type="float" office:value="84458" table:style-name="ce80">
            <text:p>84458</text:p>
          </table:table-cell>
          <table:table-cell office:value-type="float" office:value="6558" table:style-name="ce80">
            <text:p>6558</text:p>
          </table:table-cell>
          <table:table-cell office:value-type="float" office:value="66137" table:style-name="ce17">
            <text:p>66137</text:p>
          </table:table-cell>
          <table:table-cell office:value-type="float" office:value="156.49320362586838" table:style-name="ce124">
            <text:p>156</text:p>
          </table:table-cell>
          <table:table-cell office:value-type="float" office:value="2929328500" table:style-name="ce17">
            <text:p>2929328500</text:p>
          </table:table-cell>
          <table:table-cell office:value-type="float" office:value="44291.82605803106" table:formula="of:=[.BH94]/[.BF94]" table:style-name="ce51">
            <text:p>44292</text:p>
          </table:table-cell>
          <table:table-cell office:value-type="float" office:value="283.02715409878419" table:formula="of:=[.BI94]/[.BG94]" table:style-name="ce51">
            <text:p>283</text:p>
          </table:table-cell>
          <table:table-cell office:value-type="float" office:value="152483" table:style-name="ce17">
            <text:p>152483</text:p>
          </table:table-cell>
          <table:table-cell office:value-type="float" office:value="109.6253646284643" table:style-name="ce124">
            <text:p>110</text:p>
          </table:table-cell>
          <table:table-cell office:value-type="float" office:value="5082786000" table:style-name="ce17">
            <text:p>5082786000</text:p>
          </table:table-cell>
          <table:table-cell office:value-type="float" office:value="33333.460123423596" table:formula="of:=[.BM94]/[.BK94]" table:style-name="ce55">
            <text:p>33333</text:p>
          </table:table-cell>
          <table:table-cell office:value-type="float" office:value="304.06703992634692" table:formula="of:=[.BN94]/[.BL94]" table:style-name="ce55">
            <text:p>304</text:p>
          </table:table-cell>
          <table:table-cell office:value-type="float" office:value="1.9641226429001941" table:formula="of:=[.CV94]/(([.BO94]+[.BJ94])/2)" table:style-name="ce58">
            <text:p>1.96</text:p>
          </table:table-cell>
          <table:table-cell office:value-type="float" office:value="3.6821218226752706" table:formula="of:=(([.BJ94]+[.BO94])*100/([.BJ93]+[.BO93]))-100" table:style-name="ce57">
            <text:p>3.7</text:p>
          </table:table-cell>
          <table:table-cell office:value-type="string" table:style-name="ce118">
            <text:p>null</text:p>
          </table:table-cell>
          <table:table-cell office:value-type="float" office:value="17558891.149678409" table:style-name="ce24">
            <text:p>17558891</text:p>
          </table:table-cell>
          <table:table-cell office:value-type="float" office:value="352891.1496784091" table:formula="of:=[.BS94]-[.BS93]" table:style-name="ce24">
            <text:p>352891</text:p>
          </table:table-cell>
          <table:table-cell office:value-type="float" office:value="178501" table:style-name="ce76">
            <text:p>178501</text:p>
          </table:table-cell>
          <table:table-cell office:value-type="float" office:value="35695" table:style-name="ce76">
            <text:p>35695</text:p>
          </table:table-cell>
          <table:table-cell office:value-type="float" office:value="2.2361340283562905" table:formula="of:=([.B94]/[.BS94])" table:style-name="ce34">
            <text:p>2.24</text:p>
          </table:table-cell>
          <table:table-cell office:value-type="float" office:value="3.2199999999999998" table:formula="of:=[.BX93]-(([.$BX$93]-[.$BX$103])/10)" table:style-name="ce103">
            <text:p>3.22</text:p>
          </table:table-cell>
          <table:table-cell office:value-type="float" office:value="1.3109999999999999" table:style-name="ce129">
            <text:p>1.31</text:p>
          </table:table-cell>
          <table:table-cell office:value-type="float" office:value="2.0509772734999956" table:formula="of:=([.BS94]*100/[.BS93])-100" table:style-name="ce23">
            <text:p>2.1</text:p>
          </table:table-cell>
          <table:table-cell office:value-type="float" office:value="212698" table:formula="of:=([.B94]-[.B93])" table:style-name="ce73">
            <text:p>212698</text:p>
          </table:table-cell>
          <table:table-cell office:value-type="float" office:value="0.54466254368352907" table:formula="of:=([.B94]*100/[.B93])-100" table:style-name="ce25">
            <text:p>0.54</text:p>
          </table:table-cell>
          <table:table-cell office:value-type="float" office:value="286835.87017530348" table:formula="of:=[.BT94]-([.CA94]/[.BX94])" table:style-name="ce76">
            <text:p>286836</text:p>
          </table:table-cell>
          <table:table-cell office:value-type="float" office:value="1255000" table:style-name="ce78">
            <text:p>1255000</text:p>
          </table:table-cell>
          <table:table-cell office:value-type="float" office:value="26051.130000000005" table:style-name="ce8">
            <text:p>2605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76.5625" table:style-name="ce8">
            <text:p>57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93" table:style-name="ce25">
            <text:p>5.93</text:p>
          </table:table-cell>
          <table:table-cell office:value-type="float" office:value="144.27000000000001" table:formula="of:=[.CZ93]+[.CY94]" table:style-name="ce23">
            <text:p>144.3</text:p>
          </table:table-cell>
          <table:table-cell office:value-type="float" office:value="216.55096875000001" table:formula="of:=(([.CV94]*[.CY94])/100)+[.DA93]" table:style-name="ce23">
            <text:p>216.6</text:p>
          </table:table-cell>
          <table:table-cell office:value-type="float" office:value="360.01153124999996" table:formula="of:=[.CV94]-[.DA94]" table:style-name="ce23">
            <text:p>360.0</text:p>
          </table:table-cell>
          <table:table-cell office:value-type="float" office:value="399.64129756706177" table:formula="of:=[.CV94]/[.CZ94]*[.$CZ$87]" table:style-name="ce23">
            <text:p>399.6</text:p>
          </table:table-cell>
          <table:table-cell office:value-type="float" office:value="0.22783333333333111" table:formula="of:=([.Y94]-[.Y93])" table:style-name="ce25">
            <text:p>0.23</text:p>
          </table:table-cell>
          <table:table-cell office:value-type="float" office:value="-0.96618357487922424" table:formula="of:=([.CV94]*100/[.CV93])-100" table:style-name="ce25">
            <text:p>-0.97</text:p>
          </table:table-cell>
          <table:table-cell office:value-type="float" office:value="-6.896183574879224" table:formula="of:=[.DE94]-[.CY94]" table:style-name="ce25">
            <text:p>-6.9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8.352499999999999" table:style-name="ce23">
            <text:p>18.4</text:p>
          </table:table-cell>
          <table:table-cell office:value-type="float" office:value="86.888808438521153" table:formula="of:=(([.DC94]-MIN([.DC80:.DC94]))/(MAX([.DC80:.DC94])-MIN([.DC80:.DC94])))*100" table:style-name="ce128">
            <text:p>86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1.030660725048506" table:formula="of:=MIN(100;MAX(0;(([.BP94]-1.8)/(2.2-1.8))*100))" table:style-name="ce128">
            <text:p>41.0</text:p>
          </table:table-cell>
          <table:table-cell office:value-type="float" office:value="31.176069546339747" table:formula="of:=100-((([.CC94]-MIN([.CC65:.CC94]))/(MAX([.CC65:.CC94])-MIN([.CC65:.CC94])))*100)" table:style-name="ce128">
            <text:p>31.2</text:p>
          </table:table-cell>
          <table:table-cell office:value-type="float" office:value="56.647500000000001" table:formula="of:=MIN(100; MAX(0; ((IF(AND([.DI94]-[.DI93]&gt;=-0.3;[.DI94]-[.DI93]&lt;=0.3);100;IF(AND([.DI94]-[.DI93]&gt;-1;[.DI94]-[.DI93]&lt;-0.3);50;IF([.DI94]-[.DI93]&lt;=-1;25;75)))))-[.DI94]+(IF(([.DI94]-[.DI93])*([.DI93]-[.DI92])&lt;0;AVERAGE([.DI90:.DI94]);0))))" table:style-name="ce128">
            <text:p>56.6</text:p>
          </table:table-cell>
          <table:table-cell office:value-type="string" table:style-name="ce118">
            <text:p>null</text:p>
          </table:table-cell>
          <table:table-cell office:value-type="float" office:value="53.935759677477357" table:formula="of:=AVERAGE([.DJ94:.DP94])" table:style-name="ce128">
            <text:p>53.9</text:p>
          </table:table-cell>
          <table:table-cell office:value-type="float" office:value="336.03999999999996" table:formula="of:=-0.06*(([.A94]-1963)^2)+8.5*([.A94]-1963)+140" table:style-name="ce23">
            <text:p>336.0</text:p>
          </table:table-cell>
          <table:table-cell table:number-columns-repeated="16261"/>
        </table:table-row>
        <table:table-row table:style-name="ro2">
          <table:table-cell office:value-type="float" office:value="1993" table:style-name="ce15">
            <text:p>1993</text:p>
          </table:table-cell>
          <table:table-cell office:value-type="float" office:value="39458489" table:style-name="ce10">
            <text:p>39458489</text:p>
          </table:table-cell>
          <table:table-cell office:value-type="float" office:value="14319606" table:style-name="ce7">
            <text:p>14319606</text:p>
          </table:table-cell>
          <table:table-cell office:value-type="float" office:value="18384996" table:style-name="ce7">
            <text:p>18384996</text:p>
          </table:table-cell>
          <table:table-cell office:value-type="float" office:value="31107985" table:style-name="ce118">
            <text:p>3110798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.913333333333336" table:style-name="ce64">
            <text:p>10.91</text:p>
          </table:table-cell>
          <table:table-cell office:value-type="float" office:value="1.1633333333333336" table:style-name="ce70">
            <text:p>1.16</text:p>
          </table:table-cell>
          <table:table-cell office:value-type="float" office:value="3651774000000" table:style-name="ce85">
            <text:p>3.65E+12</text:p>
          </table:table-cell>
          <table:table-cell office:value-type="float" office:value="6.3671618541188337" table:formula="of:=([.AA95]*100/[.AA94])-100" table:style-name="ce70">
            <text:p>6.37</text:p>
          </table:table-cell>
          <table:table-cell office:value-type="string" table:style-name="ce118">
            <text:p>null</text:p>
          </table:table-cell>
          <table:table-cell office:value-type="float" office:value="306.66666666666663" table:style-name="ce73">
            <text:p>307</text:p>
          </table:table-cell>
          <table:table-cell office:value-type="float" office:value="425936000000" table:style-name="ce125">
            <text:p>4.25936E+11</text:p>
          </table:table-cell>
          <table:table-cell office:value-type="string" table:style-name="ce118">
            <text:p>null</text:p>
          </table:table-cell>
          <table:table-cell office:value-type="float" office:value="881059355636.44873" table:formula="of:=([.CV95]*[.BS95]*86)" table:style-name="ce125">
            <text:p>8.81059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38" table:style-name="ce129">
            <text:p>0.3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4158" table:style-name="ce5">
            <text:p>74158</text:p>
          </table:table-cell>
          <table:table-cell office:value-type="float" office:value="48588" table:style-name="ce17">
            <text:p>48588</text:p>
          </table:table-cell>
          <table:table-cell office:value-type="float" office:value="24533" table:style-name="ce17">
            <text:p>24533</text:p>
          </table:table-cell>
          <table:table-cell office:value-type="float" office:value="1037" table:style-name="ce17">
            <text:p>1037</text:p>
          </table:table-cell>
          <table:table-cell office:value-type="float" office:value="149460" table:style-name="ce80">
            <text:p>149460</text:p>
          </table:table-cell>
          <table:table-cell office:value-type="float" office:value="77311" table:style-name="ce80">
            <text:p>77311</text:p>
          </table:table-cell>
          <table:table-cell office:value-type="float" office:value="8093" table:style-name="ce80">
            <text:p>8093</text:p>
          </table:table-cell>
          <table:table-cell office:value-type="float" office:value="66788" table:style-name="ce17">
            <text:p>66788</text:p>
          </table:table-cell>
          <table:table-cell office:value-type="float" office:value="148.96771219272443" table:style-name="ce124">
            <text:p>149</text:p>
          </table:table-cell>
          <table:table-cell office:value-type="float" office:value="2966748399.9999995" table:style-name="ce17">
            <text:p>2966748400</text:p>
          </table:table-cell>
          <table:table-cell office:value-type="float" office:value="44420.380906749706" table:formula="of:=[.BH95]/[.BF95]" table:style-name="ce51">
            <text:p>44420</text:p>
          </table:table-cell>
          <table:table-cell office:value-type="float" office:value="298.18797813905871" table:formula="of:=[.BI95]/[.BG95]" table:style-name="ce51">
            <text:p>298</text:p>
          </table:table-cell>
          <table:table-cell office:value-type="float" office:value="147981" table:style-name="ce17">
            <text:p>147981</text:p>
          </table:table-cell>
          <table:table-cell office:value-type="float" office:value="108.07798596309799" table:style-name="ce124">
            <text:p>108</text:p>
          </table:table-cell>
          <table:table-cell office:value-type="float" office:value="5170784200" table:style-name="ce17">
            <text:p>5170784200</text:p>
          </table:table-cell>
          <table:table-cell office:value-type="float" office:value="34942.21690622445" table:formula="of:=[.BM95]/[.BK95]" table:style-name="ce55">
            <text:p>34942</text:p>
          </table:table-cell>
          <table:table-cell office:value-type="float" office:value="323.3055889675357" table:formula="of:=[.BN95]/[.BL95]" table:style-name="ce55">
            <text:p>323</text:p>
          </table:table-cell>
          <table:table-cell office:value-type="float" office:value="1.8453529701672613" table:formula="of:=[.CV95]/(([.BO95]+[.BJ95])/2)" table:style-name="ce58">
            <text:p>1.85</text:p>
          </table:table-cell>
          <table:table-cell office:value-type="float" office:value="5.8592596267424" table:formula="of:=(([.BJ95]+[.BO95])*100/([.BJ94]+[.BO94]))-100" table:style-name="ce57">
            <text:p>5.9</text:p>
          </table:table-cell>
          <table:table-cell office:value-type="string" table:style-name="ce118">
            <text:p>null</text:p>
          </table:table-cell>
          <table:table-cell office:value-type="float" office:value="17865724.212892946" table:style-name="ce24">
            <text:p>17865724</text:p>
          </table:table-cell>
          <table:table-cell office:value-type="float" office:value="306833.06321453676" table:formula="of:=[.BS95]-[.BS94]" table:style-name="ce24">
            <text:p>306833</text:p>
          </table:table-cell>
          <table:table-cell office:value-type="float" office:value="170403" table:style-name="ce76">
            <text:p>170403</text:p>
          </table:table-cell>
          <table:table-cell office:value-type="float" office:value="45795" table:style-name="ce76">
            <text:p>45795</text:p>
          </table:table-cell>
          <table:table-cell office:value-type="float" office:value="2.2086140214525676" table:formula="of:=([.B95]/[.BS95])" table:style-name="ce34">
            <text:p>2.21</text:p>
          </table:table-cell>
          <table:table-cell office:value-type="float" office:value="3.1799999999999997" table:formula="of:=[.BX94]-(([.$BX$93]-[.$BX$103])/10)" table:style-name="ce103">
            <text:p>3.18</text:p>
          </table:table-cell>
          <table:table-cell office:value-type="float" office:value="1.2569999999999999" table:style-name="ce129">
            <text:p>1.26</text:p>
          </table:table-cell>
          <table:table-cell office:value-type="float" office:value="1.7474512518984113" table:formula="of:=([.BS95]*100/[.BS94])-100" table:style-name="ce23">
            <text:p>1.7</text:p>
          </table:table-cell>
          <table:table-cell office:value-type="float" office:value="194455" table:formula="of:=([.B95]-[.B94])" table:style-name="ce73">
            <text:p>194455</text:p>
          </table:table-cell>
          <table:table-cell office:value-type="float" office:value="0.49524967302137668" table:formula="of:=([.B95]*100/[.B94])-100" table:style-name="ce25">
            <text:p>0.50</text:p>
          </table:table-cell>
          <table:table-cell office:value-type="float" office:value="245683.69214535435" table:formula="of:=[.BT95]-([.CA95]/[.BX95])" table:style-name="ce76">
            <text:p>245684</text:p>
          </table:table-cell>
          <table:table-cell office:value-type="float" office:value="1144000" table:style-name="ce78">
            <text:p>1144000</text:p>
          </table:table-cell>
          <table:table-cell office:value-type="float" office:value="22651.03" table:style-name="ce8">
            <text:p>2265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73.4375" table:style-name="ce8">
            <text:p>57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5699999999999994" table:style-name="ce25">
            <text:p>4.57</text:p>
          </table:table-cell>
          <table:table-cell office:value-type="float" office:value="148.84" table:formula="of:=[.CZ94]+[.CY95]" table:style-name="ce23">
            <text:p>148.8</text:p>
          </table:table-cell>
          <table:table-cell office:value-type="float" office:value="242.75706250000002" table:formula="of:=(([.CV95]*[.CY95])/100)+[.DA94]" table:style-name="ce23">
            <text:p>242.8</text:p>
          </table:table-cell>
          <table:table-cell office:value-type="float" office:value="330.68043749999998" table:formula="of:=[.CV95]-[.DA95]" table:style-name="ce23">
            <text:p>330.7</text:p>
          </table:table-cell>
          <table:table-cell office:value-type="float" office:value="385.27109647944104" table:formula="of:=[.CV95]/[.CZ95]*[.$CZ$87]" table:style-name="ce23">
            <text:p>385.3</text:p>
          </table:table-cell>
          <table:table-cell office:value-type="float" office:value="-2.3956666666666635" table:formula="of:=([.Y95]-[.Y94])" table:style-name="ce25">
            <text:p>-2.40</text:p>
          </table:table-cell>
          <table:table-cell office:value-type="float" office:value="-0.5420054200541955" table:formula="of:=([.CV95]*100/[.CV94])-100" table:style-name="ce25">
            <text:p>-0.54</text:p>
          </table:table-cell>
          <table:table-cell office:value-type="float" office:value="-5.1120054200541949" table:formula="of:=[.DE95]-[.CY95]" table:style-name="ce25">
            <text:p>-5.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2.64" table:style-name="ce23">
            <text:p>22.6</text:p>
          </table:table-cell>
          <table:table-cell office:value-type="float" office:value="81.137663850699269" table:formula="of:=(([.DC95]-MIN([.DC81:.DC95]))/(MAX([.DC81:.DC95])-MIN([.DC81:.DC95])))*100" table:style-name="ce128">
            <text:p>81.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.338242541815308" table:formula="of:=MIN(100;MAX(0;(([.BP95]-1.8)/(2.2-1.8))*100))" table:style-name="ce128">
            <text:p>11.3</text:p>
          </table:table-cell>
          <table:table-cell office:value-type="float" office:value="52.424990384856535" table:formula="of:=100-((([.CC95]-MIN([.CC66:.CC95]))/(MAX([.CC66:.CC95])-MIN([.CC66:.CC95])))*100)" table:style-name="ce128">
            <text:p>52.4</text:p>
          </table:table-cell>
          <table:table-cell office:value-type="float" office:value="52.36" table:formula="of:=MIN(100; MAX(0; ((IF(AND([.DI95]-[.DI94]&gt;=-0.3;[.DI95]-[.DI94]&lt;=0.3);100;IF(AND([.DI95]-[.DI94]&gt;-1;[.DI95]-[.DI94]&lt;-0.3);50;IF([.DI95]-[.DI94]&lt;=-1;25;75)))))-[.DI95]+(IF(([.DI95]-[.DI94])*([.DI94]-[.DI93])&lt;0;AVERAGE([.DI91:.DI95]);0))))" table:style-name="ce128">
            <text:p>52.4</text:p>
          </table:table-cell>
          <table:table-cell office:value-type="string" table:style-name="ce118">
            <text:p>null</text:p>
          </table:table-cell>
          <table:table-cell office:value-type="float" office:value="49.315224194342775" table:formula="of:=AVERAGE([.DJ95:.DP95])" table:style-name="ce128">
            <text:p>49.3</text:p>
          </table:table-cell>
          <table:table-cell office:value-type="float" office:value="341" table:formula="of:=-0.06*(([.A95]-1963)^2)+8.5*([.A95]-1963)+140" table:style-name="ce23">
            <text:p>341.0</text:p>
          </table:table-cell>
          <table:table-cell table:number-columns-repeated="16261"/>
        </table:table-row>
        <table:table-row table:style-name="ro2">
          <table:table-cell office:value-type="float" office:value="1994" table:style-name="ce15">
            <text:p>1994</text:p>
          </table:table-cell>
          <table:table-cell office:value-type="float" office:value="39639726" table:style-name="ce10">
            <text:p>39639726</text:p>
          </table:table-cell>
          <table:table-cell office:value-type="float" office:value="14555126" table:style-name="ce7">
            <text:p>14555126</text:p>
          </table:table-cell>
          <table:table-cell office:value-type="float" office:value="18613772" table:style-name="ce7">
            <text:p>18613772</text:p>
          </table:table-cell>
          <table:table-cell office:value-type="float" office:value="31586393" table:style-name="ce118">
            <text:p>3158639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.0772499999999994" table:style-name="ce64">
            <text:p>9.08</text:p>
          </table:table-cell>
          <table:table-cell office:value-type="float" office:value="1.1923250000000001" table:style-name="ce70">
            <text:p>1.19</text:p>
          </table:table-cell>
          <table:table-cell office:value-type="float" office:value="3735799000000" table:style-name="ce85">
            <text:p>3.74E+12</text:p>
          </table:table-cell>
          <table:table-cell office:value-type="float" office:value="2.3009364763536837" table:formula="of:=([.AA96]*100/[.AA95])-100" table:style-name="ce70">
            <text:p>2.30</text:p>
          </table:table-cell>
          <table:table-cell office:value-type="string" table:style-name="ce118">
            <text:p>null</text:p>
          </table:table-cell>
          <table:table-cell office:value-type="float" office:value="318.25166666666701" table:style-name="ce73">
            <text:p>318</text:p>
          </table:table-cell>
          <table:table-cell office:value-type="float" office:value="425089000000" table:style-name="ce125">
            <text:p>4.25089E+11</text:p>
          </table:table-cell>
          <table:table-cell office:value-type="string" table:style-name="ce118">
            <text:p>null</text:p>
          </table:table-cell>
          <table:table-cell office:value-type="float" office:value="924495393529.27502" table:formula="of:=([.CV96]*[.BS96]*86)" table:style-name="ce125">
            <text:p>9.24495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4" table:style-name="ce129">
            <text:p>0.4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5789" table:style-name="ce5">
            <text:p>85789</text:p>
          </table:table-cell>
          <table:table-cell office:value-type="float" office:value="56532" table:style-name="ce17">
            <text:p>56532</text:p>
          </table:table-cell>
          <table:table-cell office:value-type="float" office:value="28118" table:style-name="ce17">
            <text:p>28118</text:p>
          </table:table-cell>
          <table:table-cell office:value-type="float" office:value="1139" table:style-name="ce17">
            <text:p>1139</text:p>
          </table:table-cell>
          <table:table-cell office:value-type="float" office:value="192695" table:style-name="ce80">
            <text:p>192695</text:p>
          </table:table-cell>
          <table:table-cell office:value-type="float" office:value="89860" table:style-name="ce80">
            <text:p>89860</text:p>
          </table:table-cell>
          <table:table-cell office:value-type="float" office:value="11732" table:style-name="ce80">
            <text:p>11732</text:p>
          </table:table-cell>
          <table:table-cell office:value-type="float" office:value="86187" table:style-name="ce17">
            <text:p>86187</text:p>
          </table:table-cell>
          <table:table-cell office:value-type="float" office:value="148.88098640885858" table:style-name="ce124">
            <text:p>149</text:p>
          </table:table-cell>
          <table:table-cell office:value-type="float" office:value="4025289699.9999995" table:style-name="ce17">
            <text:p>4025289700</text:p>
          </table:table-cell>
          <table:table-cell office:value-type="float" office:value="46704.139835474023" table:formula="of:=[.BH96]/[.BF96]" table:style-name="ce51">
            <text:p>46704</text:p>
          </table:table-cell>
          <table:table-cell office:value-type="float" office:value="313.70117139884206" table:formula="of:=[.BI96]/[.BG96]" table:style-name="ce51">
            <text:p>314</text:p>
          </table:table-cell>
          <table:table-cell office:value-type="float" office:value="180702" table:style-name="ce17">
            <text:p>180702</text:p>
          </table:table-cell>
          <table:table-cell office:value-type="float" office:value="107.31739484502098" table:style-name="ce124">
            <text:p>107</text:p>
          </table:table-cell>
          <table:table-cell office:value-type="float" office:value="6401262300" table:style-name="ce17">
            <text:p>6401262300</text:p>
          </table:table-cell>
          <table:table-cell office:value-type="float" office:value="35424.413122156919" table:formula="of:=[.BM96]/[.BK96]" table:style-name="ce55">
            <text:p>35424</text:p>
          </table:table-cell>
          <table:table-cell office:value-type="float" office:value="330.09013285603851" table:formula="of:=[.BN96]/[.BL96]" table:style-name="ce55">
            <text:p>330</text:p>
          </table:table-cell>
          <table:table-cell office:value-type="float" office:value="1.8358045412991306" table:formula="of:=[.CV96]/(([.BO96]+[.BJ96])/2)" table:style-name="ce58">
            <text:p>1.84</text:p>
          </table:table-cell>
          <table:table-cell office:value-type="float" office:value="3.5877663629078" table:formula="of:=(([.BJ96]+[.BO96])*100/([.BJ95]+[.BO95]))-100" table:style-name="ce57">
            <text:p>3.6</text:p>
          </table:table-cell>
          <table:table-cell office:value-type="string" table:style-name="ce118">
            <text:p>null</text:p>
          </table:table-cell>
          <table:table-cell office:value-type="float" office:value="18191342.462421015" table:style-name="ce24">
            <text:p>18191342</text:p>
          </table:table-cell>
          <table:table-cell office:value-type="float" office:value="325618.24952806905" table:formula="of:=[.BS96]-[.BS95]" table:style-name="ce24">
            <text:p>325618</text:p>
          </table:table-cell>
          <table:table-cell office:value-type="float" office:value="174793" table:style-name="ce76">
            <text:p>174793</text:p>
          </table:table-cell>
          <table:table-cell office:value-type="float" office:value="67639" table:style-name="ce76">
            <text:p>67639</text:p>
          </table:table-cell>
          <table:table-cell office:value-type="float" office:value="2.1790434698201215" table:formula="of:=([.B96]/[.BS96])" table:style-name="ce34">
            <text:p>2.18</text:p>
          </table:table-cell>
          <table:table-cell office:value-type="float" office:value="3.1399999999999997" table:formula="of:=[.BX95]-(([.$BX$93]-[.$BX$103])/10)" table:style-name="ce103">
            <text:p>3.14</text:p>
          </table:table-cell>
          <table:table-cell office:value-type="float" office:value="1.1879999999999999" table:style-name="ce129">
            <text:p>1.19</text:p>
          </table:table-cell>
          <table:table-cell office:value-type="float" office:value="1.8225863426968374" table:formula="of:=([.BS96]*100/[.BS95])-100" table:style-name="ce23">
            <text:p>1.8</text:p>
          </table:table-cell>
          <table:table-cell office:value-type="float" office:value="181237" table:formula="of:=([.B96]-[.B95])" table:style-name="ce73">
            <text:p>181237</text:p>
          </table:table-cell>
          <table:table-cell office:value-type="float" office:value="0.45931054278332795" table:formula="of:=([.B96]*100/[.B95])-100" table:style-name="ce25">
            <text:p>0.46</text:p>
          </table:table-cell>
          <table:table-cell office:value-type="float" office:value="267899.45971915184" table:formula="of:=[.BT96]-([.CA96]/[.BX96])" table:style-name="ce76">
            <text:p>267899</text:p>
          </table:table-cell>
          <table:table-cell office:value-type="float" office:value="1118000" table:style-name="ce78">
            <text:p>1118000</text:p>
          </table:table-cell>
          <table:table-cell office:value-type="float" office:value="24037.79" table:style-name="ce8">
            <text:p>2403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90.9375" table:style-name="ce8">
            <text:p>591</text:p>
          </table:table-cell>
          <table:table-cell office:value-type="float" office:value="38.822499999999998" table:style-name="ce78">
            <text:p>39</text:p>
          </table:table-cell>
          <table:table-cell office:value-type="string" table:style-name="ce118">
            <text:p>null</text:p>
          </table:table-cell>
          <table:table-cell office:value-type="float" office:value="4.72" table:style-name="ce25">
            <text:p>4.72</text:p>
          </table:table-cell>
          <table:table-cell office:value-type="float" office:value="153.56" table:formula="of:=[.CZ95]+[.CY96]" table:style-name="ce23">
            <text:p>153.6</text:p>
          </table:table-cell>
          <table:table-cell office:value-type="float" office:value="270.64931250000001" table:formula="of:=(([.CV96]*[.CY96])/100)+[.DA95]" table:style-name="ce23">
            <text:p>270.6</text:p>
          </table:table-cell>
          <table:table-cell office:value-type="float" office:value="320.28818749999999" table:formula="of:=[.CV96]-[.DA96]" table:style-name="ce23">
            <text:p>320.3</text:p>
          </table:table-cell>
          <table:table-cell office:value-type="float" office:value="384.82514977858818" table:formula="of:=[.CV96]/[.CZ96]*[.$CZ$87]" table:style-name="ce23">
            <text:p>384.8</text:p>
          </table:table-cell>
          <table:table-cell office:value-type="float" office:value="-1.8360833333333364" table:formula="of:=([.Y96]-[.Y95])" table:style-name="ce25">
            <text:p>-1.84</text:p>
          </table:table-cell>
          <table:table-cell office:value-type="float" office:value="3.0517711171662114" table:formula="of:=([.CV96]*100/[.CV95])-100" table:style-name="ce25">
            <text:p>3.05</text:p>
          </table:table-cell>
          <table:table-cell office:value-type="float" office:value="-1.6682288828337883" table:formula="of:=[.DE96]-[.CY96]" table:style-name="ce25">
            <text:p>-1.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4.1175" table:style-name="ce23">
            <text:p>24.1</text:p>
          </table:table-cell>
          <table:table-cell office:value-type="float" office:value="80.959190081304598" table:formula="of:=(([.DC96]-MIN([.DC82:.DC96]))/(MAX([.DC82:.DC96])-MIN([.DC82:.DC96])))*100" table:style-name="ce128">
            <text:p>81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.9511353247826406" table:formula="of:=MIN(100;MAX(0;(([.BP96]-1.8)/(2.2-1.8))*100))" table:style-name="ce128">
            <text:p>9.0</text:p>
          </table:table-cell>
          <table:table-cell office:value-type="float" office:value="40.953882192260714" table:formula="of:=100-((([.CC96]-MIN([.CC67:.CC96]))/(MAX([.CC67:.CC96])-MIN([.CC67:.CC96])))*100)" table:style-name="ce128">
            <text:p>41.0</text:p>
          </table:table-cell>
          <table:table-cell office:value-type="float" office:value="50.8825" table:formula="of:=MIN(100; MAX(0; ((IF(AND([.DI96]-[.DI95]&gt;=-0.3;[.DI96]-[.DI95]&lt;=0.3);100;IF(AND([.DI96]-[.DI95]&gt;-1;[.DI96]-[.DI95]&lt;-0.3);50;IF([.DI96]-[.DI95]&lt;=-1;25;75)))))-[.DI96]+(IF(([.DI96]-[.DI95])*([.DI95]-[.DI94])&lt;0;AVERAGE([.DI92:.DI96]);0))))" table:style-name="ce128">
            <text:p>50.9</text:p>
          </table:table-cell>
          <table:table-cell office:value-type="string" table:style-name="ce118">
            <text:p>null</text:p>
          </table:table-cell>
          <table:table-cell office:value-type="float" office:value="45.436676899586985" table:formula="of:=AVERAGE([.DJ96:.DP96])" table:style-name="ce128">
            <text:p>45.4</text:p>
          </table:table-cell>
          <table:table-cell office:value-type="float" office:value="345.84000000000003" table:formula="of:=-0.06*(([.A96]-1963)^2)+8.5*([.A96]-1963)+140" table:style-name="ce23">
            <text:p>345.8</text:p>
          </table:table-cell>
          <table:table-cell table:number-columns-repeated="16261"/>
        </table:table-row>
        <table:table-row table:style-name="ro2">
          <table:table-cell office:value-type="float" office:value="1995" table:style-name="ce15">
            <text:p>1995</text:p>
          </table:table-cell>
          <table:table-cell office:value-type="float" office:value="39808374" table:style-name="ce10">
            <text:p>39808374</text:p>
          </table:table-cell>
          <table:table-cell office:value-type="float" office:value="14798908" table:style-name="ce7">
            <text:p>14798908</text:p>
          </table:table-cell>
          <table:table-cell office:value-type="float" office:value="18872892" table:style-name="ce7">
            <text:p>18872892</text:p>
          </table:table-cell>
          <table:table-cell office:value-type="float" office:value="32042210" table:style-name="ce118">
            <text:p>3204221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03587" table:style-name="ce18">
            <text:p>403587</text:p>
          </table:table-cell>
          <table:table-cell office:value-type="float" office:value="269058" table:formula="of:=[.K97]/1.5" table:style-name="ce24">
            <text:p>269058</text:p>
          </table:table-cell>
          <table:table-cell office:value-type="float" office:value="17899907000" table:style-name="ce84">
            <text:p>1.8E+10</text:p>
          </table:table-cell>
          <table:table-cell office:value-type="float" office:value="44352.040576133521" table:formula="of:=[.M97]/[.K97]" table:style-name="ce26">
            <text:p>443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0.13328801610848" table:formula="of:=([.N97]*100)/([.CV97]*(([.BL97]*([.BK97]/([.BF97]+[.BK97])))+([.BG97]*([.BF97]/([.BF97]+[.BK97])))))" table:style-name="ce67">
            <text:p>60.1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.9973333333333354" table:style-name="ce64">
            <text:p>10.00</text:p>
          </table:table-cell>
          <table:table-cell office:value-type="float" office:value="1.297625" table:style-name="ce71">
            <text:p>1.30</text:p>
          </table:table-cell>
          <table:table-cell office:value-type="float" office:value="3937403000000" table:style-name="ce85">
            <text:p>3.94E+12</text:p>
          </table:table-cell>
          <table:table-cell office:value-type="float" office:value="5.3965430152960607" table:formula="of:=([.AA97]*100/[.AA96])-100" table:style-name="ce70">
            <text:p>5.40</text:p>
          </table:table-cell>
          <table:table-cell office:value-type="string" table:style-name="ce118">
            <text:p>null</text:p>
          </table:table-cell>
          <table:table-cell office:value-type="float" office:value="290.52250000000004" table:style-name="ce76">
            <text:p>291</text:p>
          </table:table-cell>
          <table:table-cell office:value-type="float" office:value="459337000000" table:style-name="ce125">
            <text:p>4.59337E+11</text:p>
          </table:table-cell>
          <table:table-cell office:value-type="string" table:style-name="ce118">
            <text:p>null</text:p>
          </table:table-cell>
          <table:table-cell office:value-type="float" office:value="977889000001.54907" table:formula="of:=([.CV97]*[.BS97]*86)" table:style-name="ce125">
            <text:p>9.77889E+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42" table:style-name="ce129">
            <text:p>0.4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7673" table:style-name="ce5">
            <text:p>87673</text:p>
          </table:table-cell>
          <table:table-cell office:value-type="float" office:value="57527" table:style-name="ce17">
            <text:p>57527</text:p>
          </table:table-cell>
          <table:table-cell office:value-type="float" office:value="28991" table:style-name="ce17">
            <text:p>28991</text:p>
          </table:table-cell>
          <table:table-cell office:value-type="float" office:value="1155" table:style-name="ce17">
            <text:p>1155</text:p>
          </table:table-cell>
          <table:table-cell office:value-type="float" office:value="231398" table:style-name="ce80">
            <text:p>231398</text:p>
          </table:table-cell>
          <table:table-cell office:value-type="float" office:value="85346" table:style-name="ce80">
            <text:p>85346</text:p>
          </table:table-cell>
          <table:table-cell office:value-type="float" office:value="13517" table:style-name="ce80">
            <text:p>13517</text:p>
          </table:table-cell>
          <table:table-cell office:value-type="float" office:value="92749" table:style-name="ce17">
            <text:p>92749</text:p>
          </table:table-cell>
          <table:table-cell office:value-type="float" office:value="150.39587395661388" table:style-name="ce124">
            <text:p>150</text:p>
          </table:table-cell>
          <table:table-cell office:value-type="float" office:value="4421153500" table:style-name="ce17">
            <text:p>4421153500</text:p>
          </table:table-cell>
          <table:table-cell office:value-type="float" office:value="47667.937120615854" table:formula="of:=[.BH97]/[.BF97]" table:style-name="ce51">
            <text:p>47668</text:p>
          </table:table-cell>
          <table:table-cell office:value-type="float" office:value="316.94976641691028" table:formula="of:=[.BI97]/[.BG97]" table:style-name="ce51">
            <text:p>317</text:p>
          </table:table-cell>
          <table:table-cell office:value-type="float" office:value="214997" table:style-name="ce17">
            <text:p>214997</text:p>
          </table:table-cell>
          <table:table-cell office:value-type="float" office:value="107.222677845717" table:style-name="ce124">
            <text:p>107</text:p>
          </table:table-cell>
          <table:table-cell office:value-type="float" office:value="7875175899.999999" table:style-name="ce17">
            <text:p>7875175900</text:p>
          </table:table-cell>
          <table:table-cell office:value-type="float" office:value="36629.236221900763" table:formula="of:=[.BM97]/[.BK97]" table:style-name="ce55">
            <text:p>36629</text:p>
          </table:table-cell>
          <table:table-cell office:value-type="float" office:value="341.61836803410813" table:formula="of:=[.BN97]/[.BL97]" table:style-name="ce55">
            <text:p>342</text:p>
          </table:table-cell>
          <table:table-cell office:value-type="float" office:value="1.8629431577686666" table:formula="of:=[.CV97]/(([.BO97]+[.BJ97])/2)" table:style-name="ce58">
            <text:p>1.86</text:p>
          </table:table-cell>
          <table:table-cell office:value-type="float" office:value="2.2952826635706884" table:formula="of:=(([.BJ97]+[.BO97])*100/([.BJ96]+[.BO96]))-100" table:style-name="ce57">
            <text:p>2.3</text:p>
          </table:table-cell>
          <table:table-cell office:value-type="string" table:style-name="ce118">
            <text:p>null</text:p>
          </table:table-cell>
          <table:table-cell office:value-type="float" office:value="18536203.485439684" table:style-name="ce24">
            <text:p>18536203</text:p>
          </table:table-cell>
          <table:table-cell office:value-type="float" office:value="344861.02301866934" table:formula="of:=[.BS97]-[.BS96]" table:style-name="ce24">
            <text:p>344861</text:p>
          </table:table-cell>
          <table:table-cell office:value-type="float" office:value="155902" table:style-name="ce76">
            <text:p>155902</text:p>
          </table:table-cell>
          <table:table-cell office:value-type="float" office:value="71141" table:style-name="ce76">
            <text:p>71141</text:p>
          </table:table-cell>
          <table:table-cell office:value-type="float" office:value="2.1476012621068685" table:formula="of:=([.B97]/[.BS97])" table:style-name="ce34">
            <text:p>2.15</text:p>
          </table:table-cell>
          <table:table-cell office:value-type="float" office:value="3.0999999999999996" table:formula="of:=[.BX96]-(([.$BX$93]-[.$BX$103])/10)" table:style-name="ce103">
            <text:p>3.10</text:p>
          </table:table-cell>
          <table:table-cell office:value-type="float" office:value="1.1539999999999999" table:style-name="ce129">
            <text:p>1.15</text:p>
          </table:table-cell>
          <table:table-cell office:value-type="float" office:value="1.8957425694726453" table:formula="of:=([.BS97]*100/[.BS96])-100" table:style-name="ce23">
            <text:p>1.9</text:p>
          </table:table-cell>
          <table:table-cell office:value-type="float" office:value="168648" table:formula="of:=([.B97]-[.B96])" table:style-name="ce73">
            <text:p>168648</text:p>
          </table:table-cell>
          <table:table-cell office:value-type="float" office:value="0.42545198218574853" table:formula="of:=([.B97]*100/[.B96])-100" table:style-name="ce25">
            <text:p>0.43</text:p>
          </table:table-cell>
          <table:table-cell office:value-type="float" office:value="290458.44237350806" table:formula="of:=[.BT97]-([.CA97]/[.BX97])" table:style-name="ce76">
            <text:p>290458</text:p>
          </table:table-cell>
          <table:table-cell office:value-type="float" office:value="1193000" table:style-name="ce78">
            <text:p>1193000</text:p>
          </table:table-cell>
          <table:table-cell office:value-type="float" office:value="25458.329999999998" table:style-name="ce8">
            <text:p>2545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13.4375" table:style-name="ce8">
            <text:p>613</text:p>
          </table:table-cell>
          <table:table-cell office:value-type="float" office:value="39.114999999999995" table:style-name="ce78">
            <text:p>39</text:p>
          </table:table-cell>
          <table:table-cell office:value-type="string" table:style-name="ce118">
            <text:p>null</text:p>
          </table:table-cell>
          <table:table-cell office:value-type="float" office:value="4.67" table:style-name="ce25">
            <text:p>4.67</text:p>
          </table:table-cell>
          <table:table-cell office:value-type="float" office:value="158.22999999999999" table:formula="of:=[.CZ96]+[.CY97]" table:style-name="ce23">
            <text:p>158.2</text:p>
          </table:table-cell>
          <table:table-cell office:value-type="float" office:value="299.29684374999999" table:formula="of:=(([.CV97]*[.CY97])/100)+[.DA96]" table:style-name="ce23">
            <text:p>299.3</text:p>
          </table:table-cell>
          <table:table-cell office:value-type="float" office:value="314.14065625000001" table:formula="of:=[.CV97]-[.DA97]" table:style-name="ce23">
            <text:p>314.1</text:p>
          </table:table-cell>
          <table:table-cell office:value-type="float" office:value="387.68722745370667" table:formula="of:=[.CV97]/[.CZ97]*[.$CZ$87]" table:style-name="ce23">
            <text:p>387.7</text:p>
          </table:table-cell>
          <table:table-cell office:value-type="float" office:value="0.92008333333333603" table:formula="of:=([.Y97]-[.Y96])" table:style-name="ce25">
            <text:p>0.92</text:p>
          </table:table-cell>
          <table:table-cell office:value-type="float" office:value="3.8075092543627704" table:formula="of:=([.CV97]*100/[.CV96])-100" table:style-name="ce25">
            <text:p>3.81</text:p>
          </table:table-cell>
          <table:table-cell office:value-type="float" office:value="-0.86249074563722949" table:formula="of:=[.DE97]-[.CY97]" table:style-name="ce25">
            <text:p>-0.8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2.9" table:style-name="ce23">
            <text:p>22.9</text:p>
          </table:table-cell>
          <table:table-cell office:value-type="float" office:value="82.104631431138131" table:formula="of:=(([.DC97]-MIN([.DC83:.DC97]))/(MAX([.DC83:.DC97])-MIN([.DC83:.DC97])))*100" table:style-name="ce128">
            <text:p>82.1</text:p>
          </table:table-cell>
          <table:table-cell office:value-type="float" office:value="41.811301212224571" table:formula="of:=MIN(100; MAX(0; (([.K97]-([.C97]/26/2))/(([.C97]/26)-([.C97]/26/2)))*100))" table:style-name="ce128">
            <text:p>41.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.735789442166631" table:formula="of:=MIN(100;MAX(0;(([.BP97]-1.8)/(2.2-1.8))*100))" table:style-name="ce128">
            <text:p>15.7</text:p>
          </table:table-cell>
          <table:table-cell office:value-type="float" office:value="29.30555494525494" table:formula="of:=100-((([.CC97]-MIN([.CC68:.CC97]))/(MAX([.CC68:.CC97])-MIN([.CC68:.CC97])))*100)" table:style-name="ce128">
            <text:p>29.3</text:p>
          </table:table-cell>
          <table:table-cell office:value-type="float" office:value="22.964500000000001" table:formula="of:=MIN(100; MAX(0; ((IF(AND([.DI97]-[.DI96]&gt;=-0.3;[.DI97]-[.DI96]&lt;=0.3);100;IF(AND([.DI97]-[.DI96]&gt;-1;[.DI97]-[.DI96]&lt;-0.3);50;IF([.DI97]-[.DI96]&lt;=-1;25;75)))))-[.DI97]+(IF(([.DI97]-[.DI96])*([.DI96]-[.DI95])&lt;0;AVERAGE([.DI93:.DI97]);0))))" table:style-name="ce128">
            <text:p>23.0</text:p>
          </table:table-cell>
          <table:table-cell office:value-type="string" table:style-name="ce118">
            <text:p>null</text:p>
          </table:table-cell>
          <table:table-cell office:value-type="float" office:value="38.38435540615685" table:formula="of:=AVERAGE([.DJ97:.DP97])" table:style-name="ce128">
            <text:p>38.4</text:p>
          </table:table-cell>
          <table:table-cell office:value-type="float" office:value="350.56" table:formula="of:=-0.06*(([.A97]-1963)^2)+8.5*([.A97]-1963)+140" table:style-name="ce23">
            <text:p>350.6</text:p>
          </table:table-cell>
          <table:table-cell table:number-columns-repeated="16261"/>
        </table:table-row>
        <table:table-row table:style-name="ro2">
          <table:table-cell office:value-type="float" office:value="1996" table:style-name="ce15">
            <text:p>1996</text:p>
          </table:table-cell>
          <table:table-cell office:value-type="float" office:value="39971329" table:style-name="ce10">
            <text:p>39971329</text:p>
          </table:table-cell>
          <table:table-cell office:value-type="float" office:value="15027010" table:style-name="ce7">
            <text:p>15027010</text:p>
          </table:table-cell>
          <table:table-cell office:value-type="float" office:value="19143360" table:style-name="ce7">
            <text:p>19143360</text:p>
          </table:table-cell>
          <table:table-cell office:value-type="float" office:value="32483134" table:style-name="ce118">
            <text:p>3248313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12982" table:style-name="ce18">
            <text:p>412982</text:p>
          </table:table-cell>
          <table:table-cell office:value-type="float" office:value="275321.33333333331" table:formula="of:=[.K98]/1.5" table:style-name="ce24">
            <text:p>275321</text:p>
          </table:table-cell>
          <table:table-cell office:value-type="float" office:value="19566189000" table:style-name="ce84">
            <text:p>2.0E+10</text:p>
          </table:table-cell>
          <table:table-cell office:value-type="float" office:value="47377.825183664179" table:formula="of:=[.M98]/[.K98]" table:style-name="ce26">
            <text:p>4737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3.927391308910813" table:formula="of:=([.N98]*100)/([.CV98]*(([.BL98]*([.BK98]/([.BF98]+[.BK98])))+([.BG98]*([.BF98]/([.BF98]+[.BK98])))))" table:style-name="ce67">
            <text:p>63.93</text:p>
          </table:table-cell>
          <table:table-cell office:value-type="float" office:value="5.748886353431887" table:formula="of:=(([.M98]*100/[.M97])-100)-[.CY98]" table:style-name="ce28">
            <text:p>5.7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.3560000000000008" table:style-name="ce64">
            <text:p>7.36</text:p>
          </table:table-cell>
          <table:table-cell office:value-type="float" office:value="1.2521833333333336" table:style-name="ce71">
            <text:p>1.25</text:p>
          </table:table-cell>
          <table:table-cell office:value-type="float" office:value="4090345000000" table:style-name="ce85">
            <text:p>4.09E+12</text:p>
          </table:table-cell>
          <table:table-cell office:value-type="float" office:value="3.8843369601739965" table:formula="of:=([.AA98]*100/[.AA97])-100" table:style-name="ce70">
            <text:p>3.88</text:p>
          </table:table-cell>
          <table:table-cell office:value-type="string" table:style-name="ce118">
            <text:p>null</text:p>
          </table:table-cell>
          <table:table-cell office:value-type="float" office:value="300.08749999999992" table:style-name="ce76">
            <text:p>300</text:p>
          </table:table-cell>
          <table:table-cell office:value-type="float" office:value="488946000000" table:style-name="ce125">
            <text:p>4.88946E+11</text:p>
          </table:table-cell>
          <table:table-cell office:value-type="string" table:style-name="ce118">
            <text:p>null</text:p>
          </table:table-cell>
          <table:table-cell office:value-type="float" office:value="1018170155266.8947" table:formula="of:=([.CV98]*[.BS98]*86)" table:style-name="ce125">
            <text:p>1.01817E+1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46" table:style-name="ce129">
            <text:p>0.4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9323" table:style-name="ce5">
            <text:p>89323</text:p>
          </table:table-cell>
          <table:table-cell office:value-type="float" office:value="56928" table:style-name="ce17">
            <text:p>56928</text:p>
          </table:table-cell>
          <table:table-cell office:value-type="float" office:value="31111" table:style-name="ce17">
            <text:p>31111</text:p>
          </table:table-cell>
          <table:table-cell office:value-type="float" office:value="1284" table:style-name="ce17">
            <text:p>1284</text:p>
          </table:table-cell>
          <table:table-cell office:value-type="float" office:value="218775" table:style-name="ce80">
            <text:p>218775</text:p>
          </table:table-cell>
          <table:table-cell office:value-type="float" office:value="80828" table:style-name="ce80">
            <text:p>80828</text:p>
          </table:table-cell>
          <table:table-cell office:value-type="float" office:value="6959" table:style-name="ce80">
            <text:p>6959</text:p>
          </table:table-cell>
          <table:table-cell office:value-type="float" office:value="88707" table:style-name="ce17">
            <text:p>88707</text:p>
          </table:table-cell>
          <table:table-cell office:value-type="float" office:value="146.29492017656852" table:style-name="ce124">
            <text:p>146</text:p>
          </table:table-cell>
          <table:table-cell office:value-type="float" office:value="4368693100" table:style-name="ce17">
            <text:p>4368693100</text:p>
          </table:table-cell>
          <table:table-cell office:value-type="float" office:value="49248.572265999304" table:formula="of:=[.BH98]/[.BF98]" table:style-name="ce51">
            <text:p>49249</text:p>
          </table:table-cell>
          <table:table-cell office:value-type="float" office:value="336.63897698265572" table:formula="of:=[.BI98]/[.BG98]" table:style-name="ce51">
            <text:p>337</text:p>
          </table:table-cell>
          <table:table-cell office:value-type="float" office:value="192120" table:style-name="ce17">
            <text:p>192120</text:p>
          </table:table-cell>
          <table:table-cell office:value-type="float" office:value="106.04233083913887" table:style-name="ce124">
            <text:p>106</text:p>
          </table:table-cell>
          <table:table-cell office:value-type="float" office:value="7125463000" table:style-name="ce17">
            <text:p>7125463000</text:p>
          </table:table-cell>
          <table:table-cell office:value-type="float" office:value="37088.606079533623" table:formula="of:=[.BM98]/[.BK98]" table:style-name="ce55">
            <text:p>37089</text:p>
          </table:table-cell>
          <table:table-cell office:value-type="float" office:value="349.75283724944956" table:formula="of:=[.BN98]/[.BL98]" table:style-name="ce55">
            <text:p>350</text:p>
          </table:table-cell>
          <table:table-cell office:value-type="float" office:value="1.8183856131739111" table:formula="of:=[.CV98]/(([.BO98]+[.BJ98])/2)" table:style-name="ce58">
            <text:p>1.82</text:p>
          </table:table-cell>
          <table:table-cell office:value-type="float" office:value="4.2248748953334427" table:formula="of:=(([.BJ98]+[.BO98])*100/([.BJ97]+[.BO97]))-100" table:style-name="ce57">
            <text:p>4.2</text:p>
          </table:table-cell>
          <table:table-cell office:value-type="string" table:style-name="ce118">
            <text:p>null</text:p>
          </table:table-cell>
          <table:table-cell office:value-type="float" office:value="18971157.299053598" table:style-name="ce24">
            <text:p>18971157</text:p>
          </table:table-cell>
          <table:table-cell office:value-type="float" office:value="434953.81361391395" table:formula="of:=[.BS98]-[.BS97]" table:style-name="ce24">
            <text:p>434954</text:p>
          </table:table-cell>
          <table:table-cell office:value-type="float" office:value="194871" table:style-name="ce76">
            <text:p>194871</text:p>
          </table:table-cell>
          <table:table-cell office:value-type="float" office:value="77544" table:style-name="ce76">
            <text:p>77544</text:p>
          </table:table-cell>
          <table:table-cell office:value-type="float" office:value="2.1069525896553514" table:formula="of:=([.B98]/[.BS98])" table:style-name="ce34">
            <text:p>2.11</text:p>
          </table:table-cell>
          <table:table-cell office:value-type="float" office:value="3.0599999999999996" table:formula="of:=[.BX97]-(([.$BX$93]-[.$BX$103])/10)" table:style-name="ce103">
            <text:p>3.06</text:p>
          </table:table-cell>
          <table:table-cell office:value-type="float" office:value="1.137" table:style-name="ce129">
            <text:p>1.14</text:p>
          </table:table-cell>
          <table:table-cell office:value-type="float" office:value="2.3465097044039851" table:formula="of:=([.BS98]*100/[.BS97])-100" table:style-name="ce23">
            <text:p>2.3</text:p>
          </table:table-cell>
          <table:table-cell office:value-type="float" office:value="162955" table:formula="of:=([.B98]-[.B97])" table:style-name="ce73">
            <text:p>162955</text:p>
          </table:table-cell>
          <table:table-cell office:value-type="float" office:value="0.40934854561002965" table:formula="of:=([.B98]*100/[.B97])-100" table:style-name="ce25">
            <text:p>0.41</text:p>
          </table:table-cell>
          <table:table-cell office:value-type="float" office:value="381700.54564005777" table:formula="of:=[.BT98]-([.CA98]/[.BX98])" table:style-name="ce76">
            <text:p>381701</text:p>
          </table:table-cell>
          <table:table-cell office:value-type="float" office:value="1228000" table:style-name="ce78">
            <text:p>1228000</text:p>
          </table:table-cell>
          <table:table-cell office:value-type="float" office:value="24726.959999999999" table:style-name="ce8">
            <text:p>247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24.0625" table:style-name="ce8">
            <text:p>624</text:p>
          </table:table-cell>
          <table:table-cell office:value-type="float" office:value="40.534999999999997" table:style-name="ce78">
            <text:p>41</text:p>
          </table:table-cell>
          <table:table-cell office:value-type="string" table:style-name="ce118">
            <text:p>null</text:p>
          </table:table-cell>
          <table:table-cell office:value-type="float" office:value="3.56" table:style-name="ce25">
            <text:p>3.56</text:p>
          </table:table-cell>
          <table:table-cell office:value-type="float" office:value="161.79" table:formula="of:=[.CZ97]+[.CY98]" table:style-name="ce23">
            <text:p>161.8</text:p>
          </table:table-cell>
          <table:table-cell office:value-type="float" office:value="321.51346875000002" table:formula="of:=(([.CV98]*[.CY98])/100)+[.DA97]" table:style-name="ce23">
            <text:p>321.5</text:p>
          </table:table-cell>
          <table:table-cell office:value-type="float" office:value="302.54903124999998" table:formula="of:=[.CV98]-[.DA98]" table:style-name="ce23">
            <text:p>302.5</text:p>
          </table:table-cell>
          <table:table-cell office:value-type="float" office:value="385.72377773657212" table:formula="of:=[.CV98]/[.CZ98]*[.$CZ$87]" table:style-name="ce23">
            <text:p>385.7</text:p>
          </table:table-cell>
          <table:table-cell office:value-type="float" office:value="-2.6413333333333346" table:formula="of:=([.Y98]-[.Y97])" table:style-name="ce25">
            <text:p>-2.64</text:p>
          </table:table-cell>
          <table:table-cell office:value-type="float" office:value="1.7320427916454406" table:formula="of:=([.CV98]*100/[.CV97])-100" table:style-name="ce25">
            <text:p>1.73</text:p>
          </table:table-cell>
          <table:table-cell office:value-type="float" office:value="-1.8279572083545594" table:formula="of:=[.DE98]-[.CY98]" table:style-name="ce25">
            <text:p>-1.83</text:p>
          </table:table-cell>
          <table:table-cell office:value-type="string" table:style-name="ce118">
            <text:p>null</text:p>
          </table:table-cell>
          <table:table-cell office:value-type="float" office:value="2.33" table:style-name="ce25">
            <text:p>2.33</text:p>
          </table:table-cell>
          <table:table-cell office:value-type="float" office:value="22.08" table:style-name="ce23">
            <text:p>22.1</text:p>
          </table:table-cell>
          <table:table-cell office:value-type="float" office:value="81.318832878612213" table:formula="of:=(([.DC98]-MIN([.DC84:.DC98]))/(MAX([.DC84:.DC98])-MIN([.DC84:.DC98])))*100" table:style-name="ce128">
            <text:p>81.3</text:p>
          </table:table-cell>
          <table:table-cell office:value-type="float" office:value="42.909760491275364" table:formula="of:=MIN(100; MAX(0; (([.K98]-([.C98]/26/2))/(([.C98]/26)-([.C98]/26/2)))*100))" table:style-name="ce128">
            <text:p>42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596403293477767" table:formula="of:=MIN(100;MAX(0;(([.BP98]-1.8)/(2.2-1.8))*100))" table:style-name="ce128">
            <text:p>4.6</text:p>
          </table:table-cell>
          <table:table-cell office:value-type="float" office:value="0" table:formula="of:=100-((([.CC98]-MIN([.CC69:.CC98]))/(MAX([.CC69:.CC98])-MIN([.CC69:.CC98])))*100)" table:style-name="ce128">
            <text:p>0.0</text:p>
          </table:table-cell>
          <table:table-cell office:value-type="float" office:value="27.92" table:formula="of:=MIN(100; MAX(0; ((IF(AND([.DI98]-[.DI97]&gt;=-0.3;[.DI98]-[.DI97]&lt;=0.3);100;IF(AND([.DI98]-[.DI97]&gt;-1;[.DI98]-[.DI97]&lt;-0.3);50;IF([.DI98]-[.DI97]&lt;=-1;25;75)))))-[.DI98]+(IF(([.DI98]-[.DI97])*([.DI97]-[.DI96])&lt;0;AVERAGE([.DI94:.DI98]);0))))" table:style-name="ce128">
            <text:p>27.9</text:p>
          </table:table-cell>
          <table:table-cell office:value-type="string" table:style-name="ce118">
            <text:p>null</text:p>
          </table:table-cell>
          <table:table-cell office:value-type="float" office:value="31.348999332673067" table:formula="of:=AVERAGE([.DJ98:.DP98])" table:style-name="ce128">
            <text:p>31.3</text:p>
          </table:table-cell>
          <table:table-cell office:value-type="float" office:value="355.15999999999997" table:formula="of:=-0.06*(([.A98]-1963)^2)+8.5*([.A98]-1963)+140" table:style-name="ce23">
            <text:p>355.2</text:p>
          </table:table-cell>
          <table:table-cell table:number-columns-repeated="16261"/>
        </table:table-row>
        <table:table-row table:style-name="ro2">
          <table:table-cell office:value-type="float" office:value="1997" table:style-name="ce15">
            <text:p>1997</text:p>
          </table:table-cell>
          <table:table-cell office:value-type="float" office:value="40143449" table:style-name="ce10">
            <text:p>40143449</text:p>
          </table:table-cell>
          <table:table-cell office:value-type="float" office:value="15300398" table:style-name="ce7">
            <text:p>15300398</text:p>
          </table:table-cell>
          <table:table-cell office:value-type="float" office:value="19418779" table:style-name="ce7">
            <text:p>19418779</text:p>
          </table:table-cell>
          <table:table-cell office:value-type="float" office:value="32899873" table:style-name="ce118">
            <text:p>3289987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79237" table:style-name="ce18">
            <text:p>479237</text:p>
          </table:table-cell>
          <table:table-cell office:value-type="float" office:value="319491.33333333331" table:formula="of:=[.K99]/1.5" table:style-name="ce24">
            <text:p>319491</text:p>
          </table:table-cell>
          <table:table-cell office:value-type="float" office:value="24338352000" table:style-name="ce84">
            <text:p>2.4E+10</text:p>
          </table:table-cell>
          <table:table-cell office:value-type="float" office:value="50785.627987822307" table:formula="of:=[.M99]/[.K99]" table:style-name="ce26">
            <text:p>5078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7.245255727944198" table:formula="of:=([.N99]*100)/([.CV99]*(([.BL99]*([.BK99]/([.BF99]+[.BK99])))+([.BG99]*([.BF99]/([.BF99]+[.BK99])))))" table:style-name="ce67">
            <text:p>67.25</text:p>
          </table:table-cell>
          <table:table-cell office:value-type="float" office:value="22.419844133673649" table:formula="of:=(([.M99]*100/[.M98])-100)-[.CY99]" table:style-name="ce28">
            <text:p>22.4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.197916666666667" table:style-name="ce64">
            <text:p>5.20</text:p>
          </table:table-cell>
          <table:table-cell office:value-type="float" office:value="1.1270083333333334" table:style-name="ce71">
            <text:p>1.13</text:p>
          </table:table-cell>
          <table:table-cell office:value-type="float" office:value="4267311000000.0005" table:style-name="ce85">
            <text:p>4.27E+12</text:p>
          </table:table-cell>
          <table:table-cell office:value-type="float" office:value="4.3264321224737898" table:formula="of:=([.AA99]*100/[.AA98])-100" table:style-name="ce70">
            <text:p>4.33</text:p>
          </table:table-cell>
          <table:table-cell office:value-type="string" table:style-name="ce118">
            <text:p>null</text:p>
          </table:table-cell>
          <table:table-cell office:value-type="float" office:value="291.96583333333331" table:style-name="ce76">
            <text:p>292</text:p>
          </table:table-cell>
          <table:table-cell office:value-type="float" office:value="518971000000" table:style-name="ce125">
            <text:p>5.18971E+11</text:p>
          </table:table-cell>
          <table:table-cell office:value-type="string" table:style-name="ce118">
            <text:p>null</text:p>
          </table:table-cell>
          <table:table-cell office:value-type="float" office:value="1068306776614.7882" table:formula="of:=([.CV99]*[.BS99]*86)" table:style-name="ce125">
            <text:p>1.06831E+1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52" table:style-name="ce129">
            <text:p>0.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4790" table:style-name="ce5">
            <text:p>104790</text:p>
          </table:table-cell>
          <table:table-cell office:value-type="float" office:value="66740" table:style-name="ce17">
            <text:p>66740</text:p>
          </table:table-cell>
          <table:table-cell office:value-type="float" office:value="36487" table:style-name="ce17">
            <text:p>36487</text:p>
          </table:table-cell>
          <table:table-cell office:value-type="float" office:value="1563" table:style-name="ce17">
            <text:p>1563</text:p>
          </table:table-cell>
          <table:table-cell office:value-type="float" office:value="270731" table:style-name="ce80">
            <text:p>270731</text:p>
          </table:table-cell>
          <table:table-cell office:value-type="float" office:value="87826" table:style-name="ce80">
            <text:p>87826</text:p>
          </table:table-cell>
          <table:table-cell office:value-type="float" office:value="9702" table:style-name="ce80">
            <text:p>9702</text:p>
          </table:table-cell>
          <table:table-cell office:value-type="float" office:value="104094" table:style-name="ce17">
            <text:p>104094</text:p>
          </table:table-cell>
          <table:table-cell office:value-type="float" office:value="148.00938669993204" table:style-name="ce124">
            <text:p>148</text:p>
          </table:table-cell>
          <table:table-cell office:value-type="float" office:value="5435822699.999999" table:style-name="ce17">
            <text:p>5435822700</text:p>
          </table:table-cell>
          <table:table-cell office:value-type="float" office:value="52220.326819989612" table:formula="of:=[.BH99]/[.BF99]" table:style-name="ce51">
            <text:p>52220</text:p>
          </table:table-cell>
          <table:table-cell office:value-type="float" office:value="352.81766909729106" table:formula="of:=[.BI99]/[.BG99]" table:style-name="ce51">
            <text:p>353</text:p>
          </table:table-cell>
          <table:table-cell office:value-type="float" office:value="231524" table:style-name="ce17">
            <text:p>231524</text:p>
          </table:table-cell>
          <table:table-cell office:value-type="float" office:value="103.8488448819956" table:style-name="ce124">
            <text:p>104</text:p>
          </table:table-cell>
          <table:table-cell office:value-type="float" office:value="8764069200" table:style-name="ce17">
            <text:p>8764069200</text:p>
          </table:table-cell>
          <table:table-cell office:value-type="float" office:value="37853.82595324891" table:formula="of:=[.BM99]/[.BK99]" table:style-name="ce55">
            <text:p>37854</text:p>
          </table:table-cell>
          <table:table-cell office:value-type="float" office:value="364.50887822837666" table:formula="of:=[.BN99]/[.BL99]" table:style-name="ce55">
            <text:p>365</text:p>
          </table:table-cell>
          <table:table-cell office:value-type="float" office:value="1.7913738238055303" table:formula="of:=[.CV99]/(([.BO99]+[.BJ99])/2)" table:style-name="ce58">
            <text:p>1.79</text:p>
          </table:table-cell>
          <table:table-cell office:value-type="float" office:value="4.5068621816491685" table:formula="of:=(([.BJ99]+[.BO99])*100/([.BJ98]+[.BO98]))-100" table:style-name="ce57">
            <text:p>4.5</text:p>
          </table:table-cell>
          <table:table-cell office:value-type="string" table:style-name="ce118">
            <text:p>null</text:p>
          </table:table-cell>
          <table:table-cell office:value-type="float" office:value="19334119.565917801" table:style-name="ce24">
            <text:p>19334120</text:p>
          </table:table-cell>
          <table:table-cell office:value-type="float" office:value="362962.26686420292" table:formula="of:=[.BS99]-[.BS98]" table:style-name="ce24">
            <text:p>362962</text:p>
          </table:table-cell>
          <table:table-cell office:value-type="float" office:value="224332" table:style-name="ce76">
            <text:p>224332</text:p>
          </table:table-cell>
          <table:table-cell office:value-type="float" office:value="85028" table:style-name="ce76">
            <text:p>85028</text:p>
          </table:table-cell>
          <table:table-cell office:value-type="float" office:value="2.0763008557557954" table:formula="of:=([.B99]/[.BS99])" table:style-name="ce34">
            <text:p>2.08</text:p>
          </table:table-cell>
          <table:table-cell office:value-type="float" office:value="3.0199999999999996" table:formula="of:=[.BX98]-(([.$BX$93]-[.$BX$103])/10)" table:style-name="ce103">
            <text:p>3.02</text:p>
          </table:table-cell>
          <table:table-cell office:value-type="float" office:value="1.1459999999999999" table:style-name="ce129">
            <text:p>1.15</text:p>
          </table:table-cell>
          <table:table-cell office:value-type="float" office:value="1.9132320772139195" table:formula="of:=([.BS99]*100/[.BS98])-100" table:style-name="ce23">
            <text:p>1.9</text:p>
          </table:table-cell>
          <table:table-cell office:value-type="float" office:value="172120" table:formula="of:=([.B99]-[.B98])" table:style-name="ce73">
            <text:p>172120</text:p>
          </table:table-cell>
          <table:table-cell office:value-type="float" office:value="0.43060864951475253" table:formula="of:=([.B99]*100/[.B98])-100" table:style-name="ce25">
            <text:p>0.43</text:p>
          </table:table-cell>
          <table:table-cell office:value-type="float" office:value="305968.88938075921" table:formula="of:=[.BT99]-([.CA99]/[.BX99])" table:style-name="ce76">
            <text:p>305969</text:p>
          </table:table-cell>
          <table:table-cell office:value-type="float" office:value="1306000" table:style-name="ce78">
            <text:p>1306000</text:p>
          </table:table-cell>
          <table:table-cell office:value-type="float" office:value="26794.600000000002" table:style-name="ce8">
            <text:p>2679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42.5" table:style-name="ce8">
            <text:p>643</text:p>
          </table:table-cell>
          <table:table-cell office:value-type="float" office:value="43.287499999999994" table:style-name="ce78">
            <text:p>43</text:p>
          </table:table-cell>
          <table:table-cell office:value-type="string" table:style-name="ce118">
            <text:p>null</text:p>
          </table:table-cell>
          <table:table-cell office:value-type="float" office:value="1.97" table:style-name="ce25">
            <text:p>1.97</text:p>
          </table:table-cell>
          <table:table-cell office:value-type="float" office:value="163.76" table:formula="of:=[.CZ98]+[.CY99]" table:style-name="ce23">
            <text:p>163.8</text:p>
          </table:table-cell>
          <table:table-cell office:value-type="float" office:value="334.17071874999999" table:formula="of:=(([.CV99]*[.CY99])/100)+[.DA98]" table:style-name="ce23">
            <text:p>334.2</text:p>
          </table:table-cell>
          <table:table-cell office:value-type="float" office:value="308.32928125000001" table:formula="of:=[.CV99]-[.DA99]" table:style-name="ce23">
            <text:p>308.3</text:p>
          </table:table-cell>
          <table:table-cell office:value-type="float" office:value="392.34245236932099" table:formula="of:=[.CV99]/[.CZ99]*[.$CZ$87]" table:style-name="ce23">
            <text:p>392.3</text:p>
          </table:table-cell>
          <table:table-cell office:value-type="float" office:value="-2.1580833333333338" table:formula="of:=([.Y99]-[.Y98])" table:style-name="ce25">
            <text:p>-2.16</text:p>
          </table:table-cell>
          <table:table-cell office:value-type="float" office:value="2.9544316474712105" table:formula="of:=([.CV99]*100/[.CV98])-100" table:style-name="ce25">
            <text:p>2.95</text:p>
          </table:table-cell>
          <table:table-cell office:value-type="float" office:value="0.98443164747121048" table:formula="of:=[.DE99]-[.CY99]" table:style-name="ce25">
            <text:p>0.98</text:p>
          </table:table-cell>
          <table:table-cell office:value-type="string" table:style-name="ce118">
            <text:p>null</text:p>
          </table:table-cell>
          <table:table-cell office:value-type="float" office:value="16.04" table:style-name="ce25">
            <text:p>16.04</text:p>
          </table:table-cell>
          <table:table-cell office:value-type="float" office:value="20.61" table:style-name="ce23">
            <text:p>20.6</text:p>
          </table:table-cell>
          <table:table-cell office:value-type="float" office:value="83.967714029306677" table:formula="of:=(([.DC99]-MIN([.DC85:.DC99]))/(MAX([.DC85:.DC99])-MIN([.DC85:.DC99])))*100" table:style-name="ce128">
            <text:p>84.0</text:p>
          </table:table-cell>
          <table:table-cell office:value-type="float" office:value="62.873697795312253" table:formula="of:=MIN(100; MAX(0; (([.K99]-([.C99]/26/2))/(([.C99]/26)-([.C99]/26/2)))*100))" table:style-name="ce128">
            <text:p>62.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" table:formula="of:=MIN(100;MAX(0;(([.BP99]-1.8)/(2.2-1.8))*100))" table:style-name="ce128">
            <text:p>0.0</text:p>
          </table:table-cell>
          <table:table-cell office:value-type="float" office:value="33.193216448625023" table:formula="of:=100-((([.CC99]-MIN([.CC70:.CC99]))/(MAX([.CC70:.CC99])-MIN([.CC70:.CC99])))*100)" table:style-name="ce128">
            <text:p>33.2</text:p>
          </table:table-cell>
          <table:table-cell office:value-type="float" office:value="4.3900000000000006" table:formula="of:=MIN(100; MAX(0; ((IF(AND([.DI99]-[.DI98]&gt;=-0.3;[.DI99]-[.DI98]&lt;=0.3);100;IF(AND([.DI99]-[.DI98]&gt;-1;[.DI99]-[.DI98]&lt;-0.3);50;IF([.DI99]-[.DI98]&lt;=-1;25;75)))))-[.DI99]+(IF(([.DI99]-[.DI98])*([.DI98]-[.DI97])&lt;0;AVERAGE([.DI95:.DI99]);0))))" table:style-name="ce128">
            <text:p>4.4</text:p>
          </table:table-cell>
          <table:table-cell office:value-type="string" table:style-name="ce118">
            <text:p>null</text:p>
          </table:table-cell>
          <table:table-cell office:value-type="float" office:value="36.884925654648796" table:formula="of:=AVERAGE([.DJ99:.DP99])" table:style-name="ce128">
            <text:p>36.9</text:p>
          </table:table-cell>
          <table:table-cell office:value-type="float" office:value="359.64" table:formula="of:=-0.06*(([.A99]-1963)^2)+8.5*([.A99]-1963)+140" table:style-name="ce23">
            <text:p>359.6</text:p>
          </table:table-cell>
          <table:table-cell table:number-columns-repeated="16261"/>
        </table:table-row>
        <table:table-row table:style-name="ro2">
          <table:table-cell office:value-type="float" office:value="1998" table:style-name="ce15">
            <text:p>1998</text:p>
          </table:table-cell>
          <table:table-cell office:value-type="float" office:value="40303568" table:style-name="ce10">
            <text:p>40303568</text:p>
          </table:table-cell>
          <table:table-cell office:value-type="float" office:value="15557958" table:style-name="ce7">
            <text:p>15557958</text:p>
          </table:table-cell>
          <table:table-cell office:value-type="float" office:value="19747447" table:style-name="ce7">
            <text:p>19747447</text:p>
          </table:table-cell>
          <table:table-cell office:value-type="float" office:value="33280350" table:style-name="ce118">
            <text:p>3328035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29565" table:style-name="ce18">
            <text:p>529565</text:p>
          </table:table-cell>
          <table:table-cell office:value-type="float" office:value="353043.33333333331" table:formula="of:=[.K100]/1.5" table:style-name="ce24">
            <text:p>353043</text:p>
          </table:table-cell>
          <table:table-cell office:value-type="float" office:value="29595669000" table:style-name="ce84">
            <text:p>3.0E+10</text:p>
          </table:table-cell>
          <table:table-cell office:value-type="float" office:value="55886.75422280551" table:formula="of:=[.M100]/[.K100]" table:style-name="ce26">
            <text:p>5588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0.203244120505957" table:formula="of:=([.N100]*100)/([.CV100]*(([.BL100]*([.BK100]/([.BF100]+[.BK100])))+([.BG100]*([.BF100]/([.BF100]+[.BK100])))))" table:style-name="ce67">
            <text:p>70.20</text:p>
          </table:table-cell>
          <table:table-cell office:value-type="float" office:value="19.770957205319405" table:formula="of:=(([.M100]*100/[.M99])-100)-[.CY100]" table:style-name="ce28">
            <text:p>19.7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4.0049166666666665" table:style-name="ce65">
            <text:p>4.00</text:p>
          </table:table-cell>
          <table:table-cell office:value-type="float" office:value="1.1237166666666667" table:style-name="ce71">
            <text:p>1.12</text:p>
          </table:table-cell>
          <table:table-cell office:value-type="float" office:value="4471961000000" table:style-name="ce85">
            <text:p>4.47E+12</text:p>
          </table:table-cell>
          <table:table-cell office:value-type="float" office:value="4.7957601402850543" table:formula="of:=([.AA100]*100/[.AA99])-100" table:style-name="ce70">
            <text:p>4.80</text:p>
          </table:table-cell>
          <table:table-cell office:value-type="string" table:style-name="ce118">
            <text:p>null</text:p>
          </table:table-cell>
          <table:table-cell office:value-type="float" office:value="264.7141666666667" table:style-name="ce76">
            <text:p>265</text:p>
          </table:table-cell>
          <table:table-cell office:value-type="float" office:value="555559000000" table:style-name="ce125">
            <text:p>5.55559E+11</text:p>
          </table:table-cell>
          <table:table-cell office:value-type="string" table:style-name="ce118">
            <text:p>null</text:p>
          </table:table-cell>
          <table:table-cell office:value-type="float" office:value="1139813204181.0364" table:formula="of:=([.CV100]*[.BS100]*86)" table:style-name="ce125">
            <text:p>1.13981E+1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0.61" table:style-name="ce129">
            <text:p>0.6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0765" table:style-name="ce5">
            <text:p>120765</text:p>
          </table:table-cell>
          <table:table-cell office:value-type="float" office:value="79803" table:style-name="ce17">
            <text:p>79803</text:p>
          </table:table-cell>
          <table:table-cell office:value-type="float" office:value="39195" table:style-name="ce17">
            <text:p>39195</text:p>
          </table:table-cell>
          <table:table-cell office:value-type="float" office:value="1767" table:style-name="ce17">
            <text:p>1767</text:p>
          </table:table-cell>
          <table:table-cell office:value-type="float" office:value="356651" table:style-name="ce80">
            <text:p>356651</text:p>
          </table:table-cell>
          <table:table-cell office:value-type="float" office:value="100332" table:style-name="ce80">
            <text:p>100332</text:p>
          </table:table-cell>
          <table:table-cell office:value-type="float" office:value="6116" table:style-name="ce80">
            <text:p>6116</text:p>
          </table:table-cell>
          <table:table-cell office:value-type="float" office:value="136282" table:style-name="ce17">
            <text:p>136282</text:p>
          </table:table-cell>
          <table:table-cell office:value-type="float" office:value="149.19655531869017" table:style-name="ce124">
            <text:p>149</text:p>
          </table:table-cell>
          <table:table-cell office:value-type="float" office:value="7090628000" table:style-name="ce17">
            <text:p>7090628000</text:p>
          </table:table-cell>
          <table:table-cell office:value-type="float" office:value="52029.086746598965" table:formula="of:=[.BH100]/[.BF100]" table:style-name="ce51">
            <text:p>52029</text:p>
          </table:table-cell>
          <table:table-cell office:value-type="float" office:value="348.7284718837015" table:formula="of:=[.BI100]/[.BG100]" table:style-name="ce51">
            <text:p>349</text:p>
          </table:table-cell>
          <table:table-cell office:value-type="float" office:value="291165" table:style-name="ce17">
            <text:p>291165</text:p>
          </table:table-cell>
          <table:table-cell office:value-type="float" office:value="104.35321266364991" table:style-name="ce124">
            <text:p>104</text:p>
          </table:table-cell>
          <table:table-cell office:value-type="float" office:value="10917020500" table:style-name="ce17">
            <text:p>10917020500</text:p>
          </table:table-cell>
          <table:table-cell office:value-type="float" office:value="37494.274723953771" table:formula="of:=[.BM100]/[.BK100]" table:style-name="ce55">
            <text:p>37494</text:p>
          </table:table-cell>
          <table:table-cell office:value-type="float" office:value="359.30158513475664" table:formula="of:=[.BN100]/[.BL100]" table:style-name="ce55">
            <text:p>359</text:p>
          </table:table-cell>
          <table:table-cell office:value-type="float" office:value="1.8952232136170706" table:formula="of:=[.CV100]/(([.BO100]+[.BJ100])/2)" table:style-name="ce58">
            <text:p>1.90</text:p>
          </table:table-cell>
          <table:table-cell office:value-type="float" office:value="-1.2959913921865365" table:formula="of:=(([.BJ100]+[.BO100])*100/([.BJ99]+[.BO99]))-100" table:style-name="ce57">
            <text:p>-1.3</text:p>
          </table:table-cell>
          <table:table-cell office:value-type="string" table:style-name="ce118">
            <text:p>null</text:p>
          </table:table-cell>
          <table:table-cell office:value-type="float" office:value="19753914.349819198" table:style-name="ce24">
            <text:p>19753914</text:p>
          </table:table-cell>
          <table:table-cell office:value-type="float" office:value="419794.78390139714" table:formula="of:=[.BS100]-[.BS99]" table:style-name="ce24">
            <text:p>419795</text:p>
          </table:table-cell>
          <table:table-cell office:value-type="float" office:value="226631" table:style-name="ce76">
            <text:p>226631</text:p>
          </table:table-cell>
          <table:table-cell office:value-type="float" office:value="74597" table:style-name="ce76">
            <text:p>74597</text:p>
          </table:table-cell>
          <table:table-cell office:value-type="float" office:value="2.0402826136769638" table:formula="of:=([.B100]/[.BS100])" table:style-name="ce34">
            <text:p>2.04</text:p>
          </table:table-cell>
          <table:table-cell office:value-type="float" office:value="2.9799999999999995" table:formula="of:=[.BX99]-(([.$BX$93]-[.$BX$103])/10)" table:style-name="ce103">
            <text:p>2.98</text:p>
          </table:table-cell>
          <table:table-cell office:value-type="float" office:value="1.1240000000000001" table:style-name="ce129">
            <text:p>1.12</text:p>
          </table:table-cell>
          <table:table-cell office:value-type="float" office:value="2.1712640312901073" table:formula="of:=([.BS100]*100/[.BS99])-100" table:style-name="ce23">
            <text:p>2.2</text:p>
          </table:table-cell>
          <table:table-cell office:value-type="float" office:value="160119" table:formula="of:=([.B100]-[.B99])" table:style-name="ce73">
            <text:p>160119</text:p>
          </table:table-cell>
          <table:table-cell office:value-type="float" office:value="0.39886707293138102" table:formula="of:=([.B100]*100/[.B99])-100" table:style-name="ce25">
            <text:p>0.40</text:p>
          </table:table-cell>
          <table:table-cell office:value-type="float" office:value="366063.57584770583" table:formula="of:=[.BT100]-([.CA100]/[.BX100])" table:style-name="ce76">
            <text:p>366064</text:p>
          </table:table-cell>
          <table:table-cell office:value-type="float" office:value="1386000" table:style-name="ce78">
            <text:p>1386000</text:p>
          </table:table-cell>
          <table:table-cell office:value-type="float" office:value="30990.089999999997" table:style-name="ce8">
            <text:p>3099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70.9375" table:style-name="ce8">
            <text:p>671</text:p>
          </table:table-cell>
          <table:table-cell office:value-type="float" office:value="46.357500000000002" table:style-name="ce78">
            <text:p>46</text:p>
          </table:table-cell>
          <table:table-cell office:value-type="string" table:style-name="ce118">
            <text:p>null</text:p>
          </table:table-cell>
          <table:table-cell office:value-type="float" office:value="1.83" table:style-name="ce25">
            <text:p>1.83</text:p>
          </table:table-cell>
          <table:table-cell office:value-type="float" office:value="165.59" table:formula="of:=[.CZ99]+[.CY100]" table:style-name="ce23">
            <text:p>165.6</text:p>
          </table:table-cell>
          <table:table-cell office:value-type="float" office:value="346.44887499999999" table:formula="of:=(([.CV100]*[.CY100])/100)+[.DA99]" table:style-name="ce23">
            <text:p>346.4</text:p>
          </table:table-cell>
          <table:table-cell office:value-type="float" office:value="324.48862500000001" table:formula="of:=[.CV100]-[.DA100]" table:style-name="ce23">
            <text:p>324.5</text:p>
          </table:table-cell>
          <table:table-cell office:value-type="float" office:value="405.17996255812551" table:formula="of:=[.CV100]/[.CZ100]*[.$CZ$87]" table:style-name="ce23">
            <text:p>405.2</text:p>
          </table:table-cell>
          <table:table-cell office:value-type="float" office:value="-1.1930000000000005" table:formula="of:=([.Y100]-[.Y99])" table:style-name="ce25">
            <text:p>-1.19</text:p>
          </table:table-cell>
          <table:table-cell office:value-type="float" office:value="4.4260700389105097" table:formula="of:=([.CV100]*100/[.CV99])-100" table:style-name="ce25">
            <text:p>4.43</text:p>
          </table:table-cell>
          <table:table-cell office:value-type="float" office:value="2.5960700389105096" table:formula="of:=[.DE100]-[.CY100]" table:style-name="ce25">
            <text:p>2.60</text:p>
          </table:table-cell>
          <table:table-cell office:value-type="string" table:style-name="ce118">
            <text:p>null</text:p>
          </table:table-cell>
          <table:table-cell office:value-type="float" office:value="10.5" table:style-name="ce25">
            <text:p>10.50</text:p>
          </table:table-cell>
          <table:table-cell office:value-type="float" office:value="18.61" table:style-name="ce23">
            <text:p>18.6</text:p>
          </table:table-cell>
          <table:table-cell office:value-type="float" office:value="89.105455442476824" table:formula="of:=(([.DC100]-MIN([.DC86:.DC100]))/(MAX([.DC86:.DC100])-MIN([.DC86:.DC100])))*100" table:style-name="ce128">
            <text:p>89.1</text:p>
          </table:table-cell>
          <table:table-cell office:value-type="float" office:value="76.998678104157364" table:formula="of:=MIN(100; MAX(0; (([.K100]-([.C100]/26/2))/(([.C100]/26)-([.C100]/26/2)))*100))" table:style-name="ce128">
            <text:p>77.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.805803404267625" table:formula="of:=MIN(100;MAX(0;(([.BP100]-1.8)/(2.2-1.8))*100))" table:style-name="ce128">
            <text:p>23.8</text:p>
          </table:table-cell>
          <table:table-cell office:value-type="float" office:value="6.853690366165992" table:formula="of:=100-((([.CC100]-MIN([.CC71:.CC100]))/(MAX([.CC71:.CC100])-MIN([.CC71:.CC100])))*100)" table:style-name="ce128">
            <text:p>6.9</text:p>
          </table:table-cell>
          <table:table-cell office:value-type="float" office:value="6.3900000000000006" table:formula="of:=MIN(100; MAX(0; ((IF(AND([.DI100]-[.DI99]&gt;=-0.3;[.DI100]-[.DI99]&lt;=0.3);100;IF(AND([.DI100]-[.DI99]&gt;-1;[.DI100]-[.DI99]&lt;-0.3);50;IF([.DI100]-[.DI99]&lt;=-1;25;75)))))-[.DI100]+(IF(([.DI100]-[.DI99])*([.DI99]-[.DI98])&lt;0;AVERAGE([.DI96:.DI100]);0))))" table:style-name="ce128">
            <text:p>6.4</text:p>
          </table:table-cell>
          <table:table-cell office:value-type="string" table:style-name="ce118">
            <text:p>null</text:p>
          </table:table-cell>
          <table:table-cell office:value-type="float" office:value="40.630725463413555" table:formula="of:=AVERAGE([.DJ100:.DP100])" table:style-name="ce128">
            <text:p>40.6</text:p>
          </table:table-cell>
          <table:table-cell office:value-type="float" office:value="364" table:formula="of:=-0.06*(([.A100]-1963)^2)+8.5*([.A100]-1963)+140" table:style-name="ce23">
            <text:p>364.0</text:p>
          </table:table-cell>
          <table:table-cell table:number-columns-repeated="16261"/>
        </table:table-row>
        <table:table-row table:style-name="ro2">
          <table:table-cell office:value-type="float" office:value="1999" table:style-name="ce15">
            <text:p>1999</text:p>
          </table:table-cell>
          <table:table-cell office:value-type="float" office:value="40470182" table:style-name="ce10">
            <text:p>40470182</text:p>
          </table:table-cell>
          <table:table-cell office:value-type="float" office:value="15786797" table:style-name="ce7">
            <text:p>15786797</text:p>
          </table:table-cell>
          <table:table-cell office:value-type="float" office:value="20138439" table:style-name="ce7">
            <text:p>20138439</text:p>
          </table:table-cell>
          <table:table-cell office:value-type="float" office:value="33619911" table:style-name="ce77">
            <text:p>336199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585782" table:style-name="ce18">
            <text:p>585782</text:p>
          </table:table-cell>
          <table:table-cell office:value-type="float" office:value="390521.33333333331" table:formula="of:=[.K101]/1.5" table:style-name="ce24">
            <text:p>390521</text:p>
          </table:table-cell>
          <table:table-cell office:value-type="float" office:value="36218444000" table:style-name="ce84">
            <text:p>3.6E+10</text:p>
          </table:table-cell>
          <table:table-cell office:value-type="float" office:value="61829.21974386376" table:formula="of:=[.M101]/[.K101]" table:style-name="ce26">
            <text:p>6182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1.685341476391613" table:formula="of:=([.N101]*100)/([.CV101]*(([.BL101]*([.BK101]/([.BF101]+[.BK101])))+([.BG101]*([.BF101]/([.BF101]+[.BK101])))))" table:style-name="ce67">
            <text:p>71.69</text:p>
          </table:table-cell>
          <table:table-cell office:value-type="float" office:value="20.067514088294477" table:formula="of:=(([.M101]*100/[.M100])-100)-[.CY101]" table:style-name="ce28">
            <text:p>20.07</text:p>
          </table:table-cell>
          <table:table-cell office:value-type="float" office:value="145184000000" table:style-name="ce131">
            <text:p>1.45E+11</text:p>
          </table:table-cell>
          <table:table-cell office:value-type="float" office:value="4.7240000000000002" table:style-name="ce34">
            <text:p>4.7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" table:style-name="ce24">
            <text:p>23</text:p>
          </table:table-cell>
          <table:table-cell office:value-type="float" office:value="3.1549166666666664" table:style-name="ce34">
            <text:p>3.15</text:p>
          </table:table-cell>
          <table:table-cell office:value-type="float" office:value="1.0598583333333333" table:style-name="ce71">
            <text:p>1.06</text:p>
          </table:table-cell>
          <table:table-cell office:value-type="float" office:value="4708947000000" table:style-name="ce85">
            <text:p>4.71E+12</text:p>
          </table:table-cell>
          <table:table-cell office:value-type="float" office:value="5.2993753746957992" table:formula="of:=([.AA101]*100/[.AA100])-100" table:style-name="ce70">
            <text:p>5.30</text:p>
          </table:table-cell>
          <table:table-cell office:value-type="string" table:style-name="ce118">
            <text:p>null</text:p>
          </table:table-cell>
          <table:table-cell office:value-type="float" office:value="264.7833333333333" table:style-name="ce76">
            <text:p>265</text:p>
          </table:table-cell>
          <table:table-cell office:value-type="float" office:value="595242000000" table:style-name="ce125">
            <text:p>5.95242E+11</text:p>
          </table:table-cell>
          <table:table-cell office:value-type="string" table:style-name="ce118">
            <text:p>null</text:p>
          </table:table-cell>
          <table:table-cell office:value-type="float" office:value="1267967880640.6333" table:formula="of:=([.CV101]*[.BS101]*86)" table:style-name="ce125">
            <text:p>1.26797E+12</text:p>
          </table:table-cell>
          <table:table-cell office:value-type="float" office:value="379046000000" table:style-name="ce83">
            <text:p>3.79E+11</text:p>
          </table:table-cell>
          <table:table-cell office:value-type="float" office:value="11274.449834206878" table:formula="of:=[.AH101]/[.E101]" table:style-name="ce26">
            <text:p>11274</text:p>
          </table:table-cell>
          <table:table-cell office:value-type="float" office:value="11274.449834206878" table:formula="of:=[.AI101]" table:style-name="ce76">
            <text:p>11274</text:p>
          </table:table-cell>
          <table:table-cell office:value-type="float" office:value="15297.808716532367" table:formula="of:=[.AI101]+(12*PMT([.U101]/100/12;[.X101]*12;([.AI101]*5)*-1))" table:style-name="ce76">
            <text:p>15298</text:p>
          </table:table-cell>
          <table:table-cell office:value-type="float" office:value="11274.449834206878" table:formula="of:=[.AI101]" table:style-name="ce76">
            <text:p>11274</text:p>
          </table:table-cell>
          <table:table-cell office:value-type="float" office:value="15297.808716532367" table:formula="of:=(([.AL101]+([.AJ101]-[.AI101])+([.AK101]-[.AI101]))-[.AI101])+[.$AI$101]" table:style-name="ce76">
            <text:p>15298</text:p>
          </table:table-cell>
          <table:table-cell office:value-type="float" office:value="100" table:style-name="ce76">
            <text:p>100</text:p>
          </table:table-cell>
          <table:table-cell office:value-type="float" office:value="51" table:style-name="ce76">
            <text:p>51</text:p>
          </table:table-cell>
          <table:table-cell office:value-type="float" office:value="-0.42249999999999943" table:formula="of:=[.CW101]-[.AO101]" table:style-name="ce118">
            <text:p>0</text:p>
          </table:table-cell>
          <table:table-cell office:value-type="float" office:value="12365.843948772752" table:formula="of:=[.N101]/5" table:style-name="ce26">
            <text:p>12366</text:p>
          </table:table-cell>
          <table:table-cell office:value-type="string" table:style-name="ce118">
            <text:p>null</text:p>
          </table:table-cell>
          <table:table-cell office:value-type="float" office:value="0.68" table:style-name="ce129">
            <text:p>0.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1338" table:style-name="ce5">
            <text:p>141338</text:p>
          </table:table-cell>
          <table:table-cell office:value-type="float" office:value="91284" table:style-name="ce17">
            <text:p>91284</text:p>
          </table:table-cell>
          <table:table-cell office:value-type="float" office:value="47753" table:style-name="ce17">
            <text:p>47753</text:p>
          </table:table-cell>
          <table:table-cell office:value-type="float" office:value="2301" table:style-name="ce17">
            <text:p>2301</text:p>
          </table:table-cell>
          <table:table-cell office:value-type="float" office:value="432522" table:style-name="ce80">
            <text:p>432522</text:p>
          </table:table-cell>
          <table:table-cell office:value-type="float" office:value="118399" table:style-name="ce80">
            <text:p>118399</text:p>
          </table:table-cell>
          <table:table-cell office:value-type="float" office:value="7339" table:style-name="ce80">
            <text:p>7339</text:p>
          </table:table-cell>
          <table:table-cell office:value-type="float" office:value="158487" table:style-name="ce17">
            <text:p>158487</text:p>
          </table:table-cell>
          <table:table-cell office:value-type="float" office:value="146.32930434216055" table:style-name="ce124">
            <text:p>146</text:p>
          </table:table-cell>
          <table:table-cell office:value-type="float" office:value="8253696800" table:style-name="ce17">
            <text:p>8253696800</text:p>
          </table:table-cell>
          <table:table-cell office:value-type="float" office:value="52078.068232725709" table:formula="of:=[.BH101]/[.BF101]" table:style-name="ce51">
            <text:p>52078</text:p>
          </table:table-cell>
          <table:table-cell office:value-type="float" office:value="355.89636995028701" table:formula="of:=[.BI101]/[.BG101]" table:style-name="ce51">
            <text:p>356</text:p>
          </table:table-cell>
          <table:table-cell office:value-type="float" office:value="354324" table:style-name="ce17">
            <text:p>354324</text:p>
          </table:table-cell>
          <table:table-cell office:value-type="float" office:value="105.76814123949669" table:style-name="ce124">
            <text:p>106</text:p>
          </table:table-cell>
          <table:table-cell office:value-type="float" office:value="13636129599.999998" table:style-name="ce17">
            <text:p>13636129600</text:p>
          </table:table-cell>
          <table:table-cell office:value-type="float" office:value="38484.91662997708" table:formula="of:=[.BM101]/[.BK101]" table:style-name="ce55">
            <text:p>38485</text:p>
          </table:table-cell>
          <table:table-cell office:value-type="float" office:value="363.86114172918616" table:formula="of:=[.BN101]/[.BL101]" table:style-name="ce55">
            <text:p>364</text:p>
          </table:table-cell>
          <table:table-cell office:value-type="float" office:value="2.0258558977698327" table:formula="of:=[.CV101]/(([.BO101]+[.BJ101])/2)" table:style-name="ce58">
            <text:p>2.03</text:p>
          </table:table-cell>
          <table:table-cell office:value-type="float" office:value="1.6563498321525714" table:formula="of:=(([.BJ101]+[.BO101])*100/([.BJ100]+[.BO100]))-100" table:style-name="ce57">
            <text:p>1.7</text:p>
          </table:table-cell>
          <table:table-cell office:value-type="string" table:style-name="ce118">
            <text:p>null</text:p>
          </table:table-cell>
          <table:table-cell office:value-type="float" office:value="20222974.800636102" table:style-name="ce24">
            <text:p>20222975</text:p>
          </table:table-cell>
          <table:table-cell office:value-type="float" office:value="469060.45081690326" table:formula="of:=[.BS101]-[.BS100]" table:style-name="ce24">
            <text:p>469060</text:p>
          </table:table-cell>
          <table:table-cell office:value-type="float" office:value="296250" table:style-name="ce76">
            <text:p>296250</text:p>
          </table:table-cell>
          <table:table-cell office:value-type="float" office:value="55972" table:style-name="ce76">
            <text:p>55972</text:p>
          </table:table-cell>
          <table:table-cell office:value-type="float" office:value="2.0011982608378189" table:formula="of:=([.B101]/[.BS101])" table:style-name="ce34">
            <text:p>2.00</text:p>
          </table:table-cell>
          <table:table-cell office:value-type="float" office:value="2.9399999999999995" table:formula="of:=[.BX100]-(([.$BX$93]-[.$BX$103])/10)" table:style-name="ce103">
            <text:p>2.94</text:p>
          </table:table-cell>
          <table:table-cell office:value-type="float" office:value="1.161" table:style-name="ce129">
            <text:p>1.16</text:p>
          </table:table-cell>
          <table:table-cell office:value-type="float" office:value="2.3745190067668602" table:formula="of:=([.BS101]*100/[.BS100])-100" table:style-name="ce23">
            <text:p>2.4</text:p>
          </table:table-cell>
          <table:table-cell office:value-type="float" office:value="166614" table:formula="of:=([.B101]-[.B100])" table:style-name="ce73">
            <text:p>166614</text:p>
          </table:table-cell>
          <table:table-cell office:value-type="float" office:value="0.413397642610704" table:formula="of:=([.B101]*100/[.B100])-100" table:style-name="ce25">
            <text:p>0.41</text:p>
          </table:table-cell>
          <table:table-cell office:value-type="float" office:value="412389.02224547468" table:formula="of:=[.BT101]-([.CA101]/[.BX101])" table:style-name="ce76">
            <text:p>412389</text:p>
          </table:table-cell>
          <table:table-cell office:value-type="float" office:value="1573000" table:style-name="ce78">
            <text:p>1573000</text:p>
          </table:table-cell>
          <table:table-cell office:value-type="float" office:value="34626.979999999996" table:style-name="ce8">
            <text:p>346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29.0625" table:style-name="ce8">
            <text:p>729</text:p>
          </table:table-cell>
          <table:table-cell office:value-type="float" office:value="50.577500000000001" table:style-name="ce78">
            <text:p>51</text:p>
          </table:table-cell>
          <table:table-cell office:value-type="string" table:style-name="ce118">
            <text:p>null</text:p>
          </table:table-cell>
          <table:table-cell office:value-type="float" office:value="2.31" table:style-name="ce25">
            <text:p>2.31</text:p>
          </table:table-cell>
          <table:table-cell office:value-type="float" office:value="167.9" table:formula="of:=[.CZ100]+[.CY101]" table:style-name="ce23">
            <text:p>167.9</text:p>
          </table:table-cell>
          <table:table-cell office:value-type="float" office:value="363.29021875000001" table:formula="of:=(([.CV101]*[.CY101])/100)+[.DA100]" table:style-name="ce23">
            <text:p>363.3</text:p>
          </table:table-cell>
          <table:table-cell office:value-type="float" office:value="365.77228124999999" table:formula="of:=[.CV101]-[.DA101]" table:style-name="ce23">
            <text:p>365.8</text:p>
          </table:table-cell>
          <table:table-cell office:value-type="float" office:value="434.22424061941632" table:formula="of:=[.CV101]/[.CZ101]*[.$CZ$87]" table:style-name="ce23">
            <text:p>434.2</text:p>
          </table:table-cell>
          <table:table-cell office:value-type="float" office:value="-0.85000000000000009" table:formula="of:=([.Y101]-[.Y100])" table:style-name="ce25">
            <text:p>-0.85</text:p>
          </table:table-cell>
          <table:table-cell office:value-type="float" office:value="8.6632510479739153" table:formula="of:=([.CV101]*100/[.CV100])-100" table:style-name="ce25">
            <text:p>8.66</text:p>
          </table:table-cell>
          <table:table-cell office:value-type="float" office:value="6.3532510479739148" table:formula="of:=[.DE101]-[.CY101]" table:style-name="ce25">
            <text:p>6.35</text:p>
          </table:table-cell>
          <table:table-cell office:value-type="string" table:style-name="ce118">
            <text:p>null</text:p>
          </table:table-cell>
          <table:table-cell office:value-type="float" office:value="10.62" table:style-name="ce25">
            <text:p>10.62</text:p>
          </table:table-cell>
          <table:table-cell office:value-type="float" office:value="15.64" table:style-name="ce23">
            <text:p>15.6</text:p>
          </table:table-cell>
          <table:table-cell office:value-type="float" office:value="100" table:formula="of:=(([.DC101]-MIN([.DC87:.DC101]))/(MAX([.DC87:.DC101])-MIN([.DC87:.DC101])))*100" table:style-name="ce128">
            <text:p>100.0</text:p>
          </table:table-cell>
          <table:table-cell office:value-type="float" office:value="92.950248235915112" table:formula="of:=MIN(100; MAX(0; (([.K101]-([.C101]/26/2))/(([.C101]/26)-([.C101]/26/2)))*100))" table:style-name="ce128">
            <text:p>93.0</text:p>
          </table:table-cell>
          <table:table-cell office:value-type="string" table:style-name="ce118">
            <text:p>null</text:p>
          </table:table-cell>
          <table:table-cell office:value-type="float" office:value="0" table:formula="of:=(([.AP101]-MIN([.$AP$2:.$AP$128]))/(MAX([.$AP$2:.$AP$128])-MIN([.$AP$2:.$AP$128])))*100" table:style-name="ce128">
            <text:p>0.0</text:p>
          </table:table-cell>
          <table:table-cell office:value-type="float" office:value="56.463974442458131" table:formula="of:=MIN(100;MAX(0;(([.BP101]-1.8)/(2.2-1.8))*100))" table:style-name="ce128">
            <text:p>56.5</text:p>
          </table:table-cell>
          <table:table-cell office:value-type="float" office:value="0" table:formula="of:=100-((([.CC101]-MIN([.CC72:.CC101]))/(MAX([.CC72:.CC101])-MIN([.CC72:.CC101])))*100)" table:style-name="ce128">
            <text:p>0.0</text:p>
          </table:table-cell>
          <table:table-cell office:value-type="float" office:value="9.36" table:formula="of:=MIN(100; MAX(0; ((IF(AND([.DI101]-[.DI100]&gt;=-0.3;[.DI101]-[.DI100]&lt;=0.3);100;IF(AND([.DI101]-[.DI100]&gt;-1;[.DI101]-[.DI100]&lt;-0.3);50;IF([.DI101]-[.DI100]&lt;=-1;25;75)))))-[.DI101]+(IF(([.DI101]-[.DI100])*([.DI100]-[.DI99])&lt;0;AVERAGE([.DI97:.DI101]);0))))" table:style-name="ce128">
            <text:p>9.4</text:p>
          </table:table-cell>
          <table:table-cell office:value-type="string" table:style-name="ce118">
            <text:p>null</text:p>
          </table:table-cell>
          <table:table-cell office:value-type="float" office:value="43.129037113062203" table:formula="of:=AVERAGE([.DJ101:.DP101])" table:style-name="ce128">
            <text:p>43.1</text:p>
          </table:table-cell>
          <table:table-cell office:value-type="float" office:value="368.24" table:formula="of:=-0.06*(([.A101]-1963)^2)+8.5*([.A101]-1963)+140" table:style-name="ce23">
            <text:p>368.2</text:p>
          </table:table-cell>
          <table:table-cell table:number-columns-repeated="16261"/>
        </table:table-row>
        <table:table-row table:style-name="ro2">
          <table:table-cell office:value-type="float" office:value="2000" table:style-name="ce15">
            <text:p>2000</text:p>
          </table:table-cell>
          <table:table-cell office:value-type="float" office:value="40665545" table:style-name="ce10">
            <text:p>40665545</text:p>
          </table:table-cell>
          <table:table-cell office:value-type="float" office:value="16049762" table:style-name="ce7">
            <text:p>16049762</text:p>
          </table:table-cell>
          <table:table-cell office:value-type="float" office:value="20583404" table:style-name="ce7">
            <text:p>20583404</text:p>
          </table:table-cell>
          <table:table-cell office:value-type="float" office:value="33949061" table:style-name="ce77">
            <text:p>3394906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12852" table:style-name="ce18">
            <text:p>612852</text:p>
          </table:table-cell>
          <table:table-cell office:value-type="float" office:value="408568" table:formula="of:=[.K102]/1.5" table:style-name="ce24">
            <text:p>408568</text:p>
          </table:table-cell>
          <table:table-cell office:value-type="float" office:value="42325628000" table:style-name="ce84">
            <text:p>4.2E+10</text:p>
          </table:table-cell>
          <table:table-cell office:value-type="float" office:value="69063.375823200375" table:formula="of:=[.M102]/[.K102]" table:style-name="ce26">
            <text:p>6906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2.073117984420676" table:formula="of:=([.N102]*100)/([.CV102]*(([.BL102]*([.BK102]/([.BF102]+[.BK102])))+([.BG102]*([.BF102]/([.BF102]+[.BK102])))))" table:style-name="ce67">
            <text:p>72.07</text:p>
          </table:table-cell>
          <table:table-cell office:value-type="float" office:value="13.432082755404956" table:formula="of:=(([.M102]*100/[.M101])-100)-[.CY102]" table:style-name="ce28">
            <text:p>13.43</text:p>
          </table:table-cell>
          <table:table-cell office:value-type="float" office:value="176653000000" table:style-name="ce131">
            <text:p>1.77E+11</text:p>
          </table:table-cell>
          <table:table-cell office:value-type="float" office:value="5.7640000000000002" table:style-name="ce34">
            <text:p>5.7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" table:style-name="ce24">
            <text:p>23</text:p>
          </table:table-cell>
          <table:table-cell office:value-type="float" office:value="4.773083333333334" table:style-name="ce34">
            <text:p>4.77</text:p>
          </table:table-cell>
          <table:table-cell office:value-type="float" office:value="0.9213583333333335" table:style-name="ce71">
            <text:p>0.92</text:p>
          </table:table-cell>
          <table:table-cell office:value-type="float" office:value="4910328000000" table:style-name="ce85">
            <text:p>4.91E+12</text:p>
          </table:table-cell>
          <table:table-cell office:value-type="float" office:value="4.2765611929800826" table:formula="of:=([.AA102]*100/[.AA101])-100" table:style-name="ce70">
            <text:p>4.28</text:p>
          </table:table-cell>
          <table:table-cell office:value-type="string" table:style-name="ce118">
            <text:p>null</text:p>
          </table:table-cell>
          <table:table-cell office:value-type="float" office:value="301.12833333333333" table:style-name="ce76">
            <text:p>301</text:p>
          </table:table-cell>
          <table:table-cell office:value-type="float" office:value="647569000000" table:style-name="ce125">
            <text:p>6.47569E+11</text:p>
          </table:table-cell>
          <table:table-cell office:value-type="string" table:style-name="ce118">
            <text:p>null</text:p>
          </table:table-cell>
          <table:table-cell office:value-type="float" office:value="1441921528755.6147" table:formula="of:=([.CV102]*[.BS102]*86)" table:style-name="ce125">
            <text:p>1.44192E+12</text:p>
          </table:table-cell>
          <table:table-cell office:value-type="float" office:value="413811000000" table:style-name="ce83">
            <text:p>4.14E+11</text:p>
          </table:table-cell>
          <table:table-cell office:value-type="float" office:value="12189.173656378891" table:formula="of:=[.AH102]/[.E102]" table:style-name="ce26">
            <text:p>12189</text:p>
          </table:table-cell>
          <table:table-cell office:value-type="float" office:value="11661.163463520174" table:formula="of:=[.AJ101]*(1+([.CY102]/100))" table:style-name="ce76">
            <text:p>11661</text:p>
          </table:table-cell>
          <table:table-cell office:value-type="float" office:value="16978.143042355186" table:formula="of:=[.AI102]+(12*PMT([.U102]/100/12;[.X102]*12;([.AI102]*5)*-1))" table:style-name="ce76">
            <text:p>16978</text:p>
          </table:table-cell>
          <table:table-cell office:value-type="float" office:value="11948.09821180074" table:formula="of:=[.AL101]*(1+(([.CW102]-[.CW101])/100))" table:style-name="ce76">
            <text:p>11948</text:p>
          </table:table-cell>
          <table:table-cell office:value-type="float" office:value="15294.333582746305" table:formula="of:=(([.AL102]+([.AJ102]-[.AI102])+([.AK102]-[.AI102]))-[.AI102])+[.$AI$101]" table:style-name="ce76">
            <text:p>15294</text:p>
          </table:table-cell>
          <table:table-cell office:value-type="float" office:value="99.97728345379096" table:formula="of:=[.AM102]*[.$AN$101]/[.$AM$101]" table:style-name="ce76">
            <text:p>100</text:p>
          </table:table-cell>
          <table:table-cell office:value-type="float" office:value="55.137755333234352" table:formula="of:=[.AI102]*[.$AO$101]/[.$AI$101]" table:style-name="ce76">
            <text:p>55</text:p>
          </table:table-cell>
          <table:table-cell office:value-type="float" office:value="1.4147446667656496" table:formula="of:=[.CW102]-[.AO102]" table:style-name="ce118">
            <text:p>1</text:p>
          </table:table-cell>
          <table:table-cell office:value-type="float" office:value="13812.675164640075" table:formula="of:=[.N102]/5" table:style-name="ce26">
            <text:p>13813</text:p>
          </table:table-cell>
          <table:table-cell office:value-type="string" table:style-name="ce118">
            <text:p>null</text:p>
          </table:table-cell>
          <table:table-cell office:value-type="float" office:value="0.72" table:style-name="ce129">
            <text:p>0.7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3902" table:style-name="ce18">
            <text:p>143902</text:p>
          </table:table-cell>
          <table:table-cell office:value-type="float" office:value="89889" table:style-name="ce18">
            <text:p>89889</text:p>
          </table:table-cell>
          <table:table-cell office:value-type="float" office:value="51570" table:style-name="ce18">
            <text:p>51570</text:p>
          </table:table-cell>
          <table:table-cell office:value-type="float" office:value="2443" table:style-name="ce18">
            <text:p>2443</text:p>
          </table:table-cell>
          <table:table-cell office:value-type="float" office:value="466875" table:style-name="ce81">
            <text:p>466875</text:p>
          </table:table-cell>
          <table:table-cell office:value-type="float" office:value="121732" table:style-name="ce81">
            <text:p>121732</text:p>
          </table:table-cell>
          <table:table-cell office:value-type="float" office:value="6213" table:style-name="ce81">
            <text:p>6213</text:p>
          </table:table-cell>
          <table:table-cell office:value-type="float" office:value="165400" table:style-name="ce18">
            <text:p>165400</text:p>
          </table:table-cell>
          <table:table-cell office:value-type="float" office:value="146.04556760124009" table:style-name="ce5">
            <text:p>146</text:p>
          </table:table-cell>
          <table:table-cell office:value-type="float" office:value="8895954999.9999981" table:style-name="ce18">
            <text:p>8895955000</text:p>
          </table:table-cell>
          <table:table-cell office:value-type="float" office:value="53784.492140266011" table:formula="of:=[.BH102]/[.BF102]" table:style-name="ce51">
            <text:p>53784</text:p>
          </table:table-cell>
          <table:table-cell office:value-type="float" office:value="368.27199225325427" table:formula="of:=[.BI102]/[.BG102]" table:style-name="ce51">
            <text:p>368</text:p>
          </table:table-cell>
          <table:table-cell office:value-type="float" office:value="365833" table:style-name="ce18">
            <text:p>365833</text:p>
          </table:table-cell>
          <table:table-cell office:value-type="float" office:value="105.29489313462319" table:style-name="ce5">
            <text:p>105</text:p>
          </table:table-cell>
          <table:table-cell office:value-type="float" office:value="14670248899.999998" table:style-name="ce18">
            <text:p>14670248900</text:p>
          </table:table-cell>
          <table:table-cell office:value-type="float" office:value="40100.944693343677" table:formula="of:=[.BM102]/[.BK102]" table:style-name="ce55">
            <text:p>40101</text:p>
          </table:table-cell>
          <table:table-cell office:value-type="float" office:value="380.84415587062915" table:formula="of:=[.BN102]/[.BL102]" table:style-name="ce55">
            <text:p>381</text:p>
          </table:table-cell>
          <table:table-cell office:value-type="float" office:value="2.16838871257568" table:formula="of:=[.CV102]/(([.BO102]+[.BJ102])/2)" table:style-name="ce58">
            <text:p>2.17</text:p>
          </table:table-cell>
          <table:table-cell office:value-type="float" office:value="4.0789621460018139" table:formula="of:=(([.BJ102]+[.BO102])*100/([.BJ101]+[.BO101]))-100" table:style-name="ce57">
            <text:p>4.1</text:p>
          </table:table-cell>
          <table:table-cell office:value-type="string" table:style-name="ce118">
            <text:p>null</text:p>
          </table:table-cell>
          <table:table-cell office:value-type="float" office:value="20643668.369846933" table:style-name="ce24">
            <text:p>20643668</text:p>
          </table:table-cell>
          <table:table-cell office:value-type="float" office:value="420693.56921083108" table:formula="of:=[.BS102]-[.BS101]" table:style-name="ce24">
            <text:p>420694</text:p>
          </table:table-cell>
          <table:table-cell office:value-type="float" office:value="362940" table:style-name="ce76">
            <text:p>362940</text:p>
          </table:table-cell>
          <table:table-cell office:value-type="float" office:value="52318" table:style-name="ce76">
            <text:p>52318</text:p>
          </table:table-cell>
          <table:table-cell office:value-type="float" office:value="1.9698797845153295" table:formula="of:=([.B102]/[.BS102])" table:style-name="ce34">
            <text:p>1.97</text:p>
          </table:table-cell>
          <table:table-cell office:value-type="float" office:value="2.8999999999999995" table:formula="of:=[.BX101]-(([.$BX$93]-[.$BX$103])/10)" table:style-name="ce103">
            <text:p>2.90</text:p>
          </table:table-cell>
          <table:table-cell office:value-type="float" office:value="1.2070000000000001" table:style-name="ce129">
            <text:p>1.21</text:p>
          </table:table-cell>
          <table:table-cell office:value-type="float" office:value="2.0802753964644154" table:formula="of:=([.BS102]*100/[.BS101])-100" table:style-name="ce23">
            <text:p>2.1</text:p>
          </table:table-cell>
          <table:table-cell office:value-type="float" office:value="195363" table:formula="of:=([.B102]-[.B101])" table:style-name="ce73">
            <text:p>195363</text:p>
          </table:table-cell>
          <table:table-cell office:value-type="float" office:value="0.48273318859796177" table:formula="of:=([.B102]*100/[.B101])-100" table:style-name="ce25">
            <text:p>0.48</text:p>
          </table:table-cell>
          <table:table-cell office:value-type="float" office:value="353327.0174866931" table:formula="of:=[.BT102]-([.CA102]/[.BX102])" table:style-name="ce76">
            <text:p>353327</text:p>
          </table:table-cell>
          <table:table-cell office:value-type="float" office:value="1722000" table:style-name="ce78">
            <text:p>1722000</text:p>
          </table:table-cell>
          <table:table-cell office:value-type="float" office:value="38438.639999999999" table:style-name="ce8">
            <text:p>3843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12.1875" table:style-name="ce8">
            <text:p>812</text:p>
          </table:table-cell>
          <table:table-cell office:value-type="float" office:value="56.552500000000002" table:style-name="ce78">
            <text:p>57</text:p>
          </table:table-cell>
          <table:table-cell office:value-type="string" table:style-name="ce118">
            <text:p>null</text:p>
          </table:table-cell>
          <table:table-cell office:value-type="float" office:value="3.4299999999999997" table:style-name="ce25">
            <text:p>3.43</text:p>
          </table:table-cell>
          <table:table-cell office:value-type="float" office:value="171.33" table:formula="of:=[.CZ101]+[.CY102]" table:style-name="ce23">
            <text:p>171.3</text:p>
          </table:table-cell>
          <table:table-cell office:value-type="float" office:value="391.14825000000002" table:formula="of:=(([.CV102]*[.CY102])/100)+[.DA101]" table:style-name="ce23">
            <text:p>391.1</text:p>
          </table:table-cell>
          <table:table-cell office:value-type="float" office:value="421.03924999999998" table:formula="of:=[.CV102]-[.DA102]" table:style-name="ce23">
            <text:p>421.0</text:p>
          </table:table-cell>
          <table:table-cell office:value-type="float" office:value="474.04861962294984" table:formula="of:=[.CV102]/[.CZ102]*[.$CZ$87]" table:style-name="ce23">
            <text:p>474.0</text:p>
          </table:table-cell>
          <table:table-cell office:value-type="float" office:value="1.6181666666666676" table:formula="of:=([.Y102]-[.Y101])" table:style-name="ce25">
            <text:p>1.62</text:p>
          </table:table-cell>
          <table:table-cell office:value-type="float" office:value="11.401628804114878" table:formula="of:=([.CV102]*100/[.CV101])-100" table:style-name="ce25">
            <text:p>11.40</text:p>
          </table:table-cell>
          <table:table-cell office:value-type="float" office:value="7.9716288041148786" table:formula="of:=[.DE102]-[.CY102]" table:style-name="ce25">
            <text:p>7.97</text:p>
          </table:table-cell>
          <table:table-cell office:value-type="string" table:style-name="ce118">
            <text:p>null</text:p>
          </table:table-cell>
          <table:table-cell office:value-type="float" office:value="4.62" table:style-name="ce25">
            <text:p>4.62</text:p>
          </table:table-cell>
          <table:table-cell office:value-type="float" office:value="13.87" table:style-name="ce23">
            <text:p>13.9</text:p>
          </table:table-cell>
          <table:table-cell office:value-type="float" office:value="100" table:formula="of:=(([.DC102]-MIN([.DC88:.DC102]))/(MAX([.DC88:.DC102])-MIN([.DC88:.DC102])))*100" table:style-name="ce128">
            <text:p>100.0</text:p>
          </table:table-cell>
          <table:table-cell office:value-type="float" office:value="98.559355584213634" table:formula="of:=MIN(100; MAX(0; (([.K102]-([.C102]/26/2))/(([.C102]/26)-([.C102]/26/2)))*100))" table:style-name="ce128">
            <text:p>98.6</text:p>
          </table:table-cell>
          <table:table-cell office:value-type="string" table:style-name="ce118">
            <text:p>null</text:p>
          </table:table-cell>
          <table:table-cell office:value-type="float" office:value="2.8826715198889774" table:formula="of:=(([.AP102]-MIN([.$AP$2:.$AP$128]))/(MAX([.$AP$2:.$AP$128])-MIN([.$AP$2:.$AP$128])))*100" table:style-name="ce128">
            <text:p>2.9</text:p>
          </table:table-cell>
          <table:table-cell office:value-type="float" office:value="92.097178143919962" table:formula="of:=MIN(100;MAX(0;(([.BP102]-1.8)/(2.2-1.8))*100))" table:style-name="ce128">
            <text:p>92.1</text:p>
          </table:table-cell>
          <table:table-cell office:value-type="float" office:value="22.817739173501479" table:formula="of:=100-((([.CC102]-MIN([.CC73:.CC102]))/(MAX([.CC73:.CC102])-MIN([.CC73:.CC102])))*100)" table:style-name="ce128">
            <text:p>22.8</text:p>
          </table:table-cell>
          <table:table-cell office:value-type="float" office:value="11.13" table:formula="of:=MIN(100; MAX(0; ((IF(AND([.DI102]-[.DI101]&gt;=-0.3;[.DI102]-[.DI101]&lt;=0.3);100;IF(AND([.DI102]-[.DI101]&gt;-1;[.DI102]-[.DI101]&lt;-0.3);50;IF([.DI102]-[.DI101]&lt;=-1;25;75)))))-[.DI102]+(IF(([.DI102]-[.DI101])*([.DI101]-[.DI100])&lt;0;AVERAGE([.DI98:.DI102]);0))))" table:style-name="ce128">
            <text:p>11.1</text:p>
          </table:table-cell>
          <table:table-cell office:value-type="string" table:style-name="ce118">
            <text:p>null</text:p>
          </table:table-cell>
          <table:table-cell office:value-type="float" office:value="54.581157403587333" table:formula="of:=AVERAGE([.DJ102:.DP102])" table:style-name="ce128">
            <text:p>54.6</text:p>
          </table:table-cell>
          <table:table-cell office:value-type="float" office:value="372.36" table:formula="of:=-0.06*(([.A102]-1963)^2)+8.5*([.A102]-1963)+140" table:style-name="ce23">
            <text:p>372.4</text:p>
          </table:table-cell>
          <table:table-cell table:number-columns-repeated="16261"/>
        </table:table-row>
        <table:table-row table:style-name="ro2">
          <table:table-cell office:value-type="float" office:value="2001" table:style-name="ce15">
            <text:p>2001</text:p>
          </table:table-cell>
          <table:table-cell office:value-type="float" office:value="41035271" table:style-name="ce10">
            <text:p>41035271</text:p>
          </table:table-cell>
          <table:table-cell office:value-type="float" office:value="16417960" table:style-name="ce7">
            <text:p>16417960</text:p>
          </table:table-cell>
          <table:table-cell office:value-type="float" office:value="20974127" table:style-name="ce7">
            <text:p>20974127</text:p>
          </table:table-cell>
          <table:table-cell office:value-type="float" office:value="34378392" table:style-name="ce77">
            <text:p>3437839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15703" table:style-name="ce18">
            <text:p>615703</text:p>
          </table:table-cell>
          <table:table-cell office:value-type="float" office:value="410468.66666666669" table:formula="of:=[.K103]/1.5" table:style-name="ce24">
            <text:p>410469</text:p>
          </table:table-cell>
          <table:table-cell office:value-type="float" office:value="46574600000" table:style-name="ce84">
            <text:p>4.7E+10</text:p>
          </table:table-cell>
          <table:table-cell office:value-type="float" office:value="75644.588381086331" table:formula="of:=[.M103]/[.K103]" table:style-name="ce26">
            <text:p>756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1.988963873634205" table:formula="of:=([.N103]*100)/([.CV103]*(([.BL103]*([.BK103]/([.BF103]+[.BK103])))+([.BG103]*([.BF103]/([.BF103]+[.BK103])))))" table:style-name="ce67">
            <text:p>71.99</text:p>
          </table:table-cell>
          <table:table-cell office:value-type="float" office:value="6.4487689463225486" table:formula="of:=(([.M103]*100/[.M102])-100)-[.CY103]" table:style-name="ce28">
            <text:p>6.45</text:p>
          </table:table-cell>
          <table:table-cell office:value-type="float" office:value="205790000000" table:style-name="ce131">
            <text:p>2.06E+11</text:p>
          </table:table-cell>
          <table:table-cell office:value-type="float" office:value="5.76" table:style-name="ce34">
            <text:p>5.7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" table:style-name="ce24">
            <text:p>23</text:p>
          </table:table-cell>
          <table:table-cell office:value-type="float" office:value="4.0766666666666671" table:style-name="ce34">
            <text:p>4.08</text:p>
          </table:table-cell>
          <table:table-cell office:value-type="float" office:value="0.89243333333333341" table:style-name="ce71">
            <text:p>0.89</text:p>
          </table:table-cell>
          <table:table-cell office:value-type="float" office:value="5446737000000" table:style-name="ce85">
            <text:p>5.45E+12</text:p>
          </table:table-cell>
          <table:table-cell office:value-type="float" office:value="10.924097127523865" table:formula="of:=([.AA103]*100/[.AA102])-100" table:style-name="ce70">
            <text:p>10.92</text:p>
          </table:table-cell>
          <table:table-cell office:value-type="string" table:style-name="ce118">
            <text:p>null</text:p>
          </table:table-cell>
          <table:table-cell office:value-type="float" office:value="304.32833333333332" table:style-name="ce76">
            <text:p>304</text:p>
          </table:table-cell>
          <table:table-cell office:value-type="float" office:value="700958000000" table:style-name="ce125">
            <text:p>7.00958E+11</text:p>
          </table:table-cell>
          <table:table-cell office:value-type="string" table:style-name="ce118">
            <text:p>null</text:p>
          </table:table-cell>
          <table:table-cell office:value-type="float" office:value="1614446172045" table:formula="of:=([.CV103]*[.BS103]*86)" table:style-name="ce125">
            <text:p>1.61445E+12</text:p>
          </table:table-cell>
          <table:table-cell office:value-type="float" office:value="445649000000" table:style-name="ce83">
            <text:p>4.46E+11</text:p>
          </table:table-cell>
          <table:table-cell office:value-type="float" office:value="12963.055398286226" table:formula="of:=[.AH103]/[.E103]" table:style-name="ce26">
            <text:p>12963</text:p>
          </table:table-cell>
          <table:table-cell office:value-type="float" office:value="12079.799231860548" table:formula="of:=[.AJ102]*(1+([.CY103]/100))" table:style-name="ce76">
            <text:p>12080</text:p>
          </table:table-cell>
          <table:table-cell office:value-type="float" office:value="18054.232633738902" table:formula="of:=[.AI103]+(12*PMT([.U103]/100/12;[.X103]*12;([.AI103]*5)*-1))" table:style-name="ce76">
            <text:p>18054</text:p>
          </table:table-cell>
          <table:table-cell office:value-type="float" office:value="12771.023476138516" table:formula="of:=[.AL102]*(1+(([.CW103]-[.CW102])/100))" table:style-name="ce76">
            <text:p>12771</text:p>
          </table:table-cell>
          <table:table-cell office:value-type="float" office:value="15290.338981086168" table:formula="of:=(([.AL103]+([.AJ103]-[.AI103])+([.AK103]-[.AI103]))-[.AI103])+[.$AI$101]" table:style-name="ce76">
            <text:p>15290</text:p>
          </table:table-cell>
          <table:table-cell office:value-type="float" office:value="99.951171206382469" table:formula="of:=[.AM103]*[.$AN$101]/[.$AM$101]" table:style-name="ce76">
            <text:p>100</text:p>
          </table:table-cell>
          <table:table-cell office:value-type="float" office:value="58.638411189409929" table:formula="of:=[.AI103]*[.$AO$101]/[.$AI$101]" table:style-name="ce76">
            <text:p>59</text:p>
          </table:table-cell>
          <table:table-cell office:value-type="float" office:value="4.8015888105900757" table:formula="of:=[.CW103]-[.AO103]" table:style-name="ce118">
            <text:p>5</text:p>
          </table:table-cell>
          <table:table-cell office:value-type="float" office:value="15128.917676217266" table:formula="of:=[.N103]/5" table:style-name="ce26">
            <text:p>15129</text:p>
          </table:table-cell>
          <table:table-cell office:value-type="string" table:style-name="ce118">
            <text:p>null</text:p>
          </table:table-cell>
          <table:table-cell office:value-type="float" office:value="0.75" table:style-name="ce129">
            <text:p>0.7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40616" table:style-name="ce18">
            <text:p>140616</text:p>
          </table:table-cell>
          <table:table-cell office:value-type="float" office:value="82802" table:style-name="ce18">
            <text:p>82802</text:p>
          </table:table-cell>
          <table:table-cell office:value-type="float" office:value="55042" table:style-name="ce18">
            <text:p>55042</text:p>
          </table:table-cell>
          <table:table-cell office:value-type="float" office:value="2772" table:style-name="ce18">
            <text:p>2772</text:p>
          </table:table-cell>
          <table:table-cell office:value-type="float" office:value="441623" table:style-name="ce81">
            <text:p>441623</text:p>
          </table:table-cell>
          <table:table-cell office:value-type="float" office:value="110467" table:style-name="ce81">
            <text:p>110467</text:p>
          </table:table-cell>
          <table:table-cell office:value-type="float" office:value="9082" table:style-name="ce81">
            <text:p>9082</text:p>
          </table:table-cell>
          <table:table-cell office:value-type="float" office:value="144937" table:style-name="ce18">
            <text:p>144937</text:p>
          </table:table-cell>
          <table:table-cell office:value-type="float" office:value="150.93763104378507" table:style-name="ce5">
            <text:p>151</text:p>
          </table:table-cell>
          <table:table-cell office:value-type="float" office:value="8477207199.999999" table:style-name="ce18">
            <text:p>8477207200</text:p>
          </table:table-cell>
          <table:table-cell office:value-type="float" office:value="58488.910354153864" table:formula="of:=[.BH103]/[.BF103]" table:style-name="ce51">
            <text:p>58489</text:p>
          </table:table-cell>
          <table:table-cell office:value-type="float" office:value="387.50383154739575" table:formula="of:=[.BI103]/[.BG103]" table:style-name="ce51">
            <text:p>388</text:p>
          </table:table-cell>
          <table:table-cell office:value-type="float" office:value="354248" table:style-name="ce18">
            <text:p>354248</text:p>
          </table:table-cell>
          <table:table-cell office:value-type="float" office:value="104.14976299989212" table:style-name="ce5">
            <text:p>104</text:p>
          </table:table-cell>
          <table:table-cell office:value-type="float" office:value="14853672299.999998" table:style-name="ce18">
            <text:p>14853672300</text:p>
          </table:table-cell>
          <table:table-cell office:value-type="float" office:value="41930.15147580226" table:formula="of:=[.BM103]/[.BK103]" table:style-name="ce55">
            <text:p>41930</text:p>
          </table:table-cell>
          <table:table-cell office:value-type="float" office:value="402.59478531742502" table:formula="of:=[.BN103]/[.BL103]" table:style-name="ce55">
            <text:p>403</text:p>
          </table:table-cell>
          <table:table-cell office:value-type="float" office:value="2.2592116501646764" table:formula="of:=[.CV103]/(([.BO103]+[.BJ103])/2)" table:style-name="ce58">
            <text:p>2.26</text:p>
          </table:table-cell>
          <table:table-cell office:value-type="float" office:value="5.4707763066615911" table:formula="of:=(([.BJ103]+[.BO103])*100/([.BJ102]+[.BO102]))-100" table:style-name="ce57">
            <text:p>5.5</text:p>
          </table:table-cell>
          <table:table-cell office:value-type="string" table:style-name="ce118">
            <text:p>null</text:p>
          </table:table-cell>
          <table:table-cell office:value-type="float" office:value="21033759" table:style-name="ce18">
            <text:p>21033759</text:p>
          </table:table-cell>
          <table:table-cell office:value-type="float" office:value="390090.63015306741" table:formula="of:=[.BS103]-[.BS102]" table:style-name="ce26">
            <text:p>390091</text:p>
          </table:table-cell>
          <table:table-cell office:value-type="float" office:value="452252" table:style-name="ce76">
            <text:p>452252</text:p>
          </table:table-cell>
          <table:table-cell office:value-type="float" office:value="53413" table:style-name="ce76">
            <text:p>53413</text:p>
          </table:table-cell>
          <table:table-cell office:value-type="float" office:value="1.9509242736878367" table:formula="of:=([.B103]/[.BS103])" table:style-name="ce34">
            <text:p>1.95</text:p>
          </table:table-cell>
          <table:table-cell office:value-type="float" office:value="2.86" table:style-name="ce71">
            <text:p>2.86</text:p>
          </table:table-cell>
          <table:table-cell office:value-type="float" office:value="1.23" table:style-name="ce71">
            <text:p>1.23</text:p>
          </table:table-cell>
          <table:table-cell office:value-type="float" office:value="1.8896381358404852" table:formula="of:=([.BS103]*100/[.BS102])-100" table:style-name="ce23">
            <text:p>1.9</text:p>
          </table:table-cell>
          <table:table-cell office:value-type="float" office:value="369726" table:formula="of:=([.B103]-[.B102])" table:style-name="ce73">
            <text:p>369726</text:p>
          </table:table-cell>
          <table:table-cell office:value-type="float" office:value="0.90918737225825907" table:formula="of:=([.B103]*100/[.B102])-100" table:style-name="ce25">
            <text:p>0.91</text:p>
          </table:table-cell>
          <table:table-cell office:value-type="float" office:value="260815.80497824223" table:formula="of:=[.BT103]-([.CA103]/[.BX103])" table:style-name="ce76">
            <text:p>260816</text:p>
          </table:table-cell>
          <table:table-cell office:value-type="float" office:value="1876000" table:style-name="ce78">
            <text:p>1876000</text:p>
          </table:table-cell>
          <table:table-cell office:value-type="float" office:value="42150.579999999994" table:style-name="ce8">
            <text:p>4215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92.5" table:style-name="ce8">
            <text:p>893</text:p>
          </table:table-cell>
          <table:table-cell office:value-type="float" office:value="63.440000000000005" table:style-name="ce78">
            <text:p>63</text:p>
          </table:table-cell>
          <table:table-cell office:value-type="string" table:style-name="ce118">
            <text:p>null</text:p>
          </table:table-cell>
          <table:table-cell office:value-type="float" office:value="3.5900000000000003" table:style-name="ce25">
            <text:p>3.59</text:p>
          </table:table-cell>
          <table:table-cell office:value-type="float" office:value="174.92000000000002" table:formula="of:=[.CZ102]+[.CY103]" table:style-name="ce23">
            <text:p>174.9</text:p>
          </table:table-cell>
          <table:table-cell office:value-type="float" office:value="423.18900000000002" table:formula="of:=(([.CV103]*[.CY103])/100)+[.DA102]" table:style-name="ce23">
            <text:p>423.2</text:p>
          </table:table-cell>
          <table:table-cell office:value-type="float" office:value="469.31099999999998" table:formula="of:=[.CV103]-[.DA103]" table:style-name="ce23">
            <text:p>469.3</text:p>
          </table:table-cell>
          <table:table-cell office:value-type="float" office:value="510.23324948547906" table:formula="of:=[.CV103]/[.CZ103]*[.$CZ$87]" table:style-name="ce23">
            <text:p>510.2</text:p>
          </table:table-cell>
          <table:table-cell office:value-type="float" office:value="-0.69641666666666691" table:formula="of:=([.Y103]-[.Y102])" table:style-name="ce25">
            <text:p>-0.70</text:p>
          </table:table-cell>
          <table:table-cell office:value-type="float" office:value="9.8884186225471353" table:formula="of:=([.CV103]*100/[.CV102])-100" table:style-name="ce25">
            <text:p>9.89</text:p>
          </table:table-cell>
          <table:table-cell office:value-type="float" office:value="6.2984186225471355" table:formula="of:=[.DE103]-[.CY103]" table:style-name="ce25">
            <text:p>6.30</text:p>
          </table:table-cell>
          <table:table-cell office:value-type="string" table:style-name="ce118">
            <text:p>null</text:p>
          </table:table-cell>
          <table:table-cell office:value-type="float" office:value="0.47" table:style-name="ce25">
            <text:p>0.47</text:p>
          </table:table-cell>
          <table:table-cell office:value-type="float" office:value="10.55" table:style-name="ce23">
            <text:p>10.6</text:p>
          </table:table-cell>
          <table:table-cell office:value-type="float" office:value="100" table:formula="of:=(([.DC103]-MIN([.DC89:.DC103]))/(MAX([.DC89:.DC103])-MIN([.DC89:.DC103])))*100" table:style-name="ce128">
            <text:p>100.0</text:p>
          </table:table-cell>
          <table:table-cell office:value-type="float" office:value="95.009343426345296" table:formula="of:=MIN(100; MAX(0; (([.K103]-([.C103]/26/2))/(([.C103]/26)-([.C103]/26/2)))*100))" table:style-name="ce128">
            <text:p>95.0</text:p>
          </table:table-cell>
          <table:table-cell office:value-type="string" table:style-name="ce118">
            <text:p>null</text:p>
          </table:table-cell>
          <table:table-cell office:value-type="float" office:value="8.1966938340170419" table:formula="of:=(([.AP103]-MIN([.$AP$2:.$AP$128]))/(MAX([.$AP$2:.$AP$128])-MIN([.$AP$2:.$AP$128])))*100" table:style-name="ce128">
            <text:p>8.2</text:p>
          </table:table-cell>
          <table:table-cell office:value-type="float" office:value="100" table:formula="of:=MIN(100;MAX(0;(([.BP103]-1.8)/(2.2-1.8))*100))" table:style-name="ce128">
            <text:p>100.0</text:p>
          </table:table-cell>
          <table:table-cell office:value-type="float" office:value="58.558089103434128" table:formula="of:=100-((([.CC103]-MIN([.CC74:.CC103]))/(MAX([.CC74:.CC103])-MIN([.CC74:.CC103])))*100)" table:style-name="ce128">
            <text:p>58.6</text:p>
          </table:table-cell>
          <table:table-cell office:value-type="float" office:value="14.45" table:formula="of:=MIN(100; MAX(0; ((IF(AND([.DI103]-[.DI102]&gt;=-0.3;[.DI103]-[.DI102]&lt;=0.3);100;IF(AND([.DI103]-[.DI102]&gt;-1;[.DI103]-[.DI102]&lt;-0.3);50;IF([.DI103]-[.DI102]&lt;=-1;25;75)))))-[.DI103]+(IF(([.DI103]-[.DI102])*([.DI102]-[.DI101])&lt;0;AVERAGE([.DI99:.DI103]);0))))" table:style-name="ce128">
            <text:p>14.5</text:p>
          </table:table-cell>
          <table:table-cell office:value-type="string" table:style-name="ce118">
            <text:p>null</text:p>
          </table:table-cell>
          <table:table-cell office:value-type="float" office:value="62.702354393966068" table:formula="of:=AVERAGE([.DJ103:.DP103])" table:style-name="ce128">
            <text:p>62.7</text:p>
          </table:table-cell>
          <table:table-cell office:value-type="float" office:value="376.36" table:formula="of:=-0.06*(([.A103]-1963)^2)+8.5*([.A103]-1963)+140" table:style-name="ce23">
            <text:p>376.4</text:p>
          </table:table-cell>
          <table:table-cell table:number-columns-repeated="16261"/>
        </table:table-row>
        <table:table-row table:style-name="ro2">
          <table:table-cell office:value-type="float" office:value="2002" table:style-name="ce15">
            <text:p>2002</text:p>
          </table:table-cell>
          <table:table-cell office:value-type="float" office:value="41827836" table:style-name="ce10">
            <text:p>41827836</text:p>
          </table:table-cell>
          <table:table-cell office:value-type="float" office:value="16984055" table:style-name="ce7">
            <text:p>16984055</text:p>
          </table:table-cell>
          <table:table-cell office:value-type="float" office:value="21681084" table:style-name="ce7">
            <text:p>21681084</text:p>
          </table:table-cell>
          <table:table-cell office:value-type="float" office:value="35117156" table:style-name="ce77">
            <text:p>3511715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90230" table:style-name="ce18">
            <text:p>690230</text:p>
          </table:table-cell>
          <table:table-cell office:value-type="float" office:value="460153.33333333331" table:formula="of:=[.K104]/1.5" table:style-name="ce24">
            <text:p>460153</text:p>
          </table:table-cell>
          <table:table-cell office:value-type="float" office:value="58985647000" table:style-name="ce84">
            <text:p>5.9E+10</text:p>
          </table:table-cell>
          <table:table-cell office:value-type="float" office:value="85457.958941222489" table:formula="of:=[.M104]/[.K104]" table:style-name="ce26">
            <text:p>8545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1.951689548942923" table:formula="of:=([.N104]*100)/([.CV104]*(([.BL104]*([.BK104]/([.BF104]+[.BK104])))+([.BG104]*([.BF104]/([.BF104]+[.BK104])))))" table:style-name="ce67">
            <text:p>71.95</text:p>
          </table:table-cell>
          <table:table-cell office:value-type="float" office:value="23.57767276584233" table:formula="of:=(([.M104]*100/[.M103])-100)-[.CY104]" table:style-name="ce28">
            <text:p>23.58</text:p>
          </table:table-cell>
          <table:table-cell office:value-type="float" office:value="235086000000" table:style-name="ce131">
            <text:p>2.35E+11</text:p>
          </table:table-cell>
          <table:table-cell office:value-type="float" office:value="4.7949999999999999" table:style-name="ce34">
            <text:p>4.8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3" table:style-name="ce96">
            <text:p>23</text:p>
          </table:table-cell>
          <table:table-cell office:value-type="float" office:value="3.4943" table:style-name="ce25">
            <text:p>3.49</text:p>
          </table:table-cell>
          <table:table-cell office:value-type="float" office:value="0.95054166666666662" table:style-name="ce71">
            <text:p>0.95</text:p>
          </table:table-cell>
          <table:table-cell office:value-type="float" office:value="5807825000000" table:style-name="ce85">
            <text:p>5.81E+12</text:p>
          </table:table-cell>
          <table:table-cell office:value-type="float" office:value="6.6294370372573468" table:formula="of:=([.AA104]*100/[.AA103])-100" table:style-name="ce70">
            <text:p>6.63</text:p>
          </table:table-cell>
          <table:table-cell office:value-type="string" table:style-name="ce118">
            <text:p>null</text:p>
          </table:table-cell>
          <table:table-cell office:value-type="float" office:value="329.95666666666665" table:style-name="ce76">
            <text:p>330</text:p>
          </table:table-cell>
          <table:table-cell office:value-type="float" office:value="749744000000" table:style-name="ce125">
            <text:p>7.49744E+11</text:p>
          </table:table-cell>
          <table:table-cell office:value-type="string" table:style-name="ce118">
            <text:p>null</text:p>
          </table:table-cell>
          <table:table-cell office:value-type="float" office:value="1864077600517.5" table:formula="of:=([.CV104]*[.BS104]*86)" table:style-name="ce125">
            <text:p>1.86408E+12</text:p>
          </table:table-cell>
          <table:table-cell office:value-type="float" office:value="471160000000" table:style-name="ce83">
            <text:p>4.71E+11</text:p>
          </table:table-cell>
          <table:table-cell office:value-type="float" office:value="13416.804025929663" table:formula="of:=[.AH104]/[.E104]" table:style-name="ce26">
            <text:p>13417</text:p>
          </table:table-cell>
          <table:table-cell office:value-type="float" office:value="12450.649068278666" table:formula="of:=[.AJ103]*(1+([.CY104]/100))" table:style-name="ce76">
            <text:p>12451</text:p>
          </table:table-cell>
          <table:table-cell office:value-type="float" office:value="18236.910289518291" table:formula="of:=[.AI104]+(12*PMT([.U104]/100/12;[.X104]*12;([.AI104]*5)*-1))" table:style-name="ce76">
            <text:p>18237</text:p>
          </table:table-cell>
          <table:table-cell office:value-type="float" office:value="13846.662928416283" table:formula="of:=[.AL103]*(1+(([.CW104]-[.CW103])/100))" table:style-name="ce76">
            <text:p>13847</text:p>
          </table:table-cell>
          <table:table-cell office:value-type="float" office:value="15558.260042631129" table:formula="of:=(([.AL104]+([.AJ104]-[.AI104])+([.AK104]-[.AI104]))-[.AI104])+[.$AI$101]" table:style-name="ce76">
            <text:p>15558</text:p>
          </table:table-cell>
          <table:table-cell office:value-type="float" office:value="101.70254008874679" table:formula="of:=[.AM104]*[.$AN$101]/[.$AM$101]" table:style-name="ce76">
            <text:p>102</text:p>
          </table:table-cell>
          <table:table-cell office:value-type="float" office:value="60.690944159985982" table:formula="of:=[.AI104]*[.$AO$101]/[.$AI$101]" table:style-name="ce76">
            <text:p>61</text:p>
          </table:table-cell>
          <table:table-cell office:value-type="float" office:value="11.17155584001403" table:formula="of:=[.CW104]-[.AO104]" table:style-name="ce118">
            <text:p>11</text:p>
          </table:table-cell>
          <table:table-cell office:value-type="float" office:value="17091.591788244499" table:formula="of:=[.N104]/5" table:style-name="ce26">
            <text:p>17092</text:p>
          </table:table-cell>
          <table:table-cell office:value-type="string" table:style-name="ce118">
            <text:p>null</text:p>
          </table:table-cell>
          <table:table-cell office:value-type="float" office:value="0.8" table:style-name="ce129">
            <text:p>0.8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6544" table:style-name="ce18">
            <text:p>136544</text:p>
          </table:table-cell>
          <table:table-cell office:value-type="float" office:value="82569" table:style-name="ce18">
            <text:p>82569</text:p>
          </table:table-cell>
          <table:table-cell office:value-type="float" office:value="50771" table:style-name="ce18">
            <text:p>50771</text:p>
          </table:table-cell>
          <table:table-cell office:value-type="float" office:value="3204" table:style-name="ce18">
            <text:p>3204</text:p>
          </table:table-cell>
          <table:table-cell office:value-type="float" office:value="461464" table:style-name="ce81">
            <text:p>461464</text:p>
          </table:table-cell>
          <table:table-cell office:value-type="float" office:value="103394" table:style-name="ce81">
            <text:p>103394</text:p>
          </table:table-cell>
          <table:table-cell office:value-type="float" office:value="10687" table:style-name="ce81">
            <text:p>10687</text:p>
          </table:table-cell>
          <table:table-cell office:value-type="float" office:value="145368" table:style-name="ce18">
            <text:p>145368</text:p>
          </table:table-cell>
          <table:table-cell office:value-type="float" office:value="154.80400172476095" table:style-name="ce5">
            <text:p>155</text:p>
          </table:table-cell>
          <table:table-cell office:value-type="float" office:value="9087576399.9999981" table:style-name="ce18">
            <text:p>9087576400</text:p>
          </table:table-cell>
          <table:table-cell office:value-type="float" office:value="62514.283748830538" table:formula="of:=[.BH104]/[.BF104]" table:style-name="ce51">
            <text:p>62514</text:p>
          </table:table-cell>
          <table:table-cell office:value-type="float" office:value="403.82860295808075" table:formula="of:=[.BI104]/[.BG104]" table:style-name="ce51">
            <text:p>404</text:p>
          </table:table-cell>
          <table:table-cell office:value-type="float" office:value="375292" table:style-name="ce18">
            <text:p>375292</text:p>
          </table:table-cell>
          <table:table-cell office:value-type="float" office:value="103.38487494805224" table:style-name="ce5">
            <text:p>103</text:p>
          </table:table-cell>
          <table:table-cell office:value-type="float" office:value="16380710700" table:style-name="ce18">
            <text:p>16380710700</text:p>
          </table:table-cell>
          <table:table-cell office:value-type="float" office:value="43647.908028948128" table:formula="of:=[.BM104]/[.BK104]" table:style-name="ce55">
            <text:p>43648</text:p>
          </table:table-cell>
          <table:table-cell office:value-type="float" office:value="422.1885266184234" table:formula="of:=[.BN104]/[.BL104]" table:style-name="ce55">
            <text:p>422</text:p>
          </table:table-cell>
          <table:table-cell office:value-type="float" office:value="2.4424432953761679" table:formula="of:=[.CV104]/(([.BO104]+[.BJ104])/2)" table:style-name="ce58">
            <text:p>2.44</text:p>
          </table:table-cell>
          <table:table-cell office:value-type="float" office:value="4.5460796848640541" table:formula="of:=(([.BJ104]+[.BO104])*100/([.BJ103]+[.BO103]))-100" table:style-name="ce57">
            <text:p>4.5</text:p>
          </table:table-cell>
          <table:table-cell office:value-type="string" table:style-name="ce118">
            <text:p>null</text:p>
          </table:table-cell>
          <table:table-cell office:value-type="float" office:value="21487307" table:style-name="ce8">
            <text:p>21487307</text:p>
          </table:table-cell>
          <table:table-cell office:value-type="float" office:value="453548" table:formula="of:=[.BS104]-[.BS103]" table:style-name="ce26">
            <text:p>453548</text:p>
          </table:table-cell>
          <table:table-cell office:value-type="float" office:value="480729" table:style-name="ce76">
            <text:p>480729</text:p>
          </table:table-cell>
          <table:table-cell office:value-type="float" office:value="37544" table:style-name="ce76">
            <text:p>37544</text:p>
          </table:table-cell>
          <table:table-cell office:value-type="float" office:value="1.9466299802018001" table:formula="of:=([.B104]/[.BS104])" table:style-name="ce34">
            <text:p>1.95</text:p>
          </table:table-cell>
          <table:table-cell office:value-type="float" office:value="2.86" table:style-name="ce71">
            <text:p>2.86</text:p>
          </table:table-cell>
          <table:table-cell office:value-type="float" office:value="1.252" table:style-name="ce71">
            <text:p>1.25</text:p>
          </table:table-cell>
          <table:table-cell office:value-type="float" office:value="2.1562859971914605" table:formula="of:=([.BS104]*100/[.BS103])-100" table:style-name="ce23">
            <text:p>2.2</text:p>
          </table:table-cell>
          <table:table-cell office:value-type="float" office:value="792565" table:formula="of:=([.B104]-[.B103])" table:style-name="ce73">
            <text:p>792565</text:p>
          </table:table-cell>
          <table:table-cell office:value-type="float" office:value="1.9314238231788465" table:formula="of:=([.B104]*100/[.B103])-100" table:style-name="ce25">
            <text:p>1.93</text:p>
          </table:table-cell>
          <table:table-cell office:value-type="float" office:value="176427.37062937062" table:formula="of:=[.BT104]-([.CA104]/[.BX104])" table:style-name="ce76">
            <text:p>176427</text:p>
          </table:table-cell>
          <table:table-cell office:value-type="float" office:value="1981000" table:style-name="ce78">
            <text:p>1981000</text:p>
          </table:table-cell>
          <table:table-cell office:value-type="float" office:value="44119.82" table:style-name="ce8">
            <text:p>4412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008.75" table:style-name="ce8">
            <text:p>1009</text:p>
          </table:table-cell>
          <table:table-cell office:value-type="float" office:value="71.862500000000011" table:style-name="ce78">
            <text:p>72</text:p>
          </table:table-cell>
          <table:table-cell office:value-type="string" table:style-name="ce118">
            <text:p>null</text:p>
          </table:table-cell>
          <table:table-cell office:value-type="float" office:value="3.0700000000000003" table:style-name="ce25">
            <text:p>3.07</text:p>
          </table:table-cell>
          <table:table-cell office:value-type="float" office:value="177.99" table:formula="of:=[.CZ103]+[.CY104]" table:style-name="ce23">
            <text:p>178.0</text:p>
          </table:table-cell>
          <table:table-cell office:value-type="float" office:value="454.15762500000005" table:formula="of:=(([.CV104]*[.CY104])/100)+[.DA103]" table:style-name="ce23">
            <text:p>454.2</text:p>
          </table:table-cell>
          <table:table-cell office:value-type="float" office:value="554.59237499999995" table:formula="of:=[.CV104]-[.DA104]" table:style-name="ce23">
            <text:p>554.6</text:p>
          </table:table-cell>
          <table:table-cell office:value-type="float" office:value="566.74532277094215" table:formula="of:=[.CV104]/[.CZ104]*[.$CZ$87]" table:style-name="ce23">
            <text:p>566.7</text:p>
          </table:table-cell>
          <table:table-cell office:value-type="float" office:value="-0.58236666666666714" table:formula="of:=([.Y104]-[.Y103])" table:style-name="ce25">
            <text:p>-0.58</text:p>
          </table:table-cell>
          <table:table-cell office:value-type="float" office:value="13.025210084033617" table:formula="of:=([.CV104]*100/[.CV103])-100" table:style-name="ce25">
            <text:p>13.03</text:p>
          </table:table-cell>
          <table:table-cell office:value-type="float" office:value="9.9552100840336166" table:formula="of:=[.DE104]-[.CY104]" table:style-name="ce25">
            <text:p>9.96</text:p>
          </table:table-cell>
          <table:table-cell office:value-type="string" table:style-name="ce118">
            <text:p>null</text:p>
          </table:table-cell>
          <table:table-cell office:value-type="float" office:value="12.1" table:style-name="ce25">
            <text:p>12.10</text:p>
          </table:table-cell>
          <table:table-cell office:value-type="float" office:value="11.45" table:style-name="ce23">
            <text:p>11.5</text:p>
          </table:table-cell>
          <table:table-cell office:value-type="float" office:value="100" table:formula="of:=(([.DC104]-MIN([.DC90:.DC104]))/(MAX([.DC90:.DC104])-MIN([.DC90:.DC104])))*100" table:style-name="ce128">
            <text:p>100.0</text:p>
          </table:table-cell>
          <table:table-cell office:value-type="float" office:value="100" table:formula="of:=MIN(100; MAX(0; (([.K104]-([.C104]/26/2))/(([.C104]/26)-([.C104]/26/2)))*100))" table:style-name="ce128">
            <text:p>100.0</text:p>
          </table:table-cell>
          <table:table-cell office:value-type="string" table:style-name="ce118">
            <text:p>null</text:p>
          </table:table-cell>
          <table:table-cell office:value-type="float" office:value="18.191292196726273" table:formula="of:=(([.AP104]-MIN([.$AP$2:.$AP$128]))/(MAX([.$AP$2:.$AP$128])-MIN([.$AP$2:.$AP$128])))*100" table:style-name="ce128">
            <text:p>18.2</text:p>
          </table:table-cell>
          <table:table-cell office:value-type="float" office:value="100" table:formula="of:=MIN(100;MAX(0;(([.BP104]-1.8)/(2.2-1.8))*100))" table:style-name="ce128">
            <text:p>100.0</text:p>
          </table:table-cell>
          <table:table-cell office:value-type="float" office:value="91.160322842315253" table:formula="of:=100-((([.CC104]-MIN([.CC75:.CC104]))/(MAX([.CC75:.CC104])-MIN([.CC75:.CC104])))*100)" table:style-name="ce128">
            <text:p>91.2</text:p>
          </table:table-cell>
          <table:table-cell office:value-type="float" office:value="77.573999999999998" table:formula="of:=MIN(100; MAX(0; ((IF(AND([.DI104]-[.DI103]&gt;=-0.3;[.DI104]-[.DI103]&lt;=0.3);100;IF(AND([.DI104]-[.DI103]&gt;-1;[.DI104]-[.DI103]&lt;-0.3);50;IF([.DI104]-[.DI103]&lt;=-1;25;75)))))-[.DI104]+(IF(([.DI104]-[.DI103])*([.DI103]-[.DI102])&lt;0;AVERAGE([.DI100:.DI104]);0))))" table:style-name="ce128">
            <text:p>77.6</text:p>
          </table:table-cell>
          <table:table-cell office:value-type="string" table:style-name="ce118">
            <text:p>null</text:p>
          </table:table-cell>
          <table:table-cell office:value-type="float" office:value="81.154269173173603" table:formula="of:=AVERAGE([.DJ104:.DP104])" table:style-name="ce128">
            <text:p>81.2</text:p>
          </table:table-cell>
          <table:table-cell office:value-type="float" office:value="380.24" table:formula="of:=-0.06*(([.A104]-1963)^2)+8.5*([.A104]-1963)+140" table:style-name="ce23">
            <text:p>380.2</text:p>
          </table:table-cell>
          <table:table-cell table:number-columns-repeated="16261"/>
        </table:table-row>
        <table:table-row table:style-name="ro2">
          <table:table-cell office:value-type="float" office:value="2003" table:style-name="ce15">
            <text:p>2003</text:p>
          </table:table-cell>
          <table:table-cell office:value-type="float" office:value="42547454" table:style-name="ce10">
            <text:p>42547454</text:p>
          </table:table-cell>
          <table:table-cell office:value-type="float" office:value="17468532" table:style-name="ce8">
            <text:p>17468532</text:p>
          </table:table-cell>
          <table:table-cell office:value-type="float" office:value="22312467" table:style-name="ce8">
            <text:p>22312467</text:p>
          </table:table-cell>
          <table:table-cell office:value-type="float" office:value="35758936" table:style-name="ce78">
            <text:p>35758936</text:p>
          </table:table-cell>
          <table:table-cell office:value-type="float" office:value="619193.03303763864" table:formula="of:=([.F106]*(([.K105]*100/[.K106])/100))" table:style-name="ce24">
            <text:p>619193</text:p>
          </table:table-cell>
          <table:table-cell office:value-type="float" office:value="116138.90786547" table:formula="of:=[.G106]*0.97" table:style-name="ce24">
            <text:p>11613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989439" table:style-name="ce18">
            <text:p>989439</text:p>
          </table:table-cell>
          <table:table-cell office:value-type="float" office:value="494719.5" table:formula="of:=[.K105]/2" table:style-name="ce24">
            <text:p>494720</text:p>
          </table:table-cell>
          <table:table-cell office:value-type="float" office:value="96175561000" table:style-name="ce84">
            <text:p>9.6E+10</text:p>
          </table:table-cell>
          <table:table-cell office:value-type="float" office:value="97202.112510220439" table:formula="of:=[.M105]/[.K105]" table:style-name="ce26">
            <text:p>9720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1.92526823141624" table:formula="of:=([.N105]*100)/([.CV105]*(([.BL105]*([.BK105]/([.BF105]+[.BK105])))+([.BG105]*([.BF105]/([.BF105]+[.BK105])))))" table:style-name="ce67">
            <text:p>71.93</text:p>
          </table:table-cell>
          <table:table-cell office:value-type="float" office:value="60.009090569439728" table:formula="of:=(([.M105]*100/[.M104])-100)-[.CY105]" table:style-name="ce28">
            <text:p>60.01</text:p>
          </table:table-cell>
          <table:table-cell office:value-type="float" office:value="275958000000" table:style-name="ce131">
            <text:p>2.76E+11</text:p>
          </table:table-cell>
          <table:table-cell office:value-type="float" office:value="3.7130000000000001" table:style-name="ce28">
            <text:p>3.71</text:p>
          </table:table-cell>
          <table:table-cell office:value-type="float" office:value="2.9" table:style-name="ce28">
            <text:p>2.90</text:p>
          </table:table-cell>
          <table:table-cell office:value-type="float" office:value="97.1" table:formula="of:=100-[.V105]" table:style-name="ce28">
            <text:p>97.10</text:p>
          </table:table-cell>
          <table:table-cell office:value-type="float" office:value="23" table:style-name="ce60">
            <text:p>23</text:p>
          </table:table-cell>
          <table:table-cell office:value-type="float" office:value="2.3030454545454542" table:style-name="ce28">
            <text:p>2.30</text:p>
          </table:table-cell>
          <table:table-cell office:value-type="float" office:value="1.1417416666666667" table:style-name="ce72">
            <text:p>1.14</text:p>
          </table:table-cell>
          <table:table-cell office:value-type="float" office:value="6180922000000" table:style-name="ce85">
            <text:p>6.18E+12</text:p>
          </table:table-cell>
          <table:table-cell office:value-type="float" office:value="6.4240399805434976" table:formula="of:=([.AA105]*100/[.AA104])-100" table:style-name="ce70">
            <text:p>6.42</text:p>
          </table:table-cell>
          <table:table-cell office:value-type="string" table:style-name="ce118">
            <text:p>null</text:p>
          </table:table-cell>
          <table:table-cell office:value-type="float" office:value="322.245" table:style-name="ce75">
            <text:p>322</text:p>
          </table:table-cell>
          <table:table-cell office:value-type="float" office:value="802683000000" table:style-name="ce125">
            <text:p>8.02683E+11</text:p>
          </table:table-cell>
          <table:table-cell office:value-type="string" table:style-name="ce118">
            <text:p>null</text:p>
          </table:table-cell>
          <table:table-cell office:value-type="float" office:value="2199753278919.375" table:formula="of:=([.CV105]*[.BS105]*86)" table:style-name="ce125">
            <text:p>2.19975E+12</text:p>
          </table:table-cell>
          <table:table-cell office:value-type="float" office:value="505146000000" table:style-name="ce83">
            <text:p>5.05E+11</text:p>
          </table:table-cell>
          <table:table-cell office:value-type="float" office:value="14126.42702791828" table:formula="of:=[.AH105]/[.E105]" table:style-name="ce26">
            <text:p>14126</text:p>
          </table:table-cell>
          <table:table-cell office:value-type="float" office:value="12829.148799954337" table:formula="of:=[.AJ104]*(1+([.CY105]/100))" table:style-name="ce76">
            <text:p>12829</text:p>
          </table:table-cell>
          <table:table-cell office:value-type="float" office:value="18697.553223895895" table:formula="of:=[.AI105]+(12*PMT([.U105]/100/12;[.X105]*12;([.AI105]*5)*-1))" table:style-name="ce76">
            <text:p>18698</text:p>
          </table:table-cell>
          <table:table-cell office:value-type="float" office:value="15153.787908858778" table:formula="of:=[.AL104]*(1+(([.CW105]-[.CW104])/100))" table:style-name="ce76">
            <text:p>15154</text:p>
          </table:table-cell>
          <table:table-cell office:value-type="float" office:value="15575.658683161048" table:formula="of:=(([.AL105]+([.AJ105]-[.AI105])+([.AK105]-[.AI105]))-[.AI105])+[.$AI$101]" table:style-name="ce76">
            <text:p>15576</text:p>
          </table:table-cell>
          <table:table-cell office:value-type="float" office:value="101.81627298247237" table:formula="of:=[.AM105]*[.$AN$101]/[.$AM$101]" table:style-name="ce76">
            <text:p>102</text:p>
          </table:table-cell>
          <table:table-cell office:value-type="float" office:value="63.900925456954987" table:formula="of:=[.AI105]*[.$AO$101]/[.$AI$101]" table:style-name="ce76">
            <text:p>64</text:p>
          </table:table-cell>
          <table:table-cell office:value-type="float" office:value="17.401574543045008" table:formula="of:=[.CW105]-[.AO105]" table:style-name="ce118">
            <text:p>17</text:p>
          </table:table-cell>
          <table:table-cell office:value-type="float" office:value="19440.422502044086" table:formula="of:=[.N105]/5" table:style-name="ce26">
            <text:p>19440</text:p>
          </table:table-cell>
          <table:table-cell office:value-type="string" table:style-name="ce118">
            <text:p>null</text:p>
          </table:table-cell>
          <table:table-cell office:value-type="float" office:value="0.8" table:style-name="ce129">
            <text:p>0.8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2785" table:style-name="ce18">
            <text:p>152785</text:p>
          </table:table-cell>
          <table:table-cell office:value-type="float" office:value="94476" table:style-name="ce18">
            <text:p>94476</text:p>
          </table:table-cell>
          <table:table-cell office:value-type="float" office:value="54505" table:style-name="ce18">
            <text:p>54505</text:p>
          </table:table-cell>
          <table:table-cell office:value-type="float" office:value="3804" table:style-name="ce18">
            <text:p>3804</text:p>
          </table:table-cell>
          <table:table-cell office:value-type="float" office:value="560775" table:style-name="ce81">
            <text:p>560775</text:p>
          </table:table-cell>
          <table:table-cell office:value-type="float" office:value="118531" table:style-name="ce81">
            <text:p>118531</text:p>
          </table:table-cell>
          <table:table-cell office:value-type="float" office:value="10900" table:style-name="ce81">
            <text:p>10900</text:p>
          </table:table-cell>
          <table:table-cell office:value-type="float" office:value="183411" table:style-name="ce18">
            <text:p>183411</text:p>
          </table:table-cell>
          <table:table-cell office:value-type="float" office:value="151.72747698417351" table:style-name="ce5">
            <text:p>152</text:p>
          </table:table-cell>
          <table:table-cell office:value-type="float" office:value="11731425600" table:style-name="ce18">
            <text:p>11731425600</text:p>
          </table:table-cell>
          <table:table-cell office:value-type="float" office:value="63962.497342035102" table:formula="of:=[.BH105]/[.BF105]" table:style-name="ce51">
            <text:p>63962</text:p>
          </table:table-cell>
          <table:table-cell office:value-type="float" office:value="421.56172773311812" table:formula="of:=[.BI105]/[.BG105]" table:style-name="ce51">
            <text:p>422</text:p>
          </table:table-cell>
          <table:table-cell office:value-type="float" office:value="448260" table:style-name="ce18">
            <text:p>448260</text:p>
          </table:table-cell>
          <table:table-cell office:value-type="float" office:value="101.16659898776612" table:style-name="ce5">
            <text:p>101</text:p>
          </table:table-cell>
          <table:table-cell office:value-type="float" office:value="20112128800" table:style-name="ce18">
            <text:p>20112128800</text:p>
          </table:table-cell>
          <table:table-cell office:value-type="float" office:value="44867.105697586223" table:formula="of:=[.BM105]/[.BK105]" table:style-name="ce55">
            <text:p>44867</text:p>
          </table:table-cell>
          <table:table-cell office:value-type="float" office:value="443.49722286316961" table:formula="of:=[.BN105]/[.BL105]" table:style-name="ce55">
            <text:p>443</text:p>
          </table:table-cell>
          <table:table-cell office:value-type="float" office:value="2.6970705272649567" table:formula="of:=[.CV105]/(([.BO105]+[.BJ105])/2)" table:style-name="ce58">
            <text:p>2.70</text:p>
          </table:table-cell>
          <table:table-cell office:value-type="float" office:value="4.7265146958635285" table:formula="of:=(([.BJ105]+[.BO105])*100/([.BJ104]+[.BO104]))-100" table:style-name="ce57">
            <text:p>4.7</text:p>
          </table:table-cell>
          <table:table-cell office:value-type="string" table:style-name="ce118">
            <text:p>null</text:p>
          </table:table-cell>
          <table:table-cell office:value-type="float" office:value="21926409" table:style-name="ce8">
            <text:p>21926409</text:p>
          </table:table-cell>
          <table:table-cell office:value-type="float" office:value="439102" table:formula="of:=[.BS105]-[.BS104]" table:style-name="ce26">
            <text:p>439102</text:p>
          </table:table-cell>
          <table:table-cell office:value-type="float" office:value="462730" table:style-name="ce76">
            <text:p>462730</text:p>
          </table:table-cell>
          <table:table-cell office:value-type="float" office:value="40994" table:style-name="ce76">
            <text:p>40994</text:p>
          </table:table-cell>
          <table:table-cell office:value-type="float" office:value="1.9404661292234402" table:formula="of:=([.B105]/[.BS105])" table:style-name="ce34">
            <text:p>1.94</text:p>
          </table:table-cell>
          <table:table-cell office:value-type="float" office:value="2.82" table:style-name="ce71">
            <text:p>2.82</text:p>
          </table:table-cell>
          <table:table-cell office:value-type="float" office:value="1.296" table:style-name="ce71">
            <text:p>1.30</text:p>
          </table:table-cell>
          <table:table-cell office:value-type="float" office:value="2.0435413334951704" table:formula="of:=([.BS105]*100/[.BS104])-100" table:style-name="ce23">
            <text:p>2.0</text:p>
          </table:table-cell>
          <table:table-cell office:value-type="float" office:value="719618" table:formula="of:=([.B105]-[.B104])" table:style-name="ce73">
            <text:p>719618</text:p>
          </table:table-cell>
          <table:table-cell office:value-type="float" office:value="1.7204284725607124" table:formula="of:=([.B105]*100/[.B104])-100" table:style-name="ce25">
            <text:p>1.72</text:p>
          </table:table-cell>
          <table:table-cell office:value-type="float" office:value="183918.31205673757" table:formula="of:=[.BT105]-([.CA105]/[.BX105])" table:style-name="ce76">
            <text:p>183918</text:p>
          </table:table-cell>
          <table:table-cell office:value-type="float" office:value="2102000" table:style-name="ce78">
            <text:p>2102000</text:p>
          </table:table-cell>
          <table:table-cell office:value-type="float" office:value="46223.24" table:style-name="ce8">
            <text:p>4622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66.5625" table:style-name="ce8">
            <text:p>1167</text:p>
          </table:table-cell>
          <table:table-cell office:value-type="float" office:value="81.302499999999995" table:style-name="ce78">
            <text:p>81</text:p>
          </table:table-cell>
          <table:table-cell office:value-type="string" table:style-name="ce118">
            <text:p>null</text:p>
          </table:table-cell>
          <table:table-cell office:value-type="float" office:value="3.04" table:style-name="ce25">
            <text:p>3.04</text:p>
          </table:table-cell>
          <table:table-cell office:value-type="float" office:value="181.03" table:formula="of:=[.CZ104]+[.CY105]" table:style-name="ce23">
            <text:p>181.0</text:p>
          </table:table-cell>
          <table:table-cell office:value-type="float" office:value="489.62112500000006" table:formula="of:=(([.CV105]*[.CY105])/100)+[.DA104]" table:style-name="ce23">
            <text:p>489.6</text:p>
          </table:table-cell>
          <table:table-cell office:value-type="float" office:value="676.94137499999988" table:formula="of:=[.CV105]-[.DA105]" table:style-name="ce23">
            <text:p>676.9</text:p>
          </table:table-cell>
          <table:table-cell office:value-type="float" office:value="644.40286140418721" table:formula="of:=[.CV105]/[.CZ105]*[.$CZ$87]" table:style-name="ce23">
            <text:p>644.4</text:p>
          </table:table-cell>
          <table:table-cell office:value-type="float" office:value="-1.1912545454545458" table:formula="of:=([.Y105]-[.Y104])" table:style-name="ce25">
            <text:p>-1.19</text:p>
          </table:table-cell>
          <table:table-cell office:value-type="float" office:value="15.644361833952914" table:formula="of:=([.CV105]*100/[.CV104])-100" table:style-name="ce25">
            <text:p>15.64</text:p>
          </table:table-cell>
          <table:table-cell office:value-type="float" office:value="12.604361833952915" table:formula="of:=[.DE105]-[.CY105]" table:style-name="ce25">
            <text:p>12.60</text:p>
          </table:table-cell>
          <table:table-cell office:value-type="string" table:style-name="ce118">
            <text:p>null</text:p>
          </table:table-cell>
          <table:table-cell office:value-type="float" office:value="14.45" table:style-name="ce25">
            <text:p>14.45</text:p>
          </table:table-cell>
          <table:table-cell office:value-type="float" office:value="11.49" table:style-name="ce23">
            <text:p>11.5</text:p>
          </table:table-cell>
          <table:table-cell office:value-type="float" office:value="100" table:formula="of:=(([.DC105]-MIN([.DC91:.DC105]))/(MAX([.DC91:.DC105])-MIN([.DC91:.DC105])))*100" table:style-name="ce128">
            <text:p>100.0</text:p>
          </table:table-cell>
          <table:table-cell office:value-type="float" office:value="100" table:formula="of:=MIN(100; MAX(0; (([.K105]-([.C105]/26/2))/(([.C105]/26)-([.C105]/26/2)))*100))" table:style-name="ce128">
            <text:p>100.0</text:p>
          </table:table-cell>
          <table:table-cell office:value-type="float" office:value="84.320226324439901" table:formula="of:=MIN(100; MAX(0; (([.F105]-([.C105]/26/2))/(([.C105]/26)-([.C105]/26/2)))*100))" table:style-name="ce128">
            <text:p>84.3</text:p>
          </table:table-cell>
          <table:table-cell office:value-type="float" office:value="27.966308996866946" table:formula="of:=(([.AP105]-MIN([.$AP$2:.$AP$128]))/(MAX([.$AP$2:.$AP$128])-MIN([.$AP$2:.$AP$128])))*100" table:style-name="ce128">
            <text:p>28.0</text:p>
          </table:table-cell>
          <table:table-cell office:value-type="float" office:value="100" table:formula="of:=MIN(100;MAX(0;(([.BP105]-1.8)/(2.2-1.8))*100))" table:style-name="ce128">
            <text:p>100.0</text:p>
          </table:table-cell>
          <table:table-cell office:value-type="float" office:value="88.266307504506685" table:formula="of:=100-((([.CC105]-MIN([.CC76:.CC105]))/(MAX([.CC76:.CC105])-MIN([.CC76:.CC105])))*100)" table:style-name="ce128">
            <text:p>88.3</text:p>
          </table:table-cell>
          <table:table-cell office:value-type="float" office:value="88.51" table:formula="of:=MIN(100; MAX(0; ((IF(AND([.DI105]-[.DI104]&gt;=-0.3;[.DI105]-[.DI104]&lt;=0.3);100;IF(AND([.DI105]-[.DI104]&gt;-1;[.DI105]-[.DI104]&lt;-0.3);50;IF([.DI105]-[.DI104]&lt;=-1;25;75)))))-[.DI105]+(IF(([.DI105]-[.DI104])*([.DI104]-[.DI103])&lt;0;AVERAGE([.DI101:.DI105]);0))))" table:style-name="ce128">
            <text:p>88.5</text:p>
          </table:table-cell>
          <table:table-cell office:value-type="string" table:style-name="ce118">
            <text:p>null</text:p>
          </table:table-cell>
          <table:table-cell office:value-type="float" office:value="84.151834689401923" table:formula="of:=AVERAGE([.DJ105:.DP105])" table:style-name="ce128">
            <text:p>84.2</text:p>
          </table:table-cell>
          <table:table-cell office:value-type="float" office:value="384" table:formula="of:=-0.06*(([.A105]-1963)^2)+8.5*([.A105]-1963)+140" table:style-name="ce23">
            <text:p>384.0</text:p>
          </table:table-cell>
          <table:table-cell table:number-columns-repeated="16261"/>
        </table:table-row>
        <table:table-row table:style-name="ro2">
          <table:table-cell office:value-type="float" office:value="2004" table:style-name="ce15">
            <text:p>2004</text:p>
          </table:table-cell>
          <table:table-cell office:value-type="float" office:value="43296335" table:style-name="ce10">
            <text:p>43296335</text:p>
          </table:table-cell>
          <table:table-cell office:value-type="float" office:value="17953604" table:style-name="ce8">
            <text:p>17953604</text:p>
          </table:table-cell>
          <table:table-cell office:value-type="float" office:value="22889245" table:style-name="ce8">
            <text:p>22889245</text:p>
          </table:table-cell>
          <table:table-cell office:value-type="float" office:value="36439755" table:style-name="ce78">
            <text:p>36439755</text:p>
          </table:table-cell>
          <table:table-cell office:value-type="float" office:value="693178.48977713939" table:formula="of:=([.F107]*(([.K106]*100/[.K107])/100))" table:style-name="ce24">
            <text:p>693178</text:p>
          </table:table-cell>
          <table:table-cell office:value-type="float" office:value="119730.832851" table:formula="of:=[.G107]*0.97" table:style-name="ce24">
            <text:p>11973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107664" table:style-name="ce18">
            <text:p>1107664</text:p>
          </table:table-cell>
          <table:table-cell office:value-type="float" office:value="553832" table:formula="of:=[.K106]/2" table:style-name="ce24">
            <text:p>553832</text:p>
          </table:table-cell>
          <table:table-cell office:value-type="float" office:value="122147451000" table:style-name="ce84">
            <text:p>1.2E+11</text:p>
          </table:table-cell>
          <table:table-cell office:value-type="float" office:value="110274.82250935302" table:formula="of:=[.M106]/[.K106]" table:style-name="ce26">
            <text:p>11027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69.044245349399446" table:formula="of:=([.N106]*100)/([.CV106]*(([.BL106]*([.BK106]/([.BF106]+[.BK106])))+([.BG106]*([.BF106]/([.BF106]+[.BK106])))))" table:style-name="ce67">
            <text:p>69.04</text:p>
          </table:table-cell>
          <table:table-cell office:value-type="float" office:value="23.964667017226965" table:formula="of:=(([.M106]*100/[.M105])-100)-[.CY106]" table:style-name="ce28">
            <text:p>23.96</text:p>
          </table:table-cell>
          <table:table-cell office:value-type="float" office:value="333826000000" table:style-name="ce131">
            <text:p>3.34E+11</text:p>
          </table:table-cell>
          <table:table-cell office:value-type="float" office:value="3.3559999999999999" table:style-name="ce28">
            <text:p>3.36</text:p>
          </table:table-cell>
          <table:table-cell office:value-type="float" office:value="2.9" table:style-name="ce28">
            <text:p>2.90</text:p>
          </table:table-cell>
          <table:table-cell office:value-type="float" office:value="97.1" table:formula="of:=100-[.V106]" table:style-name="ce28">
            <text:p>97.10</text:p>
          </table:table-cell>
          <table:table-cell office:value-type="float" office:value="24" table:style-name="ce60">
            <text:p>24</text:p>
          </table:table-cell>
          <table:table-cell office:value-type="float" office:value="2.2788909090909093" table:style-name="ce28">
            <text:p>2.28</text:p>
          </table:table-cell>
          <table:table-cell office:value-type="float" office:value="1.2492083333333335" table:style-name="ce72">
            <text:p>1.25</text:p>
          </table:table-cell>
          <table:table-cell office:value-type="float" office:value="6568176000000" table:style-name="ce85">
            <text:p>6.57E+12</text:p>
          </table:table-cell>
          <table:table-cell office:value-type="float" office:value="6.2653112270305371" table:formula="of:=([.AA106]*100/[.AA105])-100" table:style-name="ce70">
            <text:p>6.27</text:p>
          </table:table-cell>
          <table:table-cell office:value-type="string" table:style-name="ce118">
            <text:p>null</text:p>
          </table:table-cell>
          <table:table-cell office:value-type="float" office:value="328.96749999999997" table:style-name="ce75">
            <text:p>329</text:p>
          </table:table-cell>
          <table:table-cell office:value-type="float" office:value="860059000000" table:style-name="ce125">
            <text:p>8.60059E+11</text:p>
          </table:table-cell>
          <table:table-cell office:value-type="string" table:style-name="ce118">
            <text:p>null</text:p>
          </table:table-cell>
          <table:table-cell office:value-type="float" office:value="2612966195906.25" table:formula="of:=([.CV106]*[.BS106]*86)" table:style-name="ce125">
            <text:p>2.61297E+12</text:p>
          </table:table-cell>
          <table:table-cell office:value-type="float" office:value="533211000000" table:style-name="ce83">
            <text:p>5.33E+11</text:p>
          </table:table-cell>
          <table:table-cell office:value-type="float" office:value="14632.672475432395" table:formula="of:=[.AH106]/[.E106]" table:style-name="ce26">
            <text:p>14633</text:p>
          </table:table-cell>
          <table:table-cell office:value-type="float" office:value="13219.154923472948" table:formula="of:=[.AJ105]*(1+([.CY106]/100))" table:style-name="ce76">
            <text:p>13219</text:p>
          </table:table-cell>
          <table:table-cell office:value-type="float" office:value="19075.914281493675" table:formula="of:=[.AI106]+(12*PMT([.U106]/100/12;[.X106]*12;([.AI106]*5)*-1))" table:style-name="ce76">
            <text:p>19076</text:p>
          </table:table-cell>
          <table:table-cell office:value-type="float" office:value="16769.560544640844" table:formula="of:=[.AL105]*(1+(([.CW106]-[.CW105])/100))" table:style-name="ce76">
            <text:p>16770</text:p>
          </table:table-cell>
          <table:table-cell office:value-type="float" office:value="16441.062157517161" table:formula="of:=(([.AL106]+([.AJ106]-[.AI106])+([.AK106]-[.AI106]))-[.AI106])+[.$AI$101]" table:style-name="ce76">
            <text:p>16441</text:p>
          </table:table-cell>
          <table:table-cell office:value-type="float" office:value="107.47331504903234" table:formula="of:=[.AM106]*[.$AN$101]/[.$AM$101]" table:style-name="ce76">
            <text:p>107</text:p>
          </table:table-cell>
          <table:table-cell office:value-type="float" office:value="66.190927914093606" table:formula="of:=[.AI106]*[.$AO$101]/[.$AI$101]" table:style-name="ce76">
            <text:p>66</text:p>
          </table:table-cell>
          <table:table-cell office:value-type="float" office:value="25.774072085906383" table:formula="of:=[.CW106]-[.AO106]" table:style-name="ce118">
            <text:p>26</text:p>
          </table:table-cell>
          <table:table-cell office:value-type="float" office:value="22054.964501870603" table:formula="of:=[.N106]/5" table:style-name="ce26">
            <text:p>22055</text:p>
          </table:table-cell>
          <table:table-cell office:value-type="float" office:value="227" table:style-name="ce8">
            <text:p>227</text:p>
          </table:table-cell>
          <table:table-cell office:value-type="float" office:value="0.85" table:style-name="ce129">
            <text:p>0.85</text:p>
          </table:table-cell>
          <table:table-cell office:value-type="float" office:value="86898" table:style-name="ce18">
            <text:p>86898</text:p>
          </table:table-cell>
          <table:table-cell office:value-type="float" office:value="61681" table:style-name="ce78">
            <text:p>61681</text:p>
          </table:table-cell>
          <table:table-cell office:value-type="float" office:value="55157.5" table:style-name="ce78">
            <text:p>55158</text:p>
          </table:table-cell>
          <table:table-cell office:value-type="float" office:value="4158.68" table:style-name="ce93">
            <text:p>4159</text:p>
          </table:table-cell>
          <table:table-cell office:value-type="string" table:style-name="ce118">
            <text:p>null</text:p>
          </table:table-cell>
          <table:table-cell office:value-type="float" office:value="166437" table:style-name="ce18">
            <text:p>166437</text:p>
          </table:table-cell>
          <table:table-cell office:value-type="float" office:value="102121" table:style-name="ce18">
            <text:p>102121</text:p>
          </table:table-cell>
          <table:table-cell office:value-type="float" office:value="59594" table:style-name="ce18">
            <text:p>59594</text:p>
          </table:table-cell>
          <table:table-cell office:value-type="float" office:value="4722" table:style-name="ce18">
            <text:p>4722</text:p>
          </table:table-cell>
          <table:table-cell office:value-type="float" office:value="609752" table:style-name="ce81">
            <text:p>609752</text:p>
          </table:table-cell>
          <table:table-cell office:value-type="float" office:value="121961" table:style-name="ce81">
            <text:p>121961</text:p>
          </table:table-cell>
          <table:table-cell office:value-type="float" office:value="7945" table:style-name="ce81">
            <text:p>7945</text:p>
          </table:table-cell>
          <table:table-cell office:value-type="float" office:value="186728" table:style-name="ce18">
            <text:p>186728</text:p>
          </table:table-cell>
          <table:table-cell office:value-type="float" office:value="158.916614292796" table:style-name="ce5">
            <text:p>159</text:p>
          </table:table-cell>
          <table:table-cell office:value-type="float" office:value="13060840900" table:style-name="ce18">
            <text:p>13060840900</text:p>
          </table:table-cell>
          <table:table-cell office:value-type="float" office:value="69945.808341544922" table:formula="of:=[.BH106]/[.BF106]" table:style-name="ce51">
            <text:p>69946</text:p>
          </table:table-cell>
          <table:table-cell office:value-type="float" office:value="440.14157143238168" table:formula="of:=[.BI106]/[.BG106]" table:style-name="ce51">
            <text:p>440</text:p>
          </table:table-cell>
          <table:table-cell office:value-type="float" office:value="498250" table:style-name="ce18">
            <text:p>498250</text:p>
          </table:table-cell>
          <table:table-cell office:value-type="float" office:value="102.45204288804246" table:style-name="ce5">
            <text:p>102</text:p>
          </table:table-cell>
          <table:table-cell office:value-type="float" office:value="23448077600" table:style-name="ce18">
            <text:p>23448077600</text:p>
          </table:table-cell>
          <table:table-cell office:value-type="float" office:value="47060.868238835923" table:formula="of:=[.BM106]/[.BK106]" table:style-name="ce55">
            <text:p>47061</text:p>
          </table:table-cell>
          <table:table-cell office:value-type="float" office:value="459.34533770364249" table:formula="of:=[.BN106]/[.BL106]" table:style-name="ce55">
            <text:p>459</text:p>
          </table:table-cell>
          <table:table-cell office:value-type="float" office:value="3.0135235682347075" table:formula="of:=[.CV106]/(([.BO106]+[.BJ106])/2)" table:style-name="ce58">
            <text:p>3.01</text:p>
          </table:table-cell>
          <table:table-cell office:value-type="float" office:value="3.9798395838809739" table:formula="of:=(([.BJ106]+[.BO106])*100/([.BJ105]+[.BO105]))-100" table:style-name="ce57">
            <text:p>4.0</text:p>
          </table:table-cell>
          <table:table-cell office:value-type="string" table:style-name="ce118">
            <text:p>null</text:p>
          </table:table-cell>
          <table:table-cell office:value-type="float" office:value="22417950" table:style-name="ce8">
            <text:p>22417950</text:p>
          </table:table-cell>
          <table:table-cell office:value-type="float" office:value="491541" table:formula="of:=[.BS106]-[.BS105]" table:style-name="ce26">
            <text:p>491541</text:p>
          </table:table-cell>
          <table:table-cell office:value-type="float" office:value="509293" table:style-name="ce76">
            <text:p>509293</text:p>
          </table:table-cell>
          <table:table-cell office:value-type="float" office:value="54630" table:style-name="ce76">
            <text:p>54630</text:p>
          </table:table-cell>
          <table:table-cell office:value-type="float" office:value="1.9313244520573916" table:formula="of:=([.B106]/[.BS106])" table:style-name="ce34">
            <text:p>1.93</text:p>
          </table:table-cell>
          <table:table-cell office:value-type="float" office:value="2.79" table:style-name="ce71">
            <text:p>2.79</text:p>
          </table:table-cell>
          <table:table-cell office:value-type="float" office:value="1.3129999999999999" table:style-name="ce71">
            <text:p>1.31</text:p>
          </table:table-cell>
          <table:table-cell office:value-type="float" office:value="2.241776115733316" table:formula="of:=([.BS106]*100/[.BS105])-100" table:style-name="ce23">
            <text:p>2.2</text:p>
          </table:table-cell>
          <table:table-cell office:value-type="float" office:value="748881" table:formula="of:=([.B106]-[.B105])" table:style-name="ce73">
            <text:p>748881</text:p>
          </table:table-cell>
          <table:table-cell office:value-type="float" office:value="1.7601076670768663" table:formula="of:=([.B106]*100/[.B105])-100" table:style-name="ce25">
            <text:p>1.76</text:p>
          </table:table-cell>
          <table:table-cell office:value-type="float" office:value="223124.87096774194" table:formula="of:=[.BT106]-([.CA106]/[.BX106])" table:style-name="ce76">
            <text:p>223125</text:p>
          </table:table-cell>
          <table:table-cell office:value-type="float" office:value="2253000" table:style-name="ce78">
            <text:p>2253000</text:p>
          </table:table-cell>
          <table:table-cell office:value-type="float" office:value="48003.11" table:style-name="ce8">
            <text:p>4800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9.5" table:style-name="ce18">
            <text:p>79.5</text:p>
          </table:table-cell>
          <table:table-cell office:value-type="float" office:value="13.9" table:style-name="ce18">
            <text:p>13.9</text:p>
          </table:table-cell>
          <table:table-cell office:value-type="float" office:value="6.7" table:style-name="ce18">
            <text:p>6.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55.3125" table:style-name="ce8">
            <text:p>1355</text:p>
          </table:table-cell>
          <table:table-cell office:value-type="float" office:value="91.964999999999989" table:style-name="ce78">
            <text:p>92</text:p>
          </table:table-cell>
          <table:table-cell office:value-type="string" table:style-name="ce118">
            <text:p>null</text:p>
          </table:table-cell>
          <table:table-cell office:value-type="float" office:value="3.04" table:style-name="ce25">
            <text:p>3.04</text:p>
          </table:table-cell>
          <table:table-cell office:value-type="float" office:value="184.07" table:formula="of:=[.CZ105]+[.CY106]" table:style-name="ce23">
            <text:p>184.1</text:p>
          </table:table-cell>
          <table:table-cell office:value-type="float" office:value="530.82262500000002" table:formula="of:=(([.CV106]*[.CY106])/100)+[.DA105]" table:style-name="ce23">
            <text:p>530.8</text:p>
          </table:table-cell>
          <table:table-cell office:value-type="float" office:value="824.48987499999998" table:formula="of:=[.CV106]-[.DA106]" table:style-name="ce23">
            <text:p>824.5</text:p>
          </table:table-cell>
          <table:table-cell office:value-type="float" office:value="736.30276525234967" table:formula="of:=[.CV106]/[.CZ106]*[.$CZ$87]" table:style-name="ce23">
            <text:p>736.3</text:p>
          </table:table-cell>
          <table:table-cell office:value-type="float" office:value="-2.4154545454544873E-2" table:formula="of:=([.Y106]-[.Y105])" table:style-name="ce25">
            <text:p>-0.02</text:p>
          </table:table-cell>
          <table:table-cell office:value-type="float" office:value="16.180016072863651" table:formula="of:=([.CV106]*100/[.CV105])-100" table:style-name="ce25">
            <text:p>16.18</text:p>
          </table:table-cell>
          <table:table-cell office:value-type="float" office:value="13.140016072863652" table:formula="of:=[.DE106]-[.CY106]" table:style-name="ce25">
            <text:p>13.14</text:p>
          </table:table-cell>
          <table:table-cell office:value-type="float" office:value="11.94869011631846" table:formula="of:=([.F106]*100/[.F105])-100" table:style-name="ce25">
            <text:p>11.95</text:p>
          </table:table-cell>
          <table:table-cell office:value-type="float" office:value="11.948690116318446" table:formula="of:=([.K106]*100/[.K105])-100" table:style-name="ce25">
            <text:p>11.95</text:p>
          </table:table-cell>
          <table:table-cell office:value-type="float" office:value="10.97" table:style-name="ce29">
            <text:p>11.0</text:p>
          </table:table-cell>
          <table:table-cell office:value-type="float" office:value="100" table:formula="of:=(([.DC106]-MIN([.DC92:.DC106]))/(MAX([.DC92:.DC106])-MIN([.DC92:.DC106])))*100" table:style-name="ce128">
            <text:p>100.0</text:p>
          </table:table-cell>
          <table:table-cell office:value-type="float" office:value="100" table:formula="of:=MIN(100; MAX(0; (([.K106]-([.C106]/26/2))/(([.C106]/26)-([.C106]/26/2)))*100))" table:style-name="ce128">
            <text:p>100.0</text:p>
          </table:table-cell>
          <table:table-cell office:value-type="float" office:value="100" table:formula="of:=MIN(100; MAX(0; (([.F106]-([.C106]/26/2))/(([.C106]/26)-([.C106]/26/2)))*100))" table:style-name="ce128">
            <text:p>100.0</text:p>
          </table:table-cell>
          <table:table-cell office:value-type="float" office:value="41.102915489041628" table:formula="of:=(([.AP106]-MIN([.$AP$2:.$AP$128]))/(MAX([.$AP$2:.$AP$128])-MIN([.$AP$2:.$AP$128])))*100" table:style-name="ce128">
            <text:p>41.1</text:p>
          </table:table-cell>
          <table:table-cell office:value-type="float" office:value="100" table:formula="of:=MIN(100;MAX(0;(([.BP106]-1.8)/(2.2-1.8))*100))" table:style-name="ce128">
            <text:p>100.0</text:p>
          </table:table-cell>
          <table:table-cell office:value-type="float" office:value="73.119428579967561" table:formula="of:=100-((([.CC106]-MIN([.CC77:.CC106]))/(MAX([.CC77:.CC106])-MIN([.CC77:.CC106])))*100)" table:style-name="ce128">
            <text:p>73.1</text:p>
          </table:table-cell>
          <table:table-cell office:value-type="float" office:value="50.695999999999998" table:formula="of:=MIN(100; MAX(0; ((IF(AND([.DI106]-[.DI105]&gt;=-0.3;[.DI106]-[.DI105]&lt;=0.3);100;IF(AND([.DI106]-[.DI105]&gt;-1;[.DI106]-[.DI105]&lt;-0.3);50;IF([.DI106]-[.DI105]&lt;=-1;25;75)))))-[.DI106]+(IF(([.DI106]-[.DI105])*([.DI105]-[.DI104])&lt;0;AVERAGE([.DI102:.DI106]);0))))" table:style-name="ce128">
            <text:p>50.7</text:p>
          </table:table-cell>
          <table:table-cell office:value-type="string" table:style-name="ce118">
            <text:p>null</text:p>
          </table:table-cell>
          <table:table-cell office:value-type="float" office:value="80.702620581287036" table:formula="of:=AVERAGE([.DJ106:.DP106])" table:style-name="ce128">
            <text:p>80.7</text:p>
          </table:table-cell>
          <table:table-cell office:value-type="float" office:value="387.64" table:formula="of:=-0.06*(([.A106]-1963)^2)+8.5*([.A106]-1963)+140" table:style-name="ce23">
            <text:p>387.6</text:p>
          </table:table-cell>
          <table:table-cell table:number-columns-repeated="16261"/>
        </table:table-row>
        <table:table-row table:style-name="ro2">
          <table:table-cell office:value-type="float" office:value="2005" table:style-name="ce15">
            <text:p>2005</text:p>
          </table:table-cell>
          <table:table-cell office:value-type="float" office:value="44009969" table:style-name="ce10">
            <text:p>44009969</text:p>
          </table:table-cell>
          <table:table-cell office:value-type="float" office:value="18401584" table:style-name="ce8">
            <text:p>18401584</text:p>
          </table:table-cell>
          <table:table-cell office:value-type="float" office:value="23421864" table:style-name="ce8">
            <text:p>23421864</text:p>
          </table:table-cell>
          <table:table-cell office:value-type="float" office:value="37075762" table:style-name="ce78">
            <text:p>37075762</text:p>
          </table:table-cell>
          <table:table-cell office:value-type="float" office:value="787016.8932673604" table:formula="of:=([.F108]*(([.K107]*100/[.K108])/100))" table:style-name="ce24">
            <text:p>787017</text:p>
          </table:table-cell>
          <table:table-cell office:value-type="float" office:value="123433.8483" table:formula="of:=[.G108]*0.97" table:style-name="ce24">
            <text:p>12343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257613" table:style-name="ce18">
            <text:p>1257613</text:p>
          </table:table-cell>
          <table:table-cell office:value-type="float" office:value="628806.5" table:formula="of:=[.K107]/2" table:style-name="ce24">
            <text:p>628807</text:p>
          </table:table-cell>
          <table:table-cell office:value-type="float" office:value="156946440000" table:style-name="ce84">
            <text:p>1.6E+11</text:p>
          </table:table-cell>
          <table:table-cell office:value-type="float" office:value="124797.08781636322" table:formula="of:=[.M107]/[.K107]" table:style-name="ce26">
            <text:p>12479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0.418188503441058" table:formula="of:=([.N107]*100)/([.CV107]*(([.BL107]*([.BK107]/([.BF107]+[.BK107])))+([.BG107]*([.BF107]/([.BF107]+[.BK107])))))" table:style-name="ce67">
            <text:p>70.42</text:p>
          </table:table-cell>
          <table:table-cell office:value-type="float" office:value="25.119328852224672" table:formula="of:=(([.M107]*100/[.M106])-100)-[.CY107]" table:style-name="ce28">
            <text:p>25.12</text:p>
          </table:table-cell>
          <table:table-cell office:value-type="float" office:value="445972000000" table:style-name="ce131">
            <text:p>4.46E+11</text:p>
          </table:table-cell>
          <table:table-cell office:value-type="float" office:value="3.2829999999999999" table:style-name="ce28">
            <text:p>3.28</text:p>
          </table:table-cell>
          <table:table-cell office:value-type="float" office:value="3" table:style-name="ce28">
            <text:p>3.00</text:p>
          </table:table-cell>
          <table:table-cell office:value-type="float" office:value="97" table:formula="of:=100-[.V107]" table:style-name="ce28">
            <text:p>97.00</text:p>
          </table:table-cell>
          <table:table-cell office:value-type="float" office:value="25" table:style-name="ce60">
            <text:p>25</text:p>
          </table:table-cell>
          <table:table-cell office:value-type="float" office:value="2.3361545454545456" table:style-name="ce28">
            <text:p>2.34</text:p>
          </table:table-cell>
          <table:table-cell office:value-type="float" office:value="1.2386916666666667" table:style-name="ce72">
            <text:p>1.24</text:p>
          </table:table-cell>
          <table:table-cell office:value-type="float" office:value="7130670000000" table:style-name="ce85">
            <text:p>7.13E+12</text:p>
          </table:table-cell>
          <table:table-cell office:value-type="float" office:value="8.5639300773913476" table:formula="of:=([.AA107]*100/[.AA106])-100" table:style-name="ce70">
            <text:p>8.56</text:p>
          </table:table-cell>
          <table:table-cell office:value-type="string" table:style-name="ce118">
            <text:p>null</text:p>
          </table:table-cell>
          <table:table-cell office:value-type="float" office:value="363.45" table:style-name="ce75">
            <text:p>363</text:p>
          </table:table-cell>
          <table:table-cell office:value-type="float" office:value="928122000000" table:style-name="ce125">
            <text:p>9.28122E+11</text:p>
          </table:table-cell>
          <table:table-cell office:value-type="string" table:style-name="ce118">
            <text:p>null</text:p>
          </table:table-cell>
          <table:table-cell office:value-type="float" office:value="3022946657472.5" table:formula="of:=([.CV107]*[.BS107]*86)" table:style-name="ce125">
            <text:p>3.02295E+12</text:p>
          </table:table-cell>
          <table:table-cell office:value-type="float" office:value="569049000000" table:style-name="ce83">
            <text:p>5.69E+11</text:p>
          </table:table-cell>
          <table:table-cell office:value-type="float" office:value="15348.275242461639" table:formula="of:=[.AH107]/[.E107]" table:style-name="ce26">
            <text:p>15348</text:p>
          </table:table-cell>
          <table:table-cell office:value-type="float" office:value="13664.640444393988" table:formula="of:=[.AJ106]*(1+([.CY107]/100))" table:style-name="ce76">
            <text:p>13665</text:p>
          </table:table-cell>
          <table:table-cell office:value-type="float" office:value="19852.023183549525" table:formula="of:=[.AI107]+(12*PMT([.U107]/100/12;[.X107]*12;([.AI107]*5)*-1))" table:style-name="ce76">
            <text:p>19852</text:p>
          </table:table-cell>
          <table:table-cell office:value-type="float" office:value="19134.068581435204" table:formula="of:=[.AL106]*(1+(([.CW107]-[.CW106])/100))" table:style-name="ce76">
            <text:p>19134</text:p>
          </table:table-cell>
          <table:table-cell office:value-type="float" office:value="17880.356316200679" table:formula="of:=(([.AL107]+([.AJ107]-[.AI107])+([.AK107]-[.AI107]))-[.AI107])+[.$AI$101]" table:style-name="ce76">
            <text:p>17880</text:p>
          </table:table-cell>
          <table:table-cell office:value-type="float" office:value="116.88181390892507" table:formula="of:=[.AM107]*[.$AN$101]/[.$AM$101]" table:style-name="ce76">
            <text:p>117</text:p>
          </table:table-cell>
          <table:table-cell office:value-type="float" office:value="69.427958692106643" table:formula="of:=[.AI107]*[.$AO$101]/[.$AI$101]" table:style-name="ce76">
            <text:p>69</text:p>
          </table:table-cell>
          <table:table-cell office:value-type="float" office:value="36.637041307893355" table:formula="of:=[.CW107]-[.AO107]" table:style-name="ce118">
            <text:p>37</text:p>
          </table:table-cell>
          <table:table-cell office:value-type="float" office:value="24959.417563272644" table:formula="of:=[.N107]/5" table:style-name="ce26">
            <text:p>24959</text:p>
          </table:table-cell>
          <table:table-cell office:value-type="float" office:value="261" table:style-name="ce8">
            <text:p>261</text:p>
          </table:table-cell>
          <table:table-cell office:value-type="float" office:value="0.9" table:style-name="ce129">
            <text:p>0.90</text:p>
          </table:table-cell>
          <table:table-cell office:value-type="float" office:value="75538" table:style-name="ce18">
            <text:p>75538</text:p>
          </table:table-cell>
          <table:table-cell office:value-type="float" office:value="55064.4" table:style-name="ce78">
            <text:p>55064</text:p>
          </table:table-cell>
          <table:table-cell office:value-type="float" office:value="47859.599999999991" table:style-name="ce78">
            <text:p>47860</text:p>
          </table:table-cell>
          <table:table-cell office:value-type="float" office:value="4158.68" table:style-name="ce93">
            <text:p>4159</text:p>
          </table:table-cell>
          <table:table-cell office:value-type="string" table:style-name="ce118">
            <text:p>null</text:p>
          </table:table-cell>
          <table:table-cell office:value-type="float" office:value="179257" table:style-name="ce18">
            <text:p>179257</text:p>
          </table:table-cell>
          <table:table-cell office:value-type="float" office:value="107577" table:style-name="ce18">
            <text:p>107577</text:p>
          </table:table-cell>
          <table:table-cell office:value-type="float" office:value="65368" table:style-name="ce18">
            <text:p>65368</text:p>
          </table:table-cell>
          <table:table-cell office:value-type="float" office:value="6312" table:style-name="ce18">
            <text:p>6312</text:p>
          </table:table-cell>
          <table:table-cell office:value-type="float" office:value="653968" table:style-name="ce81">
            <text:p>653968</text:p>
          </table:table-cell>
          <table:table-cell office:value-type="float" office:value="123234" table:style-name="ce81">
            <text:p>123234</text:p>
          </table:table-cell>
          <table:table-cell office:value-type="float" office:value="9055" table:style-name="ce81">
            <text:p>9055</text:p>
          </table:table-cell>
          <table:table-cell office:value-type="float" office:value="193468" table:style-name="ce18">
            <text:p>193468</text:p>
          </table:table-cell>
          <table:table-cell office:value-type="float" office:value="159.93556798953756" table:style-name="ce5">
            <text:p>160</text:p>
          </table:table-cell>
          <table:table-cell office:value-type="float" office:value="14401052899.999998" table:style-name="ce18">
            <text:p>14401052900</text:p>
          </table:table-cell>
          <table:table-cell office:value-type="float" office:value="74436.355883143449" table:formula="of:=[.BH107]/[.BF107]" table:style-name="ce51">
            <text:p>74436</text:p>
          </table:table-cell>
          <table:table-cell office:value-type="float" office:value="465.41464677833778" table:formula="of:=[.BI107]/[.BG107]" table:style-name="ce51">
            <text:p>465</text:p>
          </table:table-cell>
          <table:table-cell office:value-type="float" office:value="534859" table:style-name="ce18">
            <text:p>534859</text:p>
          </table:table-cell>
          <table:table-cell office:value-type="float" office:value="99.557311813912108" table:style-name="ce5">
            <text:p>100</text:p>
          </table:table-cell>
          <table:table-cell office:value-type="float" office:value="25597812799.999992" table:style-name="ce18">
            <text:p>25597812800</text:p>
          </table:table-cell>
          <table:table-cell office:value-type="float" office:value="47858.992369951695" table:formula="of:=[.BM107]/[.BK107]" table:style-name="ce55">
            <text:p>47859</text:p>
          </table:table-cell>
          <table:table-cell office:value-type="float" office:value="480.718005518344" table:formula="of:=[.BN107]/[.BL107]" table:style-name="ce55">
            <text:p>481</text:p>
          </table:table-cell>
          <table:table-cell office:value-type="float" office:value="3.240824627029685" table:formula="of:=[.CV107]/(([.BO107]+[.BJ107])/2)" table:style-name="ce58">
            <text:p>3.24</text:p>
          </table:table-cell>
          <table:table-cell office:value-type="float" office:value="5.1858167903145755" table:formula="of:=(([.BJ107]+[.BO107])*100/([.BJ106]+[.BO106]))-100" table:style-name="ce57">
            <text:p>5.2</text:p>
          </table:table-cell>
          <table:table-cell office:value-type="float" office:value="76.679089765915492" table:style-name="ce56">
            <text:p>77</text:p>
          </table:table-cell>
          <table:table-cell office:value-type="float" office:value="22927382" table:style-name="ce8">
            <text:p>22927382</text:p>
          </table:table-cell>
          <table:table-cell office:value-type="float" office:value="509432" table:formula="of:=[.BS107]-[.BS106]" table:style-name="ce26">
            <text:p>509432</text:p>
          </table:table-cell>
          <table:table-cell office:value-type="float" office:value="528754" table:style-name="ce76">
            <text:p>528754</text:p>
          </table:table-cell>
          <table:table-cell office:value-type="float" office:value="62850" table:style-name="ce76">
            <text:p>62850</text:p>
          </table:table-cell>
          <table:table-cell office:value-type="float" office:value="1.9195374770656326" table:formula="of:=([.B107]/[.BS107])" table:style-name="ce34">
            <text:p>1.92</text:p>
          </table:table-cell>
          <table:table-cell office:value-type="float" office:value="2.76" table:style-name="ce71">
            <text:p>2.76</text:p>
          </table:table-cell>
          <table:table-cell office:value-type="float" office:value="1.329" table:style-name="ce71">
            <text:p>1.33</text:p>
          </table:table-cell>
          <table:table-cell office:value-type="float" office:value="2.2724290133575948" table:formula="of:=([.BS107]*100/[.BS106])-100" table:style-name="ce23">
            <text:p>2.3</text:p>
          </table:table-cell>
          <table:table-cell office:value-type="float" office:value="713634" table:formula="of:=([.B107]-[.B106])" table:style-name="ce73">
            <text:p>713634</text:p>
          </table:table-cell>
          <table:table-cell office:value-type="float" office:value="1.6482549850928478" table:formula="of:=([.B107]*100/[.B106])-100" table:style-name="ce25">
            <text:p>1.65</text:p>
          </table:table-cell>
          <table:table-cell office:value-type="float" office:value="250868.95652173911" table:formula="of:=[.BT107]-([.CA107]/[.BX107])" table:style-name="ce76">
            <text:p>250869</text:p>
          </table:table-cell>
          <table:table-cell office:value-type="float" office:value="2357000" table:style-name="ce78">
            <text:p>2357000</text:p>
          </table:table-cell>
          <table:table-cell office:value-type="float" office:value="51509.639999999992" table:style-name="ce8">
            <text:p>5151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0.5" table:style-name="ce18">
            <text:p>80.5</text:p>
          </table:table-cell>
          <table:table-cell office:value-type="float" office:value="13" table:style-name="ce18">
            <text:p>13</text:p>
          </table:table-cell>
          <table:table-cell office:value-type="float" office:value="6.4" table:style-name="ce18">
            <text:p>6.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533.125" table:style-name="ce8">
            <text:p>1533</text:p>
          </table:table-cell>
          <table:table-cell office:value-type="float" office:value="106.065" table:style-name="ce78">
            <text:p>106</text:p>
          </table:table-cell>
          <table:table-cell office:value-type="string" table:style-name="ce118">
            <text:p>null</text:p>
          </table:table-cell>
          <table:table-cell office:value-type="float" office:value="3.37" table:style-name="ce25">
            <text:p>3.37</text:p>
          </table:table-cell>
          <table:table-cell office:value-type="float" office:value="187.44" table:formula="of:=[.CZ106]+[.CY107]" table:style-name="ce23">
            <text:p>187.4</text:p>
          </table:table-cell>
          <table:table-cell office:value-type="float" office:value="582.48893750000002" table:formula="of:=(([.CV107]*[.CY107])/100)+[.DA106]" table:style-name="ce23">
            <text:p>582.5</text:p>
          </table:table-cell>
          <table:table-cell office:value-type="float" office:value="950.63606249999998" table:formula="of:=[.CV107]-[.DA107]" table:style-name="ce23">
            <text:p>950.6</text:p>
          </table:table-cell>
          <table:table-cell office:value-type="float" office:value="817.92840375586854" table:formula="of:=[.CV107]/[.CZ107]*[.$CZ$87]" table:style-name="ce23">
            <text:p>817.9</text:p>
          </table:table-cell>
          <table:table-cell office:value-type="float" office:value="5.7263636363636294E-2" table:formula="of:=([.Y107]-[.Y106])" table:style-name="ce25">
            <text:p>0.06</text:p>
          </table:table-cell>
          <table:table-cell office:value-type="float" office:value="13.119667973253399" table:formula="of:=([.CV107]*100/[.CV106])-100" table:style-name="ce25">
            <text:p>13.12</text:p>
          </table:table-cell>
          <table:table-cell office:value-type="float" office:value="9.7496679732533984" table:formula="of:=[.DE107]-[.CY107]" table:style-name="ce25">
            <text:p>9.75</text:p>
          </table:table-cell>
          <table:table-cell office:value-type="float" office:value="13.537408455993855" table:formula="of:=([.F107]*100/[.F106])-100" table:style-name="ce25">
            <text:p>13.54</text:p>
          </table:table-cell>
          <table:table-cell office:value-type="float" office:value="13.537408455993869" table:formula="of:=([.K107]*100/[.K106])-100" table:style-name="ce25">
            <text:p>13.54</text:p>
          </table:table-cell>
          <table:table-cell office:value-type="float" office:value="9.15" table:style-name="ce29">
            <text:p>9.2</text:p>
          </table:table-cell>
          <table:table-cell office:value-type="float" office:value="100" table:formula="of:=(([.DC107]-MIN([.DC93:.DC107]))/(MAX([.DC93:.DC107])-MIN([.DC93:.DC107])))*100" table:style-name="ce128">
            <text:p>100.0</text:p>
          </table:table-cell>
          <table:table-cell office:value-type="float" office:value="100" table:formula="of:=MIN(100; MAX(0; (([.K107]-([.C107]/26/2))/(([.C107]/26)-([.C107]/26/2)))*100))" table:style-name="ce128">
            <text:p>100.0</text:p>
          </table:table-cell>
          <table:table-cell office:value-type="float" office:value="100" table:formula="of:=MIN(100; MAX(0; (([.F107]-([.C107]/26/2))/(([.C107]/26)-([.C107]/26/2)))*100))" table:style-name="ce128">
            <text:p>100.0</text:p>
          </table:table-cell>
          <table:table-cell office:value-type="float" office:value="58.14711899884378" table:formula="of:=(([.AP107]-MIN([.$AP$2:.$AP$128]))/(MAX([.$AP$2:.$AP$128])-MIN([.$AP$2:.$AP$128])))*100" table:style-name="ce128">
            <text:p>58.1</text:p>
          </table:table-cell>
          <table:table-cell office:value-type="float" office:value="100" table:formula="of:=MIN(100;MAX(0;(([.BP107]-1.8)/(2.2-1.8))*100))" table:style-name="ce128">
            <text:p>100.0</text:p>
          </table:table-cell>
          <table:table-cell office:value-type="float" office:value="62.400908096893502" table:formula="of:=100-((([.CC107]-MIN([.CC78:.CC107]))/(MAX([.CC78:.CC107])-MIN([.CC78:.CC107])))*100)" table:style-name="ce128">
            <text:p>62.4</text:p>
          </table:table-cell>
          <table:table-cell office:value-type="float" office:value="15.85" table:formula="of:=MIN(100; MAX(0; ((IF(AND([.DI107]-[.DI106]&gt;=-0.3;[.DI107]-[.DI106]&lt;=0.3);100;IF(AND([.DI107]-[.DI106]&gt;-1;[.DI107]-[.DI106]&lt;-0.3);50;IF([.DI107]-[.DI106]&lt;=-1;25;75)))))-[.DI107]+(IF(([.DI107]-[.DI106])*([.DI106]-[.DI105])&lt;0;AVERAGE([.DI103:.DI107]);0))))" table:style-name="ce128">
            <text:p>15.9</text:p>
          </table:table-cell>
          <table:table-cell office:value-type="string" table:style-name="ce118">
            <text:p>null</text:p>
          </table:table-cell>
          <table:table-cell office:value-type="float" office:value="76.628289585105335" table:formula="of:=AVERAGE([.DJ107:.DP107])" table:style-name="ce128">
            <text:p>76.6</text:p>
          </table:table-cell>
          <table:table-cell office:value-type="float" office:value="391.16" table:formula="of:=-0.06*(([.A107]-1963)^2)+8.5*([.A107]-1963)+140" table:style-name="ce23">
            <text:p>391.2</text:p>
          </table:table-cell>
          <table:table-cell table:number-columns-repeated="16261"/>
        </table:table-row>
        <table:table-row table:style-name="ro2">
          <table:table-cell office:value-type="float" office:value="2006" table:style-name="ce15">
            <text:p>2006</text:p>
          </table:table-cell>
          <table:table-cell office:value-type="float" office:value="44784659" table:style-name="ce10">
            <text:p>44784659</text:p>
          </table:table-cell>
          <table:table-cell office:value-type="float" office:value="18807430" table:style-name="ce8">
            <text:p>18807430</text:p>
          </table:table-cell>
          <table:table-cell office:value-type="float" office:value="23916621" table:style-name="ce8">
            <text:p>23916621</text:p>
          </table:table-cell>
          <table:table-cell office:value-type="float" office:value="37759986" table:style-name="ce78">
            <text:p>37759986</text:p>
          </table:table-cell>
          <table:table-cell office:value-type="float" office:value="839933.46971886128" table:formula="of:=([.F109]*(([.K108]*100/[.K109])/100))" table:style-name="ce24">
            <text:p>839933</text:p>
          </table:table-cell>
          <table:table-cell office:value-type="float" office:value="127251.39" table:formula="of:=[.G109]*0.97" table:style-name="ce24">
            <text:p>12725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1342171" table:style-name="ce18">
            <text:p>1342171</text:p>
          </table:table-cell>
          <table:table-cell office:value-type="float" office:value="650836" table:style-name="ce18">
            <text:p>650836</text:p>
          </table:table-cell>
          <table:table-cell office:value-type="float" office:value="188339112000" table:style-name="ce84">
            <text:p>1.9E+11</text:p>
          </table:table-cell>
          <table:table-cell office:value-type="float" office:value="140324.22992301278" table:formula="of:=[.M108]/[.K108]" table:style-name="ce26">
            <text:p>140324</text:p>
          </table:table-cell>
          <table:table-cell office:value-type="float" office:value="44335" table:style-name="ce18">
            <text:p>44335</text:p>
          </table:table-cell>
          <table:table-cell office:value-type="float" office:value="17733" table:style-name="ce18">
            <text:p>17733</text:p>
          </table:table-cell>
          <table:table-cell office:value-type="float" office:value="2.5001409800936107" table:formula="of:=[.O108]/[.P108]" table:style-name="ce67">
            <text:p>2.50</text:p>
          </table:table-cell>
          <table:table-cell office:value-type="float" office:value="73.69411086300137" table:formula="of:=([.N108]*100)/([.CV108]*(([.BL108]*([.BK108]/([.BF108]+[.BK108])))+([.BG108]*([.BF108]/([.BF108]+[.BK108])))))" table:style-name="ce67">
            <text:p>73.69</text:p>
          </table:table-cell>
          <table:table-cell office:value-type="float" office:value="16.482156149575612" table:formula="of:=(([.M108]*100/[.M107])-100)-[.CY108]" table:style-name="ce28">
            <text:p>16.48</text:p>
          </table:table-cell>
          <table:table-cell office:value-type="float" office:value="544389000000" table:style-name="ce131">
            <text:p>5.44E+11</text:p>
          </table:table-cell>
          <table:table-cell office:value-type="float" office:value="4.173" table:style-name="ce28">
            <text:p>4.17</text:p>
          </table:table-cell>
          <table:table-cell office:value-type="float" office:value="2.2999999999999998" table:style-name="ce28">
            <text:p>2.30</text:p>
          </table:table-cell>
          <table:table-cell office:value-type="float" office:value="97.7" table:formula="of:=100-[.V108]" table:style-name="ce28">
            <text:p>97.70</text:p>
          </table:table-cell>
          <table:table-cell office:value-type="float" office:value="27" table:style-name="ce60">
            <text:p>27</text:p>
          </table:table-cell>
          <table:table-cell office:value-type="float" office:value="3.491090909090909" table:style-name="ce28">
            <text:p>3.49</text:p>
          </table:table-cell>
          <table:table-cell office:value-type="float" office:value="1.2656499999999999" table:style-name="ce72">
            <text:p>1.27</text:p>
          </table:table-cell>
          <table:table-cell office:value-type="float" office:value="7801675000000" table:style-name="ce85">
            <text:p>7.80E+12</text:p>
          </table:table-cell>
          <table:table-cell office:value-type="float" office:value="9.4101255562240311" table:formula="of:=([.AA108]*100/[.AA107])-100" table:style-name="ce70">
            <text:p>9.41</text:p>
          </table:table-cell>
          <table:table-cell office:value-type="string" table:style-name="ce118">
            <text:p>null</text:p>
          </table:table-cell>
          <table:table-cell office:value-type="float" office:value="484.25500000000005" table:style-name="ce75">
            <text:p>484</text:p>
          </table:table-cell>
          <table:table-cell office:value-type="float" office:value="1004976000000" table:style-name="ce125">
            <text:p>1.00498E+12</text:p>
          </table:table-cell>
          <table:table-cell office:value-type="float" office:value="5033850313355" table:formula="of:=([.AW108]*[.AR108]*1000000)+([.CV108]*[.BS108]*86)+([.AS108]*(506006-[.AX108])*1000000)" table:style-name="ce83">
            <text:p>5.03E+12</text:p>
          </table:table-cell>
          <table:table-cell office:value-type="float" office:value="3433526676155" table:formula="of:=([.CV108]*[.BS108]*86)" table:style-name="ce125">
            <text:p>3.43353E+12</text:p>
          </table:table-cell>
          <table:table-cell office:value-type="float" office:value="602460000000" table:style-name="ce83">
            <text:p>6.02E+11</text:p>
          </table:table-cell>
          <table:table-cell office:value-type="float" office:value="15954.984729072728" table:formula="of:=[.AH108]/[.E108]" table:style-name="ce26">
            <text:p>15955</text:p>
          </table:table-cell>
          <table:table-cell office:value-type="float" office:value="14145.635788036656" table:formula="of:=[.AJ107]*(1+([.CY108]/100))" table:style-name="ce76">
            <text:p>14146</text:p>
          </table:table-cell>
          <table:table-cell office:value-type="float" office:value="20884.889457552315" table:formula="of:=[.AI108]+(12*PMT([.U108]/100/12;[.X108]*12;([.AI108]*5)*-1))" table:style-name="ce76">
            <text:p>20885</text:p>
          </table:table-cell>
          <table:table-cell office:value-type="float" office:value="22155.816362158359" table:formula="of:=[.AL107]*(1+(([.CW108]-[.CW107])/100))" table:style-name="ce76">
            <text:p>22156</text:p>
          </table:table-cell>
          <table:table-cell office:value-type="float" office:value="20595.837254736027" table:formula="of:=(([.AL108]+([.AJ108]-[.AI108])+([.AK108]-[.AI108]))-[.AI108])+[.$AI$101]" table:style-name="ce76">
            <text:p>20596</text:p>
          </table:table-cell>
          <table:table-cell office:value-type="float" office:value="134.63259762477009" table:formula="of:=[.AM108]*[.$AN$101]/[.$AM$101]" table:style-name="ce76">
            <text:p>135</text:p>
          </table:table-cell>
          <table:table-cell office:value-type="float" office:value="72.172410463339531" table:formula="of:=[.AI108]*[.$AO$101]/[.$AI$101]" table:style-name="ce76">
            <text:p>72</text:p>
          </table:table-cell>
          <table:table-cell office:value-type="float" office:value="49.68508953666047" table:formula="of:=[.CW108]-[.AO108]" table:style-name="ce118">
            <text:p>50</text:p>
          </table:table-cell>
          <table:table-cell office:value-type="float" office:value="28064.845984602558" table:formula="of:=[.N108]/5" table:style-name="ce26">
            <text:p>28065</text:p>
          </table:table-cell>
          <table:table-cell office:value-type="float" office:value="269" table:style-name="ce8">
            <text:p>269</text:p>
          </table:table-cell>
          <table:table-cell office:value-type="float" office:value="0.97" table:style-name="ce129">
            <text:p>0.97</text:p>
          </table:table-cell>
          <table:table-cell office:value-type="float" office:value="58479" table:style-name="ce18">
            <text:p>58479</text:p>
          </table:table-cell>
          <table:table-cell office:value-type="float" office:value="39707.800000000003" table:style-name="ce78">
            <text:p>39708</text:p>
          </table:table-cell>
          <table:table-cell office:value-type="float" office:value="41047.5" table:style-name="ce78">
            <text:p>41048</text:p>
          </table:table-cell>
          <table:table-cell office:value-type="float" office:value="4158.68" table:style-name="ce78">
            <text:p>4159</text:p>
          </table:table-cell>
          <table:table-cell office:value-type="float" office:value="9471.24" table:style-name="ce78">
            <text:p>9471</text:p>
          </table:table-cell>
          <table:table-cell office:value-type="float" office:value="181702" table:style-name="ce18">
            <text:p>181702</text:p>
          </table:table-cell>
          <table:table-cell office:value-type="float" office:value="113041" table:style-name="ce18">
            <text:p>113041</text:p>
          </table:table-cell>
          <table:table-cell office:value-type="float" office:value="60548" table:style-name="ce18">
            <text:p>60548</text:p>
          </table:table-cell>
          <table:table-cell office:value-type="float" office:value="8113" table:style-name="ce18">
            <text:p>8113</text:p>
          </table:table-cell>
          <table:table-cell office:value-type="float" office:value="778969" table:style-name="ce81">
            <text:p>778969</text:p>
          </table:table-cell>
          <table:table-cell office:value-type="float" office:value="124138" table:style-name="ce81">
            <text:p>124138</text:p>
          </table:table-cell>
          <table:table-cell office:value-type="float" office:value="8461" table:style-name="ce81">
            <text:p>8461</text:p>
          </table:table-cell>
          <table:table-cell office:value-type="float" office:value="165988" table:style-name="ce18">
            <text:p>165988</text:p>
          </table:table-cell>
          <table:table-cell office:value-type="float" office:value="166.23240380210862" table:style-name="ce5">
            <text:p>166</text:p>
          </table:table-cell>
          <table:table-cell office:value-type="float" office:value="14037838399.999998" table:style-name="ce18">
            <text:p>14037838400</text:p>
          </table:table-cell>
          <table:table-cell office:value-type="float" office:value="84571.405161818911" table:formula="of:=[.BH108]/[.BF108]" table:style-name="ce51">
            <text:p>84571</text:p>
          </table:table-cell>
          <table:table-cell office:value-type="float" office:value="508.75402886248912" table:formula="of:=[.BI108]/[.BG108]" table:style-name="ce51">
            <text:p>509</text:p>
          </table:table-cell>
          <table:table-cell office:value-type="float" office:value="699162" table:style-name="ce18">
            <text:p>699162</text:p>
          </table:table-cell>
          <table:table-cell office:value-type="float" office:value="99.186175801707236" table:style-name="ce5">
            <text:p>99</text:p>
          </table:table-cell>
          <table:table-cell office:value-type="float" office:value="35593133099.999992" table:style-name="ce18">
            <text:p>35593133100</text:p>
          </table:table-cell>
          <table:table-cell office:value-type="float" office:value="50908.277480755525" table:formula="of:=[.BM108]/[.BK108]" table:style-name="ce55">
            <text:p>50908</text:p>
          </table:table-cell>
          <table:table-cell office:value-type="float" office:value="513.2598073196333" table:formula="of:=[.BN108]/[.BL108]" table:style-name="ce55">
            <text:p>513</text:p>
          </table:table-cell>
          <table:table-cell office:value-type="float" office:value="3.3255420618340281" table:formula="of:=[.CV108]/(([.BO108]+[.BJ108])/2)" table:style-name="ce58">
            <text:p>3.33</text:p>
          </table:table-cell>
          <table:table-cell office:value-type="float" office:value="3.8226684943905553" table:formula="of:=[.BR108]-[.BR107]" table:style-name="ce57">
            <text:p>3.8</text:p>
          </table:table-cell>
          <table:table-cell office:value-type="float" office:value="80.501758260306048" table:style-name="ce56">
            <text:p>81</text:p>
          </table:table-cell>
          <table:table-cell office:value-type="float" office:value="23493772" table:style-name="ce8">
            <text:p>23493772</text:p>
          </table:table-cell>
          <table:table-cell office:value-type="float" office:value="566390" table:formula="of:=[.BS108]-[.BS107]" table:style-name="ce26">
            <text:p>566390</text:p>
          </table:table-cell>
          <table:table-cell office:value-type="float" office:value="597632" table:style-name="ce76">
            <text:p>597632</text:p>
          </table:table-cell>
          <table:table-cell office:value-type="float" office:value="60878" table:style-name="ce76">
            <text:p>60878</text:p>
          </table:table-cell>
          <table:table-cell office:value-type="float" office:value="1.9062353631421978" table:formula="of:=([.B108]/[.BS108])" table:style-name="ce34">
            <text:p>1.91</text:p>
          </table:table-cell>
          <table:table-cell office:value-type="float" office:value="2.73" table:style-name="ce71">
            <text:p>2.73</text:p>
          </table:table-cell>
          <table:table-cell office:value-type="float" office:value="1.3620000000000001" table:style-name="ce71">
            <text:p>1.36</text:p>
          </table:table-cell>
          <table:table-cell office:value-type="float" office:value="2.4703649112663584" table:formula="of:=([.BS108]*100/[.BS107])-100" table:style-name="ce23">
            <text:p>2.5</text:p>
          </table:table-cell>
          <table:table-cell office:value-type="float" office:value="774690" table:formula="of:=([.B108]-[.B107])" table:style-name="ce73">
            <text:p>774690</text:p>
          </table:table-cell>
          <table:table-cell office:value-type="float" office:value="1.7602602719397566" table:formula="of:=([.B108]*100/[.B107])-100" table:style-name="ce25">
            <text:p>1.76</text:p>
          </table:table-cell>
          <table:table-cell office:value-type="float" office:value="282620.76923076925" table:formula="of:=[.BT108]-([.CA108]/[.BX108])" table:style-name="ce76">
            <text:p>282621</text:p>
          </table:table-cell>
          <table:table-cell office:value-type="float" office:value="2542000" table:style-name="ce78">
            <text:p>2542000</text:p>
          </table:table-cell>
          <table:table-cell office:value-type="float" office:value="55896.39" table:style-name="ce8">
            <text:p>5589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9.5" table:style-name="ce18">
            <text:p>79.5</text:p>
          </table:table-cell>
          <table:table-cell office:value-type="float" office:value="13.5" table:style-name="ce18">
            <text:p>13.5</text:p>
          </table:table-cell>
          <table:table-cell office:value-type="float" office:value="7" table:style-name="ce18">
            <text:p>7</text:p>
          </table:table-cell>
          <table:table-cell office:value-type="string" table:style-name="ce118">
            <text:p>null</text:p>
          </table:table-cell>
          <table:table-cell office:value-type="float" office:value="123.64864864864865" table:formula="of:=[.CN108]*[.$CM$117]/[.$CN$117]" table:style-name="ce78">
            <text:p>124</text:p>
          </table:table-cell>
          <table:table-cell office:value-type="float" office:value="9.15" table:style-name="ce23">
            <text:p>9.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25" table:style-name="ce93">
            <text:p>2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86.9" table:formula="of:=[.CN108]*86" table:style-name="ce78">
            <text:p>787</text:p>
          </table:table-cell>
          <table:table-cell office:value-type="float" office:value="1699.375" table:style-name="ce8">
            <text:p>1699</text:p>
          </table:table-cell>
          <table:table-cell office:value-type="float" office:value="121.8575" table:style-name="ce78">
            <text:p>122</text:p>
          </table:table-cell>
          <table:table-cell office:value-type="string" table:style-name="ce118">
            <text:p>null</text:p>
          </table:table-cell>
          <table:table-cell office:value-type="float" office:value="3.52" table:style-name="ce25">
            <text:p>3.52</text:p>
          </table:table-cell>
          <table:table-cell office:value-type="float" office:value="190.96" table:formula="of:=[.CZ107]+[.CY108]" table:style-name="ce23">
            <text:p>191.0</text:p>
          </table:table-cell>
          <table:table-cell office:value-type="float" office:value="642.3069375" table:formula="of:=(([.CV108]*[.CY108])/100)+[.DA107]" table:style-name="ce23">
            <text:p>642.3</text:p>
          </table:table-cell>
          <table:table-cell office:value-type="float" office:value="1057.0680625" table:formula="of:=[.CV108]-[.DA108]" table:style-name="ce23">
            <text:p>1057.1</text:p>
          </table:table-cell>
          <table:table-cell office:value-type="float" office:value="889.91149979053205" table:formula="of:=[.CV108]/[.CZ108]*[.$CZ$87]" table:style-name="ce23">
            <text:p>889.9</text:p>
          </table:table-cell>
          <table:table-cell office:value-type="float" office:value="1.1549363636363634" table:formula="of:=([.Y108]-[.Y107])" table:style-name="ce25">
            <text:p>1.15</text:p>
          </table:table-cell>
          <table:table-cell office:value-type="float" office:value="10.843864655523845" table:formula="of:=([.CV108]*100/[.CV107])-100" table:style-name="ce25">
            <text:p>10.84</text:p>
          </table:table-cell>
          <table:table-cell office:value-type="float" office:value="7.3238646555238454" table:formula="of:=[.DE108]-[.CY108]" table:style-name="ce25">
            <text:p>7.32</text:p>
          </table:table-cell>
          <table:table-cell office:value-type="float" office:value="6.7236900381913927" table:formula="of:=([.F108]*100/[.F107])-100" table:style-name="ce25">
            <text:p>6.72</text:p>
          </table:table-cell>
          <table:table-cell office:value-type="float" office:value="6.7236900381913927" table:formula="of:=([.K108]*100/[.K107])-100" table:style-name="ce25">
            <text:p>6.72</text:p>
          </table:table-cell>
          <table:table-cell office:value-type="float" office:value="8.4499999999999993" table:style-name="ce30">
            <text:p>8.5</text:p>
          </table:table-cell>
          <table:table-cell office:value-type="float" office:value="100" table:formula="of:=(([.DC108]-MIN([.DC94:.DC108]))/(MAX([.DC94:.DC108])-MIN([.DC94:.DC108])))*100" table:style-name="ce128">
            <text:p>100.0</text:p>
          </table:table-cell>
          <table:table-cell office:value-type="float" office:value="100" table:formula="of:=MIN(100; MAX(0; (([.K108]-([.C108]/26/2))/(([.C108]/26)-([.C108]/26/2)))*100))" table:style-name="ce128">
            <text:p>100.0</text:p>
          </table:table-cell>
          <table:table-cell office:value-type="float" office:value="100" table:formula="of:=MIN(100; MAX(0; (([.F108]-([.C108]/26/2))/(([.C108]/26)-([.C108]/26/2)))*100))" table:style-name="ce128">
            <text:p>100.0</text:p>
          </table:table-cell>
          <table:table-cell office:value-type="float" office:value="78.619752665768743" table:formula="of:=(([.AP108]-MIN([.$AP$2:.$AP$128]))/(MAX([.$AP$2:.$AP$128])-MIN([.$AP$2:.$AP$128])))*100" table:style-name="ce128">
            <text:p>78.6</text:p>
          </table:table-cell>
          <table:table-cell office:value-type="float" office:value="100" table:formula="of:=MIN(100;MAX(0;(([.BP108]-1.8)/(2.2-1.8))*100))" table:style-name="ce128">
            <text:p>100.0</text:p>
          </table:table-cell>
          <table:table-cell office:value-type="float" office:value="50.134061015770726" table:formula="of:=100-((([.CC108]-MIN([.CC79:.CC108]))/(MAX([.CC79:.CC108])-MIN([.CC79:.CC108])))*100)" table:style-name="ce128">
            <text:p>50.1</text:p>
          </table:table-cell>
          <table:table-cell office:value-type="float" office:value="41.55" table:formula="of:=MIN(100; MAX(0; ((IF(AND([.DI108]-[.DI107]&gt;=-0.3;[.DI108]-[.DI107]&lt;=0.3);100;IF(AND([.DI108]-[.DI107]&gt;-1;[.DI108]-[.DI107]&lt;-0.3);50;IF([.DI108]-[.DI107]&lt;=-1;25;75)))))-[.DI108]+(IF(([.DI108]-[.DI107])*([.DI107]-[.DI106])&lt;0;AVERAGE([.DI104:.DI108]);0))))" table:style-name="ce128">
            <text:p>41.6</text:p>
          </table:table-cell>
          <table:table-cell office:value-type="string" table:style-name="ce118">
            <text:p>null</text:p>
          </table:table-cell>
          <table:table-cell office:value-type="float" office:value="81.471973383077056" table:formula="of:=AVERAGE([.DJ108:.DP108])" table:style-name="ce128">
            <text:p>81.5</text:p>
          </table:table-cell>
          <table:table-cell office:value-type="float" office:value="394.56" table:formula="of:=-0.06*(([.A108]-1963)^2)+8.5*([.A108]-1963)+140" table:style-name="ce23">
            <text:p>394.6</text:p>
          </table:table-cell>
          <table:table-cell table:number-columns-repeated="16261"/>
        </table:table-row>
        <table:table-row table:style-name="ro2">
          <table:table-cell office:value-type="float" office:value="2007" table:style-name="ce15">
            <text:p>2007</text:p>
          </table:table-cell>
          <table:table-cell office:value-type="float" office:value="45668938" table:style-name="ce10">
            <text:p>45668938</text:p>
          </table:table-cell>
          <table:table-cell office:value-type="float" office:value="19246126" table:style-name="ce8">
            <text:p>19246126</text:p>
          </table:table-cell>
          <table:table-cell office:value-type="float" office:value="24490353" table:style-name="ce8">
            <text:p>24490353</text:p>
          </table:table-cell>
          <table:table-cell office:value-type="float" office:value="38534828" table:style-name="ce78">
            <text:p>38534828</text:p>
          </table:table-cell>
          <table:table-cell office:value-type="float" office:value="775300" table:style-name="ce18">
            <text:p>775300</text:p>
          </table:table-cell>
          <table:table-cell office:value-type="float" office:value="131187" table:style-name="ce18">
            <text:p>131187</text:p>
          </table:table-cell>
          <table:table-cell office:value-type="float" office:value="19567" table:style-name="ce18">
            <text:p>19567</text:p>
          </table:table-cell>
          <table:table-cell office:value-type="float" office:value="11231" table:style-name="ce18">
            <text:p>11231</text:p>
          </table:table-cell>
          <table:table-cell office:value-type="float" office:value="244856" table:style-name="ce18">
            <text:p>244856</text:p>
          </table:table-cell>
          <table:table-cell office:value-type="float" office:value="1238890" table:style-name="ce18">
            <text:p>1238890</text:p>
          </table:table-cell>
          <table:table-cell office:value-type="float" office:value="640693" table:style-name="ce18">
            <text:p>640693</text:p>
          </table:table-cell>
          <table:table-cell office:value-type="float" office:value="184427159000" table:style-name="ce84">
            <text:p>1.8E+11</text:p>
          </table:table-cell>
          <table:table-cell office:value-type="float" office:value="148864.83787906918" table:formula="of:=[.M109]/[.K109]" table:style-name="ce26">
            <text:p>148865</text:p>
          </table:table-cell>
          <table:table-cell office:value-type="float" office:value="55159" table:style-name="ce18">
            <text:p>55159</text:p>
          </table:table-cell>
          <table:table-cell office:value-type="float" office:value="23084" table:style-name="ce18">
            <text:p>23084</text:p>
          </table:table-cell>
          <table:table-cell office:value-type="float" office:value="2.3894905562294229" table:formula="of:=[.O109]/[.P109]" table:style-name="ce67">
            <text:p>2.39</text:p>
          </table:table-cell>
          <table:table-cell office:value-type="float" office:value="76.258923213735798" table:formula="of:=([.N109]*100)/([.CV109]*(([.BL109]*([.BK109]/([.BF109]+[.BK109])))+([.BG109]*([.BF109]/([.BF109]+[.BK109])))))" table:style-name="ce67">
            <text:p>76.26</text:p>
          </table:table-cell>
          <table:table-cell office:value-type="float" office:value="-4.8670794544257996" table:formula="of:=(([.M109]*100/[.M108])-100)-[.CY109]" table:style-name="ce28">
            <text:p>-4.87</text:p>
          </table:table-cell>
          <table:table-cell office:value-type="float" office:value="618212000000" table:style-name="ce131">
            <text:p>6.18E+11</text:p>
          </table:table-cell>
          <table:table-cell office:value-type="float" office:value="5.242" table:style-name="ce28">
            <text:p>5.24</text:p>
          </table:table-cell>
          <table:table-cell office:value-type="float" office:value="1.9" table:style-name="ce28">
            <text:p>1.90</text:p>
          </table:table-cell>
          <table:table-cell office:value-type="float" office:value="98.1" table:formula="of:=100-[.V109]" table:style-name="ce28">
            <text:p>98.10</text:p>
          </table:table-cell>
          <table:table-cell office:value-type="float" office:value="28" table:style-name="ce60">
            <text:p>28</text:p>
          </table:table-cell>
          <table:table-cell office:value-type="float" office:value="4.4847090909090914" table:style-name="ce28">
            <text:p>4.48</text:p>
          </table:table-cell>
          <table:table-cell office:value-type="float" office:value="1.3795583333333337" table:style-name="ce72">
            <text:p>1.38</text:p>
          </table:table-cell>
          <table:table-cell office:value-type="float" office:value="8691439000000.001" table:style-name="ce85">
            <text:p>8.69E+12</text:p>
          </table:table-cell>
          <table:table-cell office:value-type="float" office:value="11.404781665475696" table:formula="of:=([.AA109]*100/[.AA108])-100" table:style-name="ce70">
            <text:p>11.40</text:p>
          </table:table-cell>
          <table:table-cell office:value-type="string" table:style-name="ce118">
            <text:p>null</text:p>
          </table:table-cell>
          <table:table-cell office:value-type="float" office:value="509.94750000000005" table:style-name="ce75">
            <text:p>510</text:p>
          </table:table-cell>
          <table:table-cell office:value-type="float" office:value="1077541000000" table:style-name="ce125">
            <text:p>1.07754E+12</text:p>
          </table:table-cell>
          <table:table-cell office:value-type="float" office:value="5405023810857.876" table:formula="of:=([.AW109]*[.AR109]*1000000)+([.CV109]*[.BS109]*86)+([.AS109]*(506006-[.AX109])*1000000)" table:style-name="ce83">
            <text:p>5.41E+12</text:p>
          </table:table-cell>
          <table:table-cell office:value-type="float" office:value="3700678176057.8765" table:formula="of:=([.CV109]*[.BS109]*86)" table:style-name="ce125">
            <text:p>3.70068E+12</text:p>
          </table:table-cell>
          <table:table-cell office:value-type="float" office:value="633982000000" table:style-name="ce83">
            <text:p>6.34E+11</text:p>
          </table:table-cell>
          <table:table-cell office:value-type="float" office:value="16452.181906715661" table:formula="of:=[.AH109]/[.E109]" table:style-name="ce26">
            <text:p>16452</text:p>
          </table:table-cell>
          <table:table-cell office:value-type="float" office:value="14540.299026522878" table:formula="of:=[.AJ108]*(1+([.CY109]/100))" table:style-name="ce76">
            <text:p>14540</text:p>
          </table:table-cell>
          <table:table-cell office:value-type="float" office:value="22060.920786272691" table:formula="of:=[.AI109]+(12*PMT([.U109]/100/12;[.X109]*12;([.AI109]*5)*-1))" table:style-name="ce76">
            <text:p>22061</text:p>
          </table:table-cell>
          <table:table-cell office:value-type="float" office:value="23831.903869955644" table:formula="of:=[.AL108]*(1+(([.CW109]-[.CW108])/100))" table:style-name="ce76">
            <text:p>23832</text:p>
          </table:table-cell>
          <table:table-cell office:value-type="float" office:value="22351.027796811104" table:formula="of:=(([.AL109]+([.AJ109]-[.AI109])+([.AK109]-[.AI109]))-[.AI109])+[.$AI$101]" table:style-name="ce76">
            <text:p>22351</text:p>
          </table:table-cell>
          <table:table-cell office:value-type="float" office:value="146.10607447755777" table:formula="of:=[.AM109]*[.$AN$101]/[.$AM$101]" table:style-name="ce76">
            <text:p>146</text:p>
          </table:table-cell>
          <table:table-cell office:value-type="float" office:value="74.421483050709227" table:formula="of:=[.AI109]*[.$AO$101]/[.$AI$101]" table:style-name="ce76">
            <text:p>74</text:p>
          </table:table-cell>
          <table:table-cell office:value-type="float" office:value="55.001016949290786" table:formula="of:=[.CW109]-[.AO109]" table:style-name="ce118">
            <text:p>55</text:p>
          </table:table-cell>
          <table:table-cell office:value-type="float" office:value="29772.967575813836" table:formula="of:=[.N109]/5" table:style-name="ce26">
            <text:p>29773</text:p>
          </table:table-cell>
          <table:table-cell office:value-type="float" office:value="279" table:style-name="ce8">
            <text:p>279</text:p>
          </table:table-cell>
          <table:table-cell office:value-type="float" office:value="1.04" table:style-name="ce129">
            <text:p>1.04</text:p>
          </table:table-cell>
          <table:table-cell office:value-type="float" office:value="46437" table:style-name="ce18">
            <text:p>46437</text:p>
          </table:table-cell>
          <table:table-cell office:value-type="float" office:value="23304.297020000002" table:style-name="ce78">
            <text:p>23304</text:p>
          </table:table-cell>
          <table:table-cell office:value-type="float" office:value="46144.039610000007" table:style-name="ce78">
            <text:p>46144</text:p>
          </table:table-cell>
          <table:table-cell office:value-type="float" office:value="4258.6499999999996" table:style-name="ce78">
            <text:p>4259</text:p>
          </table:table-cell>
          <table:table-cell office:value-type="float" office:value="9676.8799999999992" table:style-name="ce78">
            <text:p>9677</text:p>
          </table:table-cell>
          <table:table-cell office:value-type="float" office:value="151730" table:style-name="ce18">
            <text:p>151730</text:p>
          </table:table-cell>
          <table:table-cell office:value-type="float" office:value="86357" table:style-name="ce18">
            <text:p>86357</text:p>
          </table:table-cell>
          <table:table-cell office:value-type="float" office:value="58193" table:style-name="ce18">
            <text:p>58193</text:p>
          </table:table-cell>
          <table:table-cell office:value-type="float" office:value="7180" table:style-name="ce18">
            <text:p>7180</text:p>
          </table:table-cell>
          <table:table-cell office:value-type="float" office:value="579166" table:style-name="ce81">
            <text:p>579166</text:p>
          </table:table-cell>
          <table:table-cell office:value-type="float" office:value="100670" table:style-name="ce81">
            <text:p>100670</text:p>
          </table:table-cell>
          <table:table-cell office:value-type="float" office:value="9015" table:style-name="ce81">
            <text:p>9015</text:p>
          </table:table-cell>
          <table:table-cell office:value-type="float" office:value="101152" table:style-name="ce18">
            <text:p>101152</text:p>
          </table:table-cell>
          <table:table-cell office:value-type="float" office:value="167.6163251138089" table:style-name="ce5">
            <text:p>168</text:p>
          </table:table-cell>
          <table:table-cell office:value-type="float" office:value="9562511100" table:style-name="ce18">
            <text:p>9562511100</text:p>
          </table:table-cell>
          <table:table-cell office:value-type="float" office:value="94536.055639038284" table:formula="of:=[.BH109]/[.BF109]" table:style-name="ce51">
            <text:p>94536</text:p>
          </table:table-cell>
          <table:table-cell office:value-type="float" office:value="564.00267441044161" table:formula="of:=[.BI109]/[.BG109]" table:style-name="ce51">
            <text:p>564</text:p>
          </table:table-cell>
          <table:table-cell office:value-type="float" office:value="550093" table:style-name="ce18">
            <text:p>550093</text:p>
          </table:table-cell>
          <table:table-cell office:value-type="float" office:value="98.261833760132035" table:style-name="ce5">
            <text:p>98</text:p>
          </table:table-cell>
          <table:table-cell office:value-type="float" office:value="29850899100" table:style-name="ce18">
            <text:p>29850899100</text:p>
          </table:table-cell>
          <table:table-cell office:value-type="float" office:value="54265.186250324943" table:formula="of:=[.BM109]/[.BK109]" table:style-name="ce55">
            <text:p>54265</text:p>
          </table:table-cell>
          <table:table-cell office:value-type="float" office:value="552.25090122775691" table:formula="of:=[.BN109]/[.BL109]" table:style-name="ce55">
            <text:p>552</text:p>
          </table:table-cell>
          <table:table-cell office:value-type="float" office:value="3.2077941292322016" table:formula="of:=[.CV109]/(([.BO109]+[.BJ109])/2)" table:style-name="ce58">
            <text:p>3.21</text:p>
          </table:table-cell>
          <table:table-cell office:value-type="float" office:value="4.4185807076478198" table:formula="of:=[.BR109]-[.BR108]" table:style-name="ce57">
            <text:p>4.4</text:p>
          </table:table-cell>
          <table:table-cell office:value-type="float" office:value="84.920338967953867" table:style-name="ce56">
            <text:p>85</text:p>
          </table:table-cell>
          <table:table-cell office:value-type="float" office:value="24034966" table:style-name="ce8">
            <text:p>24034966</text:p>
          </table:table-cell>
          <table:table-cell office:value-type="float" office:value="541194" table:formula="of:=[.BS109]-[.BS108]" table:style-name="ce26">
            <text:p>541194</text:p>
          </table:table-cell>
          <table:table-cell office:value-type="float" office:value="579665" table:style-name="ce76">
            <text:p>579665</text:p>
          </table:table-cell>
          <table:table-cell office:value-type="float" office:value="67514" table:style-name="ce76">
            <text:p>67514</text:p>
          </table:table-cell>
          <table:table-cell office:value-type="float" office:value="1.9001041233010274" table:formula="of:=([.B109]/[.BS109])" table:style-name="ce34">
            <text:p>1.90</text:p>
          </table:table-cell>
          <table:table-cell office:value-type="float" office:value="2.71" table:style-name="ce71">
            <text:p>2.71</text:p>
          </table:table-cell>
          <table:table-cell office:value-type="float" office:value="1.377" table:style-name="ce71">
            <text:p>1.38</text:p>
          </table:table-cell>
          <table:table-cell office:value-type="float" office:value="2.3035636848778438" table:formula="of:=([.BS109]*100/[.BS108])-100" table:style-name="ce23">
            <text:p>2.3</text:p>
          </table:table-cell>
          <table:table-cell office:value-type="float" office:value="884279" table:formula="of:=([.B109]-[.B108])" table:style-name="ce73">
            <text:p>884279</text:p>
          </table:table-cell>
          <table:table-cell office:value-type="float" office:value="1.9745131921178682" table:formula="of:=([.B109]*100/[.B108])-100" table:style-name="ce25">
            <text:p>1.97</text:p>
          </table:table-cell>
          <table:table-cell office:value-type="float" office:value="214891.78597785975" table:formula="of:=[.BT109]-([.CA109]/[.BX109])" table:style-name="ce76">
            <text:p>214892</text:p>
          </table:table-cell>
          <table:table-cell office:value-type="float" office:value="2697000" table:style-name="ce78">
            <text:p>2697000</text:p>
          </table:table-cell>
          <table:table-cell office:value-type="float" office:value="55997.069999999992" table:style-name="ce8">
            <text:p>5599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80.099999999999994" table:style-name="ce18">
            <text:p>80.1</text:p>
          </table:table-cell>
          <table:table-cell office:value-type="float" office:value="13.600000000000001" table:style-name="ce18">
            <text:p>13.6</text:p>
          </table:table-cell>
          <table:table-cell office:value-type="float" office:value="6.3" table:style-name="ce18">
            <text:p>6.3</text:p>
          </table:table-cell>
          <table:table-cell office:value-type="string" table:style-name="ce118">
            <text:p>null</text:p>
          </table:table-cell>
          <table:table-cell office:value-type="float" office:value="114.18918918918916" table:formula="of:=[.CN109]*[.$CM$117]/[.$CN$117]" table:style-name="ce78">
            <text:p>114</text:p>
          </table:table-cell>
          <table:table-cell office:value-type="float" office:value="8.4499999999999993" table:style-name="ce23">
            <text:p>8.5</text:p>
          </table:table-cell>
          <table:table-cell office:value-type="float" office:value="-7.6502732240437297" table:formula="of:=(([.CN109]*100)/[.CN108])-100" table:style-name="ce23">
            <text:p>-7.7</text:p>
          </table:table-cell>
          <table:table-cell office:value-type="float" office:value="19.970414201183434" table:formula="of:=[.CR109]/([.CN109]*12)" table:style-name="ce23">
            <text:p>20.0</text:p>
          </table:table-cell>
          <table:table-cell office:value-type="float" office:value="26.627218934911244" table:formula="of:=[.CR109]/(([.CN109]*12)*0.75)" table:style-name="ce23">
            <text:p>26.6</text:p>
          </table:table-cell>
          <table:table-cell office:value-type="float" office:value="2025" table:formula="of:=AVERAGE([Quarterly.E2:.E5])" table:style-name="ce8">
            <text:p>2025</text:p>
          </table:table-cell>
          <table:table-cell office:value-type="float" office:value="989.49578178862487" table:formula="of:=PMT(([.U109]/100)/12;[.X109]*12;([.CR109]*86))*-1" table:style-name="ce78">
            <text:p>989</text:p>
          </table:table-cell>
          <table:table-cell office:value-type="float" office:value="131.5504547423127" table:formula="of:=[.CR109]*[.$CT$117]/[.$CR$117]" table:style-name="ce78">
            <text:p>132</text:p>
          </table:table-cell>
          <table:table-cell office:value-type="float" office:value="726.69999999999993" table:formula="of:=[.CN109]*86" table:style-name="ce78">
            <text:p>727</text:p>
          </table:table-cell>
          <table:table-cell office:value-type="float" office:value="1790.3558333333333" table:style-name="ce8">
            <text:p>1790</text:p>
          </table:table-cell>
          <table:table-cell office:value-type="float" office:value="129.42250000000001" table:style-name="ce78">
            <text:p>129</text:p>
          </table:table-cell>
          <table:table-cell office:value-type="float" office:value="149.59899999999999" table:style-name="ce78">
            <text:p>150</text:p>
          </table:table-cell>
          <table:table-cell office:value-type="float" office:value="2.79" table:style-name="ce25">
            <text:p>2.79</text:p>
          </table:table-cell>
          <table:table-cell office:value-type="float" office:value="193.75" table:formula="of:=[.CZ108]+[.CY109]" table:style-name="ce23">
            <text:p>193.8</text:p>
          </table:table-cell>
          <table:table-cell office:value-type="float" office:value="692.25786525000001" table:formula="of:=(([.CV109]*[.CY109])/100)+[.DA108]" table:style-name="ce23">
            <text:p>692.3</text:p>
          </table:table-cell>
          <table:table-cell office:value-type="float" office:value="1098.0979680833334" table:formula="of:=[.CV109]-[.DA109]" table:style-name="ce23">
            <text:p>1098.1</text:p>
          </table:table-cell>
          <table:table-cell office:value-type="float" office:value="924.05462365591404" table:formula="of:=[.CV109]/[.CZ109]*[.$CZ$87]" table:style-name="ce23">
            <text:p>924.1</text:p>
          </table:table-cell>
          <table:table-cell office:value-type="float" office:value="0.9936181818181824" table:formula="of:=([.Y109]-[.Y108])" table:style-name="ce25">
            <text:p>0.99</text:p>
          </table:table-cell>
          <table:table-cell office:value-type="float" office:value="5.3537820277062735" table:formula="of:=([.CV109]*100/[.CV108])-100" table:style-name="ce25">
            <text:p>5.35</text:p>
          </table:table-cell>
          <table:table-cell office:value-type="float" office:value="2.5637820277062735" table:formula="of:=[.DE109]-[.CY109]" table:style-name="ce25">
            <text:p>2.56</text:p>
          </table:table-cell>
          <table:table-cell office:value-type="float" office:value="-7.6950701512698458" table:formula="of:=([.F109]*100/[.F108])-100" table:style-name="ce25">
            <text:p>-7.70</text:p>
          </table:table-cell>
          <table:table-cell office:value-type="float" office:value="-7.6950701512698458" table:formula="of:=([.K109]*100/[.K108])-100" table:style-name="ce25">
            <text:p>-7.70</text:p>
          </table:table-cell>
          <table:table-cell office:value-type="float" office:value="8.23" table:style-name="ce30">
            <text:p>8.2</text:p>
          </table:table-cell>
          <table:table-cell office:value-type="float" office:value="100" table:formula="of:=(([.DC109]-MIN([.DC95:.DC109]))/(MAX([.DC95:.DC109])-MIN([.DC95:.DC109])))*100" table:style-name="ce128">
            <text:p>100.0</text:p>
          </table:table-cell>
          <table:table-cell office:value-type="float" office:value="100" table:formula="of:=MIN(100; MAX(0; (([.K109]-([.C109]/26/2))/(([.C109]/26)-([.C109]/26/2)))*100))" table:style-name="ce128">
            <text:p>100.0</text:p>
          </table:table-cell>
          <table:table-cell office:value-type="float" office:value="100" table:formula="of:=MIN(100; MAX(0; (([.F109]-([.C109]/26/2))/(([.C109]/26)-([.C109]/26/2)))*100))" table:style-name="ce128">
            <text:p>100.0</text:p>
          </table:table-cell>
          <table:table-cell office:value-type="float" office:value="86.960542997828099" table:formula="of:=(([.AP109]-MIN([.$AP$2:.$AP$128]))/(MAX([.$AP$2:.$AP$128])-MIN([.$AP$2:.$AP$128])))*100" table:style-name="ce128">
            <text:p>87.0</text:p>
          </table:table-cell>
          <table:table-cell office:value-type="float" office:value="100" table:formula="of:=MIN(100;MAX(0;(([.BP109]-1.8)/(2.2-1.8))*100))" table:style-name="ce128">
            <text:p>100.0</text:p>
          </table:table-cell>
          <table:table-cell office:value-type="float" office:value="76.300160196844658" table:formula="of:=100-((([.CC109]-MIN([.CC80:.CC109]))/(MAX([.CC80:.CC109])-MIN([.CC80:.CC109])))*100)" table:style-name="ce128">
            <text:p>76.3</text:p>
          </table:table-cell>
          <table:table-cell office:value-type="float" office:value="91.77" table:formula="of:=MIN(100; MAX(0; ((IF(AND([.DI109]-[.DI108]&gt;=-0.3;[.DI109]-[.DI108]&lt;=0.3);100;IF(AND([.DI109]-[.DI108]&gt;-1;[.DI109]-[.DI108]&lt;-0.3);50;IF([.DI109]-[.DI108]&lt;=-1;25;75)))))-[.DI109]+(IF(([.DI109]-[.DI108])*([.DI108]-[.DI107])&lt;0;AVERAGE([.DI105:.DI109]);0))))" table:style-name="ce128">
            <text:p>91.8</text:p>
          </table:table-cell>
          <table:table-cell office:value-type="string" table:style-name="ce118">
            <text:p>null</text:p>
          </table:table-cell>
          <table:table-cell office:value-type="float" office:value="93.5758147420961" table:formula="of:=AVERAGE([.DJ109:.DP109])" table:style-name="ce128">
            <text:p>93.6</text:p>
          </table:table-cell>
          <table:table-cell office:value-type="float" office:value="397.84000000000003" table:formula="of:=-0.06*(([.A109]-1963)^2)+8.5*([.A109]-1963)+140" table:style-name="ce23">
            <text:p>397.8</text:p>
          </table:table-cell>
          <table:table-cell table:number-columns-repeated="16261"/>
        </table:table-row>
        <table:table-row table:style-name="ro2">
          <table:table-cell office:value-type="float" office:value="2008" table:style-name="ce15">
            <text:p>2008</text:p>
          </table:table-cell>
          <table:table-cell office:value-type="float" office:value="46239271" table:style-name="ce10">
            <text:p>46239271</text:p>
          </table:table-cell>
          <table:table-cell office:value-type="float" office:value="19428733" table:style-name="ce8">
            <text:p>19428733</text:p>
          </table:table-cell>
          <table:table-cell office:value-type="float" office:value="24810150" table:style-name="ce8">
            <text:p>24810150</text:p>
          </table:table-cell>
          <table:table-cell office:value-type="float" office:value="39009330" table:style-name="ce78">
            <text:p>39009330</text:p>
          </table:table-cell>
          <table:table-cell office:value-type="float" office:value="552080" table:style-name="ce18">
            <text:p>552080</text:p>
          </table:table-cell>
          <table:table-cell office:value-type="float" office:value="130481" table:style-name="ce18">
            <text:p>130481</text:p>
          </table:table-cell>
          <table:table-cell office:value-type="float" office:value="23507" table:style-name="ce18">
            <text:p>23507</text:p>
          </table:table-cell>
          <table:table-cell office:value-type="float" office:value="10653" table:style-name="ce18">
            <text:p>10653</text:p>
          </table:table-cell>
          <table:table-cell office:value-type="float" office:value="208499" table:style-name="ce18">
            <text:p>208499</text:p>
          </table:table-cell>
          <table:table-cell office:value-type="float" office:value="836419" table:style-name="ce18">
            <text:p>836419</text:p>
          </table:table-cell>
          <table:table-cell office:value-type="float" office:value="481028" table:style-name="ce18">
            <text:p>481028</text:p>
          </table:table-cell>
          <table:table-cell office:value-type="float" office:value="116809939000" table:style-name="ce84">
            <text:p>1.2E+11</text:p>
          </table:table-cell>
          <table:table-cell office:value-type="float" office:value="139654.81295857698" table:formula="of:=[.M110]/[.K110]" table:style-name="ce26">
            <text:p>139655</text:p>
          </table:table-cell>
          <table:table-cell office:value-type="float" office:value="59375" table:style-name="ce18">
            <text:p>59375</text:p>
          </table:table-cell>
          <table:table-cell office:value-type="float" office:value="43992" table:style-name="ce18">
            <text:p>43992</text:p>
          </table:table-cell>
          <table:table-cell office:value-type="float" office:value="1.3496772140389162" table:formula="of:=[.O110]/[.P110]" table:style-name="ce67">
            <text:p>1.35</text:p>
          </table:table-cell>
          <table:table-cell office:value-type="float" office:value="70.534796393300994" table:formula="of:=([.N110]*100)/([.CV110]*(([.BL110]*([.BK110]/([.BF110]+[.BK110])))+([.BG110]*([.BF110]/([.BF110]+[.BK110])))))" table:style-name="ce67">
            <text:p>70.53</text:p>
          </table:table-cell>
          <table:table-cell office:value-type="float" office:value="-40.743374508740331" table:formula="of:=(([.M110]*100/[.M109])-100)-[.CY110]" table:style-name="ce28">
            <text:p>-40.74</text:p>
          </table:table-cell>
          <table:table-cell office:value-type="float" office:value="655145000000" table:style-name="ce131">
            <text:p>6.55E+11</text:p>
          </table:table-cell>
          <table:table-cell office:value-type="float" office:value="5.835" table:style-name="ce28">
            <text:p>5.84</text:p>
          </table:table-cell>
          <table:table-cell office:value-type="float" office:value="2.1" table:style-name="ce28">
            <text:p>2.10</text:p>
          </table:table-cell>
          <table:table-cell office:value-type="float" office:value="97.9" table:formula="of:=100-[.V110]" table:style-name="ce28">
            <text:p>97.90</text:p>
          </table:table-cell>
          <table:table-cell office:value-type="float" office:value="27" table:style-name="ce60">
            <text:p>27</text:p>
          </table:table-cell>
          <table:table-cell office:value-type="float" office:value="4.8421636363636358" table:style-name="ce28">
            <text:p>4.84</text:p>
          </table:table-cell>
          <table:table-cell office:value-type="float" office:value="1.47115" table:style-name="ce72">
            <text:p>1.47</text:p>
          </table:table-cell>
          <table:table-cell office:value-type="float" office:value="9423780000000" table:style-name="ce85">
            <text:p>9.42E+12</text:p>
          </table:table-cell>
          <table:table-cell office:value-type="float" office:value="8.426004025340319" table:formula="of:=([.AA110]*100/[.AA109])-100" table:style-name="ce70">
            <text:p>8.43</text:p>
          </table:table-cell>
          <table:table-cell office:value-type="string" table:style-name="ce118">
            <text:p>null</text:p>
          </table:table-cell>
          <table:table-cell office:value-type="float" office:value="600.01666666666665" table:style-name="ce75">
            <text:p>600</text:p>
          </table:table-cell>
          <table:table-cell office:value-type="float" office:value="1112432000000" table:style-name="ce125">
            <text:p>1.11243E+12</text:p>
          </table:table-cell>
          <table:table-cell office:value-type="float" office:value="5399408322340" table:formula="of:=([.AW110]*[.AR110]*1000000)+([.CV110]*[.BS110]*86)+([.AS110]*(506006-[.AX110])*1000000)" table:style-name="ce83">
            <text:p>5.40E+12</text:p>
          </table:table-cell>
          <table:table-cell office:value-type="float" office:value="3731550035340" table:formula="of:=([.CV110]*[.BS110]*86)" table:style-name="ce125">
            <text:p>3.73155E+12</text:p>
          </table:table-cell>
          <table:table-cell office:value-type="float" office:value="668004000000" table:style-name="ce83">
            <text:p>6.68E+11</text:p>
          </table:table-cell>
          <table:table-cell office:value-type="float" office:value="17124.211054124746" table:formula="of:=[.AH110]/[.E110]" table:style-name="ce26">
            <text:p>17124</text:p>
          </table:table-cell>
          <table:table-cell office:value-type="float" office:value="15133.543226805012" table:formula="of:=[.AJ109]*(1+([.CY110]/100))" table:style-name="ce76">
            <text:p>15134</text:p>
          </table:table-cell>
          <table:table-cell office:value-type="float" office:value="23429.936017069904" table:formula="of:=[.AI110]+(12*PMT([.U110]/100/12;[.X110]*12;([.AI110]*5)*-1))" table:style-name="ce76">
            <text:p>23430</text:p>
          </table:table-cell>
          <table:table-cell office:value-type="float" office:value="22969.784747459995" table:formula="of:=[.AL109]*(1+(([.CW110]-[.CW109])/100))" table:style-name="ce76">
            <text:p>22970</text:p>
          </table:table-cell>
          <table:table-cell office:value-type="float" office:value="21435.080663167551" table:formula="of:=(([.AL110]+([.AJ110]-[.AI110])+([.AK110]-[.AI110]))-[.AI110])+[.$AI$101]" table:style-name="ce76">
            <text:p>21435</text:p>
          </table:table-cell>
          <table:table-cell office:value-type="float" office:value="140.11863437671713" table:formula="of:=[.AM110]*[.$AN$101]/[.$AM$101]" table:style-name="ce76">
            <text:p>140</text:p>
          </table:table-cell>
          <table:table-cell office:value-type="float" office:value="77.461408459209167" table:formula="of:=[.AI110]*[.$AO$101]/[.$AI$101]" table:style-name="ce76">
            <text:p>77</text:p>
          </table:table-cell>
          <table:table-cell office:value-type="float" office:value="48.343591540790825" table:formula="of:=[.CW110]-[.AO110]" table:style-name="ce118">
            <text:p>48</text:p>
          </table:table-cell>
          <table:table-cell office:value-type="float" office:value="27930.962591715397" table:formula="of:=[.N110]/5" table:style-name="ce26">
            <text:p>27931</text:p>
          </table:table-cell>
          <table:table-cell office:value-type="float" office:value="254.63333333333335" table:style-name="ce8">
            <text:p>255</text:p>
          </table:table-cell>
          <table:table-cell office:value-type="float" office:value="1.1000000000000001" table:style-name="ce129">
            <text:p>1.10</text:p>
          </table:table-cell>
          <table:table-cell office:value-type="float" office:value="31479" table:style-name="ce18">
            <text:p>31479</text:p>
          </table:table-cell>
          <table:table-cell office:value-type="float" office:value="16546.61" table:style-name="ce78">
            <text:p>16547</text:p>
          </table:table-cell>
          <table:table-cell office:value-type="float" office:value="32201.670000000002" table:style-name="ce78">
            <text:p>32202</text:p>
          </table:table-cell>
          <table:table-cell office:value-type="float" office:value="4407.0600000000004" table:style-name="ce78">
            <text:p>4407</text:p>
          </table:table-cell>
          <table:table-cell office:value-type="float" office:value="9938.81" table:style-name="ce78">
            <text:p>9939</text:p>
          </table:table-cell>
          <table:table-cell office:value-type="float" office:value="108332" table:style-name="ce18">
            <text:p>108332</text:p>
          </table:table-cell>
          <table:table-cell office:value-type="float" office:value="50959" table:style-name="ce18">
            <text:p>50959</text:p>
          </table:table-cell>
          <table:table-cell office:value-type="float" office:value="53623" table:style-name="ce18">
            <text:p>53623</text:p>
          </table:table-cell>
          <table:table-cell office:value-type="float" office:value="3750" table:style-name="ce18">
            <text:p>3750</text:p>
          </table:table-cell>
          <table:table-cell office:value-type="float" office:value="222539" table:style-name="ce81">
            <text:p>222539</text:p>
          </table:table-cell>
          <table:table-cell office:value-type="float" office:value="71642" table:style-name="ce81">
            <text:p>71642</text:p>
          </table:table-cell>
          <table:table-cell office:value-type="float" office:value="5370" table:style-name="ce81">
            <text:p>5370</text:p>
          </table:table-cell>
          <table:table-cell office:value-type="float" office:value="53031" table:style-name="ce18">
            <text:p>53031</text:p>
          </table:table-cell>
          <table:table-cell office:value-type="float" office:value="172.45045712159359" table:style-name="ce5">
            <text:p>172</text:p>
          </table:table-cell>
          <table:table-cell office:value-type="float" office:value="5718860600.000001" table:style-name="ce18">
            <text:p>5718860600</text:p>
          </table:table-cell>
          <table:table-cell office:value-type="float" office:value="107839.95398917617" table:formula="of:=[.BH110]/[.BF110]" table:style-name="ce51">
            <text:p>107840</text:p>
          </table:table-cell>
          <table:table-cell office:value-type="float" office:value="625.33875403495733" table:formula="of:=[.BI110]/[.BG110]" table:style-name="ce51">
            <text:p>625</text:p>
          </table:table-cell>
          <table:table-cell office:value-type="float" office:value="211758" table:style-name="ce18">
            <text:p>211758</text:p>
          </table:table-cell>
          <table:table-cell office:value-type="float" office:value="97.004441921524517" table:style-name="ce5">
            <text:p>97</text:p>
          </table:table-cell>
          <table:table-cell office:value-type="float" office:value="12685046799.999998" table:style-name="ce18">
            <text:p>12685046800</text:p>
          </table:table-cell>
          <table:table-cell office:value-type="float" office:value="59903.506833271931" table:formula="of:=[.BM110]/[.BK110]" table:style-name="ce55">
            <text:p>59904</text:p>
          </table:table-cell>
          <table:table-cell office:value-type="float" office:value="617.53364739455105" table:formula="of:=[.BN110]/[.BL110]" table:style-name="ce55">
            <text:p>618</text:p>
          </table:table-cell>
          <table:table-cell office:value-type="float" office:value="2.8418041915949028" table:formula="of:=[.CV110]/(([.BO110]+[.BJ110])/2)" table:style-name="ce58">
            <text:p>2.84</text:p>
          </table:table-cell>
          <table:table-cell office:value-type="float" office:value="4.0785295576251173" table:formula="of:=[.BR110]-[.BR109]" table:style-name="ce57">
            <text:p>4.1</text:p>
          </table:table-cell>
          <table:table-cell office:value-type="float" office:value="88.998868525578985" table:style-name="ce56">
            <text:p>89</text:p>
          </table:table-cell>
          <table:table-cell office:value-type="float" office:value="24569715" table:style-name="ce8">
            <text:p>24569715</text:p>
          </table:table-cell>
          <table:table-cell office:value-type="float" office:value="534749" table:formula="of:=[.BS110]-[.BS109]" table:style-name="ce26">
            <text:p>534749</text:p>
          </table:table-cell>
          <table:table-cell office:value-type="float" office:value="563631" table:style-name="ce76">
            <text:p>563631</text:p>
          </table:table-cell>
          <table:table-cell office:value-type="float" office:value="68587" table:style-name="ce76">
            <text:p>68587</text:p>
          </table:table-cell>
          <table:table-cell office:value-type="float" office:value="1.8819620414807416" table:formula="of:=([.B110]/[.BS110])" table:style-name="ce34">
            <text:p>1.88</text:p>
          </table:table-cell>
          <table:table-cell office:value-type="float" office:value="2.68" table:style-name="ce71">
            <text:p>2.68</text:p>
          </table:table-cell>
          <table:table-cell office:value-type="float" office:value="1.446" table:style-name="ce71">
            <text:p>1.45</text:p>
          </table:table-cell>
          <table:table-cell office:value-type="float" office:value="2.2248793694985949" table:formula="of:=([.BS110]*100/[.BS109])-100" table:style-name="ce23">
            <text:p>2.2</text:p>
          </table:table-cell>
          <table:table-cell office:value-type="float" office:value="570333" table:formula="of:=([.B110]-[.B109])" table:style-name="ce73">
            <text:p>570333</text:p>
          </table:table-cell>
          <table:table-cell office:value-type="float" office:value="1.2488422656116995" table:formula="of:=([.B110]*100/[.B109])-100" table:style-name="ce25">
            <text:p>1.25</text:p>
          </table:table-cell>
          <table:table-cell office:value-type="float" office:value="321938.17910447763" table:formula="of:=[.BT110]-([.CA110]/[.BX110])" table:style-name="ce76">
            <text:p>321938</text:p>
          </table:table-cell>
          <table:table-cell office:value-type="float" office:value="1890000" table:style-name="ce78">
            <text:p>1890000</text:p>
          </table:table-cell>
          <table:table-cell office:value-type="float" office:value="42695.54" table:style-name="ce8">
            <text:p>4269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9.599999999999994" table:style-name="ce18">
            <text:p>79.6</text:p>
          </table:table-cell>
          <table:table-cell office:value-type="float" office:value="14.2" table:style-name="ce18">
            <text:p>14.2</text:p>
          </table:table-cell>
          <table:table-cell office:value-type="float" office:value="6.1" table:style-name="ce18">
            <text:p>6.1</text:p>
          </table:table-cell>
          <table:table-cell office:value-type="string" table:style-name="ce118">
            <text:p>null</text:p>
          </table:table-cell>
          <table:table-cell office:value-type="float" office:value="108.1081081081081" table:formula="of:=[.CN110]*[.$CM$117]/[.$CN$117]" table:style-name="ce78">
            <text:p>108</text:p>
          </table:table-cell>
          <table:table-cell office:value-type="float" office:value="8" table:style-name="ce23">
            <text:p>8.0</text:p>
          </table:table-cell>
          <table:table-cell office:value-type="float" office:value="-5.325443786982234" table:formula="of:=(([.CN110]*100)/[.CN109])-100" table:style-name="ce23">
            <text:p>-5.3</text:p>
          </table:table-cell>
          <table:table-cell office:value-type="float" office:value="20.627604166666668" table:formula="of:=[.CR110]/([.CN110]*12)" table:style-name="ce23">
            <text:p>20.6</text:p>
          </table:table-cell>
          <table:table-cell office:value-type="float" office:value="27.503472222222221" table:formula="of:=[.CR110]/(([.CN110]*12)*0.75)" table:style-name="ce23">
            <text:p>27.5</text:p>
          </table:table-cell>
          <table:table-cell office:value-type="float" office:value="1980.25" table:formula="of:=AVERAGE([Quarterly.E6:.E9])" table:style-name="ce8">
            <text:p>1980</text:p>
          </table:table-cell>
          <table:table-cell office:value-type="float" office:value="1045.1814065893741" table:formula="of:=PMT(([.U110]/100)/12;[.X110]*12;([.CR110]*86))*-1" table:style-name="ce78">
            <text:p>1045</text:p>
          </table:table-cell>
          <table:table-cell office:value-type="float" office:value="128.64335210047639" table:formula="of:=[.CR110]*[.$CT$117]/[.$CR$117]" table:style-name="ce78">
            <text:p>129</text:p>
          </table:table-cell>
          <table:table-cell office:value-type="float" office:value="688" table:formula="of:=[.CN110]*86" table:style-name="ce78">
            <text:p>688</text:p>
          </table:table-cell>
          <table:table-cell office:value-type="float" office:value="1766" table:style-name="ce26">
            <text:p>1766</text:p>
          </table:table-cell>
          <table:table-cell office:value-type="float" office:value="125.80499999999999" table:style-name="ce76">
            <text:p>126</text:p>
          </table:table-cell>
          <table:table-cell office:value-type="float" office:value="147.33600000000001" table:style-name="ce78">
            <text:p>147</text:p>
          </table:table-cell>
          <table:table-cell office:value-type="float" office:value="4.08" table:style-name="ce25">
            <text:p>4.08</text:p>
          </table:table-cell>
          <table:table-cell office:value-type="float" office:value="197.83" table:formula="of:=[.CZ109]+[.CY110]" table:style-name="ce23">
            <text:p>197.8</text:p>
          </table:table-cell>
          <table:table-cell office:value-type="float" office:value="764.31066525000006" table:formula="of:=(([.CV110]*[.CY110])/100)+[.DA109]" table:style-name="ce23">
            <text:p>764.3</text:p>
          </table:table-cell>
          <table:table-cell office:value-type="float" office:value="1001.6893347499999" table:formula="of:=[.CV110]-[.DA110]" table:style-name="ce23">
            <text:p>1001.7</text:p>
          </table:table-cell>
          <table:table-cell office:value-type="float" office:value="892.68563918515883" table:formula="of:=[.CV110]/[.CZ110]*[.$CZ$87]" table:style-name="ce23">
            <text:p>892.7</text:p>
          </table:table-cell>
          <table:table-cell office:value-type="float" office:value="0.35745454545454436" table:formula="of:=([.Y110]-[.Y109])" table:style-name="ce25">
            <text:p>0.36</text:p>
          </table:table-cell>
          <table:table-cell office:value-type="float" office:value="-1.3603906486001165" table:formula="of:=([.CV110]*100/[.CV109])-100" table:style-name="ce25">
            <text:p>-1.36</text:p>
          </table:table-cell>
          <table:table-cell office:value-type="float" office:value="-5.4403906486001166" table:formula="of:=[.DE110]-[.CY110]" table:style-name="ce25">
            <text:p>-5.44</text:p>
          </table:table-cell>
          <table:table-cell office:value-type="float" office:value="-28.791435573326453" table:formula="of:=([.F110]*100/[.F109])-100" table:style-name="ce25">
            <text:p>-28.79</text:p>
          </table:table-cell>
          <table:table-cell office:value-type="float" office:value="-32.486419294691217" table:formula="of:=([.K110]*100/[.K109])-100" table:style-name="ce25">
            <text:p>-32.49</text:p>
          </table:table-cell>
          <table:table-cell office:value-type="float" office:value="11.25" table:style-name="ce30">
            <text:p>11.3</text:p>
          </table:table-cell>
          <table:table-cell office:value-type="float" office:value="94.182627992272614" table:formula="of:=(([.DC110]-MIN([.DC96:.DC110]))/(MAX([.DC96:.DC110])-MIN([.DC96:.DC110])))*100" table:style-name="ce128">
            <text:p>94.2</text:p>
          </table:table-cell>
          <table:table-cell office:value-type="float" office:value="100" table:formula="of:=MIN(100; MAX(0; (([.K110]-([.C110]/26/2))/(([.C110]/26)-([.C110]/26/2)))*100))" table:style-name="ce128">
            <text:p>100.0</text:p>
          </table:table-cell>
          <table:table-cell office:value-type="float" office:value="47.761359425753611" table:formula="of:=MIN(100; MAX(0; (([.F110]-([.C110]/26/2))/(([.C110]/26)-([.C110]/26/2)))*100))" table:style-name="ce128">
            <text:p>47.8</text:p>
          </table:table-cell>
          <table:table-cell office:value-type="float" office:value="76.514917018870747" table:formula="of:=(([.AP110]-MIN([.$AP$2:.$AP$128]))/(MAX([.$AP$2:.$AP$128])-MIN([.$AP$2:.$AP$128])))*100" table:style-name="ce128">
            <text:p>76.5</text:p>
          </table:table-cell>
          <table:table-cell office:value-type="float" office:value="100" table:formula="of:=MIN(100;MAX(0;(([.BP110]-1.8)/(2.2-1.8))*100))" table:style-name="ce128">
            <text:p>100.0</text:p>
          </table:table-cell>
          <table:table-cell office:value-type="float" office:value="34.944356447834608" table:formula="of:=100-((([.CC110]-MIN([.CC81:.CC110]))/(MAX([.CC81:.CC110])-MIN([.CC81:.CC110])))*100)" table:style-name="ce128">
            <text:p>34.9</text:p>
          </table:table-cell>
          <table:table-cell office:value-type="float" office:value="73.36" table:formula="of:=MIN(100; MAX(0; ((IF(AND([.DI110]-[.DI109]&gt;=-0.3;[.DI110]-[.DI109]&lt;=0.3);100;IF(AND([.DI110]-[.DI109]&gt;-1;[.DI110]-[.DI109]&lt;-0.3);50;IF([.DI110]-[.DI109]&lt;=-1;25;75)))))-[.DI110]+(IF(([.DI110]-[.DI109])*([.DI109]-[.DI108])&lt;0;AVERAGE([.DI106:.DI110]);0))))" table:style-name="ce128">
            <text:p>73.4</text:p>
          </table:table-cell>
          <table:table-cell office:value-type="string" table:style-name="ce118">
            <text:p>null</text:p>
          </table:table-cell>
          <table:table-cell office:value-type="float" office:value="75.251894412104505" table:formula="of:=AVERAGE([.DJ110:.DP110])" table:style-name="ce128">
            <text:p>75.3</text:p>
          </table:table-cell>
          <table:table-cell office:value-type="float" office:value="401" table:formula="of:=-0.06*(([.A110]-1963)^2)+8.5*([.A110]-1963)+140" table:style-name="ce23">
            <text:p>401.0</text:p>
          </table:table-cell>
          <table:table-cell table:number-columns-repeated="16261"/>
        </table:table-row>
        <table:table-row table:style-name="ro2">
          <table:table-cell office:value-type="float" office:value="2009" table:style-name="ce15">
            <text:p>2009</text:p>
          </table:table-cell>
          <table:table-cell office:value-type="float" office:value="46486621" table:style-name="ce10">
            <text:p>46486621</text:p>
          </table:table-cell>
          <table:table-cell office:value-type="float" office:value="19403020" table:style-name="ce8">
            <text:p>19403020</text:p>
          </table:table-cell>
          <table:table-cell office:value-type="float" office:value="24881376" table:style-name="ce8">
            <text:p>24881376</text:p>
          </table:table-cell>
          <table:table-cell office:value-type="float" office:value="39239290" table:style-name="ce78">
            <text:p>39239290</text:p>
          </table:table-cell>
          <table:table-cell office:value-type="float" office:value="413393" table:style-name="ce18">
            <text:p>413393</text:p>
          </table:table-cell>
          <table:table-cell office:value-type="float" office:value="122546" table:style-name="ce18">
            <text:p>122546</text:p>
          </table:table-cell>
          <table:table-cell office:value-type="float" office:value="22765" table:style-name="ce18">
            <text:p>22765</text:p>
          </table:table-cell>
          <table:table-cell office:value-type="float" office:value="7512" table:style-name="ce18">
            <text:p>7512</text:p>
          </table:table-cell>
          <table:table-cell office:value-type="float" office:value="200749" table:style-name="ce18">
            <text:p>200749</text:p>
          </table:table-cell>
          <table:table-cell office:value-type="float" office:value="650889" table:style-name="ce18">
            <text:p>650889</text:p>
          </table:table-cell>
          <table:table-cell office:value-type="float" office:value="360397" table:style-name="ce18">
            <text:p>360397</text:p>
          </table:table-cell>
          <table:table-cell office:value-type="float" office:value="76677074000" table:style-name="ce84">
            <text:p>7.7E+10</text:p>
          </table:table-cell>
          <table:table-cell office:value-type="float" office:value="117803.61013936324" table:formula="of:=[.M111]/[.K111]" table:style-name="ce26">
            <text:p>117804</text:p>
          </table:table-cell>
          <table:table-cell office:value-type="float" office:value="70471" table:style-name="ce18">
            <text:p>70471</text:p>
          </table:table-cell>
          <table:table-cell office:value-type="float" office:value="27640" table:style-name="ce18">
            <text:p>27640</text:p>
          </table:table-cell>
          <table:table-cell office:value-type="float" office:value="2.5496020260492043" table:formula="of:=[.O111]/[.P111]" table:style-name="ce67">
            <text:p>2.55</text:p>
          </table:table-cell>
          <table:table-cell office:value-type="float" office:value="58.167734650235502" table:formula="of:=([.N111]*100)/([.CV111]*(([.BL111]*([.BK111]/([.BF111]+[.BK111])))+([.BG111]*([.BF111]/([.BF111]+[.BK111])))))" table:style-name="ce67">
            <text:p>58.17</text:p>
          </table:table-cell>
          <table:table-cell office:value-type="float" office:value="-34.067406008062385" table:formula="of:=(([.M111]*100/[.M110])-100)-[.CY111]" table:style-name="ce28">
            <text:p>-34.07</text:p>
          </table:table-cell>
          <table:table-cell office:value-type="float" office:value="654566000000" table:style-name="ce131">
            <text:p>6.55E+11</text:p>
          </table:table-cell>
          <table:table-cell office:value-type="float" office:value="3.4390000000000001" table:style-name="ce28">
            <text:p>3.44</text:p>
          </table:table-cell>
          <table:table-cell office:value-type="float" office:value="3.1" table:style-name="ce28">
            <text:p>3.10</text:p>
          </table:table-cell>
          <table:table-cell office:value-type="float" office:value="96.9" table:formula="of:=100-[.V111]" table:style-name="ce28">
            <text:p>96.90</text:p>
          </table:table-cell>
          <table:table-cell office:value-type="float" office:value="24" table:style-name="ce60">
            <text:p>24</text:p>
          </table:table-cell>
          <table:table-cell office:value-type="float" office:value="1.5266454545454544" table:style-name="ce28">
            <text:p>1.53</text:p>
          </table:table-cell>
          <table:table-cell office:value-type="float" office:value="1.3948333333333334" table:style-name="ce72">
            <text:p>1.39</text:p>
          </table:table-cell>
          <table:table-cell office:value-type="float" office:value="9382249000000" table:style-name="ce85">
            <text:p>9.38E+12</text:p>
          </table:table-cell>
          <table:table-cell office:value-type="float" office:value="-0.44070426092289949" table:formula="of:=([.AA111]*100/[.AA110])-100" table:style-name="ce70">
            <text:p>-0.44</text:p>
          </table:table-cell>
          <table:table-cell office:value-type="string" table:style-name="ce118">
            <text:p>null</text:p>
          </table:table-cell>
          <table:table-cell office:value-type="float" office:value="702.89249999999993" table:style-name="ce75">
            <text:p>703</text:p>
          </table:table-cell>
          <table:table-cell office:value-type="float" office:value="1072990000000" table:style-name="ce125">
            <text:p>1.07299E+12</text:p>
          </table:table-cell>
          <table:table-cell office:value-type="float" office:value="5286782266662" table:formula="of:=([.AW111]*[.AR111]*1000000)+([.CV111]*[.BS111]*86)+([.AS111]*(506006-[.AX111])*1000000)" table:style-name="ce83">
            <text:p>5.29E+12</text:p>
          </table:table-cell>
          <table:table-cell office:value-type="float" office:value="3624431230512" table:formula="of:=([.CV111]*[.BS111]*86)" table:style-name="ce125">
            <text:p>3.62443E+12</text:p>
          </table:table-cell>
          <table:table-cell office:value-type="float" office:value="664289000000" table:style-name="ce83">
            <text:p>6.64E+11</text:p>
          </table:table-cell>
          <table:table-cell office:value-type="float" office:value="16929.179911257314" table:formula="of:=[.AH111]/[.E111]" table:style-name="ce26">
            <text:p>16929</text:p>
          </table:table-cell>
          <table:table-cell office:value-type="float" office:value="15089.655951447277" table:formula="of:=[.AJ110]*(1+([.CY111]/100))" table:style-name="ce76">
            <text:p>15090</text:p>
          </table:table-cell>
          <table:table-cell office:value-type="float" office:value="22114.332882210903" table:formula="of:=[.AI111]+(12*PMT([.U111]/100/12;[.X111]*12;([.AI111]*5)*-1))" table:style-name="ce76">
            <text:p>22114</text:p>
          </table:table-cell>
          <table:table-cell office:value-type="float" office:value="22106.120840955504" table:formula="of:=[.AL110]*(1+(([.CW111]-[.CW110])/100))" table:style-name="ce76">
            <text:p>22106</text:p>
          </table:table-cell>
          <table:table-cell office:value-type="float" office:value="19797.019775048619" table:formula="of:=(([.AL111]+([.AJ111]-[.AI111])+([.AK111]-[.AI111]))-[.AI111])+[.$AI$101]" table:style-name="ce76">
            <text:p>19797</text:p>
          </table:table-cell>
          <table:table-cell office:value-type="float" office:value="129.41082047688272" table:formula="of:=[.AM111]*[.$AN$101]/[.$AM$101]" table:style-name="ce76">
            <text:p>129</text:p>
          </table:table-cell>
          <table:table-cell office:value-type="float" office:value="76.579184631660524" table:formula="of:=[.AI111]*[.$AO$101]/[.$AI$101]" table:style-name="ce76">
            <text:p>77</text:p>
          </table:table-cell>
          <table:table-cell office:value-type="float" office:value="45.465815368339477" table:formula="of:=[.CW111]-[.AO111]" table:style-name="ce118">
            <text:p>45</text:p>
          </table:table-cell>
          <table:table-cell office:value-type="float" office:value="23560.722027872649" table:formula="of:=[.N111]/5" table:style-name="ce26">
            <text:p>23561</text:p>
          </table:table-cell>
          <table:table-cell office:value-type="float" office:value="239.02499999999998" table:style-name="ce8">
            <text:p>239</text:p>
          </table:table-cell>
          <table:table-cell office:value-type="float" office:value="1.0900000000000001" table:style-name="ce129">
            <text:p>1.09</text:p>
          </table:table-cell>
          <table:table-cell office:value-type="float" office:value="22656" table:style-name="ce18">
            <text:p>22656</text:p>
          </table:table-cell>
          <table:table-cell office:value-type="float" office:value="9002.43" table:style-name="ce78">
            <text:p>9002</text:p>
          </table:table-cell>
          <table:table-cell office:value-type="float" office:value="21931.480000000003" table:style-name="ce78">
            <text:p>21931</text:p>
          </table:table-cell>
          <table:table-cell office:value-type="float" office:value="4695.1099999999997" table:style-name="ce78">
            <text:p>4695</text:p>
          </table:table-cell>
          <table:table-cell office:value-type="float" office:value="10499.24" table:style-name="ce78">
            <text:p>10499</text:p>
          </table:table-cell>
          <table:table-cell office:value-type="float" office:value="89108" table:style-name="ce18">
            <text:p>89108</text:p>
          </table:table-cell>
          <table:table-cell office:value-type="float" office:value="31595" table:style-name="ce18">
            <text:p>31595</text:p>
          </table:table-cell>
          <table:table-cell office:value-type="float" office:value="55012" table:style-name="ce18">
            <text:p>55012</text:p>
          </table:table-cell>
          <table:table-cell office:value-type="float" office:value="2501" table:style-name="ce18">
            <text:p>2501</text:p>
          </table:table-cell>
          <table:table-cell office:value-type="float" office:value="86219" table:style-name="ce81">
            <text:p>86219</text:p>
          </table:table-cell>
          <table:table-cell office:value-type="float" office:value="55323" table:style-name="ce81">
            <text:p>55323</text:p>
          </table:table-cell>
          <table:table-cell office:value-type="float" office:value="5098" table:style-name="ce81">
            <text:p>5098</text:p>
          </table:table-cell>
          <table:table-cell office:value-type="float" office:value="27072" table:style-name="ce18">
            <text:p>27072</text:p>
          </table:table-cell>
          <table:table-cell office:value-type="float" office:value="183.24247835965181" table:style-name="ce5">
            <text:p>183</text:p>
          </table:table-cell>
          <table:table-cell office:value-type="float" office:value="3199472400.0000005" table:style-name="ce18">
            <text:p>3199472400</text:p>
          </table:table-cell>
          <table:table-cell office:value-type="float" office:value="118183.82092198584" table:formula="of:=[.BH111]/[.BF111]" table:style-name="ce51">
            <text:p>118184</text:p>
          </table:table-cell>
          <table:table-cell office:value-type="float" office:value="644.95864703393329" table:formula="of:=[.BI111]/[.BG111]" table:style-name="ce51">
            <text:p>645</text:p>
          </table:table-cell>
          <table:table-cell office:value-type="float" office:value="83750" table:style-name="ce18">
            <text:p>83750</text:p>
          </table:table-cell>
          <table:table-cell office:value-type="float" office:value="99.153449626823587" table:style-name="ce5">
            <text:p>99</text:p>
          </table:table-cell>
          <table:table-cell office:value-type="float" office:value="5318232000" table:style-name="ce18">
            <text:p>5318232000</text:p>
          </table:table-cell>
          <table:table-cell office:value-type="float" office:value="63501.277611940299" table:formula="of:=[.BM111]/[.BK111]" table:style-name="ce55">
            <text:p>63501</text:p>
          </table:table-cell>
          <table:table-cell office:value-type="float" office:value="640.43437571698519" table:formula="of:=[.BN111]/[.BL111]" table:style-name="ce55">
            <text:p>640</text:p>
          </table:table-cell>
          <table:table-cell office:value-type="float" office:value="2.6326578253535038" table:formula="of:=[.CV111]/(([.BO111]+[.BJ111])/2)" table:style-name="ce58">
            <text:p>2.63</text:p>
          </table:table-cell>
          <table:table-cell office:value-type="float" office:value="-0.47648921956619006" table:formula="of:=[.BR111]-[.BR110]" table:style-name="ce57">
            <text:p>-0.5</text:p>
          </table:table-cell>
          <table:table-cell office:value-type="float" office:value="88.522379306012795" table:style-name="ce56">
            <text:p>89</text:p>
          </table:table-cell>
          <table:table-cell office:value-type="float" office:value="24908126" table:style-name="ce8">
            <text:p>24908126</text:p>
          </table:table-cell>
          <table:table-cell office:value-type="float" office:value="338411" table:formula="of:=[.BS111]-[.BS110]" table:style-name="ce26">
            <text:p>338411</text:p>
          </table:table-cell>
          <table:table-cell office:value-type="float" office:value="356555" table:style-name="ce76">
            <text:p>356555</text:p>
          </table:table-cell>
          <table:table-cell office:value-type="float" office:value="67904" table:style-name="ce76">
            <text:p>67904</text:p>
          </table:table-cell>
          <table:table-cell office:value-type="float" office:value="1.866323504225087" table:formula="of:=([.B111]/[.BS111])" table:style-name="ce34">
            <text:p>1.87</text:p>
          </table:table-cell>
          <table:table-cell office:value-type="float" office:value="2.66" table:style-name="ce71">
            <text:p>2.66</text:p>
          </table:table-cell>
          <table:table-cell office:value-type="float" office:value="1.379" table:style-name="ce71">
            <text:p>1.38</text:p>
          </table:table-cell>
          <table:table-cell office:value-type="float" office:value="1.3773501239228807" table:formula="of:=([.BS111]*100/[.BS110])-100" table:style-name="ce23">
            <text:p>1.4</text:p>
          </table:table-cell>
          <table:table-cell office:value-type="float" office:value="247350" table:formula="of:=([.B111]-[.B110])" table:style-name="ce73">
            <text:p>247350</text:p>
          </table:table-cell>
          <table:table-cell office:value-type="float" office:value="0.53493490414241762" table:formula="of:=([.B111]*100/[.B110])-100" table:style-name="ce25">
            <text:p>0.53</text:p>
          </table:table-cell>
          <table:table-cell office:value-type="float" office:value="245422.27819548873" table:formula="of:=[.BT111]-([.CA111]/[.BX111])" table:style-name="ce76">
            <text:p>245422</text:p>
          </table:table-cell>
          <table:table-cell office:value-type="float" office:value="2460000" table:style-name="ce78">
            <text:p>2460000</text:p>
          </table:table-cell>
          <table:table-cell office:value-type="float" office:value="28911.140000000003" table:style-name="ce8">
            <text:p>2891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9.3" table:style-name="ce18">
            <text:p>79.3</text:p>
          </table:table-cell>
          <table:table-cell office:value-type="float" office:value="14.600000000000001" table:style-name="ce18">
            <text:p>14.6</text:p>
          </table:table-cell>
          <table:table-cell office:value-type="float" office:value="6.1" table:style-name="ce18">
            <text:p>6.1</text:p>
          </table:table-cell>
          <table:table-cell office:value-type="string" table:style-name="ce118">
            <text:p>null</text:p>
          </table:table-cell>
          <table:table-cell office:value-type="float" office:value="103.37837837837837" table:formula="of:=[.CN111]*[.$CM$117]/[.$CN$117]" table:style-name="ce78">
            <text:p>103</text:p>
          </table:table-cell>
          <table:table-cell office:value-type="float" office:value="7.65" table:style-name="ce23">
            <text:p>7.7</text:p>
          </table:table-cell>
          <table:table-cell office:value-type="float" office:value="-4.375" table:formula="of:=(([.CN111]*100)/[.CN110])-100" table:style-name="ce23">
            <text:p>-4.4</text:p>
          </table:table-cell>
          <table:table-cell office:value-type="float" office:value="20.687182280319533" table:formula="of:=[.CR111]/([.CN111]*12)" table:style-name="ce23">
            <text:p>20.7</text:p>
          </table:table-cell>
          <table:table-cell office:value-type="float" office:value="27.582909707092714" table:formula="of:=[.CR111]/(([.CN111]*12)*0.75)" table:style-name="ce23">
            <text:p>27.6</text:p>
          </table:table-cell>
          <table:table-cell office:value-type="float" office:value="1899.0833333333335" table:formula="of:=AVERAGE([Quarterly.E10:.E13])" table:style-name="ce8">
            <text:p>1899</text:p>
          </table:table-cell>
          <table:table-cell office:value-type="float" office:value="833.71358112681992" table:formula="of:=PMT(([.U111]/100)/12;[.X111]*12;([.CR111]*86))*-1" table:style-name="ce78">
            <text:p>834</text:p>
          </table:table-cell>
          <table:table-cell office:value-type="float" office:value="123.37050671286272" table:formula="of:=[.CR111]*[.$CT$117]/[.$CR$117]" table:style-name="ce78">
            <text:p>123</text:p>
          </table:table-cell>
          <table:table-cell office:value-type="float" office:value="657.9" table:formula="of:=[.CN111]*86" table:style-name="ce78">
            <text:p>658</text:p>
          </table:table-cell>
          <table:table-cell office:value-type="float" office:value="1692" table:style-name="ce26">
            <text:p>1692</text:p>
          </table:table-cell>
          <table:table-cell office:value-type="float" office:value="122.045" table:style-name="ce76">
            <text:p>122</text:p>
          </table:table-cell>
          <table:table-cell office:value-type="float" office:value="137.483" table:style-name="ce76">
            <text:p>137</text:p>
          </table:table-cell>
          <table:table-cell office:value-type="float" office:value="-0.28999999999999998" table:style-name="ce25">
            <text:p>-0.29</text:p>
          </table:table-cell>
          <table:table-cell office:value-type="float" office:value="197.54000000000002" table:formula="of:=[.CZ110]+[.CY111]" table:style-name="ce23">
            <text:p>197.5</text:p>
          </table:table-cell>
          <table:table-cell office:value-type="float" office:value="759.40386525000008" table:formula="of:=(([.CV111]*[.CY111])/100)+[.DA110]" table:style-name="ce23">
            <text:p>759.4</text:p>
          </table:table-cell>
          <table:table-cell office:value-type="float" office:value="932.59613474999992" table:formula="of:=[.CV111]-[.DA111]" table:style-name="ce23">
            <text:p>932.6</text:p>
          </table:table-cell>
          <table:table-cell office:value-type="float" office:value="856.5353852384327" table:formula="of:=[.CV111]/[.CZ111]*[.$CZ$87]" table:style-name="ce23">
            <text:p>856.5</text:p>
          </table:table-cell>
          <table:table-cell office:value-type="float" office:value="-3.3155181818181814" table:formula="of:=([.Y111]-[.Y110])" table:style-name="ce25">
            <text:p>-3.32</text:p>
          </table:table-cell>
          <table:table-cell office:value-type="float" office:value="-4.1902604756511863" table:formula="of:=([.CV111]*100/[.CV110])-100" table:style-name="ce25">
            <text:p>-4.19</text:p>
          </table:table-cell>
          <table:table-cell office:value-type="float" office:value="-3.9002604756511863" table:formula="of:=[.DE111]-[.CY111]" table:style-name="ce25">
            <text:p>-3.90</text:p>
          </table:table-cell>
          <table:table-cell office:value-type="float" office:value="-25.120815823793649" table:formula="of:=([.F111]*100/[.F110])-100" table:style-name="ce25">
            <text:p>-25.12</text:p>
          </table:table-cell>
          <table:table-cell office:value-type="float" office:value="-22.181466465969805" table:formula="of:=([.K111]*100/[.K110])-100" table:style-name="ce25">
            <text:p>-22.18</text:p>
          </table:table-cell>
          <table:table-cell office:value-type="float" office:value="17.86" table:style-name="ce30">
            <text:p>17.9</text:p>
          </table:table-cell>
          <table:table-cell office:value-type="float" office:value="87.457668656869458" table:formula="of:=(([.DC111]-MIN([.DC97:.DC111]))/(MAX([.DC97:.DC111])-MIN([.DC97:.DC111])))*100" table:style-name="ce128">
            <text:p>87.5</text:p>
          </table:table-cell>
          <table:table-cell office:value-type="float" office:value="74.43793801171158" table:formula="of:=MIN(100; MAX(0; (([.K111]-([.C111]/26/2))/(([.C111]/26)-([.C111]/26/2)))*100))" table:style-name="ce128">
            <text:p>74.4</text:p>
          </table:table-cell>
          <table:table-cell office:value-type="float" office:value="10.789124579575757" table:formula="of:=MIN(100; MAX(0; (([.F111]-([.C111]/26/2))/(([.C111]/26)-([.C111]/26/2)))*100))" table:style-name="ce128">
            <text:p>10.8</text:p>
          </table:table-cell>
          <table:table-cell office:value-type="float" office:value="71.999631949329839" table:formula="of:=(([.AP111]-MIN([.$AP$2:.$AP$128]))/(MAX([.$AP$2:.$AP$128])-MIN([.$AP$2:.$AP$128])))*100" table:style-name="ce128">
            <text:p>72.0</text:p>
          </table:table-cell>
          <table:table-cell office:value-type="float" office:value="100" table:formula="of:=MIN(100;MAX(0;(([.BP111]-1.8)/(2.2-1.8))*100))" table:style-name="ce128">
            <text:p>100.0</text:p>
          </table:table-cell>
          <table:table-cell office:value-type="float" office:value="64.505152372344824" table:formula="of:=100-((([.CC111]-MIN([.CC82:.CC111]))/(MAX([.CC82:.CC111])-MIN([.CC82:.CC111])))*100)" table:style-name="ce128">
            <text:p>64.5</text:p>
          </table:table-cell>
          <table:table-cell office:value-type="float" office:value="57.14" table:formula="of:=MIN(100; MAX(0; ((IF(AND([.DI111]-[.DI110]&gt;=-0.3;[.DI111]-[.DI110]&lt;=0.3);100;IF(AND([.DI111]-[.DI110]&gt;-1;[.DI111]-[.DI110]&lt;-0.3);50;IF([.DI111]-[.DI110]&lt;=-1;25;75)))))-[.DI111]+(IF(([.DI111]-[.DI110])*([.DI110]-[.DI109])&lt;0;AVERAGE([.DI107:.DI111]);0))))" table:style-name="ce128">
            <text:p>57.1</text:p>
          </table:table-cell>
          <table:table-cell office:value-type="string" table:style-name="ce118">
            <text:p>null</text:p>
          </table:table-cell>
          <table:table-cell office:value-type="float" office:value="66.618502224261633" table:formula="of:=AVERAGE([.DJ111:.DP111])" table:style-name="ce128">
            <text:p>66.6</text:p>
          </table:table-cell>
          <table:table-cell office:value-type="float" office:value="404.04" table:formula="of:=-0.06*(([.A111]-1963)^2)+8.5*([.A111]-1963)+140" table:style-name="ce23">
            <text:p>404.0</text:p>
          </table:table-cell>
          <table:table-cell table:number-columns-repeated="16261"/>
        </table:table-row>
        <table:table-row table:style-name="ro2">
          <table:table-cell office:value-type="float" office:value="2010" table:style-name="ce15">
            <text:p>2010</text:p>
          </table:table-cell>
          <table:table-cell office:value-type="float" office:value="46667175" table:style-name="ce10">
            <text:p>46667175</text:p>
          </table:table-cell>
          <table:table-cell office:value-type="float" office:value="19304501" table:style-name="ce8">
            <text:p>19304501</text:p>
          </table:table-cell>
          <table:table-cell office:value-type="float" office:value="24916643" table:style-name="ce8">
            <text:p>24916643</text:p>
          </table:table-cell>
          <table:table-cell office:value-type="float" office:value="39432571" table:style-name="ce78">
            <text:p>39432571</text:p>
          </table:table-cell>
          <table:table-cell office:value-type="float" office:value="439591" table:style-name="ce18">
            <text:p>439591</text:p>
          </table:table-cell>
          <table:table-cell office:value-type="float" office:value="132407" table:style-name="ce18">
            <text:p>132407</text:p>
          </table:table-cell>
          <table:table-cell office:value-type="float" office:value="21986" table:style-name="ce18">
            <text:p>21986</text:p>
          </table:table-cell>
          <table:table-cell office:value-type="float" office:value="5885" table:style-name="ce18">
            <text:p>5885</text:p>
          </table:table-cell>
          <table:table-cell office:value-type="float" office:value="194221" table:style-name="ce18">
            <text:p>194221</text:p>
          </table:table-cell>
          <table:table-cell office:value-type="float" office:value="607535" table:style-name="ce18">
            <text:p>607535</text:p>
          </table:table-cell>
          <table:table-cell office:value-type="float" office:value="370543" table:style-name="ce18">
            <text:p>370543</text:p>
          </table:table-cell>
          <table:table-cell office:value-type="float" office:value="71041231000" table:style-name="ce84">
            <text:p>7.1E+10</text:p>
          </table:table-cell>
          <table:table-cell office:value-type="float" office:value="116933.56102940571" table:formula="of:=[.M112]/[.K112]" table:style-name="ce26">
            <text:p>116934</text:p>
          </table:table-cell>
          <table:table-cell office:value-type="float" office:value="57697" table:style-name="ce18">
            <text:p>57697</text:p>
          </table:table-cell>
          <table:table-cell office:value-type="float" office:value="23852" table:style-name="ce18">
            <text:p>23852</text:p>
          </table:table-cell>
          <table:table-cell office:value-type="float" office:value="2.4189585778970315" table:formula="of:=[.O112]/[.P112]" table:style-name="ce67">
            <text:p>2.42</text:p>
          </table:table-cell>
          <table:table-cell office:value-type="float" office:value="56.64971667880652" table:formula="of:=([.N112]*100)/([.CV112]*(([.BL112]*([.BK112]/([.BF112]+[.BK112])))+([.BG112]*([.BF112]/([.BF112]+[.BK112])))))" table:style-name="ce67">
            <text:p>56.65</text:p>
          </table:table-cell>
          <table:table-cell office:value-type="float" office:value="-9.1501018048758631" table:formula="of:=(([.M112]*100/[.M111])-100)-[.CY112]" table:style-name="ce28">
            <text:p>-9.15</text:p>
          </table:table-cell>
          <table:table-cell office:value-type="float" office:value="662798000000" table:style-name="ce131">
            <text:p>6.63E+11</text:p>
          </table:table-cell>
          <table:table-cell office:value-type="float" office:value="2.77" table:style-name="ce28">
            <text:p>2.77</text:p>
          </table:table-cell>
          <table:table-cell office:value-type="float" office:value="2.7" table:style-name="ce28">
            <text:p>2.70</text:p>
          </table:table-cell>
          <table:table-cell office:value-type="float" office:value="97.3" table:formula="of:=100-[.V112]" table:style-name="ce28">
            <text:p>97.30</text:p>
          </table:table-cell>
          <table:table-cell office:value-type="float" office:value="24" table:style-name="ce60">
            <text:p>24</text:p>
          </table:table-cell>
          <table:table-cell office:value-type="float" office:value="1.361181818181818" table:style-name="ce28">
            <text:p>1.36</text:p>
          </table:table-cell>
          <table:table-cell office:value-type="float" office:value="1.3209833333333336" table:style-name="ce72">
            <text:p>1.32</text:p>
          </table:table-cell>
          <table:table-cell office:value-type="float" office:value="9320772000000" table:style-name="ce85">
            <text:p>9.32E+12</text:p>
          </table:table-cell>
          <table:table-cell office:value-type="float" office:value="-0.6552480114309418" table:formula="of:=([.AA112]*100/[.AA111])-100" table:style-name="ce70">
            <text:p>-0.66</text:p>
          </table:table-cell>
          <table:table-cell office:value-type="float" office:value="8.1666666666666679E-2" table:style-name="ce74">
            <text:p>0.1</text:p>
          </table:table-cell>
          <table:table-cell office:value-type="float" office:value="934.45249999999987" table:style-name="ce75">
            <text:p>934</text:p>
          </table:table-cell>
          <table:table-cell office:value-type="float" office:value="1077145000000" table:style-name="ce125">
            <text:p>1.07715E+12</text:p>
          </table:table-cell>
          <table:table-cell office:value-type="float" office:value="5101932796982" table:formula="of:=([.AW112]*[.AR112]*1000000)+([.CV112]*[.BS112]*86)+([.AS112]*(506006-[.AX112])*1000000)" table:style-name="ce83">
            <text:p>5.10E+12</text:p>
          </table:table-cell>
          <table:table-cell office:value-type="float" office:value="3588486667932" table:formula="of:=([.CV112]*[.BS112]*86)" table:style-name="ce125">
            <text:p>3.58849E+12</text:p>
          </table:table-cell>
          <table:table-cell office:value-type="float" office:value="667852000000" table:style-name="ce83">
            <text:p>6.68E+11</text:p>
          </table:table-cell>
          <table:table-cell office:value-type="float" office:value="16936.557344942077" table:formula="of:=[.AH112]/[.E112]" table:style-name="ce26">
            <text:p>16937</text:p>
          </table:table-cell>
          <table:table-cell office:value-type="float" office:value="15361.269758573329" table:formula="of:=[.AJ111]*(1+([.CY112]/100))" table:style-name="ce76">
            <text:p>15361</text:p>
          </table:table-cell>
          <table:table-cell office:value-type="float" office:value="21770.792979191643" table:formula="of:=[.AI112]+(12*PMT([.U112]/100/12;[.X112]*12;([.AI112]*5)*-1))" table:style-name="ce76">
            <text:p>21771</text:p>
          </table:table-cell>
          <table:table-cell office:value-type="float" office:value="20592.404216371076" table:formula="of:=[.AL111]*(1+(([.CW112]-[.CW111])/100))" table:style-name="ce76">
            <text:p>20592</text:p>
          </table:table-cell>
          <table:table-cell office:value-type="float" office:value="18189.244753516694" table:formula="of:=(([.AL112]+([.AJ112]-[.AI112])+([.AK112]-[.AI112]))-[.AI112])+[.$AI$101]" table:style-name="ce76">
            <text:p>18189</text:p>
          </table:table-cell>
          <table:table-cell office:value-type="float" office:value="118.90098177171969" table:formula="of:=[.AM112]*[.$AN$101]/[.$AM$101]" table:style-name="ce76">
            <text:p>119</text:p>
          </table:table-cell>
          <table:table-cell office:value-type="float" office:value="76.612556470061136" table:formula="of:=[.AI112]*[.$AO$101]/[.$AI$101]" table:style-name="ce76">
            <text:p>77</text:p>
          </table:table-cell>
          <table:table-cell office:value-type="float" office:value="38.584943529938869" table:formula="of:=[.CW112]-[.AO112]" table:style-name="ce118">
            <text:p>39</text:p>
          </table:table-cell>
          <table:table-cell office:value-type="float" office:value="23386.712205881144" table:formula="of:=[.N112]/5" table:style-name="ce26">
            <text:p>23387</text:p>
          </table:table-cell>
          <table:table-cell office:value-type="float" office:value="208.47500000000002" table:style-name="ce8">
            <text:p>208</text:p>
          </table:table-cell>
          <table:table-cell office:value-type="float" office:value="1.04" table:style-name="ce129">
            <text:p>1.04</text:p>
          </table:table-cell>
          <table:table-cell office:value-type="float" office:value="21220" table:style-name="ce18">
            <text:p>21220</text:p>
          </table:table-cell>
          <table:table-cell office:value-type="float" office:value="6569.31" table:style-name="ce78">
            <text:p>6569</text:p>
          </table:table-cell>
          <table:table-cell office:value-type="float" office:value="17108.22" table:style-name="ce78">
            <text:p>17108</text:p>
          </table:table-cell>
          <table:table-cell office:value-type="float" office:value="4788.91" table:style-name="ce78">
            <text:p>4789</text:p>
          </table:table-cell>
          <table:table-cell office:value-type="float" office:value="10738.58" table:style-name="ce78">
            <text:p>10739</text:p>
          </table:table-cell>
          <table:table-cell office:value-type="float" office:value="89788" table:style-name="ce18">
            <text:p>89788</text:p>
          </table:table-cell>
          <table:table-cell office:value-type="float" office:value="29715" table:style-name="ce18">
            <text:p>29715</text:p>
          </table:table-cell>
          <table:table-cell office:value-type="float" office:value="56957" table:style-name="ce18">
            <text:p>56957</text:p>
          </table:table-cell>
          <table:table-cell office:value-type="float" office:value="3116" table:style-name="ce18">
            <text:p>3116</text:p>
          </table:table-cell>
          <table:table-cell office:value-type="float" office:value="69223" table:style-name="ce81">
            <text:p>69223</text:p>
          </table:table-cell>
          <table:table-cell office:value-type="float" office:value="55692" table:style-name="ce81">
            <text:p>55692</text:p>
          </table:table-cell>
          <table:table-cell office:value-type="float" office:value="2628" table:style-name="ce81">
            <text:p>2628</text:p>
          </table:table-cell>
          <table:table-cell office:value-type="float" office:value="24633" table:style-name="ce18">
            <text:p>24633</text:p>
          </table:table-cell>
          <table:table-cell office:value-type="float" office:value="188.56656918891656" table:style-name="ce5">
            <text:p>189</text:p>
          </table:table-cell>
          <table:table-cell office:value-type="float" office:value="3009437099.999999" table:style-name="ce18">
            <text:p>3009437100</text:p>
          </table:table-cell>
          <table:table-cell office:value-type="float" office:value="122170.95359883079" table:formula="of:=[.BH112]/[.BF112]" table:style-name="ce51">
            <text:p>122171</text:p>
          </table:table-cell>
          <table:table-cell office:value-type="float" office:value="647.89296493183303" table:formula="of:=[.BI112]/[.BG112]" table:style-name="ce51">
            <text:p>648</text:p>
          </table:table-cell>
          <table:table-cell office:value-type="float" office:value="66994" table:style-name="ce18">
            <text:p>66994</text:p>
          </table:table-cell>
          <table:table-cell office:value-type="float" office:value="100.52870557289202" table:style-name="ce5">
            <text:p>101</text:p>
          </table:table-cell>
          <table:table-cell office:value-type="float" office:value="4380167900" table:style-name="ce18">
            <text:p>4380167900</text:p>
          </table:table-cell>
          <table:table-cell office:value-type="float" office:value="65381.495357793232" table:formula="of:=[.BM112]/[.BK112]" table:style-name="ce55">
            <text:p>65381</text:p>
          </table:table-cell>
          <table:table-cell office:value-type="float" office:value="650.37637742570939" table:formula="of:=[.BN112]/[.BL112]" table:style-name="ce55">
            <text:p>650</text:p>
          </table:table-cell>
          <table:table-cell office:value-type="float" office:value="2.5603315826313127" table:formula="of:=[.CV112]/(([.BO112]+[.BJ112])/2)" table:style-name="ce58">
            <text:p>2.56</text:p>
          </table:table-cell>
          <table:table-cell office:value-type="float" office:value="0.81235765730913556" table:formula="of:=[.BR112]-[.BR111]" table:style-name="ce57">
            <text:p>0.8</text:p>
          </table:table-cell>
          <table:table-cell office:value-type="float" office:value="89.33473696332193" table:style-name="ce56">
            <text:p>89</text:p>
          </table:table-cell>
          <table:table-cell office:value-type="float" office:value="25106251" table:style-name="ce8">
            <text:p>25106251</text:p>
          </table:table-cell>
          <table:table-cell office:value-type="float" office:value="198125" table:formula="of:=[.BS112]-[.BS111]" table:style-name="ce26">
            <text:p>198125</text:p>
          </table:table-cell>
          <table:table-cell office:value-type="float" office:value="218572" table:style-name="ce76">
            <text:p>218572</text:p>
          </table:table-cell>
          <table:table-cell office:value-type="float" office:value="58311" table:style-name="ce76">
            <text:p>58311</text:p>
          </table:table-cell>
          <table:table-cell office:value-type="float" office:value="1.858787080556153" table:formula="of:=([.B112]/[.BS112])" table:style-name="ce34">
            <text:p>1.86</text:p>
          </table:table-cell>
          <table:table-cell office:value-type="float" office:value="2.63" table:style-name="ce71">
            <text:p>2.63</text:p>
          </table:table-cell>
          <table:table-cell office:value-type="float" office:value="1.369" table:style-name="ce71">
            <text:p>1.37</text:p>
          </table:table-cell>
          <table:table-cell office:value-type="float" office:value="0.79542314825290816" table:formula="of:=([.BS112]*100/[.BS111])-100" table:style-name="ce23">
            <text:p>0.8</text:p>
          </table:table-cell>
          <table:table-cell office:value-type="float" office:value="180554" table:formula="of:=([.B112]-[.B111])" table:style-name="ce73">
            <text:p>180554</text:p>
          </table:table-cell>
          <table:table-cell office:value-type="float" office:value="0.38839992263579859" table:formula="of:=([.B112]*100/[.B111])-100" table:style-name="ce25">
            <text:p>0.39</text:p>
          </table:table-cell>
          <table:table-cell office:value-type="float" office:value="129473.28897338403" table:formula="of:=[.BT112]-([.CA112]/[.BX112])" table:style-name="ce76">
            <text:p>129473</text:p>
          </table:table-cell>
          <table:table-cell office:value-type="float" office:value="1651000" table:style-name="ce78">
            <text:p>1651000</text:p>
          </table:table-cell>
          <table:table-cell office:value-type="float" office:value="24456.010000000002" table:style-name="ce8">
            <text:p>2445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float" office:value="79.400000000000006" table:style-name="ce18">
            <text:p>79.4</text:p>
          </table:table-cell>
          <table:table-cell office:value-type="float" office:value="14.5" table:style-name="ce18">
            <text:p>14.5</text:p>
          </table:table-cell>
          <table:table-cell office:value-type="float" office:value="6.1" table:style-name="ce18">
            <text:p>6.1</text:p>
          </table:table-cell>
          <table:table-cell office:value-type="string" table:style-name="ce118">
            <text:p>null</text:p>
          </table:table-cell>
          <table:table-cell office:value-type="float" office:value="103.37837837837837" table:formula="of:=[.CN112]*[.$CM$117]/[.$CN$117]" table:style-name="ce78">
            <text:p>103</text:p>
          </table:table-cell>
          <table:table-cell office:value-type="float" office:value="7.65" table:style-name="ce23">
            <text:p>7.7</text:p>
          </table:table-cell>
          <table:table-cell office:value-type="float" office:value="0" table:formula="of:=(([.CN112]*100)/[.CN111])-100" table:style-name="ce23">
            <text:p>0.0</text:p>
          </table:table-cell>
          <table:table-cell office:value-type="float" office:value="20.875998547567171" table:formula="of:=[.CR112]/([.CN112]*12)" table:style-name="ce23">
            <text:p>20.9</text:p>
          </table:table-cell>
          <table:table-cell office:value-type="float" office:value="27.83466473008956" table:formula="of:=[.CR112]/(([.CN112]*12)*0.75)" table:style-name="ce23">
            <text:p>27.8</text:p>
          </table:table-cell>
          <table:table-cell office:value-type="float" office:value="1916.4166666666665" table:formula="of:=AVERAGE([Quarterly.E14:.E17])" table:style-name="ce8">
            <text:p>1916</text:p>
          </table:table-cell>
          <table:table-cell office:value-type="float" office:value="784.0428856733173" table:formula="of:=PMT(([.U112]/100)/12;[.X112]*12;([.CR112]*86))*-1" table:style-name="ce78">
            <text:p>784</text:p>
          </table:table-cell>
          <table:table-cell office:value-type="float" office:value="124.49653529666523" table:formula="of:=[.CR112]*[.$CT$117]/[.$CR$117]" table:style-name="ce78">
            <text:p>124</text:p>
          </table:table-cell>
          <table:table-cell office:value-type="float" office:value="657.9" table:formula="of:=[.CN112]*86" table:style-name="ce78">
            <text:p>658</text:p>
          </table:table-cell>
          <table:table-cell office:value-type="float" office:value="1662" table:style-name="ce26">
            <text:p>1662</text:p>
          </table:table-cell>
          <table:table-cell office:value-type="float" office:value="115.19750000000001" table:style-name="ce76">
            <text:p>115</text:p>
          </table:table-cell>
          <table:table-cell office:value-type="float" office:value="134.745" table:style-name="ce76">
            <text:p>135</text:p>
          </table:table-cell>
          <table:table-cell office:value-type="float" office:value="1.7999999999999998" table:style-name="ce25">
            <text:p>1.80</text:p>
          </table:table-cell>
          <table:table-cell office:value-type="float" office:value="199.34000000000003" table:formula="of:=[.CZ111]+[.CY112]" table:style-name="ce23">
            <text:p>199.3</text:p>
          </table:table-cell>
          <table:table-cell office:value-type="float" office:value="789.31986525000013" table:formula="of:=(([.CV112]*[.CY112])/100)+[.DA111]" table:style-name="ce23">
            <text:p>789.3</text:p>
          </table:table-cell>
          <table:table-cell office:value-type="float" office:value="872.68013474999987" table:formula="of:=[.CV112]-[.DA112]" table:style-name="ce23">
            <text:p>872.7</text:p>
          </table:table-cell>
          <table:table-cell office:value-type="float" office:value="833.7513795525233" table:formula="of:=[.CV112]/[.CZ112]*[.$CZ$87]" table:style-name="ce23">
            <text:p>833.8</text:p>
          </table:table-cell>
          <table:table-cell office:value-type="float" office:value="-0.16546363636363637" table:formula="of:=([.Y112]-[.Y111])" table:style-name="ce25">
            <text:p>-0.17</text:p>
          </table:table-cell>
          <table:table-cell office:value-type="float" office:value="-1.7730496453900741" table:formula="of:=([.CV112]*100/[.CV111])-100" table:style-name="ce25">
            <text:p>-1.77</text:p>
          </table:table-cell>
          <table:table-cell office:value-type="float" office:value="-3.573049645390074" table:formula="of:=[.DE112]-[.CY112]" table:style-name="ce25">
            <text:p>-3.57</text:p>
          </table:table-cell>
          <table:table-cell office:value-type="float" office:value="6.3373109849465266" table:formula="of:=([.F112]*100/[.F111])-100" table:style-name="ce25">
            <text:p>6.34</text:p>
          </table:table-cell>
          <table:table-cell office:value-type="float" office:value="-6.6607363160231614" table:formula="of:=([.K112]*100/[.K111])-100" table:style-name="ce25">
            <text:p>-6.66</text:p>
          </table:table-cell>
          <table:table-cell office:value-type="float" office:value="19.86" table:style-name="ce30">
            <text:p>19.9</text:p>
          </table:table-cell>
          <table:table-cell office:value-type="float" office:value="83.225326063347865" table:formula="of:=(([.DC112]-MIN([.DC98:.DC112]))/(MAX([.DC98:.DC112])-MIN([.DC98:.DC112])))*100" table:style-name="ce128">
            <text:p>83.2</text:p>
          </table:table-cell>
          <table:table-cell office:value-type="float" office:value="63.650021308502083" table:formula="of:=MIN(100; MAX(0; (([.K112]-([.C112]/26/2))/(([.C112]/26)-([.C112]/26/2)))*100))" table:style-name="ce128">
            <text:p>63.7</text:p>
          </table:table-cell>
          <table:table-cell office:value-type="float" office:value="18.411410893241936" table:formula="of:=MIN(100; MAX(0; (([.F112]-([.C112]/26/2))/(([.C112]/26)-([.C112]/26/2)))*100))" table:style-name="ce128">
            <text:p>18.4</text:p>
          </table:table-cell>
          <table:table-cell office:value-type="float" office:value="61.203414309203389" table:formula="of:=(([.AP112]-MIN([.$AP$2:.$AP$128]))/(MAX([.$AP$2:.$AP$128])-MIN([.$AP$2:.$AP$128])))*100" table:style-name="ce128">
            <text:p>61.2</text:p>
          </table:table-cell>
          <table:table-cell office:value-type="float" office:value="100" table:formula="of:=MIN(100;MAX(0;(([.BP112]-1.8)/(2.2-1.8))*100))" table:style-name="ce128">
            <text:p>100.0</text:p>
          </table:table-cell>
          <table:table-cell office:value-type="float" office:value="100" table:formula="of:=100-((([.CC112]-MIN([.CC83:.CC112]))/(MAX([.CC83:.CC112])-MIN([.CC83:.CC112])))*100)" table:style-name="ce128">
            <text:p>100.0</text:p>
          </table:table-cell>
          <table:table-cell office:value-type="float" office:value="55.14" table:formula="of:=MIN(100; MAX(0; ((IF(AND([.DI112]-[.DI111]&gt;=-0.3;[.DI112]-[.DI111]&lt;=0.3);100;IF(AND([.DI112]-[.DI111]&gt;-1;[.DI112]-[.DI111]&lt;-0.3);50;IF([.DI112]-[.DI111]&lt;=-1;25;75)))))-[.DI112]+(IF(([.DI112]-[.DI111])*([.DI111]-[.DI110])&lt;0;AVERAGE([.DI108:.DI112]);0))))" table:style-name="ce128">
            <text:p>55.1</text:p>
          </table:table-cell>
          <table:table-cell office:value-type="string" table:style-name="ce118">
            <text:p>null</text:p>
          </table:table-cell>
          <table:table-cell office:value-type="float" office:value="68.804310367756472" table:formula="of:=AVERAGE([.DJ112:.DP112])" table:style-name="ce128">
            <text:p>68.8</text:p>
          </table:table-cell>
          <table:table-cell office:value-type="float" office:value="406.96000000000004" table:formula="of:=-0.06*(([.A112]-1963)^2)+8.5*([.A112]-1963)+140" table:style-name="ce23">
            <text:p>407.0</text:p>
          </table:table-cell>
          <table:table-cell table:number-columns-repeated="16261"/>
        </table:table-row>
        <table:table-row table:style-name="ro2">
          <table:table-cell office:value-type="float" office:value="2011" table:style-name="ce15">
            <text:p>2011</text:p>
          </table:table-cell>
          <table:table-cell office:value-type="float" office:value="46818216" table:style-name="ce10">
            <text:p>46818216</text:p>
          </table:table-cell>
          <table:table-cell office:value-type="float" office:value="19150018" table:style-name="ce8">
            <text:p>19150018</text:p>
          </table:table-cell>
          <table:table-cell office:value-type="float" office:value="24934891" table:style-name="ce8">
            <text:p>24934891</text:p>
          </table:table-cell>
          <table:table-cell office:value-type="float" office:value="39600460" table:style-name="ce78">
            <text:p>39600460</text:p>
          </table:table-cell>
          <table:table-cell office:value-type="float" office:value="359824" table:style-name="ce18">
            <text:p>359824</text:p>
          </table:table-cell>
          <table:table-cell office:value-type="float" office:value="134536" table:style-name="ce18">
            <text:p>134536</text:p>
          </table:table-cell>
          <table:table-cell office:value-type="float" office:value="18875" table:style-name="ce18">
            <text:p>18875</text:p>
          </table:table-cell>
          <table:table-cell office:value-type="float" office:value="4310" table:style-name="ce18">
            <text:p>4310</text:p>
          </table:table-cell>
          <table:table-cell office:value-type="float" office:value="191539" table:style-name="ce18">
            <text:p>191539</text:p>
          </table:table-cell>
          <table:table-cell office:value-type="float" office:value="408461" table:style-name="ce18">
            <text:p>408461</text:p>
          </table:table-cell>
          <table:table-cell office:value-type="float" office:value="320866" table:style-name="ce18">
            <text:p>320866</text:p>
          </table:table-cell>
          <table:table-cell office:value-type="float" office:value="45715937000" table:style-name="ce84">
            <text:p>4.6E+10</text:p>
          </table:table-cell>
          <table:table-cell office:value-type="float" office:value="111922.40385250979" table:formula="of:=[.M113]/[.K113]" table:style-name="ce26">
            <text:p>111922</text:p>
          </table:table-cell>
          <table:table-cell office:value-type="float" office:value="38155" table:style-name="ce18">
            <text:p>38155</text:p>
          </table:table-cell>
          <table:table-cell office:value-type="float" office:value="16266" table:style-name="ce18">
            <text:p>16266</text:p>
          </table:table-cell>
          <table:table-cell office:value-type="float" office:value="2.3456903971474241" table:formula="of:=[.O113]/[.P113]" table:style-name="ce67">
            <text:p>2.35</text:p>
          </table:table-cell>
          <table:table-cell office:value-type="float" office:value="57.804332969874238" table:formula="of:=([.N113]*100)/([.CV113]*(([.BL113]*([.BK113]/([.BF113]+[.BK113])))+([.BG113]*([.BF113]/([.BF113]+[.BK113])))))" table:style-name="ce67">
            <text:p>57.80</text:p>
          </table:table-cell>
          <table:table-cell office:value-type="float" office:value="-38.848726300927979" table:formula="of:=(([.M113]*100/[.M112])-100)-[.CY113]" table:style-name="ce28">
            <text:p>-38.85</text:p>
          </table:table-cell>
          <table:table-cell office:value-type="float" office:value="656452000000" table:style-name="ce131">
            <text:p>6.56E+11</text:p>
          </table:table-cell>
          <table:table-cell office:value-type="float" office:value="3.383" table:style-name="ce28">
            <text:p>3.38</text:p>
          </table:table-cell>
          <table:table-cell office:value-type="float" office:value="3.4" table:style-name="ce28">
            <text:p>3.40</text:p>
          </table:table-cell>
          <table:table-cell office:value-type="float" office:value="96.6" table:formula="of:=100-[.V113]" table:style-name="ce28">
            <text:p>96.60</text:p>
          </table:table-cell>
          <table:table-cell office:value-type="float" office:value="24" table:style-name="ce60">
            <text:p>24</text:p>
          </table:table-cell>
          <table:table-cell office:value-type="float" office:value="2.0471727272727271" table:style-name="ce28">
            <text:p>2.05</text:p>
          </table:table-cell>
          <table:table-cell office:value-type="float" office:value="1.3978999999999999" table:style-name="ce72">
            <text:p>1.40</text:p>
          </table:table-cell>
          <table:table-cell office:value-type="float" office:value="9535047000000" table:style-name="ce85">
            <text:p>9.54E+12</text:p>
          </table:table-cell>
          <table:table-cell office:value-type="float" office:value="2.298897559129216" table:formula="of:=([.AA113]*100/[.AA112])-100" table:style-name="ce70">
            <text:p>2.30</text:p>
          </table:table-cell>
          <table:table-cell office:value-type="float" office:value="3.5887000000000002" table:style-name="ce74">
            <text:p>3.6</text:p>
          </table:table-cell>
          <table:table-cell office:value-type="float" office:value="1121.4075" table:style-name="ce75">
            <text:p>1121</text:p>
          </table:table-cell>
          <table:table-cell office:value-type="float" office:value="1068690000000" table:style-name="ce125">
            <text:p>1.06869E+12</text:p>
          </table:table-cell>
          <table:table-cell office:value-type="float" office:value="4796882582504" table:formula="of:=([.AW113]*[.AR113]*1000000)+([.CV113]*[.BS113]*86)+([.AS113]*(506006-[.AX113])*1000000)" table:style-name="ce83">
            <text:p>4.80E+12</text:p>
          </table:table-cell>
          <table:table-cell office:value-type="float" office:value="3339641742204" table:formula="of:=([.CV113]*[.BS113]*86)" table:style-name="ce125">
            <text:p>3.33964E+12</text:p>
          </table:table-cell>
          <table:table-cell office:value-type="float" office:value="673309000000" table:style-name="ce83">
            <text:p>6.73E+11</text:p>
          </table:table-cell>
          <table:table-cell office:value-type="float" office:value="17002.555020825515" table:formula="of:=[.AH113]/[.E113]" table:style-name="ce26">
            <text:p>17003</text:p>
          </table:table-cell>
          <table:table-cell office:value-type="float" office:value="15852.830390847677" table:formula="of:=[.AJ112]*(1+([.CY113]/100))" table:style-name="ce76">
            <text:p>15853</text:p>
          </table:table-cell>
          <table:table-cell office:value-type="float" office:value="22179.954799222829" table:formula="of:=[.AI113]+(12*PMT([.U113]/100/12;[.X113]*12;([.AI113]*5)*-1))" table:style-name="ce76">
            <text:p>22180</text:p>
          </table:table-cell>
          <table:table-cell office:value-type="float" office:value="19340.900850121125" table:formula="of:=[.AL112]*(1+(([.CW113]-[.CW112])/100))" table:style-name="ce76">
            <text:p>19341</text:p>
          </table:table-cell>
          <table:table-cell office:value-type="float" office:value="17640.470811921965" table:formula="of:=(([.AL113]+([.AJ113]-[.AI113])+([.AK113]-[.AI113]))-[.AI113])+[.$AI$101]" table:style-name="ce76">
            <text:p>17640</text:p>
          </table:table-cell>
          <table:table-cell office:value-type="float" office:value="115.31371021039033" table:formula="of:=[.AM113]*[.$AN$101]/[.$AM$101]" table:style-name="ce76">
            <text:p>115</text:p>
          </table:table-cell>
          <table:table-cell office:value-type="float" office:value="76.911097110141256" table:formula="of:=[.AI113]*[.$AO$101]/[.$AI$101]" table:style-name="ce76">
            <text:p>77</text:p>
          </table:table-cell>
          <table:table-cell office:value-type="float" office:value="32.208902889858749" table:formula="of:=[.CW113]-[.AO113]" table:style-name="ce118">
            <text:p>32</text:p>
          </table:table-cell>
          <table:table-cell office:value-type="float" office:value="22384.480770501956" table:formula="of:=[.N113]/5" table:style-name="ce26">
            <text:p>22384</text:p>
          </table:table-cell>
          <table:table-cell office:value-type="float" office:value="194.6" table:style-name="ce8">
            <text:p>195</text:p>
          </table:table-cell>
          <table:table-cell office:value-type="float" office:value="1.01" table:style-name="ce129">
            <text:p>1.01</text:p>
          </table:table-cell>
          <table:table-cell office:value-type="float" office:value="16796" table:style-name="ce18">
            <text:p>16796</text:p>
          </table:table-cell>
          <table:table-cell office:value-type="float" office:value="11968.17" table:style-name="ce78">
            <text:p>11968</text:p>
          </table:table-cell>
          <table:table-cell office:value-type="float" office:value="11762.809999999998" table:style-name="ce78">
            <text:p>11763</text:p>
          </table:table-cell>
          <table:table-cell office:value-type="float" office:value="4919.18" table:style-name="ce78">
            <text:p>4919</text:p>
          </table:table-cell>
          <table:table-cell office:value-type="float" office:value="10987.77" table:style-name="ce78">
            <text:p>10988</text:p>
          </table:table-cell>
          <table:table-cell office:value-type="float" office:value="76339" table:style-name="ce18">
            <text:p>76339</text:p>
          </table:table-cell>
          <table:table-cell office:value-type="float" office:value="24285" table:style-name="ce18">
            <text:p>24285</text:p>
          </table:table-cell>
          <table:table-cell office:value-type="float" office:value="49199" table:style-name="ce18">
            <text:p>49199</text:p>
          </table:table-cell>
          <table:table-cell office:value-type="float" office:value="2855" table:style-name="ce18">
            <text:p>2855</text:p>
          </table:table-cell>
          <table:table-cell office:value-type="float" office:value="57932" table:style-name="ce81">
            <text:p>57932</text:p>
          </table:table-cell>
          <table:table-cell office:value-type="float" office:value="49521" table:style-name="ce81">
            <text:p>49521</text:p>
          </table:table-cell>
          <table:table-cell office:value-type="float" office:value="2413" table:style-name="ce81">
            <text:p>2413</text:p>
          </table:table-cell>
          <table:table-cell office:value-type="float" office:value="19914" table:style-name="ce18">
            <text:p>19914</text:p>
          </table:table-cell>
          <table:table-cell office:value-type="float" office:value="189.77535706948277" table:style-name="ce5">
            <text:p>190</text:p>
          </table:table-cell>
          <table:table-cell office:value-type="float" office:value="2440981800.0000005" table:style-name="ce18">
            <text:p>2440981800</text:p>
          </table:table-cell>
          <table:table-cell office:value-type="float" office:value="122576.16752033748" table:formula="of:=[.BH113]/[.BF113]" table:style-name="ce51">
            <text:p>122576</text:p>
          </table:table-cell>
          <table:table-cell office:value-type="float" office:value="645.90139316907448" table:formula="of:=[.BI113]/[.BG113]" table:style-name="ce51">
            <text:p>646</text:p>
          </table:table-cell>
          <table:table-cell office:value-type="float" office:value="58346" table:style-name="ce18">
            <text:p>58346</text:p>
          </table:table-cell>
          <table:table-cell office:value-type="float" office:value="104.08889406620307" table:style-name="ce5">
            <text:p>104</text:p>
          </table:table-cell>
          <table:table-cell office:value-type="float" office:value="3923135000" table:style-name="ce18">
            <text:p>3923135000</text:p>
          </table:table-cell>
          <table:table-cell office:value-type="float" office:value="67239.142357659483" table:formula="of:=[.BM113]/[.BK113]" table:style-name="ce55">
            <text:p>67239</text:p>
          </table:table-cell>
          <table:table-cell office:value-type="float" office:value="645.9780648153851" table:formula="of:=[.BN113]/[.BL113]" table:style-name="ce55">
            <text:p>646</text:p>
          </table:table-cell>
          <table:table-cell office:value-type="float" office:value="2.3810271004688444" table:formula="of:=[.CV113]/(([.BO113]+[.BJ113])/2)" table:style-name="ce58">
            <text:p>2.38</text:p>
          </table:table-cell>
          <table:table-cell office:value-type="float" office:value="2.7940075074744044" table:formula="of:=[.BR113]-[.BR112]" table:style-name="ce57">
            <text:p>2.8</text:p>
          </table:table-cell>
          <table:table-cell office:value-type="float" office:value="92.128744470796335" table:style-name="ce56">
            <text:p>92</text:p>
          </table:table-cell>
          <table:table-cell office:value-type="float" office:value="25249053" table:style-name="ce18">
            <text:p>25249053</text:p>
          </table:table-cell>
          <table:table-cell office:value-type="float" office:value="142802" table:formula="of:=[.BS113]-[.BS112]" table:style-name="ce26">
            <text:p>142802</text:p>
          </table:table-cell>
          <table:table-cell office:value-type="float" office:value="121043" table:style-name="ce76">
            <text:p>121043</text:p>
          </table:table-cell>
          <table:table-cell office:value-type="float" office:value="58308" table:style-name="ce76">
            <text:p>58308</text:p>
          </table:table-cell>
          <table:table-cell office:value-type="float" office:value="1.854256316068567" table:formula="of:=([.B113]/[.BS113])" table:style-name="ce34">
            <text:p>1.85</text:p>
          </table:table-cell>
          <table:table-cell office:value-type="float" office:value="2.6" table:style-name="ce71">
            <text:p>2.60</text:p>
          </table:table-cell>
          <table:table-cell office:value-type="float" office:value="1.3420000000000001" table:style-name="ce71">
            <text:p>1.34</text:p>
          </table:table-cell>
          <table:table-cell office:value-type="float" office:value="0.5687906171255861" table:formula="of:=([.BS113]*100/[.BS112])-100" table:style-name="ce23">
            <text:p>0.6</text:p>
          </table:table-cell>
          <table:table-cell office:value-type="float" office:value="151041" table:formula="of:=([.B113]-[.B112])" table:style-name="ce73">
            <text:p>151041</text:p>
          </table:table-cell>
          <table:table-cell office:value-type="float" office:value="0.32365576017832609" table:formula="of:=([.B113]*100/[.B112])-100" table:style-name="ce25">
            <text:p>0.32</text:p>
          </table:table-cell>
          <table:table-cell office:value-type="float" office:value="84709.307692307688" table:formula="of:=[.BT113]-([.CA113]/[.BX113])" table:style-name="ce76">
            <text:p>84709</text:p>
          </table:table-cell>
          <table:table-cell office:value-type="float" office:value="1404000" table:style-name="ce78">
            <text:p>1404000</text:p>
          </table:table-cell>
          <table:table-cell office:value-type="float" office:value="20441.07" table:style-name="ce8">
            <text:p>20441</text:p>
          </table:table-cell>
          <table:table-cell office:value-type="float" office:value="12.77" table:style-name="ce18">
            <text:p>12.77</text:p>
          </table:table-cell>
          <table:table-cell office:value-type="float" office:value="81.961308000000002" table:formula="of:=100-([.CF113]+[.CH113])" table:style-name="ce25">
            <text:p>81.96</text:p>
          </table:table-cell>
          <table:table-cell office:value-type="float" office:value="5.2686919999999997" table:formula="of:=(6.04*(100-[.CF113]))/100" table:style-name="ce25">
            <text:p>5.27</text:p>
          </table:table-cell>
          <table:table-cell office:value-type="float" office:value="79.599999999999994" table:style-name="ce18">
            <text:p>79.6</text:p>
          </table:table-cell>
          <table:table-cell office:value-type="float" office:value="14.899999999999999" table:style-name="ce18">
            <text:p>14.9</text:p>
          </table:table-cell>
          <table:table-cell office:value-type="float" office:value="5.5" table:style-name="ce18">
            <text:p>5.5</text:p>
          </table:table-cell>
          <table:table-cell office:value-type="float" office:value="104.761" table:style-name="ce78">
            <text:p>105</text:p>
          </table:table-cell>
          <table:table-cell office:value-type="float" office:value="106.75675675675676" table:formula="of:=[.CN113]*[.$CM$117]/[.$CN$117]" table:style-name="ce78">
            <text:p>107</text:p>
          </table:table-cell>
          <table:table-cell office:value-type="float" office:value="7.9" table:style-name="ce23">
            <text:p>7.9</text:p>
          </table:table-cell>
          <table:table-cell office:value-type="float" office:value="3.2679738562091387" table:formula="of:=(([.CN113]*100)/[.CN112])-100" table:style-name="ce23">
            <text:p>3.3</text:p>
          </table:table-cell>
          <table:table-cell office:value-type="float" office:value="20.683895921237688" table:formula="of:=[.CR113]/([.CN113]*12)" table:style-name="ce23">
            <text:p>20.7</text:p>
          </table:table-cell>
          <table:table-cell office:value-type="float" office:value="27.578527894983587" table:formula="of:=[.CR113]/(([.CN113]*12)*0.75)" table:style-name="ce23">
            <text:p>27.6</text:p>
          </table:table-cell>
          <table:table-cell office:value-type="float" office:value="1960.8333333333333" table:formula="of:=AVERAGE([Quarterly.E18:.E21])" table:style-name="ce8">
            <text:p>1961</text:p>
          </table:table-cell>
          <table:table-cell office:value-type="float" office:value="855.82583770634153" table:formula="of:=PMT(([.U113]/100)/12;[.X113]*12;([.CR113]*86))*-1" table:style-name="ce78">
            <text:p>856</text:p>
          </table:table-cell>
          <table:table-cell office:value-type="float" office:value="127.38198354265916" table:formula="of:=[.CR113]*[.$CT$117]/[.$CR$117]" table:style-name="ce78">
            <text:p>127</text:p>
          </table:table-cell>
          <table:table-cell office:value-type="float" office:value="679.4" table:formula="of:=[.CN113]*86" table:style-name="ce78">
            <text:p>679</text:p>
          </table:table-cell>
          <table:table-cell office:value-type="float" office:value="1538" table:style-name="ce26">
            <text:p>1538</text:p>
          </table:table-cell>
          <table:table-cell office:value-type="float" office:value="109.12" table:style-name="ce76">
            <text:p>109</text:p>
          </table:table-cell>
          <table:table-cell office:value-type="float" office:value="124.82899999999999" table:style-name="ce76">
            <text:p>125</text:p>
          </table:table-cell>
          <table:table-cell office:value-type="float" office:value="3.2" table:style-name="ce25">
            <text:p>3.20</text:p>
          </table:table-cell>
          <table:table-cell office:value-type="float" office:value="202.54000000000002" table:formula="of:=[.CZ112]+[.CY113]" table:style-name="ce23">
            <text:p>202.5</text:p>
          </table:table-cell>
          <table:table-cell office:value-type="float" office:value="838.53586525000014" table:formula="of:=(([.CV113]*[.CY113])/100)+[.DA112]" table:style-name="ce23">
            <text:p>838.5</text:p>
          </table:table-cell>
          <table:table-cell office:value-type="float" office:value="699.46413474999986" table:formula="of:=[.CV113]-[.DA113]" table:style-name="ce23">
            <text:p>699.5</text:p>
          </table:table-cell>
          <table:table-cell office:value-type="float" office:value="759.35617655771694" table:formula="of:=[.CV113]/[.CZ113]*[.$CZ$87]" table:style-name="ce23">
            <text:p>759.4</text:p>
          </table:table-cell>
          <table:table-cell office:value-type="float" office:value="0.6859909090909091" table:formula="of:=([.Y113]-[.Y112])" table:style-name="ce25">
            <text:p>0.69</text:p>
          </table:table-cell>
          <table:table-cell office:value-type="float" office:value="-7.4608904933814699" table:formula="of:=([.CV113]*100/[.CV112])-100" table:style-name="ce25">
            <text:p>-7.46</text:p>
          </table:table-cell>
          <table:table-cell office:value-type="float" office:value="-10.660890493381469" table:formula="of:=[.DE113]-[.CY113]" table:style-name="ce25">
            <text:p>-10.66</text:p>
          </table:table-cell>
          <table:table-cell office:value-type="float" office:value="-18.145730918057922" table:formula="of:=([.F113]*100/[.F112])-100" table:style-name="ce25">
            <text:p>-18.15</text:p>
          </table:table-cell>
          <table:table-cell office:value-type="float" office:value="-32.76749487683837" table:formula="of:=([.K113]*100/[.K112])-100" table:style-name="ce25">
            <text:p>-32.77</text:p>
          </table:table-cell>
          <table:table-cell office:value-type="float" office:value="21.39" table:style-name="ce30">
            <text:p>21.4</text:p>
          </table:table-cell>
          <table:table-cell office:value-type="float" office:value="69.024886772918236" table:formula="of:=(([.DC113]-MIN([.DC99:.DC113]))/(MAX([.DC99:.DC113])-MIN([.DC99:.DC113])))*100" table:style-name="ce128">
            <text:p>69.0</text:p>
          </table:table-cell>
          <table:table-cell office:value-type="float" office:value="10.913587653024656" table:formula="of:=MIN(100; MAX(0; (([.K113]-([.C113]/26/2))/(([.C113]/26)-([.C113]/26/2)))*100))" table:style-name="ce128">
            <text:p>10.9</text:p>
          </table:table-cell>
          <table:table-cell office:value-type="float" office:value="0" table:formula="of:=MIN(100; MAX(0; (([.F113]-([.C113]/26/2))/(([.C113]/26)-([.C113]/26/2)))*100))" table:style-name="ce128">
            <text:p>0.0</text:p>
          </table:table-cell>
          <table:table-cell office:value-type="float" office:value="51.199286336868319" table:formula="of:=(([.AP113]-MIN([.$AP$2:.$AP$128]))/(MAX([.$AP$2:.$AP$128])-MIN([.$AP$2:.$AP$128])))*100" table:style-name="ce128">
            <text:p>51.2</text:p>
          </table:table-cell>
          <table:table-cell office:value-type="float" office:value="100" table:formula="of:=MIN(100;MAX(0;(([.BP113]-1.8)/(2.2-1.8))*100))" table:style-name="ce128">
            <text:p>100.0</text:p>
          </table:table-cell>
          <table:table-cell office:value-type="float" office:value="100" table:formula="of:=100-((([.CC113]-MIN([.CC84:.CC113]))/(MAX([.CC84:.CC113])-MIN([.CC84:.CC113])))*100)" table:style-name="ce128">
            <text:p>100.0</text:p>
          </table:table-cell>
          <table:table-cell office:value-type="float" office:value="53.61" table:formula="of:=MIN(100; MAX(0; ((IF(AND([.DI113]-[.DI112]&gt;=-0.3;[.DI113]-[.DI112]&lt;=0.3);100;IF(AND([.DI113]-[.DI112]&gt;-1;[.DI113]-[.DI112]&lt;-0.3);50;IF([.DI113]-[.DI112]&lt;=-1;25;75)))))-[.DI113]+(IF(([.DI113]-[.DI112])*([.DI112]-[.DI111])&lt;0;AVERAGE([.DI109:.DI113]);0))))" table:style-name="ce128">
            <text:p>53.6</text:p>
          </table:table-cell>
          <table:table-cell office:value-type="string" table:style-name="ce118">
            <text:p>null</text:p>
          </table:table-cell>
          <table:table-cell office:value-type="float" office:value="54.963965823258754" table:formula="of:=AVERAGE([.DJ113:.DP113])" table:style-name="ce128">
            <text:p>55.0</text:p>
          </table:table-cell>
          <table:table-cell office:value-type="float" office:value="409.76" table:formula="of:=-0.06*(([.A113]-1963)^2)+8.5*([.A113]-1963)+140" table:style-name="ce23">
            <text:p>409.8</text:p>
          </table:table-cell>
          <table:table-cell table:number-columns-repeated="16261"/>
        </table:table-row>
        <table:table-row table:style-name="ro2">
          <table:table-cell office:value-type="float" office:value="2012" table:style-name="ce15">
            <text:p>2012</text:p>
          </table:table-cell>
          <table:table-cell office:value-type="float" office:value="46712650" table:style-name="ce10">
            <text:p>46712650</text:p>
          </table:table-cell>
          <table:table-cell office:value-type="float" office:value="18871198" table:style-name="ce8">
            <text:p>18871198</text:p>
          </table:table-cell>
          <table:table-cell office:value-type="float" office:value="24791438" table:style-name="ce8">
            <text:p>24791438</text:p>
          </table:table-cell>
          <table:table-cell office:value-type="float" office:value="39543687" table:style-name="ce78">
            <text:p>39543687</text:p>
          </table:table-cell>
          <table:table-cell office:value-type="float" office:value="318534" table:style-name="ce18">
            <text:p>318534</text:p>
          </table:table-cell>
          <table:table-cell office:value-type="float" office:value="136922" table:style-name="ce18">
            <text:p>136922</text:p>
          </table:table-cell>
          <table:table-cell office:value-type="float" office:value="19901" table:style-name="ce18">
            <text:p>19901</text:p>
          </table:table-cell>
          <table:table-cell office:value-type="float" office:value="2890" table:style-name="ce18">
            <text:p>2890</text:p>
          </table:table-cell>
          <table:table-cell office:value-type="float" office:value="201009" table:style-name="ce18">
            <text:p>201009</text:p>
          </table:table-cell>
          <table:table-cell office:value-type="float" office:value="273873" table:style-name="ce18">
            <text:p>273873</text:p>
          </table:table-cell>
          <table:table-cell office:value-type="float" office:value="294261" table:style-name="ce18">
            <text:p>294261</text:p>
          </table:table-cell>
          <table:table-cell office:value-type="float" office:value="28328881000" table:style-name="ce84">
            <text:p>2.8E+10</text:p>
          </table:table-cell>
          <table:table-cell office:value-type="float" office:value="103438.02054236818" table:formula="of:=[.M114]/[.K114]" table:style-name="ce26">
            <text:p>103438</text:p>
          </table:table-cell>
          <table:table-cell office:value-type="float" office:value="37108" table:style-name="ce18">
            <text:p>37108</text:p>
          </table:table-cell>
          <table:table-cell office:value-type="float" office:value="17271" table:style-name="ce18">
            <text:p>17271</text:p>
          </table:table-cell>
          <table:table-cell office:value-type="float" office:value="2.1485727520120435" table:formula="of:=[.O114]/[.P114]" table:style-name="ce67">
            <text:p>2.15</text:p>
          </table:table-cell>
          <table:table-cell office:value-type="float" office:value="55.281401608330235" table:formula="of:=([.N114]*100)/([.CV114]*(([.BL114]*([.BK114]/([.BF114]+[.BK114])))+([.BG114]*([.BF114]/([.BF114]+[.BK114])))))" table:style-name="ce67">
            <text:p>55.28</text:p>
          </table:table-cell>
          <table:table-cell office:value-type="float" office:value="-40.482811183548534" table:formula="of:=(([.M114]*100/[.M113])-100)-[.CY114]" table:style-name="ce28">
            <text:p>-40.48</text:p>
          </table:table-cell>
          <table:table-cell office:value-type="float" office:value="633138000000" table:style-name="ce131">
            <text:p>6.33E+11</text:p>
          </table:table-cell>
          <table:table-cell office:value-type="float" office:value="3.4159999999999999" table:style-name="ce28">
            <text:p>3.42</text:p>
          </table:table-cell>
          <table:table-cell office:value-type="float" office:value="4.7" table:style-name="ce28">
            <text:p>4.70</text:p>
          </table:table-cell>
          <table:table-cell office:value-type="float" office:value="95.3" table:formula="of:=100-[.V114]" table:style-name="ce28">
            <text:p>95.30</text:p>
          </table:table-cell>
          <table:table-cell office:value-type="float" office:value="24" table:style-name="ce60">
            <text:p>24</text:p>
          </table:table-cell>
          <table:table-cell office:value-type="float" office:value="1.0449181818181819" table:style-name="ce28">
            <text:p>1.04</text:p>
          </table:table-cell>
          <table:table-cell office:value-type="float" office:value="1.2905916666666666" table:style-name="ce72">
            <text:p>1.29</text:p>
          </table:table-cell>
          <table:table-cell office:value-type="float" office:value="9807968000000" table:style-name="ce85">
            <text:p>9.81E+12</text:p>
          </table:table-cell>
          <table:table-cell office:value-type="float" office:value="2.8622931800965432" table:formula="of:=([.AA114]*100/[.AA113])-100" table:style-name="ce70">
            <text:p>2.86</text:p>
          </table:table-cell>
          <table:table-cell office:value-type="float" office:value="5.5066416666666678" table:style-name="ce74">
            <text:p>5.5</text:p>
          </table:table-cell>
          <table:table-cell office:value-type="float" office:value="1298.9416666666666" table:style-name="ce75">
            <text:p>1299</text:p>
          </table:table-cell>
          <table:table-cell office:value-type="float" office:value="1035964000000" table:style-name="ce125">
            <text:p>1.03596E+12</text:p>
          </table:table-cell>
          <table:table-cell office:value-type="float" office:value="4394880087426" table:formula="of:=([.AW114]*[.AR114]*1000000)+([.CV114]*[.BS114]*86)+([.AS114]*(506006-[.AX114])*1000000)" table:style-name="ce83">
            <text:p>4.39E+12</text:p>
          </table:table-cell>
          <table:table-cell office:value-type="float" office:value="2987732176176" table:formula="of:=([.CV114]*[.BS114]*86)" table:style-name="ce125">
            <text:p>2.98773E+12</text:p>
          </table:table-cell>
          <table:table-cell office:value-type="float" office:value="639034000000" table:style-name="ce83">
            <text:p>6.39E+11</text:p>
          </table:table-cell>
          <table:table-cell office:value-type="float" office:value="16160.202765108877" table:formula="of:=[.AH114]/[.E114]" table:style-name="ce26">
            <text:p>16160</text:p>
          </table:table-cell>
          <table:table-cell office:value-type="float" office:value="16241.224735423444" table:formula="of:=[.AJ113]*(1+([.CY114]/100))" table:style-name="ce76">
            <text:p>16241</text:p>
          </table:table-cell>
          <table:table-cell office:value-type="float" office:value="21098.018623959793" table:formula="of:=[.AI114]+(12*PMT([.U114]/100/12;[.X114]*12;([.AI114]*5)*-1))" table:style-name="ce76">
            <text:p>21098</text:p>
          </table:table-cell>
          <table:table-cell office:value-type="float" office:value="17100.257486634589" table:formula="of:=[.AL113]*(1+(([.CW114]-[.CW113])/100))" table:style-name="ce76">
            <text:p>17100</text:p>
          </table:table-cell>
          <table:table-cell office:value-type="float" office:value="17233.342384898071" table:formula="of:=(([.AL114]+([.AJ114]-[.AI114])+([.AK114]-[.AI114]))-[.AI114])+[.$AI$101]" table:style-name="ce76">
            <text:p>17233</text:p>
          </table:table-cell>
          <table:table-cell office:value-type="float" office:value="112.65235893735532" table:formula="of:=[.AM114]*[.$AN$101]/[.$AM$101]" table:style-name="ce76">
            <text:p>113</text:p>
          </table:table-cell>
          <table:table-cell office:value-type="float" office:value="73.100714725786929" table:formula="of:=[.AI114]*[.$AO$101]/[.$AI$101]" table:style-name="ce76">
            <text:p>73</text:p>
          </table:table-cell>
          <table:table-cell office:value-type="float" office:value="24.434285274213067" table:formula="of:=[.CW114]-[.AO114]" table:style-name="ce118">
            <text:p>24</text:p>
          </table:table-cell>
          <table:table-cell office:value-type="float" office:value="20687.604108473635" table:formula="of:=[.N114]/5" table:style-name="ce26">
            <text:p>20688</text:p>
          </table:table-cell>
          <table:table-cell office:value-type="float" office:value="182.22499999999999" table:style-name="ce8">
            <text:p>182</text:p>
          </table:table-cell>
          <table:table-cell office:value-type="float" office:value="1" table:style-name="ce129">
            <text:p>1.00</text:p>
          </table:table-cell>
          <table:table-cell office:value-type="float" office:value="14908" table:style-name="ce18">
            <text:p>14908</text:p>
          </table:table-cell>
          <table:table-cell office:value-type="float" office:value="11176.169999999998" table:style-name="ce78">
            <text:p>11176</text:p>
          </table:table-cell>
          <table:table-cell office:value-type="float" office:value="8639.35" table:style-name="ce78">
            <text:p>8639</text:p>
          </table:table-cell>
          <table:table-cell office:value-type="float" office:value="5006.8500000000004" table:style-name="ce78">
            <text:p>5007</text:p>
          </table:table-cell>
          <table:table-cell office:value-type="float" office:value="11231.33" table:style-name="ce78">
            <text:p>11231</text:p>
          </table:table-cell>
          <table:table-cell office:value-type="float" office:value="60670" table:style-name="ce18">
            <text:p>60670</text:p>
          </table:table-cell>
          <table:table-cell office:value-type="float" office:value="18289" table:style-name="ce18">
            <text:p>18289</text:p>
          </table:table-cell>
          <table:table-cell office:value-type="float" office:value="40094" table:style-name="ce18">
            <text:p>40094</text:p>
          </table:table-cell>
          <table:table-cell office:value-type="float" office:value="2287" table:style-name="ce18">
            <text:p>2287</text:p>
          </table:table-cell>
          <table:table-cell office:value-type="float" office:value="31194" table:style-name="ce81">
            <text:p>31194</text:p>
          </table:table-cell>
          <table:table-cell office:value-type="float" office:value="37937" table:style-name="ce81">
            <text:p>37937</text:p>
          </table:table-cell>
          <table:table-cell office:value-type="float" office:value="525" table:style-name="ce81">
            <text:p>525</text:p>
          </table:table-cell>
          <table:table-cell office:value-type="float" office:value="14515" table:style-name="ce18">
            <text:p>14515</text:p>
          </table:table-cell>
          <table:table-cell office:value-type="float" office:value="196.6635838317799" table:style-name="ce5">
            <text:p>197</text:p>
          </table:table-cell>
          <table:table-cell office:value-type="float" office:value="1816255299.9999998" table:style-name="ce18">
            <text:p>1816255300</text:p>
          </table:table-cell>
          <table:table-cell office:value-type="float" office:value="125129.54185325524" table:formula="of:=[.BH114]/[.BF114]" table:style-name="ce51">
            <text:p>125130</text:p>
          </table:table-cell>
          <table:table-cell office:value-type="float" office:value="636.26188140803572" table:formula="of:=[.BI114]/[.BG114]" table:style-name="ce51">
            <text:p>636</text:p>
          </table:table-cell>
          <table:table-cell office:value-type="float" office:value="29611" table:style-name="ce18">
            <text:p>29611</text:p>
          </table:table-cell>
          <table:table-cell office:value-type="float" office:value="108.01988521501141" table:style-name="ce5">
            <text:p>108</text:p>
          </table:table-cell>
          <table:table-cell office:value-type="float" office:value="2082608800.0000002" table:style-name="ce18">
            <text:p>2082608800</text:p>
          </table:table-cell>
          <table:table-cell office:value-type="float" office:value="70332.268413765167" table:formula="of:=[.BM114]/[.BK114]" table:style-name="ce55">
            <text:p>70332</text:p>
          </table:table-cell>
          <table:table-cell office:value-type="float" office:value="651.10482457716182" table:formula="of:=[.BN114]/[.BL114]" table:style-name="ce55">
            <text:p>651</text:p>
          </table:table-cell>
          <table:table-cell office:value-type="float" office:value="2.1190543357359184" table:formula="of:=[.CV114]/(([.BO114]+[.BJ114])/2)" table:style-name="ce58">
            <text:p>2.12</text:p>
          </table:table-cell>
          <table:table-cell office:value-type="float" office:value="0.61351766735471358" table:formula="of:=[.BR114]-[.BR113]" table:style-name="ce57">
            <text:p>0.6</text:p>
          </table:table-cell>
          <table:table-cell office:value-type="float" office:value="92.742262138151048" table:style-name="ce56">
            <text:p>93</text:p>
          </table:table-cell>
          <table:table-cell office:value-type="float" office:value="25469994" table:style-name="ce8">
            <text:p>25469994</text:p>
          </table:table-cell>
          <table:table-cell office:value-type="float" office:value="220941" table:formula="of:=[.BS114]-[.BS113]" table:style-name="ce26">
            <text:p>220941</text:p>
          </table:table-cell>
          <table:table-cell office:value-type="float" office:value="80083" table:style-name="ce76">
            <text:p>80083</text:p>
          </table:table-cell>
          <table:table-cell office:value-type="float" office:value="53332" table:style-name="ce76">
            <text:p>53332</text:p>
          </table:table-cell>
          <table:table-cell office:value-type="float" office:value="1.8340267375013908" table:formula="of:=([.B114]/[.BS114])" table:style-name="ce34">
            <text:p>1.83</text:p>
          </table:table-cell>
          <table:table-cell office:value-type="float" office:value="2.57" table:style-name="ce71">
            <text:p>2.57</text:p>
          </table:table-cell>
          <table:table-cell office:value-type="float" office:value="1.321" table:style-name="ce71">
            <text:p>1.32</text:p>
          </table:table-cell>
          <table:table-cell office:value-type="float" office:value="0.87504667996854835" table:formula="of:=([.BS114]*100/[.BS113])-100" table:style-name="ce23">
            <text:p>0.9</text:p>
          </table:table-cell>
          <table:table-cell office:value-type="float" office:value="-105566" table:formula="of:=([.B114]-[.B113])" table:style-name="ce73">
            <text:p>-105566</text:p>
          </table:table-cell>
          <table:table-cell office:value-type="float" office:value="-0.22548061207629644" table:formula="of:=([.B114]*100/[.B113])-100" table:style-name="ce25">
            <text:p>-0.23</text:p>
          </table:table-cell>
          <table:table-cell office:value-type="float" office:value="262017.26459143969" table:formula="of:=[.BT114]-([.CA114]/[.BX114])" table:style-name="ce76">
            <text:p>262017</text:p>
          </table:table-cell>
          <table:table-cell office:value-type="float" office:value="1161000" table:style-name="ce78">
            <text:p>1161000</text:p>
          </table:table-cell>
          <table:table-cell office:value-type="float" office:value="13581.800000000001" table:style-name="ce8">
            <text:p>13582</text:p>
          </table:table-cell>
          <table:table-cell office:value-type="float" office:value="18.649999999999999" table:style-name="ce18">
            <text:p>18.65</text:p>
          </table:table-cell>
          <table:table-cell office:value-type="float" office:value="74.744380000000007" table:formula="of:=100-([.CF114]+[.CH114])" table:style-name="ce25">
            <text:p>74.74</text:p>
          </table:table-cell>
          <table:table-cell office:value-type="float" office:value="6.6056199999999992" table:formula="of:=(8.12*(100-[.CF114]))/100" table:style-name="ce25">
            <text:p>6.61</text:p>
          </table:table-cell>
          <table:table-cell office:value-type="float" office:value="79.2" table:style-name="ce18">
            <text:p>79.2</text:p>
          </table:table-cell>
          <table:table-cell office:value-type="float" office:value="14.5" table:style-name="ce18">
            <text:p>14.5</text:p>
          </table:table-cell>
          <table:table-cell office:value-type="float" office:value="6.3" table:style-name="ce18">
            <text:p>6.3</text:p>
          </table:table-cell>
          <table:table-cell office:value-type="float" office:value="103.193" table:style-name="ce78">
            <text:p>103</text:p>
          </table:table-cell>
          <table:table-cell office:value-type="float" office:value="104.72972972972973" table:formula="of:=[.CN114]*[.$CM$117]/[.$CN$117]" table:style-name="ce78">
            <text:p>105</text:p>
          </table:table-cell>
          <table:table-cell office:value-type="float" office:value="7.75" table:style-name="ce23">
            <text:p>7.8</text:p>
          </table:table-cell>
          <table:table-cell office:value-type="float" office:value="-1.8987341772151893" table:formula="of:=(([.CN114]*100)/[.CN113])-100" table:style-name="ce23">
            <text:p>-1.9</text:p>
          </table:table-cell>
          <table:table-cell office:value-type="float" office:value="19.378136200716845" table:formula="of:=[.CR114]/([.CN114]*12)" table:style-name="ce23">
            <text:p>19.4</text:p>
          </table:table-cell>
          <table:table-cell office:value-type="float" office:value="25.837514934289125" table:formula="of:=[.CR114]/(([.CN114]*12)*0.75)" table:style-name="ce23">
            <text:p>25.8</text:p>
          </table:table-cell>
          <table:table-cell office:value-type="float" office:value="1802.1666666666665" table:formula="of:=AVERAGE([Quarterly.E22:.E25])" table:style-name="ce8">
            <text:p>1802</text:p>
          </table:table-cell>
          <table:table-cell office:value-type="float" office:value="789.27843683044227" table:formula="of:=PMT(([.U114]/100)/12;[.X114]*12;([.CR114]*86))*-1" table:style-name="ce78">
            <text:p>789</text:p>
          </table:table-cell>
          <table:table-cell office:value-type="float" office:value="117.0744911216977" table:formula="of:=[.CR114]*[.$CT$117]/[.$CR$117]" table:style-name="ce78">
            <text:p>117</text:p>
          </table:table-cell>
          <table:table-cell office:value-type="float" office:value="666.5" table:formula="of:=[.CN114]*86" table:style-name="ce78">
            <text:p>667</text:p>
          </table:table-cell>
          <table:table-cell office:value-type="float" office:value="1364" table:style-name="ce26">
            <text:p>1364</text:p>
          </table:table-cell>
          <table:table-cell office:value-type="float" office:value="97.534999999999997" table:style-name="ce76">
            <text:p>98</text:p>
          </table:table-cell>
          <table:table-cell office:value-type="float" office:value="107.678" table:style-name="ce76">
            <text:p>108</text:p>
          </table:table-cell>
          <table:table-cell office:value-type="float" office:value="2.4500000000000002" table:style-name="ce25">
            <text:p>2.45</text:p>
          </table:table-cell>
          <table:table-cell office:value-type="float" office:value="204.99" table:formula="of:=[.CZ113]+[.CY114]" table:style-name="ce23">
            <text:p>205.0</text:p>
          </table:table-cell>
          <table:table-cell office:value-type="float" office:value="871.95386525000015" table:formula="of:=(([.CV114]*[.CY114])/100)+[.DA113]" table:style-name="ce23">
            <text:p>872.0</text:p>
          </table:table-cell>
          <table:table-cell office:value-type="float" office:value="492.04613474999985" table:formula="of:=[.CV114]-[.DA114]" table:style-name="ce23">
            <text:p>492.0</text:p>
          </table:table-cell>
          <table:table-cell office:value-type="float" office:value="665.39831211278602" table:formula="of:=[.CV114]/[.CZ114]*[.$CZ$87]" table:style-name="ce23">
            <text:p>665.4</text:p>
          </table:table-cell>
          <table:table-cell office:value-type="float" office:value="-1.0022545454545453" table:formula="of:=([.Y114]-[.Y113])" table:style-name="ce25">
            <text:p>-1.00</text:p>
          </table:table-cell>
          <table:table-cell office:value-type="float" office:value="-11.313394018205457" table:formula="of:=([.CV114]*100/[.CV113])-100" table:style-name="ce25">
            <text:p>-11.31</text:p>
          </table:table-cell>
          <table:table-cell office:value-type="float" office:value="-13.763394018205457" table:formula="of:=[.DE114]-[.CY114]" table:style-name="ce25">
            <text:p>-13.76</text:p>
          </table:table-cell>
          <table:table-cell office:value-type="float" office:value="-11.475054471074742" table:formula="of:=([.F114]*100/[.F113])-100" table:style-name="ce25">
            <text:p>-11.48</text:p>
          </table:table-cell>
          <table:table-cell office:value-type="float" office:value="-32.950024604552212" table:formula="of:=([.K114]*100/[.K113])-100" table:style-name="ce25">
            <text:p>-32.95</text:p>
          </table:table-cell>
          <table:table-cell office:value-type="float" office:value="24.79" table:style-name="ce30">
            <text:p>24.8</text:p>
          </table:table-cell>
          <table:table-cell office:value-type="float" office:value="50.150521708675058" table:formula="of:=(([.DC114]-MIN([.DC100:.DC114]))/(MAX([.DC100:.DC114])-MIN([.DC100:.DC114])))*100" table:style-name="ce128">
            <text:p>50.2</text:p>
          </table:table-cell>
          <table:table-cell office:value-type="float" office:value="0" table:formula="of:=MIN(100; MAX(0; (([.K114]-([.C114]/26/2))/(([.C114]/26)-([.C114]/26/2)))*100))" table:style-name="ce128">
            <text:p>0.0</text:p>
          </table:table-cell>
          <table:table-cell office:value-type="float" office:value="0" table:formula="of:=MIN(100; MAX(0; (([.F114]-([.C114]/26/2))/(([.C114]/26)-([.C114]/26/2)))*100))" table:style-name="ce128">
            <text:p>0.0</text:p>
          </table:table-cell>
          <table:table-cell office:value-type="float" office:value="39.00076472237739" table:formula="of:=(([.AP114]-MIN([.$AP$2:.$AP$128]))/(MAX([.$AP$2:.$AP$128])-MIN([.$AP$2:.$AP$128])))*100" table:style-name="ce128">
            <text:p>39.0</text:p>
          </table:table-cell>
          <table:table-cell office:value-type="float" office:value="79.763583933979561" table:formula="of:=MIN(100;MAX(0;(([.BP114]-1.8)/(2.2-1.8))*100))" table:style-name="ce128">
            <text:p>79.8</text:p>
          </table:table-cell>
          <table:table-cell office:value-type="float" office:value="45.889858595331731" table:formula="of:=100-((([.CC114]-MIN([.CC85:.CC114]))/(MAX([.CC85:.CC114])-MIN([.CC85:.CC114])))*100)" table:style-name="ce128">
            <text:p>45.9</text:p>
          </table:table-cell>
          <table:table-cell office:value-type="float" office:value="50.21" table:formula="of:=MIN(100; MAX(0; ((IF(AND([.DI114]-[.DI113]&gt;=-0.3;[.DI114]-[.DI113]&lt;=0.3);100;IF(AND([.DI114]-[.DI113]&gt;-1;[.DI114]-[.DI113]&lt;-0.3);50;IF([.DI114]-[.DI113]&lt;=-1;25;75)))))-[.DI114]+(IF(([.DI114]-[.DI113])*([.DI113]-[.DI112])&lt;0;AVERAGE([.DI110:.DI114]);0))))" table:style-name="ce128">
            <text:p>50.2</text:p>
          </table:table-cell>
          <table:table-cell office:value-type="string" table:style-name="ce118">
            <text:p>null</text:p>
          </table:table-cell>
          <table:table-cell office:value-type="float" office:value="37.859246994337681" table:formula="of:=AVERAGE([.DJ114:.DP114])" table:style-name="ce128">
            <text:p>37.9</text:p>
          </table:table-cell>
          <table:table-cell office:value-type="float" office:value="412.44" table:formula="of:=-0.06*(([.A114]-1963)^2)+8.5*([.A114]-1963)+140" table:style-name="ce23">
            <text:p>412.4</text:p>
          </table:table-cell>
          <table:table-cell table:number-columns-repeated="16261"/>
        </table:table-row>
        <table:table-row table:style-name="ro2">
          <table:table-cell office:value-type="float" office:value="2013" table:style-name="ce15">
            <text:p>2013</text:p>
          </table:table-cell>
          <table:table-cell office:value-type="float" office:value="46495744" table:style-name="ce10">
            <text:p>46495744</text:p>
          </table:table-cell>
          <table:table-cell office:value-type="float" office:value="18507866" table:style-name="ce8">
            <text:p>18507866</text:p>
          </table:table-cell>
          <table:table-cell office:value-type="float" office:value="24537540" table:style-name="ce8">
            <text:p>24537540</text:p>
          </table:table-cell>
          <table:table-cell office:value-type="float" office:value="39415835" table:style-name="ce78">
            <text:p>39415835</text:p>
          </table:table-cell>
          <table:table-cell office:value-type="float" office:value="312593" table:style-name="ce18">
            <text:p>312593</text:p>
          </table:table-cell>
          <table:table-cell office:value-type="float" office:value="132980" table:style-name="ce18">
            <text:p>132980</text:p>
          </table:table-cell>
          <table:table-cell office:value-type="float" office:value="15898" table:style-name="ce18">
            <text:p>15898</text:p>
          </table:table-cell>
          <table:table-cell office:value-type="float" office:value="2351" table:style-name="ce18">
            <text:p>2351</text:p>
          </table:table-cell>
          <table:table-cell office:value-type="float" office:value="231836" table:style-name="ce18">
            <text:p>231836</text:p>
          </table:table-cell>
          <table:table-cell office:value-type="float" office:value="199703" table:style-name="ce18">
            <text:p>199703</text:p>
          </table:table-cell>
          <table:table-cell office:value-type="float" office:value="283488" table:style-name="ce18">
            <text:p>283488</text:p>
          </table:table-cell>
          <table:table-cell office:value-type="float" office:value="19972573000" table:style-name="ce84">
            <text:p>2.0E+10</text:p>
          </table:table-cell>
          <table:table-cell office:value-type="float" office:value="100011.38190212466" table:formula="of:=[.M115]/[.K115]" table:style-name="ce26">
            <text:p>100011</text:p>
          </table:table-cell>
          <table:table-cell office:value-type="float" office:value="36877" table:style-name="ce18">
            <text:p>36877</text:p>
          </table:table-cell>
          <table:table-cell office:value-type="float" office:value="11325" table:style-name="ce18">
            <text:p>11325</text:p>
          </table:table-cell>
          <table:table-cell office:value-type="float" office:value="3.2562472406181016" table:formula="of:=[.O115]/[.P115]" table:style-name="ce67">
            <text:p>3.26</text:p>
          </table:table-cell>
          <table:table-cell office:value-type="float" office:value="58.478995637435418" table:formula="of:=([.N115]*100)/([.CV115]*(([.BL115]*([.BK115]/([.BF115]+[.BK115])))+([.BG115]*([.BF115]/([.BF115]+[.BK115])))))" table:style-name="ce67">
            <text:p>58.48</text:p>
          </table:table-cell>
          <table:table-cell office:value-type="float" office:value="-30.907487034521413" table:formula="of:=(([.M115]*100/[.M114])-100)-[.CY115]" table:style-name="ce28">
            <text:p>-30.91</text:p>
          </table:table-cell>
          <table:table-cell office:value-type="float" office:value="604395000000" table:style-name="ce131">
            <text:p>6.04E+11</text:p>
          </table:table-cell>
          <table:table-cell office:value-type="float" office:value="3.3530000000000002" table:style-name="ce28">
            <text:p>3.35</text:p>
          </table:table-cell>
          <table:table-cell office:value-type="float" office:value="5.9" table:style-name="ce28">
            <text:p>5.90</text:p>
          </table:table-cell>
          <table:table-cell office:value-type="float" office:value="94.1" table:formula="of:=100-[.V115]" table:style-name="ce28">
            <text:p>94.10</text:p>
          </table:table-cell>
          <table:table-cell office:value-type="float" office:value="23" table:style-name="ce60">
            <text:p>23</text:p>
          </table:table-cell>
          <table:table-cell office:value-type="float" office:value="0.53268181818181815" table:style-name="ce28">
            <text:p>0.53</text:p>
          </table:table-cell>
          <table:table-cell office:value-type="float" office:value="1.3298416666666666" table:style-name="ce72">
            <text:p>1.33</text:p>
          </table:table-cell>
          <table:table-cell office:value-type="float" office:value="9849473000000" table:style-name="ce85">
            <text:p>9.85E+12</text:p>
          </table:table-cell>
          <table:table-cell office:value-type="float" office:value="0.42317633989017622" table:formula="of:=([.AA115]*100/[.AA114])-100" table:style-name="ce70">
            <text:p>0.42</text:p>
          </table:table-cell>
          <table:table-cell office:value-type="float" office:value="117.12691666666665" table:style-name="ce68">
            <text:p>117</text:p>
          </table:table-cell>
          <table:table-cell office:value-type="float" office:value="1049.1100000000001" table:style-name="ce75">
            <text:p>1049</text:p>
          </table:table-cell>
          <table:table-cell office:value-type="float" office:value="1025652000000" table:style-name="ce125">
            <text:p>1.02565E+12</text:p>
          </table:table-cell>
          <table:table-cell office:value-type="float" office:value="4011912699750" table:formula="of:=([.AW115]*[.AR115]*1000000)+([.CV115]*[.BS115]*86)+([.AS115]*(506006-[.AX115])*1000000)" table:style-name="ce83">
            <text:p>4.01E+12</text:p>
          </table:table-cell>
          <table:table-cell office:value-type="float" office:value="2754221917500" table:formula="of:=([.CV115]*[.BS115]*86)" table:style-name="ce125">
            <text:p>2.75422E+12</text:p>
          </table:table-cell>
          <table:table-cell office:value-type="float" office:value="638923000000" table:style-name="ce83">
            <text:p>6.39E+11</text:p>
          </table:table-cell>
          <table:table-cell office:value-type="float" office:value="16209.805018719" table:formula="of:=[.AH115]/[.E115]" table:style-name="ce26">
            <text:p>16210</text:p>
          </table:table-cell>
          <table:table-cell office:value-type="float" office:value="16470.226004192915" table:formula="of:=[.AJ114]*(1+([.CY115]/100))" table:style-name="ce76">
            <text:p>16470</text:p>
          </table:table-cell>
          <table:table-cell office:value-type="float" office:value="21270.087110998727" table:formula="of:=[.AI115]+(12*PMT([.U115]/100/12;[.X115]*12;([.AI115]*5)*-1))" table:style-name="ce76">
            <text:p>21270</text:p>
          </table:table-cell>
          <table:table-cell office:value-type="float" office:value="15493.688295765271" table:formula="of:=[.AL114]*(1+(([.CW115]-[.CW114])/100))" table:style-name="ce76">
            <text:p>15494</text:p>
          </table:table-cell>
          <table:table-cell office:value-type="float" office:value="15879.036189006791" table:formula="of:=(([.AL115]+([.AJ115]-[.AI115])+([.AK115]-[.AI115]))-[.AI115])+[.$AI$101]" table:style-name="ce76">
            <text:p>15879</text:p>
          </table:table-cell>
          <table:table-cell office:value-type="float" office:value="103.79941652588641" table:formula="of:=[.AM115]*[.$AN$101]/[.$AM$101]" table:style-name="ce76">
            <text:p>104</text:p>
          </table:table-cell>
          <table:table-cell office:value-type="float" office:value="73.325090635149806" table:formula="of:=[.AI115]*[.$AO$101]/[.$AI$101]" table:style-name="ce76">
            <text:p>73</text:p>
          </table:table-cell>
          <table:table-cell office:value-type="float" office:value="14.814909364850195" table:formula="of:=[.CW115]-[.AO115]" table:style-name="ce118">
            <text:p>15</text:p>
          </table:table-cell>
          <table:table-cell office:value-type="float" office:value="20002.276380424933" table:formula="of:=[.N115]/5" table:style-name="ce26">
            <text:p>20002</text:p>
          </table:table-cell>
          <table:table-cell office:value-type="float" office:value="153.52500000000001" table:style-name="ce8">
            <text:p>154</text:p>
          </table:table-cell>
          <table:table-cell office:value-type="float" office:value="0.97" table:style-name="ce129">
            <text:p>0.97</text:p>
          </table:table-cell>
          <table:table-cell office:value-type="float" office:value="14555" table:style-name="ce18">
            <text:p>14555</text:p>
          </table:table-cell>
          <table:table-cell office:value-type="float" office:value="13812.349999999999" table:style-name="ce78">
            <text:p>13812</text:p>
          </table:table-cell>
          <table:table-cell office:value-type="float" office:value="7325.4299999999994" table:style-name="ce78">
            <text:p>7325</text:p>
          </table:table-cell>
          <table:table-cell office:value-type="float" office:value="5066.97" table:style-name="ce78">
            <text:p>5067</text:p>
          </table:table-cell>
          <table:table-cell office:value-type="float" office:value="11383.1" table:style-name="ce78">
            <text:p>11383</text:p>
          </table:table-cell>
          <table:table-cell office:value-type="float" office:value="56436" table:style-name="ce18">
            <text:p>56436</text:p>
          </table:table-cell>
          <table:table-cell office:value-type="float" office:value="15025" table:style-name="ce18">
            <text:p>15025</text:p>
          </table:table-cell>
          <table:table-cell office:value-type="float" office:value="38894" table:style-name="ce18">
            <text:p>38894</text:p>
          </table:table-cell>
          <table:table-cell office:value-type="float" office:value="2517" table:style-name="ce18">
            <text:p>2517</text:p>
          </table:table-cell>
          <table:table-cell office:value-type="float" office:value="23889" table:style-name="ce81">
            <text:p>23889</text:p>
          </table:table-cell>
          <table:table-cell office:value-type="float" office:value="34294" table:style-name="ce81">
            <text:p>34294</text:p>
          </table:table-cell>
          <table:table-cell office:value-type="float" office:value="557" table:style-name="ce81">
            <text:p>557</text:p>
          </table:table-cell>
          <table:table-cell office:value-type="float" office:value="11311" table:style-name="ce18">
            <text:p>11311</text:p>
          </table:table-cell>
          <table:table-cell office:value-type="float" office:value="197.77760310692932" table:style-name="ce5">
            <text:p>198</text:p>
          </table:table-cell>
          <table:table-cell office:value-type="float" office:value="1487085500.0000002" table:style-name="ce18">
            <text:p>1487085500</text:p>
          </table:table-cell>
          <table:table-cell office:value-type="float" office:value="131472.50464149946" table:formula="of:=[.BH115]/[.BF115]" table:style-name="ce51">
            <text:p>131473</text:p>
          </table:table-cell>
          <table:table-cell office:value-type="float" office:value="664.74920605857619" table:formula="of:=[.BI115]/[.BG115]" table:style-name="ce51">
            <text:p>665</text:p>
          </table:table-cell>
          <table:table-cell office:value-type="float" office:value="22961" table:style-name="ce18">
            <text:p>22961</text:p>
          </table:table-cell>
          <table:table-cell office:value-type="float" office:value="106.78645446722538" table:style-name="ce5">
            <text:p>107</text:p>
          </table:table-cell>
          <table:table-cell office:value-type="float" office:value="1620894999.9999998" table:style-name="ce18">
            <text:p>1620895000</text:p>
          </table:table-cell>
          <table:table-cell office:value-type="float" office:value="70593.397500108869" table:formula="of:=[.BM115]/[.BK115]" table:style-name="ce55">
            <text:p>70593</text:p>
          </table:table-cell>
          <table:table-cell office:value-type="float" office:value="661.0707121264636" table:formula="of:=[.BN115]/[.BL115]" table:style-name="ce55">
            <text:p>661</text:p>
          </table:table-cell>
          <table:table-cell office:value-type="float" office:value="1.8856256160507345" table:formula="of:=[.CV115]/(([.BO115]+[.BJ115])/2)" table:style-name="ce58">
            <text:p>1.89</text:p>
          </table:table-cell>
          <table:table-cell office:value-type="float" office:value="-0.10074848420418903" table:formula="of:=[.BR115]-[.BR114]" table:style-name="ce57">
            <text:p>-0.1</text:p>
          </table:table-cell>
          <table:table-cell office:value-type="float" office:value="92.641513653946859" table:style-name="ce56">
            <text:p>93</text:p>
          </table:table-cell>
          <table:table-cell office:value-type="float" office:value="25620669" table:style-name="ce8">
            <text:p>25620669</text:p>
          </table:table-cell>
          <table:table-cell office:value-type="float" office:value="150675" table:formula="of:=[.BS115]-[.BS114]" table:style-name="ce26">
            <text:p>150675</text:p>
          </table:table-cell>
          <table:table-cell office:value-type="float" office:value="43230" table:style-name="ce76">
            <text:p>43230</text:p>
          </table:table-cell>
          <table:table-cell office:value-type="float" office:value="17059" table:style-name="ce76">
            <text:p>17059</text:p>
          </table:table-cell>
          <table:table-cell office:value-type="float" office:value="1.8147747820324285" table:formula="of:=([.B115]/[.BS115])" table:style-name="ce34">
            <text:p>1.81</text:p>
          </table:table-cell>
          <table:table-cell office:value-type="float" office:value="2.5499999999999998" table:style-name="ce71">
            <text:p>2.55</text:p>
          </table:table-cell>
          <table:table-cell office:value-type="float" office:value="1.2729999999999999" table:style-name="ce71">
            <text:p>1.27</text:p>
          </table:table-cell>
          <table:table-cell office:value-type="float" office:value="0.59157846680294313" table:formula="of:=([.BS115]*100/[.BS114])-100" table:style-name="ce23">
            <text:p>0.6</text:p>
          </table:table-cell>
          <table:table-cell office:value-type="float" office:value="-216906" table:formula="of:=([.B115]-[.B114])" table:style-name="ce73">
            <text:p>-216906</text:p>
          </table:table-cell>
          <table:table-cell office:value-type="float" office:value="-0.46434102967825197" table:formula="of:=([.B115]*100/[.B114])-100" table:style-name="ce25">
            <text:p>-0.46</text:p>
          </table:table-cell>
          <table:table-cell office:value-type="float" office:value="235736.17647058825" table:formula="of:=[.BT115]-([.CA115]/[.BX115])" table:style-name="ce76">
            <text:p>235736</text:p>
          </table:table-cell>
          <table:table-cell office:value-type="float" office:value="1029000" table:style-name="ce78">
            <text:p>1029000</text:p>
          </table:table-cell>
          <table:table-cell office:value-type="float" office:value="10742.990000000002" table:style-name="ce8">
            <text:p>10743</text:p>
          </table:table-cell>
          <table:table-cell office:value-type="float" office:value="21.93" table:style-name="ce18">
            <text:p>21.93</text:p>
          </table:table-cell>
          <table:table-cell office:value-type="float" office:value="69.365195" table:formula="of:=100-([.CF115]+[.CH115])" table:style-name="ce25">
            <text:p>69.37</text:p>
          </table:table-cell>
          <table:table-cell office:value-type="float" office:value="8.7048050000000003" table:formula="of:=(11.15*(100-[.CF115]))/100" table:style-name="ce25">
            <text:p>8.70</text:p>
          </table:table-cell>
          <table:table-cell office:value-type="float" office:value="77.7" table:style-name="ce23">
            <text:p>77.7</text:p>
          </table:table-cell>
          <table:table-cell office:value-type="float" office:value="15.4" table:style-name="ce23">
            <text:p>15.4</text:p>
          </table:table-cell>
          <table:table-cell office:value-type="float" office:value="6.9" table:style-name="ce23">
            <text:p>6.9</text:p>
          </table:table-cell>
          <table:table-cell office:value-type="float" office:value="100.49299999999999" table:style-name="ce78">
            <text:p>100</text:p>
          </table:table-cell>
          <table:table-cell office:value-type="float" office:value="98.648648648648646" table:formula="of:=[.CN115]*[.$CM$117]/[.$CN$117]" table:style-name="ce78">
            <text:p>99</text:p>
          </table:table-cell>
          <table:table-cell office:value-type="float" office:value="7.3" table:style-name="ce23">
            <text:p>7.3</text:p>
          </table:table-cell>
          <table:table-cell office:value-type="float" office:value="-5.8064516129032313" table:formula="of:=(([.CN115]*100)/[.CN114])-100" table:style-name="ce23">
            <text:p>-5.8</text:p>
          </table:table-cell>
          <table:table-cell office:value-type="float" office:value="18.774733637747335" table:formula="of:=[.CR115]/([.CN115]*12)" table:style-name="ce23">
            <text:p>18.8</text:p>
          </table:table-cell>
          <table:table-cell office:value-type="float" office:value="25.032978183663118" table:formula="of:=[.CR115]/(([.CN115]*12)*0.75)" table:style-name="ce23">
            <text:p>25.0</text:p>
          </table:table-cell>
          <table:table-cell office:value-type="float" office:value="1644.6666666666665" table:formula="of:=AVERAGE([Quarterly.E26:.E29])" table:style-name="ce8">
            <text:p>1645</text:p>
          </table:table-cell>
          <table:table-cell office:value-type="float" office:value="735.90546518841438" table:formula="of:=PMT(([.U115]/100)/12;[.X115]*12;([.CR115]*86))*-1" table:style-name="ce78">
            <text:p>736</text:p>
          </table:table-cell>
          <table:table-cell office:value-type="float" office:value="106.8427890861845" table:formula="of:=[.CR115]*[.$CT$117]/[.$CR$117]" table:style-name="ce78">
            <text:p>107</text:p>
          </table:table-cell>
          <table:table-cell office:value-type="float" office:value="627.79999999999995" table:formula="of:=[.CN115]*86" table:style-name="ce78">
            <text:p>628</text:p>
          </table:table-cell>
          <table:table-cell office:value-type="float" office:value="1250" table:style-name="ce26">
            <text:p>1250</text:p>
          </table:table-cell>
          <table:table-cell office:value-type="float" office:value="88.14" table:style-name="ce76">
            <text:p>88</text:p>
          </table:table-cell>
          <table:table-cell office:value-type="float" office:value="96.266000000000005" table:style-name="ce76">
            <text:p>96</text:p>
          </table:table-cell>
          <table:table-cell office:value-type="float" office:value="1.41" table:style-name="ce25">
            <text:p>1.41</text:p>
          </table:table-cell>
          <table:table-cell office:value-type="float" office:value="206.4" table:formula="of:=[.CZ114]+[.CY115]" table:style-name="ce23">
            <text:p>206.4</text:p>
          </table:table-cell>
          <table:table-cell office:value-type="float" office:value="889.57886525000015" table:formula="of:=(([.CV115]*[.CY115])/100)+[.DA114]" table:style-name="ce23">
            <text:p>889.6</text:p>
          </table:table-cell>
          <table:table-cell office:value-type="float" office:value="360.42113474999985" table:formula="of:=[.CV115]-[.DA115]" table:style-name="ce23">
            <text:p>360.4</text:p>
          </table:table-cell>
          <table:table-cell office:value-type="float" office:value="605.62015503875966" table:formula="of:=[.CV115]/[.CZ115]*[.$CZ$87]" table:style-name="ce23">
            <text:p>605.6</text:p>
          </table:table-cell>
          <table:table-cell office:value-type="float" office:value="-0.51223636363636371" table:formula="of:=([.Y115]-[.Y114])" table:style-name="ce25">
            <text:p>-0.51</text:p>
          </table:table-cell>
          <table:table-cell office:value-type="float" office:value="-8.3577712609970689" table:formula="of:=([.CV115]*100/[.CV114])-100" table:style-name="ce25">
            <text:p>-8.36</text:p>
          </table:table-cell>
          <table:table-cell office:value-type="float" office:value="-9.767771260997069" table:formula="of:=[.DE115]-[.CY115]" table:style-name="ce25">
            <text:p>-9.77</text:p>
          </table:table-cell>
          <table:table-cell office:value-type="float" office:value="-1.8651070215424426" table:formula="of:=([.F115]*100/[.F114])-100" table:style-name="ce25">
            <text:p>-1.87</text:p>
          </table:table-cell>
          <table:table-cell office:value-type="float" office:value="-27.081895623153798" table:formula="of:=([.K115]*100/[.K114])-100" table:style-name="ce25">
            <text:p>-27.08</text:p>
          </table:table-cell>
          <table:table-cell office:value-type="float" office:value="26.09" table:style-name="ce30">
            <text:p>26.1</text:p>
          </table:table-cell>
          <table:table-cell office:value-type="float" office:value="34.990870381875119" table:formula="of:=(([.DC115]-MIN([.DC101:.DC115]))/(MAX([.DC101:.DC115])-MIN([.DC101:.DC115])))*100" table:style-name="ce128">
            <text:p>35.0</text:p>
          </table:table-cell>
          <table:table-cell office:value-type="float" office:value="0" table:formula="of:=MIN(100; MAX(0; (([.K115]-([.C115]/26/2))/(([.C115]/26)-([.C115]/26/2)))*100))" table:style-name="ce128">
            <text:p>0.0</text:p>
          </table:table-cell>
          <table:table-cell office:value-type="float" office:value="0" table:formula="of:=MIN(100; MAX(0; (([.F115]-([.C115]/26/2))/(([.C115]/26)-([.C115]/26/2)))*100))" table:style-name="ce128">
            <text:p>0.0</text:p>
          </table:table-cell>
          <table:table-cell office:value-type="float" office:value="23.907782565655452" table:formula="of:=(([.AP115]-MIN([.$AP$2:.$AP$128]))/(MAX([.$AP$2:.$AP$128])-MIN([.$AP$2:.$AP$128])))*100" table:style-name="ce128">
            <text:p>23.9</text:p>
          </table:table-cell>
          <table:table-cell office:value-type="float" office:value="21.406404012683613" table:formula="of:=MIN(100;MAX(0;(([.BP115]-1.8)/(2.2-1.8))*100))" table:style-name="ce128">
            <text:p>21.4</text:p>
          </table:table-cell>
          <table:table-cell office:value-type="float" office:value="53.910217181364153" table:formula="of:=100-((([.CC115]-MIN([.CC86:.CC115]))/(MAX([.CC86:.CC115])-MIN([.CC86:.CC115])))*100)" table:style-name="ce128">
            <text:p>53.9</text:p>
          </table:table-cell>
          <table:table-cell office:value-type="float" office:value="48.91" table:formula="of:=MIN(100; MAX(0; ((IF(AND([.DI115]-[.DI114]&gt;=-0.3;[.DI115]-[.DI114]&lt;=0.3);100;IF(AND([.DI115]-[.DI114]&gt;-1;[.DI115]-[.DI114]&lt;-0.3);50;IF([.DI115]-[.DI114]&lt;=-1;25;75)))))-[.DI115]+(IF(([.DI115]-[.DI114])*([.DI114]-[.DI113])&lt;0;AVERAGE([.DI111:.DI115]);0))))" table:style-name="ce128">
            <text:p>48.9</text:p>
          </table:table-cell>
          <table:table-cell office:value-type="string" table:style-name="ce118">
            <text:p>null</text:p>
          </table:table-cell>
          <table:table-cell office:value-type="float" office:value="26.160753448796903" table:formula="of:=AVERAGE([.DJ115:.DP115])" table:style-name="ce128">
            <text:p>26.2</text:p>
          </table:table-cell>
          <table:table-cell office:value-type="float" office:value="415" table:formula="of:=-0.06*(([.A115]-1963)^2)+8.5*([.A115]-1963)+140" table:style-name="ce23">
            <text:p>415.0</text:p>
          </table:table-cell>
          <table:table-cell table:number-columns-repeated="16261"/>
        </table:table-row>
        <table:table-row table:style-name="ro2">
          <table:table-cell office:value-type="float" office:value="2014" table:style-name="ce15">
            <text:p>2014</text:p>
          </table:table-cell>
          <table:table-cell office:value-type="float" office:value="46425722" table:style-name="ce10">
            <text:p>46425722</text:p>
          </table:table-cell>
          <table:table-cell office:value-type="float" office:value="18208062" table:style-name="ce8">
            <text:p>18208062</text:p>
          </table:table-cell>
          <table:table-cell office:value-type="float" office:value="24376282" table:style-name="ce8">
            <text:p>24376282</text:p>
          </table:table-cell>
          <table:table-cell office:value-type="float" office:value="39411532" table:style-name="ce78">
            <text:p>39411532</text:p>
          </table:table-cell>
          <table:table-cell office:value-type="float" office:value="318830" table:style-name="ce18">
            <text:p>318830</text:p>
          </table:table-cell>
          <table:table-cell office:value-type="float" office:value="137594" table:style-name="ce18">
            <text:p>137594</text:p>
          </table:table-cell>
          <table:table-cell office:value-type="float" office:value="14306" table:style-name="ce18">
            <text:p>14306</text:p>
          </table:table-cell>
          <table:table-cell office:value-type="float" office:value="1827" table:style-name="ce18">
            <text:p>1827</text:p>
          </table:table-cell>
          <table:table-cell office:value-type="float" office:value="196646" table:style-name="ce18">
            <text:p>196646</text:p>
          </table:table-cell>
          <table:table-cell office:value-type="float" office:value="204302" table:style-name="ce18">
            <text:p>204302</text:p>
          </table:table-cell>
          <table:table-cell office:value-type="float" office:value="282360" table:style-name="ce18">
            <text:p>282360</text:p>
          </table:table-cell>
          <table:table-cell office:value-type="float" office:value="20890540000" table:style-name="ce84">
            <text:p>2.1E+10</text:p>
          </table:table-cell>
          <table:table-cell office:value-type="float" office:value="102253.23295905082" table:formula="of:=[.M116]/[.K116]" table:style-name="ce26">
            <text:p>102253</text:p>
          </table:table-cell>
          <table:table-cell office:value-type="float" office:value="33601" table:style-name="ce18">
            <text:p>33601</text:p>
          </table:table-cell>
          <table:table-cell office:value-type="float" office:value="9547" table:style-name="ce18">
            <text:p>9547</text:p>
          </table:table-cell>
          <table:table-cell office:value-type="float" office:value="3.5195349324395098" table:formula="of:=[.O116]/[.P116]" table:style-name="ce67">
            <text:p>3.52</text:p>
          </table:table-cell>
          <table:table-cell office:value-type="float" office:value="57.940806173985102" table:formula="of:=([.N116]*100)/([.CV116]*(([.BL116]*([.BK116]/([.BF116]+[.BK116])))+([.BG116]*([.BF116]/([.BF116]+[.BK116])))))" table:style-name="ce67">
            <text:p>57.94</text:p>
          </table:table-cell>
          <table:table-cell office:value-type="float" office:value="4.7461379137279867" table:formula="of:=(([.M116]*100/[.M115])-100)-[.CY116]" table:style-name="ce28">
            <text:p>4.75</text:p>
          </table:table-cell>
          <table:table-cell office:value-type="float" office:value="579793000000" table:style-name="ce131">
            <text:p>5.80E+11</text:p>
          </table:table-cell>
          <table:table-cell office:value-type="float" office:value="3.004" table:style-name="ce28">
            <text:p>3.00</text:p>
          </table:table-cell>
          <table:table-cell office:value-type="float" office:value="5.4" table:style-name="ce28">
            <text:p>5.40</text:p>
          </table:table-cell>
          <table:table-cell office:value-type="float" office:value="94.6" table:formula="of:=100-[.V116]" table:style-name="ce28">
            <text:p>94.60</text:p>
          </table:table-cell>
          <table:table-cell office:value-type="float" office:value="23" table:style-name="ce60">
            <text:p>23</text:p>
          </table:table-cell>
          <table:table-cell office:value-type="float" office:value="0.46862727272727284" table:style-name="ce28">
            <text:p>0.47</text:p>
          </table:table-cell>
          <table:table-cell office:value-type="float" office:value="1.3205499999999999" table:style-name="ce72">
            <text:p>1.32</text:p>
          </table:table-cell>
          <table:table-cell office:value-type="float" office:value="10328136000000" table:style-name="ce85">
            <text:p>1.03E+13</text:p>
          </table:table-cell>
          <table:table-cell office:value-type="float" office:value="4.8597828533567196" table:formula="of:=([.AA116]*100/[.AA115])-100" table:style-name="ce70">
            <text:p>4.86</text:p>
          </table:table-cell>
          <table:table-cell office:value-type="float" office:value="374.17320000000001" table:style-name="ce68">
            <text:p>374</text:p>
          </table:table-cell>
          <table:table-cell office:value-type="float" office:value="950.48333333333323" table:style-name="ce75">
            <text:p>950</text:p>
          </table:table-cell>
          <table:table-cell office:value-type="float" office:value="1038949000000" table:style-name="ce125">
            <text:p>1.03895E+12</text:p>
          </table:table-cell>
          <table:table-cell office:value-type="float" office:value="3985360613574" table:formula="of:=([.AW116]*[.AR116]*1000000)+([.CV116]*[.BS116]*86)+([.AS116]*(506006-[.AX116])*1000000)" table:style-name="ce83">
            <text:p>3.99E+12</text:p>
          </table:table-cell>
          <table:table-cell office:value-type="float" office:value="2776261271574" table:formula="of:=([.CV116]*[.BS116]*86)" table:style-name="ce125">
            <text:p>2.77626E+12</text:p>
          </table:table-cell>
          <table:table-cell office:value-type="float" office:value="639698000000" table:style-name="ce83">
            <text:p>6.40E+11</text:p>
          </table:table-cell>
          <table:table-cell office:value-type="float" office:value="16231.239120570091" table:formula="of:=[.AH116]/[.E116]" table:style-name="ce26">
            <text:p>16231</text:p>
          </table:table-cell>
          <table:table-cell office:value-type="float" office:value="16445.520665186625" table:formula="of:=[.AJ115]*(1+([.CY116]/100))" table:style-name="ce76">
            <text:p>16446</text:p>
          </table:table-cell>
          <table:table-cell office:value-type="float" office:value="21122.242583926538" table:formula="of:=[.AI116]+(12*PMT([.U116]/100/12;[.X116]*12;([.AI116]*5)*-1))" table:style-name="ce76">
            <text:p>21122</text:p>
          </table:table-cell>
          <table:table-cell office:value-type="float" office:value="15123.001803289086" table:formula="of:=[.AL115]*(1+(([.CW116]-[.CW115])/100))" table:style-name="ce76">
            <text:p>15123</text:p>
          </table:table-cell>
          <table:table-cell office:value-type="float" office:value="15271.49752489885" table:formula="of:=(([.AL116]+([.AJ116]-[.AI116])+([.AK116]-[.AI116]))-[.AI116])+[.$AI$101]" table:style-name="ce76">
            <text:p>15271</text:p>
          </table:table-cell>
          <table:table-cell office:value-type="float" office:value="99.828006794168616" table:formula="of:=[.AM116]*[.$AN$101]/[.$AM$101]" table:style-name="ce76">
            <text:p>100</text:p>
          </table:table-cell>
          <table:table-cell office:value-type="float" office:value="73.422047844635003" table:formula="of:=[.AI116]*[.$AO$101]/[.$AI$101]" table:style-name="ce76">
            <text:p>73</text:p>
          </table:table-cell>
          <table:table-cell office:value-type="float" office:value="12.325452155364985" table:formula="of:=[.CW116]-[.AO116]" table:style-name="ce118">
            <text:p>12</text:p>
          </table:table-cell>
          <table:table-cell office:value-type="float" office:value="20450.646591810164" table:formula="of:=[.N116]/5" table:style-name="ce26">
            <text:p>20451</text:p>
          </table:table-cell>
          <table:table-cell office:value-type="float" office:value="146.52500000000001" table:style-name="ce8">
            <text:p>147</text:p>
          </table:table-cell>
          <table:table-cell office:value-type="float" office:value="0.99" table:style-name="ce129">
            <text:p>0.99</text:p>
          </table:table-cell>
          <table:table-cell office:value-type="float" office:value="15899" table:style-name="ce18">
            <text:p>15899</text:p>
          </table:table-cell>
          <table:table-cell office:value-type="float" office:value="14675.24" table:style-name="ce78">
            <text:p>14675</text:p>
          </table:table-cell>
          <table:table-cell office:value-type="float" office:value="9039.5" table:style-name="ce78">
            <text:p>9040</text:p>
          </table:table-cell>
          <table:table-cell office:value-type="float" office:value="4909.74" table:style-name="ce78">
            <text:p>4910</text:p>
          </table:table-cell>
          <table:table-cell office:value-type="float" office:value="11359.85" table:style-name="ce78">
            <text:p>11360</text:p>
          </table:table-cell>
          <table:table-cell office:value-type="float" office:value="56606" table:style-name="ce18">
            <text:p>56606</text:p>
          </table:table-cell>
          <table:table-cell office:value-type="float" office:value="14934" table:style-name="ce18">
            <text:p>14934</text:p>
          </table:table-cell>
          <table:table-cell office:value-type="float" office:value="39293" table:style-name="ce18">
            <text:p>39293</text:p>
          </table:table-cell>
          <table:table-cell office:value-type="float" office:value="2379" table:style-name="ce18">
            <text:p>2379</text:p>
          </table:table-cell>
          <table:table-cell office:value-type="float" office:value="25422" table:style-name="ce81">
            <text:p>25422</text:p>
          </table:table-cell>
          <table:table-cell office:value-type="float" office:value="32846" table:style-name="ce81">
            <text:p>32846</text:p>
          </table:table-cell>
          <table:table-cell office:value-type="float" office:value="508" table:style-name="ce81">
            <text:p>508</text:p>
          </table:table-cell>
          <table:table-cell office:value-type="float" office:value="11550" table:style-name="ce18">
            <text:p>11550</text:p>
          </table:table-cell>
          <table:table-cell office:value-type="float" office:value="198.73922895243689" table:style-name="ce5">
            <text:p>199</text:p>
          </table:table-cell>
          <table:table-cell office:value-type="float" office:value="1527021399.9999998" table:style-name="ce18">
            <text:p>1527021400</text:p>
          </table:table-cell>
          <table:table-cell office:value-type="float" office:value="132209.645021645" table:formula="of:=[.BH116]/[.BF116]" table:style-name="ce51">
            <text:p>132210</text:p>
          </table:table-cell>
          <table:table-cell office:value-type="float" office:value="665.24181319675927" table:formula="of:=[.BI116]/[.BG116]" table:style-name="ce51">
            <text:p>665</text:p>
          </table:table-cell>
          <table:table-cell office:value-type="float" office:value="23301" table:style-name="ce18">
            <text:p>23301</text:p>
          </table:table-cell>
          <table:table-cell office:value-type="float" office:value="112.14759479853062" table:style-name="ce5">
            <text:p>112</text:p>
          </table:table-cell>
          <table:table-cell office:value-type="float" office:value="1719056499.9999998" table:style-name="ce18">
            <text:p>1719056500</text:p>
          </table:table-cell>
          <table:table-cell office:value-type="float" office:value="73776.082571563442" table:formula="of:=[.BM116]/[.BK116]" table:style-name="ce55">
            <text:p>73776</text:p>
          </table:table-cell>
          <table:table-cell office:value-type="float" office:value="657.84810368960382" table:formula="of:=[.BN116]/[.BL116]" table:style-name="ce55">
            <text:p>658</text:p>
          </table:table-cell>
          <table:table-cell office:value-type="float" office:value="1.8940511661500588" table:formula="of:=[.CV116]/(([.BO116]+[.BJ116])/2)" table:style-name="ce58">
            <text:p>1.89</text:p>
          </table:table-cell>
          <table:table-cell office:value-type="float" office:value="-0.17482220574653695" table:formula="of:=[.BR116]-[.BR115]" table:style-name="ce57">
            <text:p>-0.2</text:p>
          </table:table-cell>
          <table:table-cell office:value-type="float" office:value="92.466691448200322" table:style-name="ce56">
            <text:p>92</text:p>
          </table:table-cell>
          <table:table-cell office:value-type="float" office:value="25763853" table:style-name="ce8">
            <text:p>25763853</text:p>
          </table:table-cell>
          <table:table-cell office:value-type="float" office:value="143184" table:formula="of:=[.BS116]-[.BS115]" table:style-name="ce26">
            <text:p>143184</text:p>
          </table:table-cell>
          <table:table-cell office:value-type="float" office:value="35382" table:style-name="ce76">
            <text:p>35382</text:p>
          </table:table-cell>
          <table:table-cell office:value-type="float" office:value="15046" table:style-name="ce76">
            <text:p>15046</text:p>
          </table:table-cell>
          <table:table-cell office:value-type="float" office:value="1.8019712346596606" table:formula="of:=([.B116]/[.BS116])" table:style-name="ce34">
            <text:p>1.80</text:p>
          </table:table-cell>
          <table:table-cell office:value-type="float" office:value="2.52" table:style-name="ce71">
            <text:p>2.52</text:p>
          </table:table-cell>
          <table:table-cell office:value-type="float" office:value="1.3180000000000001" table:style-name="ce71">
            <text:p>1.32</text:p>
          </table:table-cell>
          <table:table-cell office:value-type="float" office:value="0.55886128500391408" table:formula="of:=([.BS116]*100/[.BS115])-100" table:style-name="ce23">
            <text:p>0.6</text:p>
          </table:table-cell>
          <table:table-cell office:value-type="float" office:value="-70022" table:formula="of:=([.B116]-[.B115])" table:style-name="ce73">
            <text:p>-70022</text:p>
          </table:table-cell>
          <table:table-cell office:value-type="float" office:value="-0.15059873006870816" table:formula="of:=([.B116]*100/[.B115])-100" table:style-name="ce25">
            <text:p>-0.15</text:p>
          </table:table-cell>
          <table:table-cell office:value-type="float" office:value="170970.50793650793" table:formula="of:=[.BT116]-([.CA116]/[.BX116])" table:style-name="ce76">
            <text:p>170971</text:p>
          </table:table-cell>
          <table:table-cell office:value-type="float" office:value="993000" table:style-name="ce78">
            <text:p>993000</text:p>
          </table:table-cell>
          <table:table-cell office:value-type="float" office:value="10833.2" table:style-name="ce8">
            <text:p>10833</text:p>
          </table:table-cell>
          <table:table-cell office:value-type="float" office:value="15.28" table:style-name="ce18">
            <text:p>15.28</text:p>
          </table:table-cell>
          <table:table-cell office:value-type="float" office:value="73.69792799999999" table:formula="of:=100-([.CF116]+[.CH116])" table:style-name="ce25">
            <text:p>73.70</text:p>
          </table:table-cell>
          <table:table-cell office:value-type="float" office:value="11.022072000000001" table:formula="of:=(13.01*(100-[.CF116]))/100" table:style-name="ce25">
            <text:p>11.02</text:p>
          </table:table-cell>
          <table:table-cell office:value-type="float" office:value="78" table:style-name="ce23">
            <text:p>78.0</text:p>
          </table:table-cell>
          <table:table-cell office:value-type="float" office:value="14.9" table:style-name="ce23">
            <text:p>14.9</text:p>
          </table:table-cell>
          <table:table-cell office:value-type="float" office:value="7" table:style-name="ce23">
            <text:p>7.0</text:p>
          </table:table-cell>
          <table:table-cell office:value-type="float" office:value="99.741" table:style-name="ce78">
            <text:p>100</text:p>
          </table:table-cell>
          <table:table-cell office:value-type="float" office:value="97.972972972972968" table:formula="of:=[.CN116]*[.$CM$117]/[.$CN$117]" table:style-name="ce78">
            <text:p>98</text:p>
          </table:table-cell>
          <table:table-cell office:value-type="float" office:value="7.25" table:style-name="ce23">
            <text:p>7.3</text:p>
          </table:table-cell>
          <table:table-cell office:value-type="float" office:value="-0.68493150684930981" table:formula="of:=(([.CN116]*100)/[.CN115])-100" table:style-name="ce23">
            <text:p>-0.7</text:p>
          </table:table-cell>
          <table:table-cell office:value-type="float" office:value="17.995210727969351" table:formula="of:=[.CR116]/([.CN116]*12)" table:style-name="ce23">
            <text:p>18.0</text:p>
          </table:table-cell>
          <table:table-cell office:value-type="float" office:value="23.993614303959134" table:formula="of:=[.CR116]/(([.CN116]*12)*0.75)" table:style-name="ce23">
            <text:p>24.0</text:p>
          </table:table-cell>
          <table:table-cell office:value-type="float" office:value="1565.5833333333335" table:formula="of:=AVERAGE([Quarterly.E30:.E33])" table:style-name="ce8">
            <text:p>1566</text:p>
          </table:table-cell>
          <table:table-cell office:value-type="float" office:value="676.19146488842455" table:formula="of:=PMT(([.U116]/100)/12;[.X116]*12;([.CR116]*86))*-1" table:style-name="ce78">
            <text:p>676</text:p>
          </table:table-cell>
          <table:table-cell office:value-type="float" office:value="101.70528367258555" table:formula="of:=[.CR116]*[.$CT$117]/[.$CR$117]" table:style-name="ce78">
            <text:p>102</text:p>
          </table:table-cell>
          <table:table-cell office:value-type="float" office:value="623.5" table:formula="of:=[.CN116]*86" table:style-name="ce78">
            <text:p>624</text:p>
          </table:table-cell>
          <table:table-cell office:value-type="float" office:value="1253" table:style-name="ce26">
            <text:p>1253</text:p>
          </table:table-cell>
          <table:table-cell office:value-type="float" office:value="85.747499999999988" table:style-name="ce76">
            <text:p>86</text:p>
          </table:table-cell>
          <table:table-cell office:value-type="float" office:value="96.552999999999997" table:style-name="ce76">
            <text:p>97</text:p>
          </table:table-cell>
          <table:table-cell office:value-type="float" office:value="-0.15" table:style-name="ce25">
            <text:p>-0.15</text:p>
          </table:table-cell>
          <table:table-cell office:value-type="float" office:value="206.25" table:formula="of:=[.CZ115]+[.CY116]" table:style-name="ce23">
            <text:p>206.3</text:p>
          </table:table-cell>
          <table:table-cell office:value-type="float" office:value="887.69936525000014" table:formula="of:=(([.CV116]*[.CY116])/100)+[.DA115]" table:style-name="ce23">
            <text:p>887.7</text:p>
          </table:table-cell>
          <table:table-cell office:value-type="float" office:value="365.30063474999986" table:formula="of:=[.CV116]-[.DA116]" table:style-name="ce23">
            <text:p>365.3</text:p>
          </table:table-cell>
          <table:table-cell office:value-type="float" office:value="607.5151515151515" table:formula="of:=[.CV116]/[.CZ116]*[.$CZ$87]" table:style-name="ce23">
            <text:p>607.5</text:p>
          </table:table-cell>
          <table:table-cell office:value-type="float" office:value="-6.4054545454545309E-2" table:formula="of:=([.Y116]-[.Y115])" table:style-name="ce25">
            <text:p>-0.06</text:p>
          </table:table-cell>
          <table:table-cell office:value-type="float" office:value="0.23999999999999488" table:formula="of:=([.CV116]*100/[.CV115])-100" table:style-name="ce25">
            <text:p>0.24</text:p>
          </table:table-cell>
          <table:table-cell office:value-type="float" office:value="0.38999999999999491" table:formula="of:=[.DE116]-[.CY116]" table:style-name="ce25">
            <text:p>0.39</text:p>
          </table:table-cell>
          <table:table-cell office:value-type="float" office:value="1.9952462147264924" table:formula="of:=([.F116]*100/[.F115])-100" table:style-name="ce25">
            <text:p>2.00</text:p>
          </table:table-cell>
          <table:table-cell office:value-type="float" office:value="2.302919835956402" table:formula="of:=([.K116]*100/[.K115])-100" table:style-name="ce25">
            <text:p>2.30</text:p>
          </table:table-cell>
          <table:table-cell office:value-type="float" office:value="24.44" table:style-name="ce30">
            <text:p>24.4</text:p>
          </table:table-cell>
          <table:table-cell office:value-type="float" office:value="29.658833592456883" table:formula="of:=(([.DC116]-MIN([.DC102:.DC116]))/(MAX([.DC102:.DC116])-MIN([.DC102:.DC116])))*100" table:style-name="ce128">
            <text:p>29.7</text:p>
          </table:table-cell>
          <table:table-cell office:value-type="float" office:value="0" table:formula="of:=MIN(100; MAX(0; (([.K116]-([.C116]/26/2))/(([.C116]/26)-([.C116]/26/2)))*100))" table:style-name="ce128">
            <text:p>0.0</text:p>
          </table:table-cell>
          <table:table-cell office:value-type="float" office:value="0" table:formula="of:=MIN(100; MAX(0; (([.F116]-([.C116]/26/2))/(([.C116]/26)-([.C116]/26/2)))*100))" table:style-name="ce128">
            <text:p>0.0</text:p>
          </table:table-cell>
          <table:table-cell office:value-type="float" office:value="20.001777270019627" table:formula="of:=(([.AP116]-MIN([.$AP$2:.$AP$128]))/(MAX([.$AP$2:.$AP$128])-MIN([.$AP$2:.$AP$128])))*100" table:style-name="ce128">
            <text:p>20.0</text:p>
          </table:table-cell>
          <table:table-cell office:value-type="float" office:value="23.512791537514669" table:formula="of:=MIN(100;MAX(0;(([.BP116]-1.8)/(2.2-1.8))*100))" table:style-name="ce128">
            <text:p>23.5</text:p>
          </table:table-cell>
          <table:table-cell office:value-type="float" office:value="73.675147891950417" table:formula="of:=100-((([.CC116]-MIN([.CC87:.CC116]))/(MAX([.CC87:.CC116])-MIN([.CC87:.CC116])))*100)" table:style-name="ce128">
            <text:p>73.7</text:p>
          </table:table-cell>
          <table:table-cell office:value-type="float" office:value="23.873999999999999" table:formula="of:=MIN(100; MAX(0; ((IF(AND([.DI116]-[.DI115]&gt;=-0.3;[.DI116]-[.DI115]&lt;=0.3);100;IF(AND([.DI116]-[.DI115]&gt;-1;[.DI116]-[.DI115]&lt;-0.3);50;IF([.DI116]-[.DI115]&lt;=-1;25;75)))))-[.DI116]+(IF(([.DI116]-[.DI115])*([.DI115]-[.DI114])&lt;0;AVERAGE([.DI112:.DI116]);0))))" table:style-name="ce128">
            <text:p>23.9</text:p>
          </table:table-cell>
          <table:table-cell office:value-type="string" table:style-name="ce118">
            <text:p>null</text:p>
          </table:table-cell>
          <table:table-cell office:value-type="float" office:value="24.388935755991657" table:formula="of:=AVERAGE([.DJ116:.DP116])" table:style-name="ce128">
            <text:p>24.4</text:p>
          </table:table-cell>
          <table:table-cell office:value-type="float" office:value="417.44" table:formula="of:=-0.06*(([.A116]-1963)^2)+8.5*([.A116]-1963)+140" table:style-name="ce23">
            <text:p>417.4</text:p>
          </table:table-cell>
          <table:table-cell table:number-columns-repeated="16261"/>
        </table:table-row>
        <table:table-row table:style-name="ro2">
          <table:table-cell office:value-type="float" office:value="2015" table:style-name="ce15">
            <text:p>2015</text:p>
          </table:table-cell>
          <table:table-cell office:value-type="float" office:value="46418884" table:style-name="ce10">
            <text:p>46418884</text:p>
          </table:table-cell>
          <table:table-cell office:value-type="float" office:value="17924814" table:style-name="ce8">
            <text:p>17924814</text:p>
          </table:table-cell>
          <table:table-cell office:value-type="float" office:value="24273349" table:style-name="ce8">
            <text:p>24273349</text:p>
          </table:table-cell>
          <table:table-cell office:value-type="float" office:value="39464650" table:style-name="ce78">
            <text:p>39464650</text:p>
          </table:table-cell>
          <table:table-cell office:value-type="float" office:value="355556" table:style-name="ce18">
            <text:p>355556</text:p>
          </table:table-cell>
          <table:table-cell office:value-type="float" office:value="151206" table:style-name="ce18">
            <text:p>151206</text:p>
          </table:table-cell>
          <table:table-cell office:value-type="float" office:value="14992" table:style-name="ce18">
            <text:p>14992</text:p>
          </table:table-cell>
          <table:table-cell office:value-type="float" office:value="1720" table:style-name="ce18">
            <text:p>1720</text:p>
          </table:table-cell>
          <table:table-cell office:value-type="float" office:value="196668" table:style-name="ce18">
            <text:p>196668</text:p>
          </table:table-cell>
          <table:table-cell office:value-type="float" office:value="246767" table:style-name="ce18">
            <text:p>246767</text:p>
          </table:table-cell>
          <table:table-cell office:value-type="float" office:value="302418" table:style-name="ce18">
            <text:p>302418</text:p>
          </table:table-cell>
          <table:table-cell office:value-type="float" office:value="26338940000" table:style-name="ce84">
            <text:p>2.6E+10</text:p>
          </table:table-cell>
          <table:table-cell office:value-type="float" office:value="106736.07086847107" table:formula="of:=[.M117]/[.K117]" table:style-name="ce26">
            <text:p>106736</text:p>
          </table:table-cell>
          <table:table-cell office:value-type="float" office:value="29029" table:style-name="ce18">
            <text:p>29029</text:p>
          </table:table-cell>
          <table:table-cell office:value-type="float" office:value="7055" table:style-name="ce18">
            <text:p>7055</text:p>
          </table:table-cell>
          <table:table-cell office:value-type="float" office:value="4.11467044649185" table:formula="of:=[.O117]/[.P117]" table:style-name="ce67">
            <text:p>4.11</text:p>
          </table:table-cell>
          <table:table-cell office:value-type="float" office:value="59.848546403258034" table:formula="of:=([.N117]*100)/([.CV117]*(([.BL117]*([.BK117]/([.BF117]+[.BK117])))+([.BG117]*([.BF117]/([.BF117]+[.BK117])))))" table:style-name="ce67">
            <text:p>59.85</text:p>
          </table:table-cell>
          <table:table-cell office:value-type="float" office:value="26.580704471976304" table:formula="of:=(([.M117]*100/[.M116])-100)-[.CY117]" table:style-name="ce28">
            <text:p>26.58</text:p>
          </table:table-cell>
          <table:table-cell office:value-type="float" office:value="549238000000" table:style-name="ce131">
            <text:p>5.49E+11</text:p>
          </table:table-cell>
          <table:table-cell office:value-type="float" office:value="2.2120000000000002" table:style-name="ce28">
            <text:p>2.21</text:p>
          </table:table-cell>
          <table:table-cell office:value-type="float" office:value="7.4" table:style-name="ce28">
            <text:p>7.40</text:p>
          </table:table-cell>
          <table:table-cell office:value-type="float" office:value="92.6" table:formula="of:=100-[.V117]" table:style-name="ce28">
            <text:p>92.60</text:p>
          </table:table-cell>
          <table:table-cell office:value-type="float" office:value="23" table:style-name="ce60">
            <text:p>23</text:p>
          </table:table-cell>
          <table:table-cell office:value-type="float" office:value="0.15673636363636365" table:style-name="ce28">
            <text:p>0.16</text:p>
          </table:table-cell>
          <table:table-cell office:value-type="float" office:value="1.1029583333333333" table:style-name="ce72">
            <text:p>1.10</text:p>
          </table:table-cell>
          <table:table-cell office:value-type="float" office:value="10837680000000" table:style-name="ce85">
            <text:p>1.08E+13</text:p>
          </table:table-cell>
          <table:table-cell office:value-type="float" office:value="4.933552385444969" table:formula="of:=([.AA117]*100/[.AA116])-100" table:style-name="ce70">
            <text:p>4.93</text:p>
          </table:table-cell>
          <table:table-cell office:value-type="float" office:value="251.56777449999996" table:style-name="ce68">
            <text:p>252</text:p>
          </table:table-cell>
          <table:table-cell office:value-type="float" office:value="1042.9791666666667" table:style-name="ce75">
            <text:p>1043</text:p>
          </table:table-cell>
          <table:table-cell office:value-type="float" office:value="1087112000000" table:style-name="ce125">
            <text:p>1.08711E+12</text:p>
          </table:table-cell>
          <table:table-cell office:value-type="float" office:value="4091540171712" table:formula="of:=([.AW117]*[.AR117]*1000000)+([.CV117]*[.BS117]*86)+([.AS117]*(506006-[.AX117])*1000000)" table:style-name="ce83">
            <text:p>4.09E+12</text:p>
          </table:table-cell>
          <table:table-cell office:value-type="float" office:value="2847289177512" table:formula="of:=([.CV117]*[.BS117]*86)" table:style-name="ce125">
            <text:p>2.84729E+12</text:p>
          </table:table-cell>
          <table:table-cell office:value-type="float" office:value="666109000000" table:style-name="ce83">
            <text:p>6.66E+11</text:p>
          </table:table-cell>
          <table:table-cell office:value-type="float" office:value="16878.624287812003" table:formula="of:=[.AH117]/[.E117]" table:style-name="ce26">
            <text:p>16879</text:p>
          </table:table-cell>
          <table:table-cell office:value-type="float" office:value="16363.293061860692" table:formula="of:=[.AJ116]*(1+([.CY117]/100))" table:style-name="ce76">
            <text:p>16363</text:p>
          </table:table-cell>
          <table:table-cell office:value-type="float" office:value="21563.392975683037" table:formula="of:=[.AI117]+(12*PMT([.U117]/100/12;[.X117]*12;([.AI117]*5)*-1))" table:style-name="ce76">
            <text:p>21563</text:p>
          </table:table-cell>
          <table:table-cell office:value-type="float" office:value="15596.351759732035" table:formula="of:=[.AL116]*(1+(([.CW117]-[.CW116])/100))" table:style-name="ce76">
            <text:p>15596</text:p>
          </table:table-cell>
          <table:table-cell office:value-type="float" office:value="14161.614768046633" table:formula="of:=(([.AL117]+([.AJ117]-[.AI117])+([.AK117]-[.AI117]))-[.AI117])+[.$AI$101]" table:style-name="ce76">
            <text:p>14162</text:p>
          </table:table-cell>
          <table:table-cell office:value-type="float" office:value="92.572832034055651" table:formula="of:=[.AM117]*[.$AN$101]/[.$AM$101]" table:style-name="ce76">
            <text:p>93</text:p>
          </table:table-cell>
          <table:table-cell office:value-type="float" office:value="76.350496151634829" table:formula="of:=[.AI117]*[.$AO$101]/[.$AI$101]" table:style-name="ce76">
            <text:p>76</text:p>
          </table:table-cell>
          <table:table-cell office:value-type="float" office:value="12.527003848365169" table:formula="of:=[.CW117]-[.AO117]" table:style-name="ce118">
            <text:p>13</text:p>
          </table:table-cell>
          <table:table-cell office:value-type="float" office:value="21347.214173694214" table:formula="of:=[.N117]/5" table:style-name="ce26">
            <text:p>21347</text:p>
          </table:table-cell>
          <table:table-cell office:value-type="float" office:value="152.875" table:style-name="ce8">
            <text:p>153</text:p>
          </table:table-cell>
          <table:table-cell office:value-type="float" office:value="1.01" table:style-name="ce129">
            <text:p>1.01</text:p>
          </table:table-cell>
          <table:table-cell office:value-type="float" office:value="15718" table:style-name="ce18">
            <text:p>15718</text:p>
          </table:table-cell>
          <table:table-cell office:value-type="float" office:value="17279.72" table:style-name="ce78">
            <text:p>17280</text:p>
          </table:table-cell>
          <table:table-cell office:value-type="float" office:value="7347.5999999999995" table:style-name="ce78">
            <text:p>7348</text:p>
          </table:table-cell>
          <table:table-cell office:value-type="float" office:value="4870.96" table:style-name="ce78">
            <text:p>4871</text:p>
          </table:table-cell>
          <table:table-cell office:value-type="float" office:value="11349.58" table:style-name="ce78">
            <text:p>11350</text:p>
          </table:table-cell>
          <table:table-cell office:value-type="float" office:value="64156" table:style-name="ce18">
            <text:p>64156</text:p>
          </table:table-cell>
          <table:table-cell office:value-type="float" office:value="17915" table:style-name="ce18">
            <text:p>17915</text:p>
          </table:table-cell>
          <table:table-cell office:value-type="float" office:value="43700" table:style-name="ce18">
            <text:p>43700</text:p>
          </table:table-cell>
          <table:table-cell office:value-type="float" office:value="2541" table:style-name="ce18">
            <text:p>2541</text:p>
          </table:table-cell>
          <table:table-cell office:value-type="float" office:value="36061" table:style-name="ce81">
            <text:p>36061</text:p>
          </table:table-cell>
          <table:table-cell office:value-type="float" office:value="39809" table:style-name="ce81">
            <text:p>39809</text:p>
          </table:table-cell>
          <table:table-cell office:value-type="float" office:value="672" table:style-name="ce81">
            <text:p>672</text:p>
          </table:table-cell>
          <table:table-cell office:value-type="float" office:value="14651" table:style-name="ce18">
            <text:p>14651</text:p>
          </table:table-cell>
          <table:table-cell office:value-type="float" office:value="201.52778170772271" table:style-name="ce5">
            <text:p>202</text:p>
          </table:table-cell>
          <table:table-cell office:value-type="float" office:value="2013348599.9999998" table:style-name="ce18">
            <text:p>2013348600</text:p>
          </table:table-cell>
          <table:table-cell office:value-type="float" office:value="137420.55832366389" table:formula="of:=[.BH117]/[.BF117]" table:style-name="ce51">
            <text:p>137421</text:p>
          </table:table-cell>
          <table:table-cell office:value-type="float" office:value="681.89386673727188" table:formula="of:=[.BI117]/[.BG117]" table:style-name="ce51">
            <text:p>682</text:p>
          </table:table-cell>
          <table:table-cell office:value-type="float" office:value="35025" table:style-name="ce18">
            <text:p>35025</text:p>
          </table:table-cell>
          <table:table-cell office:value-type="float" office:value="113.62321060148459" table:style-name="ce5">
            <text:p>114</text:p>
          </table:table-cell>
          <table:table-cell office:value-type="float" office:value="2698152700" table:style-name="ce18">
            <text:p>2698152700</text:p>
          </table:table-cell>
          <table:table-cell office:value-type="float" office:value="77035.052105638824" table:formula="of:=[.BM117]/[.BK117]" table:style-name="ce55">
            <text:p>77035</text:p>
          </table:table-cell>
          <table:table-cell office:value-type="float" office:value="677.98693328449474" table:formula="of:=[.BN117]/[.BL117]" table:style-name="ce55">
            <text:p>678</text:p>
          </table:table-cell>
          <table:table-cell office:value-type="float" office:value="1.879576504028212" table:formula="of:=[.CV117]/(([.BO117]+[.BJ117])/2)" table:style-name="ce58">
            <text:p>1.88</text:p>
          </table:table-cell>
          <table:table-cell office:value-type="float" office:value="-0.66181611540368124" table:formula="of:=[.BR117]-[.BR116]" table:style-name="ce57">
            <text:p>-0.7</text:p>
          </table:table-cell>
          <table:table-cell office:value-type="float" office:value="91.804875332796641" table:style-name="ce56">
            <text:p>92</text:p>
          </table:table-cell>
          <table:table-cell office:value-type="float" office:value="25906114" table:style-name="ce8">
            <text:p>25906114</text:p>
          </table:table-cell>
          <table:table-cell office:value-type="float" office:value="142261" table:formula="of:=[.BS117]-[.BS116]" table:style-name="ce26">
            <text:p>142261</text:p>
          </table:table-cell>
          <table:table-cell office:value-type="float" office:value="41541" table:style-name="ce76">
            <text:p>41541</text:p>
          </table:table-cell>
          <table:table-cell office:value-type="float" office:value="7931" table:style-name="ce76">
            <text:p>7931</text:p>
          </table:table-cell>
          <table:table-cell office:value-type="float" office:value="1.7918119251694793" table:formula="of:=([.B117]/[.BS117])" table:style-name="ce34">
            <text:p>1.79</text:p>
          </table:table-cell>
          <table:table-cell office:value-type="float" office:value="2.5099999999999998" table:style-name="ce71">
            <text:p>2.51</text:p>
          </table:table-cell>
          <table:table-cell office:value-type="float" office:value="1.331" table:style-name="ce71">
            <text:p>1.33</text:p>
          </table:table-cell>
          <table:table-cell office:value-type="float" office:value="0.55217284464400507" table:formula="of:=([.BS117]*100/[.BS116])-100" table:style-name="ce23">
            <text:p>0.6</text:p>
          </table:table-cell>
          <table:table-cell office:value-type="float" office:value="-6838" table:formula="of:=([.B117]-[.B116])" table:style-name="ce73">
            <text:p>-6838</text:p>
          </table:table-cell>
          <table:table-cell office:value-type="float" office:value="-1.4728903946831906E-2" table:formula="of:=([.B117]*100/[.B116])-100" table:style-name="ce25">
            <text:p>-0.01</text:p>
          </table:table-cell>
          <table:table-cell office:value-type="float" office:value="144985.30278884462" table:formula="of:=[.BT117]-([.CA117]/[.BX117])" table:style-name="ce76">
            <text:p>144985</text:p>
          </table:table-cell>
          <table:table-cell office:value-type="float" office:value="1074000" table:style-name="ce78">
            <text:p>1074000</text:p>
          </table:table-cell>
          <table:table-cell office:value-type="float" office:value="11491.999999999998" table:style-name="ce8">
            <text:p>11492</text:p>
          </table:table-cell>
          <table:table-cell office:value-type="float" office:value="12.71" table:style-name="ce18">
            <text:p>12.71</text:p>
          </table:table-cell>
          <table:table-cell office:value-type="float" office:value="75.785178000000002" table:formula="of:=100-([.CF117]+[.CH117])" table:style-name="ce25">
            <text:p>75.79</text:p>
          </table:table-cell>
          <table:table-cell office:value-type="float" office:value="11.504821999999999" table:formula="of:=(13.18*(100-[.CF117]))/100" table:style-name="ce25">
            <text:p>11.50</text:p>
          </table:table-cell>
          <table:table-cell office:value-type="float" office:value="77.3" table:style-name="ce23">
            <text:p>77.3</text:p>
          </table:table-cell>
          <table:table-cell office:value-type="float" office:value="15.6" table:style-name="ce23">
            <text:p>15.6</text:p>
          </table:table-cell>
          <table:table-cell office:value-type="float" office:value="7.1" table:style-name="ce23">
            <text:p>7.1</text:p>
          </table:table-cell>
          <table:table-cell office:value-type="float" office:value="100" table:style-name="ce78">
            <text:p>100</text:p>
          </table:table-cell>
          <table:table-cell office:value-type="float" office:value="100" table:style-name="ce78">
            <text:p>100</text:p>
          </table:table-cell>
          <table:table-cell office:value-type="float" office:value="7.4" table:style-name="ce23">
            <text:p>7.4</text:p>
          </table:table-cell>
          <table:table-cell office:value-type="float" office:value="2.0689655172413808" table:formula="of:=(([.CN117]*100)/[.CN116])-100" table:style-name="ce23">
            <text:p>2.1</text:p>
          </table:table-cell>
          <table:table-cell office:value-type="float" office:value="17.334834834834833" table:formula="of:=[.CR117]/([.CN117]*12)" table:style-name="ce23">
            <text:p>17.3</text:p>
          </table:table-cell>
          <table:table-cell office:value-type="float" office:value="23.113113113113108" table:formula="of:=[.CR117]/(([.CN117]*12)*0.75)" table:style-name="ce23">
            <text:p>23.1</text:p>
          </table:table-cell>
          <table:table-cell office:value-type="float" office:value="1539.3333333333333" table:formula="of:=AVERAGE([Quarterly.E34:.E37])" table:style-name="ce8">
            <text:p>1539</text:p>
          </table:table-cell>
          <table:table-cell office:value-type="float" office:value="612.39407612216712" table:formula="of:=PMT(([.U117]/100)/12;[.X117]*12;([.CR117]*86))*-1" table:style-name="ce78">
            <text:p>612</text:p>
          </table:table-cell>
          <table:table-cell office:value-type="float" office:value="100" table:style-name="ce78">
            <text:p>100</text:p>
          </table:table-cell>
          <table:table-cell office:value-type="float" office:value="636.4" table:formula="of:=[.CN117]*86" table:style-name="ce78">
            <text:p>636</text:p>
          </table:table-cell>
          <table:table-cell office:value-type="float" office:value="1278" table:style-name="ce26">
            <text:p>1278</text:p>
          </table:table-cell>
          <table:table-cell office:value-type="float" office:value="88.877499999999998" table:style-name="ce76">
            <text:p>89</text:p>
          </table:table-cell>
          <table:table-cell office:value-type="float" office:value="100" table:style-name="ce76">
            <text:p>100</text:p>
          </table:table-cell>
          <table:table-cell office:value-type="float" office:value="-0.5" table:style-name="ce25">
            <text:p>-0.50</text:p>
          </table:table-cell>
          <table:table-cell office:value-type="float" office:value="205.75" table:formula="of:=[.CZ116]+[.CY117]" table:style-name="ce23">
            <text:p>205.8</text:p>
          </table:table-cell>
          <table:table-cell office:value-type="float" office:value="881.30936525000016" table:formula="of:=(([.CV117]*[.CY117])/100)+[.DA116]" table:style-name="ce23">
            <text:p>881.3</text:p>
          </table:table-cell>
          <table:table-cell office:value-type="float" office:value="396.69063474999984" table:formula="of:=[.CV117]-[.DA117]" table:style-name="ce23">
            <text:p>396.7</text:p>
          </table:table-cell>
          <table:table-cell office:value-type="float" office:value="621.14216281895506" table:formula="of:=[.CV117]/[.CZ117]*[.$CZ$87]" table:style-name="ce23">
            <text:p>621.1</text:p>
          </table:table-cell>
          <table:table-cell office:value-type="float" office:value="-0.31189090909090922" table:formula="of:=([.Y117]-[.Y116])" table:style-name="ce25">
            <text:p>-0.31</text:p>
          </table:table-cell>
          <table:table-cell office:value-type="float" office:value="1.9952114924181927" table:formula="of:=([.CV117]*100/[.CV116])-100" table:style-name="ce25">
            <text:p>2.00</text:p>
          </table:table-cell>
          <table:table-cell office:value-type="float" office:value="2.4952114924181927" table:formula="of:=[.DE117]-[.CY117]" table:style-name="ce25">
            <text:p>2.50</text:p>
          </table:table-cell>
          <table:table-cell office:value-type="float" office:value="11.518991311984436" table:formula="of:=([.F117]*100/[.F116])-100" table:style-name="ce25">
            <text:p>11.52</text:p>
          </table:table-cell>
          <table:table-cell office:value-type="float" office:value="20.785405918688994" table:formula="of:=([.K117]*100/[.K116])-100" table:style-name="ce25">
            <text:p>20.79</text:p>
          </table:table-cell>
          <table:table-cell office:value-type="float" office:value="22.06" table:style-name="ce30">
            <text:p>22.1</text:p>
          </table:table-cell>
          <table:table-cell office:value-type="float" office:value="26.801156309484742" table:formula="of:=(([.DC117]-MIN([.DC103:.DC117]))/(MAX([.DC103:.DC117])-MIN([.DC103:.DC117])))*100" table:style-name="ce128">
            <text:p>26.8</text:p>
          </table:table-cell>
          <table:table-cell office:value-type="float" office:value="0" table:formula="of:=MIN(100; MAX(0; (([.K117]-([.C117]/26/2))/(([.C117]/26)-([.C117]/26/2)))*100))" table:style-name="ce128">
            <text:p>0.0</text:p>
          </table:table-cell>
          <table:table-cell office:value-type="float" office:value="3.1470228923993231" table:formula="of:=MIN(100; MAX(0; (([.F117]-([.C117]/26/2))/(([.C117]/26)-([.C117]/26/2)))*100))" table:style-name="ce128">
            <text:p>3.1</text:p>
          </table:table-cell>
          <table:table-cell office:value-type="float" office:value="20.318015676208535" table:formula="of:=(([.AP117]-MIN([.$AP$2:.$AP$128]))/(MAX([.$AP$2:.$AP$128])-MIN([.$AP$2:.$AP$128])))*100" table:style-name="ce128">
            <text:p>20.3</text:p>
          </table:table-cell>
          <table:table-cell office:value-type="float" office:value="19.894126007052975" table:formula="of:=MIN(100;MAX(0;(([.BP117]-1.8)/(2.2-1.8))*100))" table:style-name="ce128">
            <text:p>19.9</text:p>
          </table:table-cell>
          <table:table-cell office:value-type="float" office:value="81.60521008182306" table:formula="of:=100-((([.CC117]-MIN([.CC88:.CC117]))/(MAX([.CC88:.CC117])-MIN([.CC88:.CC117])))*100)" table:style-name="ce128">
            <text:p>81.6</text:p>
          </table:table-cell>
          <table:table-cell office:value-type="float" office:value="2.9400000000000013" table:formula="of:=MIN(100; MAX(0; ((IF(AND([.DI117]-[.DI116]&gt;=-0.3;[.DI117]-[.DI116]&lt;=0.3);100;IF(AND([.DI117]-[.DI116]&gt;-1;[.DI117]-[.DI116]&lt;-0.3);50;IF([.DI117]-[.DI116]&lt;=-1;25;75)))))-[.DI117]+(IF(([.DI117]-[.DI116])*([.DI116]-[.DI115])&lt;0;AVERAGE([.DI113:.DI117]);0))))" table:style-name="ce128">
            <text:p>2.9</text:p>
          </table:table-cell>
          <table:table-cell office:value-type="string" table:style-name="ce118">
            <text:p>null</text:p>
          </table:table-cell>
          <table:table-cell office:value-type="float" office:value="22.100790138138375" table:formula="of:=AVERAGE([.DJ117:.DP117])" table:style-name="ce128">
            <text:p>22.1</text:p>
          </table:table-cell>
          <table:table-cell office:value-type="float" office:value="419.76" table:formula="of:=-0.06*(([.A117]-1963)^2)+8.5*([.A117]-1963)+140" table:style-name="ce23">
            <text:p>419.8</text:p>
          </table:table-cell>
          <table:table-cell table:number-columns-repeated="16261"/>
        </table:table-row>
        <table:table-row table:style-name="ro2">
          <table:table-cell office:value-type="float" office:value="2016" table:style-name="ce15">
            <text:p>2016</text:p>
          </table:table-cell>
          <table:table-cell office:value-type="float" office:value="46497393" table:style-name="ce10">
            <text:p>46497393</text:p>
          </table:table-cell>
          <table:table-cell office:value-type="float" office:value="17695808" table:style-name="ce8">
            <text:p>17695808</text:p>
          </table:table-cell>
          <table:table-cell office:value-type="float" office:value="24196008" table:style-name="ce8">
            <text:p>24196008</text:p>
          </table:table-cell>
          <table:table-cell office:value-type="float" office:value="39597317" table:style-name="ce78">
            <text:p>39597317</text:p>
          </table:table-cell>
          <table:table-cell office:value-type="float" office:value="405385" table:style-name="ce18">
            <text:p>405385</text:p>
          </table:table-cell>
          <table:table-cell office:value-type="float" office:value="159988" table:style-name="ce18">
            <text:p>159988</text:p>
          </table:table-cell>
          <table:table-cell office:value-type="float" office:value="16148" table:style-name="ce18">
            <text:p>16148</text:p>
          </table:table-cell>
          <table:table-cell office:value-type="float" office:value="1313" table:style-name="ce18">
            <text:p>1313</text:p>
          </table:table-cell>
          <table:table-cell office:value-type="float" office:value="187238" table:style-name="ce18">
            <text:p>187238</text:p>
          </table:table-cell>
          <table:table-cell office:value-type="float" office:value="282707" table:style-name="ce18">
            <text:p>282707</text:p>
          </table:table-cell>
          <table:table-cell office:value-type="float" office:value="309357" table:style-name="ce18">
            <text:p>309357</text:p>
          </table:table-cell>
          <table:table-cell office:value-type="float" office:value="31036970000" table:style-name="ce84">
            <text:p>3.1E+10</text:p>
          </table:table-cell>
          <table:table-cell office:value-type="float" office:value="109784.93634752589" table:formula="of:=[.M118]/[.K118]" table:style-name="ce26">
            <text:p>109785</text:p>
          </table:table-cell>
          <table:table-cell office:value-type="float" office:value="22583" table:style-name="ce18">
            <text:p>22583</text:p>
          </table:table-cell>
          <table:table-cell office:value-type="float" office:value="7440" table:style-name="ce18">
            <text:p>7440</text:p>
          </table:table-cell>
          <table:table-cell office:value-type="float" office:value="3.0353494623655912" table:formula="of:=[.O118]/[.P118]" table:style-name="ce67">
            <text:p>3.04</text:p>
          </table:table-cell>
          <table:table-cell office:value-type="float" office:value="60.527672312232106" table:formula="of:=([.N118]*100)/([.CV118]*(([.BL118]*([.BK118]/([.BF118]+[.BK118])))+([.BG118]*([.BF118]/([.BF118]+[.BK118])))))" table:style-name="ce67">
            <text:p>60.53</text:p>
          </table:table-cell>
          <table:table-cell office:value-type="float" office:value="18.036822590430742" table:formula="of:=(([.M118]*100/[.M117])-100)-[.CY118]" table:style-name="ce28">
            <text:p>18.04</text:p>
          </table:table-cell>
          <table:table-cell office:value-type="float" office:value="533107000000" table:style-name="ce131">
            <text:p>5.33E+11</text:p>
          </table:table-cell>
          <table:table-cell office:value-type="float" office:value="1.952" table:style-name="ce28">
            <text:p>1.95</text:p>
          </table:table-cell>
          <table:table-cell office:value-type="float" office:value="23.7" table:style-name="ce28">
            <text:p>23.70</text:p>
          </table:table-cell>
          <table:table-cell office:value-type="float" office:value="76.3" table:formula="of:=100-[.V118]" table:style-name="ce28">
            <text:p>76.30</text:p>
          </table:table-cell>
          <table:table-cell office:value-type="float" office:value="23" table:style-name="ce60">
            <text:p>23</text:p>
          </table:table-cell>
          <table:table-cell office:value-type="float" office:value="-4.1390909090909096E-2" table:style-name="ce28">
            <text:p>-0.04</text:p>
          </table:table-cell>
          <table:table-cell office:value-type="float" office:value="1.1034249999999999" table:style-name="ce72">
            <text:p>1.10</text:p>
          </table:table-cell>
          <table:table-cell office:value-type="float" office:value="11392602000000" table:style-name="ce85">
            <text:p>1.14E+13</text:p>
          </table:table-cell>
          <table:table-cell office:value-type="float" office:value="5.1203025001660905" table:formula="of:=([.AA118]*100/[.AA117])-100" table:style-name="ce70">
            <text:p>5.12</text:p>
          </table:table-cell>
          <table:table-cell office:value-type="float" office:value="538.52805583333338" table:style-name="ce68">
            <text:p>539</text:p>
          </table:table-cell>
          <table:table-cell office:value-type="float" office:value="1129.9566666666667" table:style-name="ce75">
            <text:p>1130</text:p>
          </table:table-cell>
          <table:table-cell office:value-type="float" office:value="1122967000000" table:style-name="ce125">
            <text:p>1.12297E+12</text:p>
          </table:table-cell>
          <table:table-cell office:value-type="float" office:value="4130478832960" table:formula="of:=([.AW118]*[.AR118]*1000000)+([.CV118]*[.BS118]*86)+([.AS118]*(506006-[.AX118])*1000000)" table:style-name="ce83">
            <text:p>4.13E+12</text:p>
          </table:table-cell>
          <table:table-cell office:value-type="float" office:value="2932987736160" table:formula="of:=([.CV118]*[.BS118]*86)" table:style-name="ce125">
            <text:p>2.93299E+12</text:p>
          </table:table-cell>
          <table:table-cell office:value-type="float" office:value="683415000000" table:style-name="ce83">
            <text:p>6.83E+11</text:p>
          </table:table-cell>
          <table:table-cell office:value-type="float" office:value="17259.123894682056" table:formula="of:=[.AH118]/[.E118]" table:style-name="ce26">
            <text:p>17259</text:p>
          </table:table-cell>
          <table:table-cell office:value-type="float" office:value="16330.56647573697" table:formula="of:=[.AJ117]*(1+([.CY118]/100))" table:style-name="ce76">
            <text:p>16331</text:p>
          </table:table-cell>
          <table:table-cell office:value-type="float" office:value="21919.164388140664" table:formula="of:=[.AI118]+(12*PMT([.U118]/100/12;[.X118]*12;([.AI118]*5)*-1))" table:style-name="ce76">
            <text:p>21919</text:p>
          </table:table-cell>
          <table:table-cell office:value-type="float" office:value="16293.898592186049" table:formula="of:=[.AL117]*(1+(([.CW118]-[.CW117])/100))" table:style-name="ce76">
            <text:p>16294</text:p>
          </table:table-cell>
          <table:table-cell office:value-type="float" office:value="14040.707606224392" table:formula="of:=(([.AL118]+([.AJ118]-[.AI118])+([.AK118]-[.AI118]))-[.AI118])+[.$AI$101]" table:style-name="ce76">
            <text:p>14041</text:p>
          </table:table-cell>
          <table:table-cell office:value-type="float" office:value="91.782475950627997" table:formula="of:=[.AM118]*[.$AN$101]/[.$AM$101]" table:style-name="ce76">
            <text:p>92</text:p>
          </table:table-cell>
          <table:table-cell office:value-type="float" office:value="78.071687006686233" table:formula="of:=[.AI118]*[.$AO$101]/[.$AI$101]" table:style-name="ce76">
            <text:p>78</text:p>
          </table:table-cell>
          <table:table-cell office:value-type="float" office:value="15.278312993313762" table:formula="of:=[.CW118]-[.AO118]" table:style-name="ce118">
            <text:p>15</text:p>
          </table:table-cell>
          <table:table-cell office:value-type="float" office:value="21956.987269505178" table:formula="of:=[.N118]/5" table:style-name="ce26">
            <text:p>21957</text:p>
          </table:table-cell>
          <table:table-cell office:value-type="float" office:value="160.92500000000001" table:style-name="ce8">
            <text:p>161</text:p>
          </table:table-cell>
          <table:table-cell office:value-type="float" office:value="1.04" table:style-name="ce129">
            <text:p>1.04</text:p>
          </table:table-cell>
          <table:table-cell office:value-type="float" office:value="17396" table:style-name="ce18">
            <text:p>17396</text:p>
          </table:table-cell>
          <table:table-cell office:value-type="float" office:value="14851.27" table:style-name="ce78">
            <text:p>14851</text:p>
          </table:table-cell>
          <table:table-cell office:value-type="float" office:value="8291.5099999999984" table:style-name="ce78">
            <text:p>8292</text:p>
          </table:table-cell>
          <table:table-cell office:value-type="float" office:value="4240.6400000000003" table:style-name="ce78">
            <text:p>4241</text:p>
          </table:table-cell>
          <table:table-cell office:value-type="float" office:value="10750.13" table:style-name="ce78">
            <text:p>10750</text:p>
          </table:table-cell>
          <table:table-cell office:value-type="float" office:value="66417" table:style-name="ce18">
            <text:p>66417</text:p>
          </table:table-cell>
          <table:table-cell office:value-type="float" office:value="19285" table:style-name="ce18">
            <text:p>19285</text:p>
          </table:table-cell>
          <table:table-cell office:value-type="float" office:value="44361" table:style-name="ce18">
            <text:p>44361</text:p>
          </table:table-cell>
          <table:table-cell office:value-type="float" office:value="2771" table:style-name="ce18">
            <text:p>2771</text:p>
          </table:table-cell>
          <table:table-cell office:value-type="float" office:value="49212" table:style-name="ce81">
            <text:p>49212</text:p>
          </table:table-cell>
          <table:table-cell office:value-type="float" office:value="42503" table:style-name="ce81">
            <text:p>42503</text:p>
          </table:table-cell>
          <table:table-cell office:value-type="float" office:value="420" table:style-name="ce81">
            <text:p>420</text:p>
          </table:table-cell>
          <table:table-cell office:value-type="float" office:value="17134" table:style-name="ce18">
            <text:p>17134</text:p>
          </table:table-cell>
          <table:table-cell office:value-type="float" office:value="198.13151507455737" table:style-name="ce5">
            <text:p>198</text:p>
          </table:table-cell>
          <table:table-cell office:value-type="float" office:value="2337858800.0000005" table:style-name="ce18">
            <text:p>2337858800</text:p>
          </table:table-cell>
          <table:table-cell office:value-type="float" office:value="136445.59355667097" table:formula="of:=[.BH118]/[.BF118]" table:style-name="ce51">
            <text:p>136446</text:p>
          </table:table-cell>
          <table:table-cell office:value-type="float" office:value="688.66173816581454" table:formula="of:=[.BI118]/[.BG118]" table:style-name="ce51">
            <text:p>689</text:p>
          </table:table-cell>
          <table:table-cell office:value-type="float" office:value="46889" table:style-name="ce18">
            <text:p>46889</text:p>
          </table:table-cell>
          <table:table-cell office:value-type="float" office:value="116.65208387727343" table:style-name="ce5">
            <text:p>117</text:p>
          </table:table-cell>
          <table:table-cell office:value-type="float" office:value="3646366499.9999995" table:style-name="ce18">
            <text:p>3646366500</text:p>
          </table:table-cell>
          <table:table-cell office:value-type="float" office:value="77765.925910128164" table:formula="of:=[.BM118]/[.BK118]" table:style-name="ce55">
            <text:p>77766</text:p>
          </table:table-cell>
          <table:table-cell office:value-type="float" office:value="666.64840717242259" table:formula="of:=[.BN118]/[.BL118]" table:style-name="ce55">
            <text:p>667</text:p>
          </table:table-cell>
          <table:table-cell office:value-type="float" office:value="1.9331368609700337" table:formula="of:=[.CV118]/(([.BO118]+[.BJ118])/2)" table:style-name="ce58">
            <text:p>1.93</text:p>
          </table:table-cell>
          <table:table-cell office:value-type="float" office:value="-0.76090176048630553" table:formula="of:=[.BR118]-[.BR117]" table:style-name="ce57">
            <text:p>-0.8</text:p>
          </table:table-cell>
          <table:table-cell office:value-type="float" office:value="91.043973572310335" table:style-name="ce56">
            <text:p>91</text:p>
          </table:table-cell>
          <table:table-cell office:value-type="float" office:value="26033976" table:style-name="ce8">
            <text:p>26033976</text:p>
          </table:table-cell>
          <table:table-cell office:value-type="float" office:value="127862" table:formula="of:=[.BS118]-[.BS117]" table:style-name="ce26">
            <text:p>127862</text:p>
          </table:table-cell>
          <table:table-cell office:value-type="float" office:value="37512" table:style-name="ce76">
            <text:p>37512</text:p>
          </table:table-cell>
          <table:table-cell office:value-type="float" office:value="7118" table:style-name="ce76">
            <text:p>7118</text:p>
          </table:table-cell>
          <table:table-cell office:value-type="float" office:value="1.7860273436527714" table:formula="of:=([.B118]/[.BS118])" table:style-name="ce34">
            <text:p>1.79</text:p>
          </table:table-cell>
          <table:table-cell office:value-type="float" office:value="2.5" table:style-name="ce71">
            <text:p>2.50</text:p>
          </table:table-cell>
          <table:table-cell office:value-type="float" office:value="1.3340000000000001" table:style-name="ce71">
            <text:p>1.33</text:p>
          </table:table-cell>
          <table:table-cell office:value-type="float" office:value="0.49355916522253551" table:formula="of:=([.BS118]*100/[.BS117])-100" table:style-name="ce23">
            <text:p>0.5</text:p>
          </table:table-cell>
          <table:table-cell office:value-type="float" office:value="78509" table:formula="of:=([.B118]-[.B117])" table:style-name="ce73">
            <text:p>78509</text:p>
          </table:table-cell>
          <table:table-cell office:value-type="float" office:value="0.16913159739040395" table:formula="of:=([.B118]*100/[.B117])-100" table:style-name="ce25">
            <text:p>0.17</text:p>
          </table:table-cell>
          <table:table-cell office:value-type="float" office:value="96458.4" table:formula="of:=[.BT118]-([.CA118]/[.BX118])" table:style-name="ce76">
            <text:p>96458</text:p>
          </table:table-cell>
          <table:table-cell office:value-type="float" office:value="1074000" table:style-name="ce78">
            <text:p>1074000</text:p>
          </table:table-cell>
          <table:table-cell office:value-type="float" office:value="11157.839999999998" table:style-name="ce8">
            <text:p>11158</text:p>
          </table:table-cell>
          <table:table-cell office:value-type="float" office:value="12.54" table:style-name="ce18">
            <text:p>12.54</text:p>
          </table:table-cell>
          <table:table-cell office:value-type="float" office:value="75.871549999999999" table:formula="of:=100-([.CF118]+[.CH118])" table:style-name="ce25">
            <text:p>75.87</text:p>
          </table:table-cell>
          <table:table-cell office:value-type="float" office:value="11.58845" table:formula="of:=(13.25*(100-[.CF118]))/100" table:style-name="ce25">
            <text:p>11.59</text:p>
          </table:table-cell>
          <table:table-cell office:value-type="float" office:value="77.099999999999994" table:style-name="ce23">
            <text:p>77.1</text:p>
          </table:table-cell>
          <table:table-cell office:value-type="float" office:value="16.3" table:style-name="ce23">
            <text:p>16.3</text:p>
          </table:table-cell>
          <table:table-cell office:value-type="float" office:value="6.5" table:style-name="ce23">
            <text:p>6.5</text:p>
          </table:table-cell>
          <table:table-cell office:value-type="float" office:value="101.681" table:style-name="ce78">
            <text:p>102</text:p>
          </table:table-cell>
          <table:table-cell office:value-type="float" office:value="106.75675675675676" table:formula="of:=[.CN118]*[.$CM$117]/[.$CN$117]" table:style-name="ce78">
            <text:p>107</text:p>
          </table:table-cell>
          <table:table-cell office:value-type="float" office:value="7.9" table:style-name="ce23">
            <text:p>7.9</text:p>
          </table:table-cell>
          <table:table-cell office:value-type="float" office:value="6.7567567567567579" table:formula="of:=(([.CN118]*100)/[.CN117])-100" table:style-name="ce23">
            <text:p>6.8</text:p>
          </table:table-cell>
          <table:table-cell office:value-type="float" office:value="15.974859353023909" table:formula="of:=[.CR118]/([.CN118]*12)" table:style-name="ce23">
            <text:p>16.0</text:p>
          </table:table-cell>
          <table:table-cell office:value-type="float" office:value="21.299812470698544" table:formula="of:=[.CR118]/(([.CN118]*12)*0.75)" table:style-name="ce23">
            <text:p>21.3</text:p>
          </table:table-cell>
          <table:table-cell office:value-type="float" office:value="1514.4166666666667" table:formula="of:=AVERAGE([Quarterly.E38:.E41])" table:style-name="ce8">
            <text:p>1514</text:p>
          </table:table-cell>
          <table:table-cell office:value-type="float" office:value="586.0889394870934" table:formula="of:=PMT(([.U118]/100)/12;[.X118]*12;([.CR118]*86))*-1" table:style-name="ce78">
            <text:p>586</text:p>
          </table:table-cell>
          <table:table-cell office:value-type="float" office:value="98.381333910783908" table:formula="of:=[.CR118]*[.$CT$117]/[.$CR$117]" table:style-name="ce78">
            <text:p>98</text:p>
          </table:table-cell>
          <table:table-cell office:value-type="float" office:value="679.4" table:formula="of:=[.CN118]*86" table:style-name="ce78">
            <text:p>679</text:p>
          </table:table-cell>
          <table:table-cell office:value-type="float" office:value="1310" table:style-name="ce26">
            <text:p>1310</text:p>
          </table:table-cell>
          <table:table-cell office:value-type="float" office:value="93.35" table:style-name="ce76">
            <text:p>93</text:p>
          </table:table-cell>
          <table:table-cell office:value-type="float" office:value="104.664" table:style-name="ce76">
            <text:p>105</text:p>
          </table:table-cell>
          <table:table-cell office:value-type="float" office:value="-0.2" table:style-name="ce25">
            <text:p>-0.20</text:p>
          </table:table-cell>
          <table:table-cell office:value-type="float" office:value="205.55" table:formula="of:=[.CZ117]+[.CY118]" table:style-name="ce23">
            <text:p>205.6</text:p>
          </table:table-cell>
          <table:table-cell office:value-type="float" office:value="878.68936525000015" table:formula="of:=(([.CV118]*[.CY118])/100)+[.DA117]" table:style-name="ce23">
            <text:p>878.7</text:p>
          </table:table-cell>
          <table:table-cell office:value-type="float" office:value="431.31063474999985" table:formula="of:=[.CV118]-[.DA118]" table:style-name="ce23">
            <text:p>431.3</text:p>
          </table:table-cell>
          <table:table-cell office:value-type="float" office:value="637.31452201410855" table:formula="of:=[.CV118]/[.CZ118]*[.$CZ$87]" table:style-name="ce23">
            <text:p>637.3</text:p>
          </table:table-cell>
          <table:table-cell office:value-type="float" office:value="-0.19812727272727274" table:formula="of:=([.Y118]-[.Y117])" table:style-name="ce25">
            <text:p>-0.20</text:p>
          </table:table-cell>
          <table:table-cell office:value-type="float" office:value="2.5039123630672862" table:formula="of:=([.CV118]*100/[.CV117])-100" table:style-name="ce25">
            <text:p>2.50</text:p>
          </table:table-cell>
          <table:table-cell office:value-type="float" office:value="2.7039123630672863" table:formula="of:=[.DE118]-[.CY118]" table:style-name="ce25">
            <text:p>2.70</text:p>
          </table:table-cell>
          <table:table-cell office:value-type="float" office:value="14.014388732014083" table:formula="of:=([.F118]*100/[.F117])-100" table:style-name="ce25">
            <text:p>14.01</text:p>
          </table:table-cell>
          <table:table-cell office:value-type="float" office:value="14.564346124076565" table:formula="of:=([.K118]*100/[.K117])-100" table:style-name="ce25">
            <text:p>14.56</text:p>
          </table:table-cell>
          <table:table-cell office:value-type="float" office:value="19.63" table:style-name="ce30">
            <text:p>19.6</text:p>
          </table:table-cell>
          <table:table-cell office:value-type="float" office:value="19.750171369282281" table:formula="of:=(([.DC118]-MIN([.DC104:.DC118]))/(MAX([.DC104:.DC118])-MIN([.DC104:.DC118])))*100" table:style-name="ce128">
            <text:p>19.8</text:p>
          </table:table-cell>
          <table:table-cell office:value-type="float" office:value="0" table:formula="of:=MIN(100; MAX(0; (([.K118]-([.C118]/26/2))/(([.C118]/26)-([.C118]/26/2)))*100))" table:style-name="ce128">
            <text:p>0.0</text:p>
          </table:table-cell>
          <table:table-cell office:value-type="float" office:value="19.124371150500728" table:formula="of:=MIN(100; MAX(0; (([.F118]-([.C118]/26/2))/(([.C118]/26)-([.C118]/26/2)))*100))" table:style-name="ce128">
            <text:p>19.1</text:p>
          </table:table-cell>
          <table:table-cell office:value-type="float" office:value="24.634871595303746" table:formula="of:=(([.AP118]-MIN([.$AP$2:.$AP$128]))/(MAX([.$AP$2:.$AP$128])-MIN([.$AP$2:.$AP$128])))*100" table:style-name="ce128">
            <text:p>24.6</text:p>
          </table:table-cell>
          <table:table-cell office:value-type="float" office:value="33.284215242508395" table:formula="of:=MIN(100;MAX(0;(([.BP118]-1.8)/(2.2-1.8))*100))" table:style-name="ce128">
            <text:p>33.3</text:p>
          </table:table-cell>
          <table:table-cell office:value-type="float" office:value="96.414458452604038" table:formula="of:=100-((([.CC118]-MIN([.CC89:.CC118]))/(MAX([.CC89:.CC118])-MIN([.CC89:.CC118])))*100)" table:style-name="ce128">
            <text:p>96.4</text:p>
          </table:table-cell>
          <table:table-cell office:value-type="float" office:value="5.370000000000001" table:formula="of:=MIN(100; MAX(0; ((IF(AND([.DI118]-[.DI117]&gt;=-0.3;[.DI118]-[.DI117]&lt;=0.3);100;IF(AND([.DI118]-[.DI117]&gt;-1;[.DI118]-[.DI117]&lt;-0.3);50;IF([.DI118]-[.DI117]&lt;=-1;25;75)))))-[.DI118]+(IF(([.DI118]-[.DI117])*([.DI117]-[.DI116])&lt;0;AVERAGE([.DI114:.DI118]);0))))" table:style-name="ce128">
            <text:p>5.4</text:p>
          </table:table-cell>
          <table:table-cell office:value-type="string" table:style-name="ce118">
            <text:p>null</text:p>
          </table:table-cell>
          <table:table-cell office:value-type="float" office:value="28.368298258599882" table:formula="of:=AVERAGE([.DJ118:.DP118])" table:style-name="ce128">
            <text:p>28.4</text:p>
          </table:table-cell>
          <table:table-cell office:value-type="float" office:value="421.96000000000004" table:formula="of:=-0.06*(([.A118]-1963)^2)+8.5*([.A118]-1963)+140" table:style-name="ce23">
            <text:p>422.0</text:p>
          </table:table-cell>
          <table:table-cell table:number-columns-repeated="16261"/>
        </table:table-row>
        <table:table-row table:style-name="ro2">
          <table:table-cell office:value-type="float" office:value="2017" table:style-name="ce15">
            <text:p>2017</text:p>
          </table:table-cell>
          <table:table-cell office:value-type="float" office:value="46645070" table:style-name="ce10">
            <text:p>46645070</text:p>
          </table:table-cell>
          <table:table-cell office:value-type="float" office:value="17519692" table:style-name="ce8">
            <text:p>17519692</text:p>
          </table:table-cell>
          <table:table-cell office:value-type="float" office:value="24163709" table:style-name="ce8">
            <text:p>24163709</text:p>
          </table:table-cell>
          <table:table-cell office:value-type="float" office:value="39806121" table:style-name="ce78">
            <text:p>39806121</text:p>
          </table:table-cell>
          <table:table-cell office:value-type="float" office:value="467644" table:style-name="ce18">
            <text:p>467644</text:p>
          </table:table-cell>
          <table:table-cell office:value-type="float" office:value="169851" table:style-name="ce18">
            <text:p>169851</text:p>
          </table:table-cell>
          <table:table-cell office:value-type="float" office:value="15865" table:style-name="ce18">
            <text:p>15865</text:p>
          </table:table-cell>
          <table:table-cell office:value-type="float" office:value="1407" table:style-name="ce18">
            <text:p>1407</text:p>
          </table:table-cell>
          <table:table-cell office:value-type="float" office:value="179964" table:style-name="ce18">
            <text:p>179964</text:p>
          </table:table-cell>
          <table:table-cell office:value-type="float" office:value="312843" table:style-name="ce18">
            <text:p>312843</text:p>
          </table:table-cell>
          <table:table-cell office:value-type="float" office:value="313911" table:style-name="ce18">
            <text:p>313911</text:p>
          </table:table-cell>
          <table:table-cell office:value-type="float" office:value="36664867000" table:style-name="ce84">
            <text:p>3.7E+10</text:p>
          </table:table-cell>
          <table:table-cell office:value-type="float" office:value="117198.93684691683" table:formula="of:=[.M119]/[.K119]" table:style-name="ce26">
            <text:p>117199</text:p>
          </table:table-cell>
          <table:table-cell office:value-type="float" office:value="14469" table:style-name="ce18">
            <text:p>14469</text:p>
          </table:table-cell>
          <table:table-cell office:value-type="float" office:value="4572" table:style-name="ce18">
            <text:p>4572</text:p>
          </table:table-cell>
          <table:table-cell office:value-type="float" office:value="3.1646981627296586" table:formula="of:=[.O119]/[.P119]" table:style-name="ce67">
            <text:p>3.16</text:p>
          </table:table-cell>
          <table:table-cell office:value-type="float" office:value="61.811510583511129" table:formula="of:=([.N119]*100)/([.CV119]*(([.BL119]*([.BK119]/([.BF119]+[.BK119])))+([.BG119]*([.BF119]/([.BF119]+[.BK119])))))" table:style-name="ce67">
            <text:p>61.81</text:p>
          </table:table-cell>
          <table:table-cell office:value-type="float" office:value="16.172881528061531" table:formula="of:=(([.M119]*100/[.M118])-100)-[.CY119]" table:style-name="ce28">
            <text:p>16.17</text:p>
          </table:table-cell>
          <table:table-cell office:value-type="float" office:value="520209000000" table:style-name="ce131">
            <text:p>5.20E+11</text:p>
          </table:table-cell>
          <table:table-cell office:value-type="float" office:value="1.91" table:style-name="ce28">
            <text:p>1.91</text:p>
          </table:table-cell>
          <table:table-cell office:value-type="float" office:value="37.799999999999997" table:style-name="ce28">
            <text:p>37.80</text:p>
          </table:table-cell>
          <table:table-cell office:value-type="float" office:value="62.2" table:formula="of:=100-[.V119]" table:style-name="ce28">
            <text:p>62.20</text:p>
          </table:table-cell>
          <table:table-cell office:value-type="float" office:value="23" table:style-name="ce60">
            <text:p>23</text:p>
          </table:table-cell>
          <table:table-cell office:value-type="float" office:value="-0.14981818181818179" table:style-name="ce28">
            <text:p>-0.15</text:p>
          </table:table-cell>
          <table:table-cell office:value-type="float" office:value="1.139" table:style-name="ce72">
            <text:p>1.14</text:p>
          </table:table-cell>
          <table:table-cell office:value-type="float" office:value="11855689000000" table:style-name="ce85">
            <text:p>1.19E+13</text:p>
          </table:table-cell>
          <table:table-cell office:value-type="float" office:value="4.0648045108571296" table:formula="of:=([.AA119]*100/[.AA118])-100" table:style-name="ce70">
            <text:p>4.06</text:p>
          </table:table-cell>
          <table:table-cell office:value-type="float" office:value="3705.6640219166661" table:style-name="ce68">
            <text:p>3706</text:p>
          </table:table-cell>
          <table:table-cell office:value-type="float" office:value="1112.4033333333334" table:style-name="ce75">
            <text:p>1112</text:p>
          </table:table-cell>
          <table:table-cell office:value-type="float" office:value="1170024000000" table:style-name="ce125">
            <text:p>1.17002E+12</text:p>
          </table:table-cell>
          <table:table-cell office:value-type="float" office:value="4176252606118" table:formula="of:=([.AW119]*[.AR119]*1000000)+([.CV119]*[.BS119]*86)+([.AS119]*(506006-[.AX119])*1000000)" table:style-name="ce83">
            <text:p>4.18E+12</text:p>
          </table:table-cell>
          <table:table-cell office:value-type="float" office:value="3087933706368" table:formula="of:=([.CV119]*[.BS119]*86)" table:style-name="ce125">
            <text:p>3.08793E+12</text:p>
          </table:table-cell>
          <table:table-cell office:value-type="float" office:value="704541000000" table:style-name="ce83">
            <text:p>7.05E+11</text:p>
          </table:table-cell>
          <table:table-cell office:value-type="float" office:value="17699.3131282498" table:formula="of:=[.AH119]/[.E119]" table:style-name="ce26">
            <text:p>17699</text:p>
          </table:table-cell>
          <table:table-cell office:value-type="float" office:value="16650.645578661417" table:formula="of:=[.AJ118]*(1+([.CY119]/100))" table:style-name="ce76">
            <text:p>16651</text:p>
          </table:table-cell>
          <table:table-cell office:value-type="float" office:value="22456.825051305201" table:formula="of:=[.AI119]+(12*PMT([.U119]/100/12;[.X119]*12;([.AI119]*5)*-1))" table:style-name="ce76">
            <text:p>22457</text:p>
          </table:table-cell>
          <table:table-cell office:value-type="float" office:value="17262.163516026707" table:formula="of:=[.AL118]*(1+(([.CW119]-[.CW118])/100))" table:style-name="ce76">
            <text:p>17262</text:p>
          </table:table-cell>
          <table:table-cell office:value-type="float" office:value="14546.144595450804" table:formula="of:=(([.AL119]+([.AJ119]-[.AI119])+([.AK119]-[.AI119]))-[.AI119])+[.$AI$101]" table:style-name="ce76">
            <text:p>14546</text:p>
          </table:table-cell>
          <table:table-cell office:value-type="float" office:value="95.086458884341795" table:formula="of:=[.AM119]*[.$AN$101]/[.$AM$101]" table:style-name="ce76">
            <text:p>95</text:p>
          </table:table-cell>
          <table:table-cell office:value-type="float" office:value="80.062884026681147" table:formula="of:=[.AI119]*[.$AO$101]/[.$AI$101]" table:style-name="ce76">
            <text:p>80</text:p>
          </table:table-cell>
          <table:table-cell office:value-type="float" office:value="19.229615973318857" table:formula="of:=[.CW119]-[.AO119]" table:style-name="ce118">
            <text:p>19</text:p>
          </table:table-cell>
          <table:table-cell office:value-type="float" office:value="23439.787369383364" table:formula="of:=[.N119]/5" table:style-name="ce26">
            <text:p>23440</text:p>
          </table:table-cell>
          <table:table-cell office:value-type="float" office:value="162.22499999999999" table:style-name="ce8">
            <text:p>162</text:p>
          </table:table-cell>
          <table:table-cell office:value-type="float" office:value="1" table:style-name="ce129">
            <text:p>1.00</text:p>
          </table:table-cell>
          <table:table-cell office:value-type="float" office:value="20789" table:style-name="ce18">
            <text:p>20789</text:p>
          </table:table-cell>
          <table:table-cell office:value-type="float" office:value="17905.849999999999" table:style-name="ce78">
            <text:p>17906</text:p>
          </table:table-cell>
          <table:table-cell office:value-type="float" office:value="9504.52" table:style-name="ce78">
            <text:p>9505</text:p>
          </table:table-cell>
          <table:table-cell office:value-type="float" office:value="3652.31" table:style-name="ce78">
            <text:p>3652</text:p>
          </table:table-cell>
          <table:table-cell office:value-type="float" office:value="10183.09" table:style-name="ce78">
            <text:p>10183</text:p>
          </table:table-cell>
          <table:table-cell office:value-type="float" office:value="70982" table:style-name="ce18">
            <text:p>70982</text:p>
          </table:table-cell>
          <table:table-cell office:value-type="float" office:value="22041" table:style-name="ce18">
            <text:p>22041</text:p>
          </table:table-cell>
          <table:table-cell office:value-type="float" office:value="45719" table:style-name="ce18">
            <text:p>45719</text:p>
          </table:table-cell>
          <table:table-cell office:value-type="float" office:value="3222" table:style-name="ce18">
            <text:p>3222</text:p>
          </table:table-cell>
          <table:table-cell office:value-type="float" office:value="62582" table:style-name="ce81">
            <text:p>62582</text:p>
          </table:table-cell>
          <table:table-cell office:value-type="float" office:value="45321" table:style-name="ce81">
            <text:p>45321</text:p>
          </table:table-cell>
          <table:table-cell office:value-type="float" office:value="1144" table:style-name="ce81">
            <text:p>1144</text:p>
          </table:table-cell>
          <table:table-cell office:value-type="float" office:value="19411" table:style-name="ce18">
            <text:p>19411</text:p>
          </table:table-cell>
          <table:table-cell office:value-type="float" office:value="199.19877171105509" table:style-name="ce5">
            <text:p>199</text:p>
          </table:table-cell>
          <table:table-cell office:value-type="float" office:value="2714055300" table:style-name="ce18">
            <text:p>2714055300</text:p>
          </table:table-cell>
          <table:table-cell office:value-type="float" office:value="139820.47807943949" table:formula="of:=[.BH119]/[.BF119]" table:style-name="ce51">
            <text:p>139820</text:p>
          </table:table-cell>
          <table:table-cell office:value-type="float" office:value="701.91435859983153" table:formula="of:=[.BI119]/[.BG119]" table:style-name="ce51">
            <text:p>702</text:p>
          </table:table-cell>
          <table:table-cell office:value-type="float" office:value="61337" table:style-name="ce18">
            <text:p>61337</text:p>
          </table:table-cell>
          <table:table-cell office:value-type="float" office:value="118.89275319185471" table:style-name="ce5">
            <text:p>119</text:p>
          </table:table-cell>
          <table:table-cell office:value-type="float" office:value="4978249800" table:style-name="ce18">
            <text:p>4978249800</text:p>
          </table:table-cell>
          <table:table-cell office:value-type="float" office:value="81162.264212465554" table:formula="of:=[.BM119]/[.BK119]" table:style-name="ce55">
            <text:p>81162</text:p>
          </table:table-cell>
          <table:table-cell office:value-type="float" office:value="682.65106184811566" table:formula="of:=[.BN119]/[.BL119]" table:style-name="ce55">
            <text:p>683</text:p>
          </table:table-cell>
          <table:table-cell office:value-type="float" office:value="1.9818492932693901" table:formula="of:=[.CV119]/(([.BO119]+[.BJ119])/2)" table:style-name="ce58">
            <text:p>1.98</text:p>
          </table:table-cell>
          <table:table-cell office:value-type="float" office:value="1.4085222824767243" table:formula="of:=[.BR119]-[.BR118]" table:style-name="ce57">
            <text:p>1.4</text:p>
          </table:table-cell>
          <table:table-cell office:value-type="float" office:value="92.45249585478706" table:style-name="ce56">
            <text:p>92</text:p>
          </table:table-cell>
          <table:table-cell office:value-type="float" office:value="26170704" table:style-name="ce8">
            <text:p>26170704</text:p>
          </table:table-cell>
          <table:table-cell office:value-type="float" office:value="136728" table:formula="of:=[.BS119]-[.BS118]" table:style-name="ce26">
            <text:p>136728</text:p>
          </table:table-cell>
          <table:table-cell office:value-type="float" office:value="49336" table:style-name="ce76">
            <text:p>49336</text:p>
          </table:table-cell>
          <table:table-cell office:value-type="float" office:value="4938" table:style-name="ce76">
            <text:p>4938</text:p>
          </table:table-cell>
          <table:table-cell office:value-type="float" office:value="1.7823391376861699" table:formula="of:=([.B119]/[.BS119])" table:style-name="ce34">
            <text:p>1.78</text:p>
          </table:table-cell>
          <table:table-cell office:value-type="float" office:value="2.5" table:style-name="ce71">
            <text:p>2.50</text:p>
          </table:table-cell>
          <table:table-cell office:value-type="float" office:value="1.306" table:style-name="ce71">
            <text:p>1.31</text:p>
          </table:table-cell>
          <table:table-cell office:value-type="float" office:value="0.52519062013423934" table:formula="of:=([.BS119]*100/[.BS118])-100" table:style-name="ce23">
            <text:p>0.5</text:p>
          </table:table-cell>
          <table:table-cell office:value-type="float" office:value="147677" table:formula="of:=([.B119]-[.B118])" table:style-name="ce73">
            <text:p>147677</text:p>
          </table:table-cell>
          <table:table-cell office:value-type="float" office:value="0.31760275248119285" table:formula="of:=([.B119]*100/[.B118])-100" table:style-name="ce25">
            <text:p>0.32</text:p>
          </table:table-cell>
          <table:table-cell office:value-type="float" office:value="77657.2" table:formula="of:=[.BT119]-([.CA119]/[.BX119])" table:style-name="ce76">
            <text:p>77657</text:p>
          </table:table-cell>
          <table:table-cell office:value-type="float" office:value="1128000" table:style-name="ce78">
            <text:p>1128000</text:p>
          </table:table-cell>
          <table:table-cell office:value-type="float" office:value="12392.989999999998" table:style-name="ce8">
            <text:p>12393</text:p>
          </table:table-cell>
          <table:table-cell office:value-type="float" office:value="12.55" table:style-name="ce18">
            <text:p>12.55</text:p>
          </table:table-cell>
          <table:table-cell office:value-type="float" office:value="75.985304999999997" table:formula="of:=100-([.CF119]+[.CH119])" table:style-name="ce25">
            <text:p>75.99</text:p>
          </table:table-cell>
          <table:table-cell office:value-type="float" office:value="11.464694999999999" table:formula="of:=(13.11*(100-[.CF119]))/100" table:style-name="ce25">
            <text:p>11.46</text:p>
          </table:table-cell>
          <table:table-cell office:value-type="float" office:value="76.7" table:style-name="ce23">
            <text:p>76.7</text:p>
          </table:table-cell>
          <table:table-cell office:value-type="float" office:value="16.900000000000002" table:style-name="ce23">
            <text:p>16.9</text:p>
          </table:table-cell>
          <table:table-cell office:value-type="float" office:value="6.4" table:style-name="ce23">
            <text:p>6.4</text:p>
          </table:table-cell>
          <table:table-cell office:value-type="float" office:value="103.52800000000001" table:style-name="ce78">
            <text:p>104</text:p>
          </table:table-cell>
          <table:table-cell office:value-type="float" office:value="120.94594594594592" table:formula="of:=[.CN119]*[.$CM$117]/[.$CN$117]" table:style-name="ce78">
            <text:p>121</text:p>
          </table:table-cell>
          <table:table-cell office:value-type="float" office:value="8.9499999999999993" table:style-name="ce23">
            <text:p>9.0</text:p>
          </table:table-cell>
          <table:table-cell office:value-type="float" office:value="13.291139240506311" table:formula="of:=(([.CN119]*100)/[.CN118])-100" table:style-name="ce23">
            <text:p>13.3</text:p>
          </table:table-cell>
          <table:table-cell office:value-type="float" office:value="14.351334574798262" table:formula="of:=[.CR119]/([.CN119]*12)" table:style-name="ce23">
            <text:p>14.4</text:p>
          </table:table-cell>
          <table:table-cell office:value-type="float" office:value="19.135112766397683" table:formula="of:=[.CR119]/(([.CN119]*12)*0.75)" table:style-name="ce23">
            <text:p>19.1</text:p>
          </table:table-cell>
          <table:table-cell office:value-type="float" office:value="1541.3333333333333" table:formula="of:=AVERAGE([Quarterly.E42:.E45])" table:style-name="ce8">
            <text:p>1541</text:p>
          </table:table-cell>
          <table:table-cell office:value-type="float" office:value="593.8369873016469" table:formula="of:=PMT(([.U119]/100)/12;[.X119]*12;([.CR119]*86))*-1" table:style-name="ce78">
            <text:p>594</text:p>
          </table:table-cell>
          <table:table-cell office:value-type="float" office:value="100.12992637505413" table:formula="of:=[.CR119]*[.$CT$117]/[.$CR$117]" table:style-name="ce78">
            <text:p>100</text:p>
          </table:table-cell>
          <table:table-cell office:value-type="float" office:value="769.69999999999993" table:formula="of:=[.CN119]*86" table:style-name="ce78">
            <text:p>770</text:p>
          </table:table-cell>
          <table:table-cell office:value-type="float" office:value="1372" table:style-name="ce26">
            <text:p>1372</text:p>
          </table:table-cell>
          <table:table-cell office:value-type="float" office:value="99.292500000000004" table:style-name="ce76">
            <text:p>99</text:p>
          </table:table-cell>
          <table:table-cell office:value-type="float" office:value="111.137" table:style-name="ce76">
            <text:p>111</text:p>
          </table:table-cell>
          <table:table-cell office:value-type="float" office:value="1.96" table:style-name="ce25">
            <text:p>1.96</text:p>
          </table:table-cell>
          <table:table-cell office:value-type="float" office:value="207.51000000000002" table:formula="of:=[.CZ118]+[.CY119]" table:style-name="ce23">
            <text:p>207.5</text:p>
          </table:table-cell>
          <table:table-cell office:value-type="float" office:value="905.58056525000018" table:formula="of:=(([.CV119]*[.CY119])/100)+[.DA118]" table:style-name="ce23">
            <text:p>905.6</text:p>
          </table:table-cell>
          <table:table-cell office:value-type="float" office:value="466.41943474999982" table:formula="of:=[.CV119]-[.DA119]" table:style-name="ce23">
            <text:p>466.4</text:p>
          </table:table-cell>
          <table:table-cell office:value-type="float" office:value="661.17295552021585" table:formula="of:=[.CV119]/[.CZ119]*[.$CZ$87]" table:style-name="ce23">
            <text:p>661.2</text:p>
          </table:table-cell>
          <table:table-cell office:value-type="float" office:value="-0.10842727272727271" table:formula="of:=([.Y119]-[.Y118])" table:style-name="ce25">
            <text:p>-0.11</text:p>
          </table:table-cell>
          <table:table-cell office:value-type="float" office:value="4.7328244274809208" table:formula="of:=([.CV119]*100/[.CV118])-100" table:style-name="ce25">
            <text:p>4.73</text:p>
          </table:table-cell>
          <table:table-cell office:value-type="float" office:value="2.7728244274809208" table:formula="of:=[.DE119]-[.CY119]" table:style-name="ce25">
            <text:p>2.77</text:p>
          </table:table-cell>
          <table:table-cell office:value-type="float" office:value="15.357993018981958" table:formula="of:=([.F119]*100/[.F118])-100" table:style-name="ce25">
            <text:p>15.36</text:p>
          </table:table-cell>
          <table:table-cell office:value-type="float" office:value="10.659799721973627" table:formula="of:=([.K119]*100/[.K118])-100" table:style-name="ce25">
            <text:p>10.66</text:p>
          </table:table-cell>
          <table:table-cell office:value-type="float" office:value="17.22" table:style-name="ce30">
            <text:p>17.2</text:p>
          </table:table-cell>
          <table:table-cell office:value-type="float" office:value="17.445599002740465" table:formula="of:=(([.DC119]-MIN([.DC105:.DC119]))/(MAX([.DC105:.DC119])-MIN([.DC105:.DC119])))*100" table:style-name="ce128">
            <text:p>17.4</text:p>
          </table:table-cell>
          <table:table-cell office:value-type="float" office:value="0" table:formula="of:=MIN(100; MAX(0; (([.K119]-([.C119]/26/2))/(([.C119]/26)-([.C119]/26/2)))*100))" table:style-name="ce128">
            <text:p>0.0</text:p>
          </table:table-cell>
          <table:table-cell office:value-type="float" office:value="38.800887595512513" table:formula="of:=MIN(100; MAX(0; (([.F119]-([.C119]/26/2))/(([.C119]/26)-([.C119]/26/2)))*100))" table:style-name="ce128">
            <text:p>38.8</text:p>
          </table:table-cell>
          <table:table-cell office:value-type="float" office:value="30.834540465190869" table:formula="of:=(([.AP119]-MIN([.$AP$2:.$AP$128]))/(MAX([.$AP$2:.$AP$128])-MIN([.$AP$2:.$AP$128])))*100" table:style-name="ce128">
            <text:p>30.8</text:p>
          </table:table-cell>
          <table:table-cell office:value-type="float" office:value="45.46232331734749" table:formula="of:=MIN(100;MAX(0;(([.BP119]-1.8)/(2.2-1.8))*100))" table:style-name="ce128">
            <text:p>45.5</text:p>
          </table:table-cell>
          <table:table-cell office:value-type="float" office:value="100" table:formula="of:=100-((([.CC119]-MIN([.CC90:.CC119]))/(MAX([.CC90:.CC119])-MIN([.CC90:.CC119])))*100)" table:style-name="ce128">
            <text:p>100.0</text:p>
          </table:table-cell>
          <table:table-cell office:value-type="float" office:value="7.7800000000000011" table:formula="of:=MIN(100; MAX(0; ((IF(AND([.DI119]-[.DI118]&gt;=-0.3;[.DI119]-[.DI118]&lt;=0.3);100;IF(AND([.DI119]-[.DI118]&gt;-1;[.DI119]-[.DI118]&lt;-0.3);50;IF([.DI119]-[.DI118]&lt;=-1;25;75)))))-[.DI119]+(IF(([.DI119]-[.DI118])*([.DI118]-[.DI117])&lt;0;AVERAGE([.DI115:.DI119]);0))))" table:style-name="ce128">
            <text:p>7.8</text:p>
          </table:table-cell>
          <table:table-cell office:value-type="string" table:style-name="ce118">
            <text:p>null</text:p>
          </table:table-cell>
          <table:table-cell office:value-type="float" office:value="34.331907197255909" table:formula="of:=AVERAGE([.DJ119:.DP119])" table:style-name="ce128">
            <text:p>34.3</text:p>
          </table:table-cell>
          <table:table-cell office:value-type="float" office:value="424.04" table:formula="of:=-0.06*(([.A119]-1963)^2)+8.5*([.A119]-1963)+140" table:style-name="ce23">
            <text:p>424.0</text:p>
          </table:table-cell>
          <table:table-cell table:number-columns-repeated="16261"/>
        </table:table-row>
        <table:table-row table:style-name="ro2">
          <table:table-cell office:value-type="float" office:value="2018" table:style-name="ce15">
            <text:p>2018</text:p>
          </table:table-cell>
          <table:table-cell office:value-type="float" office:value="46918951" table:style-name="ce10">
            <text:p>46918951</text:p>
          </table:table-cell>
          <table:table-cell office:value-type="float" office:value="17410201" table:style-name="ce8">
            <text:p>17410201</text:p>
          </table:table-cell>
          <table:table-cell office:value-type="float" office:value="24188740" table:style-name="ce8">
            <text:p>24188740</text:p>
          </table:table-cell>
          <table:table-cell office:value-type="float" office:value="40154342" table:style-name="ce78">
            <text:p>40154342</text:p>
          </table:table-cell>
          <table:table-cell office:value-type="float" office:value="517984" table:style-name="ce18">
            <text:p>517984</text:p>
          </table:table-cell>
          <table:table-cell office:value-type="float" office:value="179385" table:style-name="ce18">
            <text:p>179385</text:p>
          </table:table-cell>
          <table:table-cell office:value-type="float" office:value="16278" table:style-name="ce18">
            <text:p>16278</text:p>
          </table:table-cell>
          <table:table-cell office:value-type="float" office:value="1338" table:style-name="ce18">
            <text:p>1338</text:p>
          </table:table-cell>
          <table:table-cell office:value-type="float" office:value="210091" table:style-name="ce18">
            <text:p>210091</text:p>
          </table:table-cell>
          <table:table-cell office:value-type="float" office:value="348326" table:style-name="ce18">
            <text:p>348326</text:p>
          </table:table-cell>
          <table:table-cell office:value-type="float" office:value="342799" table:style-name="ce18">
            <text:p>342799</text:p>
          </table:table-cell>
          <table:table-cell office:value-type="float" office:value="43284882000" table:style-name="ce84">
            <text:p>4.3E+10</text:p>
          </table:table-cell>
          <table:table-cell office:value-type="float" office:value="124265.43525318237" table:formula="of:=[.M120]/[.K120]" table:style-name="ce26">
            <text:p>124265</text:p>
          </table:table-cell>
          <table:table-cell office:value-type="float" office:value="11970" table:style-name="ce18">
            <text:p>11970</text:p>
          </table:table-cell>
          <table:table-cell office:value-type="float" office:value="4049" table:style-name="ce18">
            <text:p>4049</text:p>
          </table:table-cell>
          <table:table-cell office:value-type="float" office:value="2.9562855025932331" table:formula="of:=[.O120]/[.P120]" table:style-name="ce67">
            <text:p>2.96</text:p>
          </table:table-cell>
          <table:table-cell office:value-type="float" office:value="65.621353533989321" table:formula="of:=([.N120]*100)/([.CV120]*(([.BL120]*([.BK120]/([.BF120]+[.BK120])))+([.BG120]*([.BF120]/([.BF120]+[.BK120])))))" table:style-name="ce67">
            <text:p>65.62</text:p>
          </table:table-cell>
          <table:table-cell office:value-type="float" office:value="16.385472559057689" table:formula="of:=(([.M120]*100/[.M119])-100)-[.CY120]" table:style-name="ce28">
            <text:p>16.39</text:p>
          </table:table-cell>
          <table:table-cell office:value-type="float" office:value="513752000000" table:style-name="ce131">
            <text:p>5.14E+11</text:p>
          </table:table-cell>
          <table:table-cell office:value-type="float" office:value="1.921" table:style-name="ce28">
            <text:p>1.92</text:p>
          </table:table-cell>
          <table:table-cell office:value-type="float" office:value="39.200000000000003" table:style-name="ce28">
            <text:p>39.20</text:p>
          </table:table-cell>
          <table:table-cell office:value-type="float" office:value="60.8" table:formula="of:=100-[.V120]" table:style-name="ce28">
            <text:p>60.80</text:p>
          </table:table-cell>
          <table:table-cell office:value-type="float" office:value="24" table:style-name="ce60">
            <text:p>24</text:p>
          </table:table-cell>
          <table:table-cell office:value-type="float" office:value="-0.17148181818181818" table:style-name="ce28">
            <text:p>-0.17</text:p>
          </table:table-cell>
          <table:table-cell office:value-type="float" office:value="1.1781333333333335" table:style-name="ce72">
            <text:p>1.18</text:p>
          </table:table-cell>
          <table:table-cell office:value-type="float" office:value="12359586000000" table:style-name="ce85">
            <text:p>1.24E+13</text:p>
          </table:table-cell>
          <table:table-cell office:value-type="float" office:value="4.2502548776372322" table:formula="of:=([.AA120]*100/[.AA119])-100" table:style-name="ce70">
            <text:p>4.25</text:p>
          </table:table-cell>
          <table:table-cell office:value-type="float" office:value="6065.6484375" table:style-name="ce68">
            <text:p>6066</text:p>
          </table:table-cell>
          <table:table-cell office:value-type="float" office:value="1073.2033333333334" table:style-name="ce75">
            <text:p>1073</text:p>
          </table:table-cell>
          <table:table-cell office:value-type="float" office:value="1212276000000" table:style-name="ce125">
            <text:p>1.21228E+12</text:p>
          </table:table-cell>
          <table:table-cell office:value-type="float" office:value="4264229620270" table:formula="of:=([.AW120]*[.AR120]*1000000)+([.CV120]*[.BS120]*86)+([.AS120]*(506006-[.AX120])*1000000)" table:style-name="ce83">
            <text:p>4.26E+12</text:p>
          </table:table-cell>
          <table:table-cell office:value-type="float" office:value="3184099263870" table:formula="of:=([.CV120]*[.BS120]*86)" table:style-name="ce125">
            <text:p>3.1841E+12</text:p>
          </table:table-cell>
          <table:table-cell office:value-type="float" office:value="725089000000" table:style-name="ce83">
            <text:p>7.25E+11</text:p>
          </table:table-cell>
          <table:table-cell office:value-type="float" office:value="18057.549044135751" table:formula="of:=[.AH120]/[.E120]" table:style-name="ce26">
            <text:p>18058</text:p>
          </table:table-cell>
          <table:table-cell office:value-type="float" office:value="16928.711359825062" table:formula="of:=[.AJ119]*(1+([.CY120]/100))" table:style-name="ce76">
            <text:p>16929</text:p>
          </table:table-cell>
          <table:table-cell office:value-type="float" office:value="22756.111685180484" table:formula="of:=[.AI120]+(12*PMT([.U120]/100/12;[.X120]*12;([.AI120]*5)*-1))" table:style-name="ce76">
            <text:p>22756</text:p>
          </table:table-cell>
          <table:table-cell office:value-type="float" office:value="18668.166734407081" table:formula="of:=[.AL119]*(1+(([.CW120]-[.CW119])/100))" table:style-name="ce76">
            <text:p>18668</text:p>
          </table:table-cell>
          <table:table-cell office:value-type="float" office:value="15454.792481212253" table:formula="of:=(([.AL120]+([.AJ120]-[.AI120])+([.AK120]-[.AI120]))-[.AI120])+[.$AI$101]" table:style-name="ce76">
            <text:p>15455</text:p>
          </table:table-cell>
          <table:table-cell office:value-type="float" office:value="101.02618464898332" table:formula="of:=[.AM120]*[.$AN$101]/[.$AM$101]" table:style-name="ce76">
            <text:p>101</text:p>
          </table:table-cell>
          <table:table-cell office:value-type="float" office:value="81.683365023878181" table:formula="of:=[.AI120]*[.$AO$101]/[.$AI$101]" table:style-name="ce76">
            <text:p>82</text:p>
          </table:table-cell>
          <table:table-cell office:value-type="float" office:value="25.754134976121819" table:formula="of:=[.CW120]-[.AO120]" table:style-name="ce118">
            <text:p>26</text:p>
          </table:table-cell>
          <table:table-cell office:value-type="float" office:value="24853.087050636474" table:formula="of:=[.N120]/5" table:style-name="ce26">
            <text:p>24853</text:p>
          </table:table-cell>
          <table:table-cell office:value-type="float" office:value="159.69999999999999" table:style-name="ce8">
            <text:p>160</text:p>
          </table:table-cell>
          <table:table-cell office:value-type="float" office:value="1.02" table:style-name="ce129">
            <text:p>1.02</text:p>
          </table:table-cell>
          <table:table-cell office:value-type="float" office:value="21901" table:style-name="ce18">
            <text:p>21901</text:p>
          </table:table-cell>
          <table:table-cell office:value-type="float" office:value="22162.300000000003" table:style-name="ce78">
            <text:p>22162</text:p>
          </table:table-cell>
          <table:table-cell office:value-type="float" office:value="10072.82" table:style-name="ce78">
            <text:p>10073</text:p>
          </table:table-cell>
          <table:table-cell office:value-type="float" office:value="3596.59" table:style-name="ce78">
            <text:p>3597</text:p>
          </table:table-cell>
          <table:table-cell office:value-type="float" office:value="10167.83" table:style-name="ce78">
            <text:p>10168</text:p>
          </table:table-cell>
          <table:table-cell office:value-type="float" office:value="74081" table:style-name="ce18">
            <text:p>74081</text:p>
          </table:table-cell>
          <table:table-cell office:value-type="float" office:value="24175" table:style-name="ce18">
            <text:p>24175</text:p>
          </table:table-cell>
          <table:table-cell office:value-type="float" office:value="46560" table:style-name="ce18">
            <text:p>46560</text:p>
          </table:table-cell>
          <table:table-cell office:value-type="float" office:value="3346" table:style-name="ce18">
            <text:p>3346</text:p>
          </table:table-cell>
          <table:table-cell office:value-type="float" office:value="80876" table:style-name="ce81">
            <text:p>80876</text:p>
          </table:table-cell>
          <table:table-cell office:value-type="float" office:value="47242" table:style-name="ce81">
            <text:p>47242</text:p>
          </table:table-cell>
          <table:table-cell office:value-type="float" office:value="681" table:style-name="ce81">
            <text:p>681</text:p>
          </table:table-cell>
          <table:table-cell office:value-type="float" office:value="21254" table:style-name="ce18">
            <text:p>21254</text:p>
          </table:table-cell>
          <table:table-cell office:value-type="float" office:value="200.23759273547648" table:style-name="ce5">
            <text:p>200</text:p>
          </table:table-cell>
          <table:table-cell office:value-type="float" office:value="3063400400" table:style-name="ce18">
            <text:p>3063400400</text:p>
          </table:table-cell>
          <table:table-cell office:value-type="float" office:value="144132.88792697844" table:formula="of:=[.BH120]/[.BF120]" table:style-name="ce51">
            <text:p>144133</text:p>
          </table:table-cell>
          <table:table-cell office:value-type="float" office:value="719.80933229348659" table:formula="of:=[.BI120]/[.BG120]" table:style-name="ce51">
            <text:p>720</text:p>
          </table:table-cell>
          <table:table-cell office:value-type="float" office:value="79453" table:style-name="ce18">
            <text:p>79453</text:p>
          </table:table-cell>
          <table:table-cell office:value-type="float" office:value="117.0283231932777" table:style-name="ce5">
            <text:p>117</text:p>
          </table:table-cell>
          <table:table-cell office:value-type="float" office:value="6541922000" table:style-name="ce18">
            <text:p>6541922000</text:p>
          </table:table-cell>
          <table:table-cell office:value-type="float" office:value="82337.004266673379" table:formula="of:=[.BM120]/[.BK120]" table:style-name="ce55">
            <text:p>82337</text:p>
          </table:table-cell>
          <table:table-cell office:value-type="float" office:value="703.56476124749736" table:formula="of:=[.BN120]/[.BL120]" table:style-name="ce55">
            <text:p>704</text:p>
          </table:table-cell>
          <table:table-cell office:value-type="float" office:value="1.9769925648987337" table:formula="of:=[.CV120]/(([.BO120]+[.BJ120])/2)" table:style-name="ce58">
            <text:p>1.98</text:p>
          </table:table-cell>
          <table:table-cell office:value-type="float" office:value="1.64999656676315" table:formula="of:=[.BR120]-[.BR119]" table:style-name="ce57">
            <text:p>1.6</text:p>
          </table:table-cell>
          <table:table-cell office:value-type="float" office:value="94.10249242155021" table:style-name="ce56">
            <text:p>94</text:p>
          </table:table-cell>
          <table:table-cell office:value-type="float" office:value="26314435" table:style-name="ce8">
            <text:p>26314435</text:p>
          </table:table-cell>
          <table:table-cell office:value-type="float" office:value="143731" table:formula="of:=[.BS120]-[.BS119]" table:style-name="ce26">
            <text:p>143731</text:p>
          </table:table-cell>
          <table:table-cell office:value-type="float" office:value="58853" table:style-name="ce76">
            <text:p>58853</text:p>
          </table:table-cell>
          <table:table-cell office:value-type="float" office:value="5191" table:style-name="ce76">
            <text:p>5191</text:p>
          </table:table-cell>
          <table:table-cell office:value-type="float" office:value="1.7830119096229884" table:formula="of:=([.B120]/[.BS120])" table:style-name="ce34">
            <text:p>1.78</text:p>
          </table:table-cell>
          <table:table-cell office:value-type="float" office:value="2.5" table:style-name="ce71">
            <text:p>2.50</text:p>
          </table:table-cell>
          <table:table-cell office:value-type="float" office:value="1.2569999999999999" table:style-name="ce71">
            <text:p>1.26</text:p>
          </table:table-cell>
          <table:table-cell office:value-type="float" office:value="0.54920570726717699" table:formula="of:=([.BS120]*100/[.BS119])-100" table:style-name="ce23">
            <text:p>0.5</text:p>
          </table:table-cell>
          <table:table-cell office:value-type="float" office:value="273881" table:formula="of:=([.B120]-[.B119])" table:style-name="ce73">
            <text:p>273881</text:p>
          </table:table-cell>
          <table:table-cell office:value-type="float" office:value="0.58715958621135655" table:formula="of:=([.B120]*100/[.B119])-100" table:style-name="ce25">
            <text:p>0.59</text:p>
          </table:table-cell>
          <table:table-cell office:value-type="float" office:value="34178.600000000006" table:formula="of:=[.BT120]-([.CA120]/[.BX120])" table:style-name="ce76">
            <text:p>34179</text:p>
          </table:table-cell>
          <table:table-cell office:value-type="float" office:value="1222000" table:style-name="ce78">
            <text:p>1222000</text:p>
          </table:table-cell>
          <table:table-cell office:value-type="float" office:value="13461.079999999998" table:style-name="ce8">
            <text:p>13461</text:p>
          </table:table-cell>
          <table:table-cell office:value-type="float" office:value="12.18" table:style-name="ce18">
            <text:p>12.18</text:p>
          </table:table-cell>
          <table:table-cell office:value-type="float" office:value="76.719551999999993" table:formula="of:=100-([.CF120]+[.CH120])" table:style-name="ce25">
            <text:p>76.72</text:p>
          </table:table-cell>
          <table:table-cell office:value-type="float" office:value="11.100447999999998" table:formula="of:=(12.64*(100-[.CF120]))/100" table:style-name="ce25">
            <text:p>11.10</text:p>
          </table:table-cell>
          <table:table-cell office:value-type="float" office:value="76.099999999999994" table:style-name="ce23">
            <text:p>76.1</text:p>
          </table:table-cell>
          <table:table-cell office:value-type="float" office:value="17.5" table:style-name="ce23">
            <text:p>17.5</text:p>
          </table:table-cell>
          <table:table-cell office:value-type="float" office:value="6.4" table:style-name="ce23">
            <text:p>6.4</text:p>
          </table:table-cell>
          <table:table-cell office:value-type="float" office:value="106.247" table:style-name="ce78">
            <text:p>106</text:p>
          </table:table-cell>
          <table:table-cell office:value-type="float" office:value="135.81081081081081" table:formula="of:=[.CN120]*[.$CM$117]/[.$CN$117]" table:style-name="ce78">
            <text:p>136</text:p>
          </table:table-cell>
          <table:table-cell office:value-type="float" office:value="10.050000000000001" table:style-name="ce23">
            <text:p>10.1</text:p>
          </table:table-cell>
          <table:table-cell office:value-type="float" office:value="12.290502793296113" table:formula="of:=(([.CN120]*100)/[.CN119])-100" table:style-name="ce23">
            <text:p>12.3</text:p>
          </table:table-cell>
          <table:table-cell office:value-type="float" office:value="13.574488667772249" table:formula="of:=[.CR120]/([.CN120]*12)" table:style-name="ce23">
            <text:p>13.6</text:p>
          </table:table-cell>
          <table:table-cell office:value-type="float" office:value="18.099318223696333" table:formula="of:=[.CR120]/(([.CN120]*12)*0.75)" table:style-name="ce23">
            <text:p>18.1</text:p>
          </table:table-cell>
          <table:table-cell office:value-type="float" office:value="1637.0833333333333" table:formula="of:=AVERAGE([Quarterly.E46:.E49])" table:style-name="ce8">
            <text:p>1637</text:p>
          </table:table-cell>
          <table:table-cell office:value-type="float" office:value="610.55417612045483" table:formula="of:=PMT(([.U120]/100)/12;[.X120]*12;([.CR120]*86))*-1" table:style-name="ce78">
            <text:p>611</text:p>
          </table:table-cell>
          <table:table-cell office:value-type="float" office:value="106.35015158077088" table:formula="of:=[.CR120]*[.$CT$117]/[.$CR$117]" table:style-name="ce78">
            <text:p>106</text:p>
          </table:table-cell>
          <table:table-cell office:value-type="float" office:value="864.30000000000007" table:formula="of:=[.CN120]*86" table:style-name="ce78">
            <text:p>864</text:p>
          </table:table-cell>
          <table:table-cell office:value-type="float" office:value="1407" table:style-name="ce26">
            <text:p>1407</text:p>
          </table:table-cell>
          <table:table-cell office:value-type="float" office:value="107.4375" table:style-name="ce76">
            <text:p>107</text:p>
          </table:table-cell>
          <table:table-cell office:value-type="float" office:value="118.595" table:style-name="ce76">
            <text:p>119</text:p>
          </table:table-cell>
          <table:table-cell office:value-type="float" office:value="1.67" table:style-name="ce25">
            <text:p>1.67</text:p>
          </table:table-cell>
          <table:table-cell office:value-type="float" office:value="209.18" table:formula="of:=[.CZ119]+[.CY120]" table:style-name="ce23">
            <text:p>209.2</text:p>
          </table:table-cell>
          <table:table-cell office:value-type="float" office:value="929.07746525000016" table:formula="of:=(([.CV120]*[.CY120])/100)+[.DA119]" table:style-name="ce23">
            <text:p>929.1</text:p>
          </table:table-cell>
          <table:table-cell office:value-type="float" office:value="477.92253474999984" table:formula="of:=[.CV120]-[.DA120]" table:style-name="ce23">
            <text:p>477.9</text:p>
          </table:table-cell>
          <table:table-cell office:value-type="float" office:value="672.62644612295628" table:formula="of:=[.CV120]/[.CZ120]*[.$CZ$87]" table:style-name="ce23">
            <text:p>672.6</text:p>
          </table:table-cell>
          <table:table-cell office:value-type="float" office:value="-2.1663636363636385E-2" table:formula="of:=([.Y120]-[.Y119])" table:style-name="ce25">
            <text:p>-0.02</text:p>
          </table:table-cell>
          <table:table-cell office:value-type="float" office:value="2.5510204081632679" table:formula="of:=([.CV120]*100/[.CV119])-100" table:style-name="ce25">
            <text:p>2.55</text:p>
          </table:table-cell>
          <table:table-cell office:value-type="float" office:value="0.88102040816326799" table:formula="of:=[.DE120]-[.CY120]" table:style-name="ce25">
            <text:p>0.88</text:p>
          </table:table-cell>
          <table:table-cell office:value-type="float" office:value="10.764598711840634" table:formula="of:=([.F120]*100/[.F119])-100" table:style-name="ce25">
            <text:p>10.76</text:p>
          </table:table-cell>
          <table:table-cell office:value-type="float" office:value="11.34211089907717" table:formula="of:=([.K120]*100/[.K119])-100" table:style-name="ce25">
            <text:p>11.34</text:p>
          </table:table-cell>
          <table:table-cell office:value-type="float" office:value="15.25" table:style-name="ce30">
            <text:p>15.3</text:p>
          </table:table-cell>
          <table:table-cell office:value-type="float" office:value="21.042411449734281" table:formula="of:=(([.DC120]-MIN([.DC106:.DC120]))/(MAX([.DC106:.DC120])-MIN([.DC106:.DC120])))*100" table:style-name="ce128">
            <text:p>21.0</text:p>
          </table:table-cell>
          <table:table-cell office:value-type="float" office:value="4.0364324340655244" table:formula="of:=MIN(100; MAX(0; (([.K120]-([.C120]/26/2))/(([.C120]/26)-([.C120]/26/2)))*100))" table:style-name="ce128">
            <text:p>4.0</text:p>
          </table:table-cell>
          <table:table-cell office:value-type="float" office:value="54.70911565007205" table:formula="of:=MIN(100; MAX(0; (([.F120]-([.C120]/26/2))/(([.C120]/26)-([.C120]/26/2)))*100))" table:style-name="ce128">
            <text:p>54.7</text:p>
          </table:table-cell>
          <table:table-cell office:value-type="float" office:value="41.071633787913576" table:formula="of:=(([.AP120]-MIN([.$AP$2:.$AP$128]))/(MAX([.$AP$2:.$AP$128])-MIN([.$AP$2:.$AP$128])))*100" table:style-name="ce128">
            <text:p>41.1</text:p>
          </table:table-cell>
          <table:table-cell office:value-type="float" office:value="44.248141224683387" table:formula="of:=MIN(100;MAX(0;(([.BP120]-1.8)/(2.2-1.8))*100))" table:style-name="ce128">
            <text:p>44.2</text:p>
          </table:table-cell>
          <table:table-cell office:value-type="float" office:value="100" table:formula="of:=100-((([.CC120]-MIN([.CC91:.CC120]))/(MAX([.CC91:.CC120])-MIN([.CC91:.CC120])))*100)" table:style-name="ce128">
            <text:p>100.0</text:p>
          </table:table-cell>
          <table:table-cell office:value-type="float" office:value="9.75" table:formula="of:=MIN(100; MAX(0; ((IF(AND([.DI120]-[.DI119]&gt;=-0.3;[.DI120]-[.DI119]&lt;=0.3);100;IF(AND([.DI120]-[.DI119]&gt;-1;[.DI120]-[.DI119]&lt;-0.3);50;IF([.DI120]-[.DI119]&lt;=-1;25;75)))))-[.DI120]+(IF(([.DI120]-[.DI119])*([.DI119]-[.DI118])&lt;0;AVERAGE([.DI116:.DI120]);0))))" table:style-name="ce128">
            <text:p>9.8</text:p>
          </table:table-cell>
          <table:table-cell office:value-type="string" table:style-name="ce118">
            <text:p>null</text:p>
          </table:table-cell>
          <table:table-cell office:value-type="float" office:value="39.265390649495544" table:formula="of:=AVERAGE([.DJ120:.DP120])" table:style-name="ce128">
            <text:p>39.3</text:p>
          </table:table-cell>
          <table:table-cell office:value-type="float" office:value="426" table:formula="of:=-0.06*(([.A120]-1963)^2)+8.5*([.A120]-1963)+140" table:style-name="ce23">
            <text:p>426.0</text:p>
          </table:table-cell>
          <table:table-cell table:number-columns-repeated="16261"/>
        </table:table-row>
        <table:table-row table:style-name="ro2">
          <table:table-cell office:value-type="float" office:value="2019" table:style-name="ce15">
            <text:p>2019</text:p>
          </table:table-cell>
          <table:table-cell office:value-type="float" office:value="47318050" table:style-name="ce10">
            <text:p>47318050</text:p>
          </table:table-cell>
          <table:table-cell office:value-type="float" office:value="17360827" table:style-name="ce8">
            <text:p>17360827</text:p>
          </table:table-cell>
          <table:table-cell office:value-type="float" office:value="24268262" table:style-name="ce8">
            <text:p>24268262</text:p>
          </table:table-cell>
          <table:table-cell office:value-type="float" office:value="40615573" table:style-name="ce78">
            <text:p>40615573</text:p>
          </table:table-cell>
          <table:table-cell office:value-type="float" office:value="503546" table:style-name="ce18">
            <text:p>503546</text:p>
          </table:table-cell>
          <table:table-cell office:value-type="float" office:value="176046" table:style-name="ce18">
            <text:p>176046</text:p>
          </table:table-cell>
          <table:table-cell office:value-type="float" office:value="18764" table:style-name="ce18">
            <text:p>18764</text:p>
          </table:table-cell>
          <table:table-cell office:value-type="float" office:value="1355" table:style-name="ce18">
            <text:p>1355</text:p>
          </table:table-cell>
          <table:table-cell office:value-type="float" office:value="249414" table:style-name="ce18">
            <text:p>249414</text:p>
          </table:table-cell>
          <table:table-cell office:value-type="float" office:value="361291" table:style-name="ce18">
            <text:p>361291</text:p>
          </table:table-cell>
          <table:table-cell office:value-type="float" office:value="340776" table:style-name="ce18">
            <text:p>340776</text:p>
          </table:table-cell>
          <table:table-cell office:value-type="float" office:value="45383450000" table:style-name="ce84">
            <text:p>4.5E+10</text:p>
          </table:table-cell>
          <table:table-cell office:value-type="float" office:value="125614.67072249239" table:formula="of:=[.M121]/[.K121]" table:style-name="ce26">
            <text:p>125615</text:p>
          </table:table-cell>
          <table:table-cell office:value-type="float" office:value="11183" table:style-name="ce18">
            <text:p>11183</text:p>
          </table:table-cell>
          <table:table-cell office:value-type="float" office:value="3607" table:style-name="ce18">
            <text:p>3607</text:p>
          </table:table-cell>
          <table:table-cell office:value-type="float" office:value="3.1003604103132796" table:formula="of:=[.O121]/[.P121]" table:style-name="ce67">
            <text:p>3.10</text:p>
          </table:table-cell>
          <table:table-cell office:value-type="float" office:value="67.113538027177086" table:formula="of:=([.N121]*100)/([.CV121]*(([.BL121]*([.BK121]/([.BF121]+[.BK121])))+([.BG121]*([.BF121]/([.BF121]+[.BK121])))))" table:style-name="ce67">
            <text:p>67.11</text:p>
          </table:table-cell>
          <table:table-cell office:value-type="float" office:value="4.1482701188835334" table:formula="of:=(([.M121]*100/[.M120])-100)-[.CY121]" table:style-name="ce28">
            <text:p>4.15</text:p>
          </table:table-cell>
          <table:table-cell office:value-type="float" office:value="510585000000" table:style-name="ce131">
            <text:p>5.11E+11</text:p>
          </table:table-cell>
          <table:table-cell office:value-type="float" office:value="1.9350000000000001" table:style-name="ce28">
            <text:p>1.94</text:p>
          </table:table-cell>
          <table:table-cell office:value-type="float" office:value="42.1" table:style-name="ce28">
            <text:p>42.10</text:p>
          </table:table-cell>
          <table:table-cell office:value-type="float" office:value="57.9" table:formula="of:=100-[.V121]" table:style-name="ce28">
            <text:p>57.90</text:p>
          </table:table-cell>
          <table:table-cell office:value-type="float" office:value="23" table:style-name="ce60">
            <text:p>23</text:p>
          </table:table-cell>
          <table:table-cell office:value-type="float" office:value="-0.22453636363636367" table:style-name="ce28">
            <text:p>-0.22</text:p>
          </table:table-cell>
          <table:table-cell office:value-type="float" office:value="1.1176416666666669" table:style-name="ce72">
            <text:p>1.12</text:p>
          </table:table-cell>
          <table:table-cell office:value-type="float" office:value="12977013000000" table:style-name="ce85">
            <text:p>1.30E+13</text:p>
          </table:table-cell>
          <table:table-cell office:value-type="float" office:value="4.9955314037217704" table:formula="of:=([.AA121]*100/[.AA120])-100" table:style-name="ce70">
            <text:p>5.00</text:p>
          </table:table-cell>
          <table:table-cell office:value-type="float" office:value="6584.3950399166679" table:style-name="ce68">
            <text:p>6584</text:p>
          </table:table-cell>
          <table:table-cell office:value-type="float" office:value="1255.8258333333333" table:style-name="ce75">
            <text:p>1256</text:p>
          </table:table-cell>
          <table:table-cell office:value-type="float" office:value="1253710000000" table:style-name="ce125">
            <text:p>1.25371E+12</text:p>
          </table:table-cell>
          <table:table-cell office:value-type="float" office:value="4348677926360" table:formula="of:=([.AW121]*[.AR121]*1000000)+([.CV121]*[.BS121]*86)+([.AS121]*(506006-[.AX121])*1000000)" table:style-name="ce83">
            <text:p>4.35E+12</text:p>
          </table:table-cell>
          <table:table-cell office:value-type="float" office:value="3272634940760" table:formula="of:=([.CV121]*[.BS121]*86)" table:style-name="ce125">
            <text:p>3.27263E+12</text:p>
          </table:table-cell>
          <table:table-cell office:value-type="float" office:value="761525000000" table:style-name="ce83">
            <text:p>7.62E+11</text:p>
          </table:table-cell>
          <table:table-cell office:value-type="float" office:value="18749.581595217183" table:formula="of:=[.AH121]/[.E121]" table:style-name="ce26">
            <text:p>18750</text:p>
          </table:table-cell>
          <table:table-cell office:value-type="float" office:value="17047.212339343834" table:formula="of:=[.AJ120]*(1+([.CY121]/100))" table:style-name="ce76">
            <text:p>17047</text:p>
          </table:table-cell>
          <table:table-cell office:value-type="float" office:value="23802.87683090983" table:formula="of:=[.AI121]+(12*PMT([.U121]/100/12;[.X121]*12;([.AI121]*5)*-1))" table:style-name="ce76">
            <text:p>23803</text:p>
          </table:table-cell>
          <table:table-cell office:value-type="float" office:value="20121.950218849037" table:formula="of:=[.AL120]*(1+(([.CW121]-[.CW120])/100))" table:style-name="ce76">
            <text:p>20122</text:p>
          </table:table-cell>
          <table:table-cell office:value-type="float" office:value="15997.74443765803" table:formula="of:=(([.AL121]+([.AJ121]-[.AI121])+([.AK121]-[.AI121]))-[.AI121])+[.$AI$101]" table:style-name="ce76">
            <text:p>15998</text:p>
          </table:table-cell>
          <table:table-cell office:value-type="float" office:value="104.57539856913782" table:formula="of:=[.AM121]*[.$AN$101]/[.$AM$101]" table:style-name="ce76">
            <text:p>105</text:p>
          </table:table-cell>
          <table:table-cell office:value-type="float" office:value="84.813775875330236" table:formula="of:=[.AI121]*[.$AO$101]/[.$AI$101]" table:style-name="ce76">
            <text:p>85</text:p>
          </table:table-cell>
          <table:table-cell office:value-type="float" office:value="30.411224124669772" table:formula="of:=[.CW121]-[.AO121]" table:style-name="ce118">
            <text:p>30</text:p>
          </table:table-cell>
          <table:table-cell office:value-type="float" office:value="25122.934144498478" table:formula="of:=[.N121]/5" table:style-name="ce26">
            <text:p>25123</text:p>
          </table:table-cell>
          <table:table-cell office:value-type="float" office:value="160.9" table:style-name="ce8">
            <text:p>161</text:p>
          </table:table-cell>
          <table:table-cell office:value-type="float" office:value="1.01" table:style-name="ce129">
            <text:p>1.01</text:p>
          </table:table-cell>
          <table:table-cell office:value-type="float" office:value="19047" table:style-name="ce18">
            <text:p>19047</text:p>
          </table:table-cell>
          <table:table-cell office:value-type="float" office:value="15629.949999999999" table:style-name="ce78">
            <text:p>15630</text:p>
          </table:table-cell>
          <table:table-cell office:value-type="float" office:value="8536.9700000000012" table:style-name="ce78">
            <text:p>8537</text:p>
          </table:table-cell>
          <table:table-cell office:value-type="float" office:value="3575.35" table:style-name="ce78">
            <text:p>3575</text:p>
          </table:table-cell>
          <table:table-cell office:value-type="float" office:value="10194.94" table:style-name="ce78">
            <text:p>10195</text:p>
          </table:table-cell>
          <table:table-cell office:value-type="float" office:value="78325" table:style-name="ce18">
            <text:p>78325</text:p>
          </table:table-cell>
          <table:table-cell office:value-type="float" office:value="24947" table:style-name="ce18">
            <text:p>24947</text:p>
          </table:table-cell>
          <table:table-cell office:value-type="float" office:value="50024" table:style-name="ce18">
            <text:p>50024</text:p>
          </table:table-cell>
          <table:table-cell office:value-type="float" office:value="3354" table:style-name="ce18">
            <text:p>3354</text:p>
          </table:table-cell>
          <table:table-cell office:value-type="float" office:value="85576" table:style-name="ce81">
            <text:p>85576</text:p>
          </table:table-cell>
          <table:table-cell office:value-type="float" office:value="51130" table:style-name="ce81">
            <text:p>51130</text:p>
          </table:table-cell>
          <table:table-cell office:value-type="float" office:value="670" table:style-name="ce81">
            <text:p>670</text:p>
          </table:table-cell>
          <table:table-cell office:value-type="float" office:value="21982" table:style-name="ce18">
            <text:p>21982</text:p>
          </table:table-cell>
          <table:table-cell office:value-type="float" office:value="197.91902503962376" table:style-name="ce5">
            <text:p>198</text:p>
          </table:table-cell>
          <table:table-cell office:value-type="float" office:value="3245249300" table:style-name="ce18">
            <text:p>3245249300</text:p>
          </table:table-cell>
          <table:table-cell office:value-type="float" office:value="147632.1217359658" table:formula="of:=[.BH121]/[.BF121]" table:style-name="ce51">
            <text:p>147632</text:p>
          </table:table-cell>
          <table:table-cell office:value-type="float" office:value="745.92183195329289" table:formula="of:=[.BI121]/[.BG121]" table:style-name="ce51">
            <text:p>746</text:p>
          </table:table-cell>
          <table:table-cell office:value-type="float" office:value="84223" table:style-name="ce18">
            <text:p>84223</text:p>
          </table:table-cell>
          <table:table-cell office:value-type="float" office:value="112.47271621837696" table:style-name="ce5">
            <text:p>112</text:p>
          </table:table-cell>
          <table:table-cell office:value-type="float" office:value="6965173000" table:style-name="ce18">
            <text:p>6965173000</text:p>
          </table:table-cell>
          <table:table-cell office:value-type="float" office:value="82699.17955902782" table:formula="of:=[.BM121]/[.BK121]" table:style-name="ce55">
            <text:p>82699</text:p>
          </table:table-cell>
          <table:table-cell office:value-type="float" office:value="735.28214076789197" table:formula="of:=[.BN121]/[.BL121]" table:style-name="ce55">
            <text:p>735</text:p>
          </table:table-cell>
          <table:table-cell office:value-type="float" office:value="1.9416637093650067" table:formula="of:=[.CV121]/(([.BO121]+[.BJ121])/2)" table:style-name="ce58">
            <text:p>1.94</text:p>
          </table:table-cell>
          <table:table-cell office:value-type="float" office:value="0.64127037607237014" table:formula="of:=[.BR121]-[.BR120]" table:style-name="ce57">
            <text:p>0.6</text:p>
          </table:table-cell>
          <table:table-cell office:value-type="float" office:value="94.74376279762258" table:style-name="ce56">
            <text:p>95</text:p>
          </table:table-cell>
          <table:table-cell office:value-type="float" office:value="26463070" table:style-name="ce8">
            <text:p>26463070</text:p>
          </table:table-cell>
          <table:table-cell office:value-type="float" office:value="148635" table:formula="of:=[.BS121]-[.BS120]" table:style-name="ce26">
            <text:p>148635</text:p>
          </table:table-cell>
          <table:table-cell office:value-type="float" office:value="71562" table:style-name="ce76">
            <text:p>71562</text:p>
          </table:table-cell>
          <table:table-cell office:value-type="float" office:value="6615" table:style-name="ce76">
            <text:p>6615</text:p>
          </table:table-cell>
          <table:table-cell office:value-type="float" office:value="1.7880786318443023" table:formula="of:=([.B121]/[.BS121])" table:style-name="ce34">
            <text:p>1.79</text:p>
          </table:table-cell>
          <table:table-cell office:value-type="float" office:value="2.5" table:style-name="ce71">
            <text:p>2.50</text:p>
          </table:table-cell>
          <table:table-cell office:value-type="float" office:value="1.2290000000000001" table:style-name="ce71">
            <text:p>1.23</text:p>
          </table:table-cell>
          <table:table-cell office:value-type="float" office:value="0.56484207242147022" table:formula="of:=([.BS121]*100/[.BS120])-100" table:style-name="ce23">
            <text:p>0.6</text:p>
          </table:table-cell>
          <table:table-cell office:value-type="float" office:value="399099" table:formula="of:=([.B121]-[.B120])" table:style-name="ce73">
            <text:p>399099</text:p>
          </table:table-cell>
          <table:table-cell office:value-type="float" office:value="0.85061364649861559" table:formula="of:=([.B121]*100/[.B120])-100" table:style-name="ce25">
            <text:p>0.85</text:p>
          </table:table-cell>
          <table:table-cell office:value-type="float" office:value="-11004.600000000006" table:formula="of:=[.BT121]-([.CA121]/[.BX121])" table:style-name="ce76">
            <text:p>-11005</text:p>
          </table:table-cell>
          <table:table-cell office:value-type="float" office:value="1278000" table:style-name="ce78">
            <text:p>1278000</text:p>
          </table:table-cell>
          <table:table-cell office:value-type="float" office:value="14718.939999999997" table:style-name="ce8">
            <text:p>14719</text:p>
          </table:table-cell>
          <table:table-cell office:value-type="float" office:value="12.03" table:style-name="ce18">
            <text:p>12.03</text:p>
          </table:table-cell>
          <table:table-cell office:value-type="float" office:value="76.876982999999996" table:formula="of:=100-([.CF121]+[.CH121])" table:style-name="ce25">
            <text:p>76.88</text:p>
          </table:table-cell>
          <table:table-cell office:value-type="float" office:value="11.093017" table:formula="of:=(12.61*(100-[.CF121]))/100" table:style-name="ce25">
            <text:p>11.09</text:p>
          </table:table-cell>
          <table:table-cell office:value-type="float" office:value="75.900000000000006" table:style-name="ce23">
            <text:p>75.9</text:p>
          </table:table-cell>
          <table:table-cell office:value-type="float" office:value="18.100000000000001" table:style-name="ce23">
            <text:p>18.1</text:p>
          </table:table-cell>
          <table:table-cell office:value-type="float" office:value="6" table:style-name="ce23">
            <text:p>6.0</text:p>
          </table:table-cell>
          <table:table-cell office:value-type="float" office:value="109.999" table:style-name="ce78">
            <text:p>110</text:p>
          </table:table-cell>
          <table:table-cell office:value-type="float" office:value="143.91891891891891" table:formula="of:=[.CN121]*[.$CM$117]/[.$CN$117]" table:style-name="ce78">
            <text:p>144</text:p>
          </table:table-cell>
          <table:table-cell office:value-type="float" office:value="10.65" table:style-name="ce23">
            <text:p>10.7</text:p>
          </table:table-cell>
          <table:table-cell office:value-type="float" office:value="5.9701492537313356" table:formula="of:=(([.CN121]*100)/[.CN120])-100" table:style-name="ce23">
            <text:p>6.0</text:p>
          </table:table-cell>
          <table:table-cell office:value-type="float" office:value="13.513302034428794" table:formula="of:=[.CR121]/([.CN121]*12)" table:style-name="ce23">
            <text:p>13.5</text:p>
          </table:table-cell>
          <table:table-cell office:value-type="float" office:value="18.017736045905057" table:formula="of:=[.CR121]/(([.CN121]*12)*0.75)" table:style-name="ce23">
            <text:p>18.0</text:p>
          </table:table-cell>
          <table:table-cell office:value-type="float" office:value="1727" table:formula="of:=AVERAGE([Quarterly.E50:.E53])" table:style-name="ce8">
            <text:p>1727</text:p>
          </table:table-cell>
          <table:table-cell office:value-type="float" office:value="667.14867847770529" table:formula="of:=PMT(([.U121]/100)/12;[.X121]*12;([.CR121]*86))*-1" table:style-name="ce78">
            <text:p>667</text:p>
          </table:table-cell>
          <table:table-cell office:value-type="float" office:value="112.19142485924644" table:formula="of:=[.CR121]*[.$CT$117]/[.$CR$117]" table:style-name="ce78">
            <text:p>112</text:p>
          </table:table-cell>
          <table:table-cell office:value-type="float" office:value="915.9" table:formula="of:=[.CN121]*86" table:style-name="ce78">
            <text:p>916</text:p>
          </table:table-cell>
          <table:table-cell office:value-type="float" office:value="1438" table:style-name="ce26">
            <text:p>1438</text:p>
          </table:table-cell>
          <table:table-cell office:value-type="float" office:value="115.22500000000001" table:style-name="ce76">
            <text:p>115</text:p>
          </table:table-cell>
          <table:table-cell office:value-type="float" office:value="124.59699999999999" table:style-name="ce76">
            <text:p>125</text:p>
          </table:table-cell>
          <table:table-cell office:value-type="float" office:value="0.70000000000000007" table:style-name="ce25">
            <text:p>0.70</text:p>
          </table:table-cell>
          <table:table-cell office:value-type="float" office:value="209.88" table:formula="of:=[.CZ120]+[.CY121]" table:style-name="ce23">
            <text:p>209.9</text:p>
          </table:table-cell>
          <table:table-cell office:value-type="float" office:value="939.14346525000019" table:formula="of:=(([.CV121]*[.CY121])/100)+[.DA120]" table:style-name="ce23">
            <text:p>939.1</text:p>
          </table:table-cell>
          <table:table-cell office:value-type="float" office:value="498.85653474999981" table:formula="of:=[.CV121]-[.DA121]" table:style-name="ce23">
            <text:p>498.9</text:p>
          </table:table-cell>
          <table:table-cell office:value-type="float" office:value="685.15342100247767" table:formula="of:=[.CV121]/[.CZ121]*[.$CZ$87]" table:style-name="ce23">
            <text:p>685.2</text:p>
          </table:table-cell>
          <table:table-cell office:value-type="float" office:value="-5.3054545454545493E-2" table:formula="of:=([.Y121]-[.Y120])" table:style-name="ce25">
            <text:p>-0.05</text:p>
          </table:table-cell>
          <table:table-cell office:value-type="float" office:value="2.2032693674484705" table:formula="of:=([.CV121]*100/[.CV120])-100" table:style-name="ce25">
            <text:p>2.20</text:p>
          </table:table-cell>
          <table:table-cell office:value-type="float" office:value="1.5032693674484703" table:formula="of:=[.DE121]-[.CY121]" table:style-name="ce25">
            <text:p>1.50</text:p>
          </table:table-cell>
          <table:table-cell office:value-type="float" office:value="-2.7873447828504396" table:formula="of:=([.F121]*100/[.F120])-100" table:style-name="ce25">
            <text:p>-2.79</text:p>
          </table:table-cell>
          <table:table-cell office:value-type="float" office:value="3.7220879291238731" table:formula="of:=([.K121]*100/[.K120])-100" table:style-name="ce25">
            <text:p>3.72</text:p>
          </table:table-cell>
          <table:table-cell office:value-type="float" office:value="14.1" table:style-name="ce30">
            <text:p>14.1</text:p>
          </table:table-cell>
          <table:table-cell office:value-type="float" office:value="24.976336986728288" table:formula="of:=(([.DC121]-MIN([.DC107:.DC121]))/(MAX([.DC107:.DC121])-MIN([.DC107:.DC121])))*100" table:style-name="ce128">
            <text:p>25.0</text:p>
          </table:table-cell>
          <table:table-cell office:value-type="float" office:value="8.2156512474895358" table:formula="of:=MIN(100; MAX(0; (([.K121]-([.C121]/26/2))/(([.C121]/26)-([.C121]/26/2)))*100))" table:style-name="ce128">
            <text:p>8.2</text:p>
          </table:table-cell>
          <table:table-cell office:value-type="float" office:value="50.824566133859875" table:formula="of:=MIN(100; MAX(0; (([.F121]-([.C121]/26/2))/(([.C121]/26)-([.C121]/26/2)))*100))" table:style-name="ce128">
            <text:p>50.8</text:p>
          </table:table-cell>
          <table:table-cell office:value-type="float" office:value="48.378694462492533" table:formula="of:=(([.AP121]-MIN([.$AP$2:.$AP$128]))/(MAX([.$AP$2:.$AP$128])-MIN([.$AP$2:.$AP$128])))*100" table:style-name="ce128">
            <text:p>48.4</text:p>
          </table:table-cell>
          <table:table-cell office:value-type="float" office:value="35.415927341251638" table:formula="of:=MIN(100;MAX(0;(([.BP121]-1.8)/(2.2-1.8))*100))" table:style-name="ce128">
            <text:p>35.4</text:p>
          </table:table-cell>
          <table:table-cell office:value-type="float" office:value="100" table:formula="of:=100-((([.CC121]-MIN([.CC92:.CC121]))/(MAX([.CC92:.CC121])-MIN([.CC92:.CC121])))*100)" table:style-name="ce128">
            <text:p>100.0</text:p>
          </table:table-cell>
          <table:table-cell office:value-type="float" office:value="10.9" table:formula="of:=MIN(100; MAX(0; ((IF(AND([.DI121]-[.DI120]&gt;=-0.3;[.DI121]-[.DI120]&lt;=0.3);100;IF(AND([.DI121]-[.DI120]&gt;-1;[.DI121]-[.DI120]&lt;-0.3);50;IF([.DI121]-[.DI120]&lt;=-1;25;75)))))-[.DI121]+(IF(([.DI121]-[.DI120])*([.DI120]-[.DI119])&lt;0;AVERAGE([.DI117:.DI121]);0))))" table:style-name="ce128">
            <text:p>10.9</text:p>
          </table:table-cell>
          <table:table-cell office:value-type="string" table:style-name="ce118">
            <text:p>16,4</text:p>
          </table:table-cell>
          <table:table-cell office:value-type="float" office:value="39.815882310260257" table:formula="of:=AVERAGE([.DJ121:.DP121])" table:style-name="ce128">
            <text:p>39.8</text:p>
          </table:table-cell>
          <table:table-cell office:value-type="float" office:value="427.84000000000003" table:formula="of:=-0.06*(([.A121]-1963)^2)+8.5*([.A121]-1963)+140" table:style-name="ce23">
            <text:p>427.8</text:p>
          </table:table-cell>
          <table:table-cell table:number-columns-repeated="16261"/>
        </table:table-row>
        <table:table-row table:style-name="ro2">
          <table:table-cell office:value-type="float" office:value="2020" table:style-name="ce15">
            <text:p>2020</text:p>
          </table:table-cell>
          <table:table-cell office:value-type="float" office:value="47400798" table:style-name="ce10">
            <text:p>47400798</text:p>
          </table:table-cell>
          <table:table-cell office:value-type="float" office:value="17200985" table:style-name="ce8">
            <text:p>17200985</text:p>
          </table:table-cell>
          <table:table-cell office:value-type="float" office:value="24215544" table:style-name="ce8">
            <text:p>24215544</text:p>
          </table:table-cell>
          <table:table-cell office:value-type="float" office:value="40790748" table:style-name="ce78">
            <text:p>40790748</text:p>
          </table:table-cell>
          <table:table-cell office:value-type="float" office:value="415748" table:style-name="ce18">
            <text:p>415748</text:p>
          </table:table-cell>
          <table:table-cell office:value-type="float" office:value="151533" table:style-name="ce18">
            <text:p>151533</text:p>
          </table:table-cell>
          <table:table-cell office:value-type="float" office:value="20020" table:style-name="ce18">
            <text:p>20020</text:p>
          </table:table-cell>
          <table:table-cell office:value-type="float" office:value="1028" table:style-name="ce18">
            <text:p>1028</text:p>
          </table:table-cell>
          <table:table-cell office:value-type="float" office:value="178365" table:style-name="ce18">
            <text:p>178365</text:p>
          </table:table-cell>
          <table:table-cell office:value-type="float" office:value="333721" table:style-name="ce31">
            <text:p>333721</text:p>
          </table:table-cell>
          <table:table-cell office:value-type="float" office:value="274789" table:style-name="ce31">
            <text:p>274789</text:p>
          </table:table-cell>
          <table:table-cell office:value-type="float" office:value="45020403000" table:style-name="ce84">
            <text:p>4.5E+10</text:p>
          </table:table-cell>
          <table:table-cell office:value-type="float" office:value="134904.31528132781" table:formula="of:=[.M122]/[.K122]" table:style-name="ce26">
            <text:p>134904</text:p>
          </table:table-cell>
          <table:table-cell office:value-type="float" office:value="14717" table:style-name="ce31">
            <text:p>14717</text:p>
          </table:table-cell>
          <table:table-cell office:value-type="float" office:value="4716" table:style-name="ce31">
            <text:p>4716</text:p>
          </table:table-cell>
          <table:table-cell office:value-type="float" office:value="3.1206530958439354" table:formula="of:=[.O122]/[.P122]" table:style-name="ce67">
            <text:p>3.12</text:p>
          </table:table-cell>
          <table:table-cell office:value-type="float" office:value="72.945567304304447" table:formula="of:=([.N122]*100)/([.CV122]*(([.BL122]*([.BK122]/([.BF122]+[.BK122])))+([.BG122]*([.BF122]/([.BF122]+[.BK122])))))" table:style-name="ce67">
            <text:p>72.95</text:p>
          </table:table-cell>
          <table:table-cell office:value-type="float" office:value="-0.47995460900394732" table:formula="of:=(([.M122]*100/[.M121])-100)-[.CY122]" table:style-name="ce28">
            <text:p>-0.48</text:p>
          </table:table-cell>
          <table:table-cell office:value-type="float" office:value="504619000000" table:style-name="ce131">
            <text:p>5.05E+11</text:p>
          </table:table-cell>
          <table:table-cell office:value-type="float" office:value="1.7270000000000001" table:style-name="ce28">
            <text:p>1.73</text:p>
          </table:table-cell>
          <table:table-cell office:value-type="float" office:value="47.4" table:style-name="ce28">
            <text:p>47.40</text:p>
          </table:table-cell>
          <table:table-cell office:value-type="float" office:value="52.6" table:formula="of:=100-[.V122]" table:style-name="ce28">
            <text:p>52.60</text:p>
          </table:table-cell>
          <table:table-cell office:value-type="float" office:value="24" table:style-name="ce60">
            <text:p>24</text:p>
          </table:table-cell>
          <table:table-cell office:value-type="float" office:value="-0.30785454545454549" table:style-name="ce28">
            <text:p>-0.31</text:p>
          </table:table-cell>
          <table:table-cell office:value-type="float" office:value="1.1470583333333333" table:style-name="ce72">
            <text:p>1.15</text:p>
          </table:table-cell>
          <table:table-cell office:value-type="float" office:value="14449274000000" table:style-name="ce85">
            <text:p>1.44E+13</text:p>
          </table:table-cell>
          <table:table-cell office:value-type="float" office:value="11.345145450651856" table:formula="of:=([.AA122]*100/[.AA121])-100" table:style-name="ce70">
            <text:p>11.35</text:p>
          </table:table-cell>
          <table:table-cell office:value-type="float" office:value="10600.186686166666" table:style-name="ce68">
            <text:p>10600</text:p>
          </table:table-cell>
          <table:table-cell office:value-type="float" office:value="1548.6233333333332" table:style-name="ce75">
            <text:p>1549</text:p>
          </table:table-cell>
          <table:table-cell office:value-type="float" office:value="1129214000000" table:style-name="ce125">
            <text:p>1.12921E+12</text:p>
          </table:table-cell>
          <table:table-cell office:value-type="float" office:value="4284057188112" table:formula="of:=([.AW122]*[.AR122]*1000000)+([.CV122]*[.BS122]*86)+([.AS122]*(506006-[.AX122])*1000000)" table:style-name="ce83">
            <text:p>4.28E+12</text:p>
          </table:table-cell>
          <table:table-cell office:value-type="float" office:value="3260445776512" table:formula="of:=([.CV122]*[.BS122]*86)" table:style-name="ce125">
            <text:p>3.26045E+12</text:p>
          </table:table-cell>
          <table:table-cell office:value-type="float" office:value="743298000000" table:style-name="ce83">
            <text:p>7.43E+11</text:p>
          </table:table-cell>
          <table:table-cell office:value-type="float" office:value="18222.220391741776" table:formula="of:=[.AH122]/[.E122]" table:style-name="ce26">
            <text:p>18222</text:p>
          </table:table-cell>
          <table:table-cell office:value-type="float" office:value="16992.661259857934" table:formula="of:=[.AJ121]*(1+([.CY122]/100))" table:style-name="ce76">
            <text:p>16993</text:p>
          </table:table-cell>
          <table:table-cell office:value-type="float" office:value="22862.146354018023" table:formula="of:=[.AI122]+(12*PMT([.U122]/100/12;[.X122]*12;([.AI122]*5)*-1))" table:style-name="ce76">
            <text:p>22862</text:p>
          </table:table-cell>
          <table:table-cell office:value-type="float" office:value="20392.087400537082" table:formula="of:=[.AL121]*(1+(([.CW122]-[.CW121])/100))" table:style-name="ce76">
            <text:p>20392</text:p>
          </table:table-cell>
          <table:table-cell office:value-type="float" office:value="16854.683673394589" table:formula="of:=(([.AL122]+([.AJ122]-[.AI122])+([.AK122]-[.AI122]))-[.AI122])+[.$AI$101]" table:style-name="ce76">
            <text:p>16855</text:p>
          </table:table-cell>
          <table:table-cell office:value-type="float" office:value="110.17711089026565" table:formula="of:=[.AM122]*[.$AN$101]/[.$AM$101]" table:style-name="ce76">
            <text:p>110</text:p>
          </table:table-cell>
          <table:table-cell office:value-type="float" office:value="82.428256247077996" table:formula="of:=[.AI122]*[.$AO$101]/[.$AI$101]" table:style-name="ce76">
            <text:p>82</text:p>
          </table:table-cell>
          <table:table-cell office:value-type="float" office:value="34.139243752921999" table:formula="of:=[.CW122]-[.AO122]" table:style-name="ce118">
            <text:p>34</text:p>
          </table:table-cell>
          <table:table-cell office:value-type="float" office:value="26980.863056265564" table:formula="of:=[.N122]/5" table:style-name="ce26">
            <text:p>26981</text:p>
          </table:table-cell>
          <table:table-cell office:value-type="float" office:value="145.81" table:style-name="ce8">
            <text:p>146</text:p>
          </table:table-cell>
          <table:table-cell office:value-type="float" office:value="1.01" table:style-name="ce129">
            <text:p>1.01</text:p>
          </table:table-cell>
          <table:table-cell office:value-type="float" office:value="16207" table:style-name="ce18">
            <text:p>16207</text:p>
          </table:table-cell>
          <table:table-cell office:value-type="float" office:value="12441.97" table:style-name="ce78">
            <text:p>12442</text:p>
          </table:table-cell>
          <table:table-cell office:value-type="float" office:value="7504.5700000000006" table:style-name="ce78">
            <text:p>7505</text:p>
          </table:table-cell>
          <table:table-cell office:value-type="float" office:value="3586.06" table:style-name="ce78">
            <text:p>3586</text:p>
          </table:table-cell>
          <table:table-cell office:value-type="float" office:value="10235.700000000001" table:style-name="ce78">
            <text:p>10236</text:p>
          </table:table-cell>
          <table:table-cell office:value-type="float" office:value="71099" table:style-name="ce18">
            <text:p>71099</text:p>
          </table:table-cell>
          <table:table-cell office:value-type="float" office:value="22808" table:style-name="ce18">
            <text:p>22808</text:p>
          </table:table-cell>
          <table:table-cell office:value-type="float" office:value="45317" table:style-name="ce18">
            <text:p>45317</text:p>
          </table:table-cell>
          <table:table-cell office:value-type="float" office:value="2974" table:style-name="ce18">
            <text:p>2974</text:p>
          </table:table-cell>
          <table:table-cell office:value-type="float" office:value="68039" table:style-name="ce81">
            <text:p>68039</text:p>
          </table:table-cell>
          <table:table-cell office:value-type="float" office:value="45071" table:style-name="ce81">
            <text:p>45071</text:p>
          </table:table-cell>
          <table:table-cell office:value-type="float" office:value="654" table:style-name="ce81">
            <text:p>654</text:p>
          </table:table-cell>
          <table:table-cell office:value-type="float" office:value="20314" table:style-name="ce18">
            <text:p>20314</text:p>
          </table:table-cell>
          <table:table-cell office:value-type="float" office:value="195.01493287086069" table:style-name="ce5">
            <text:p>195</text:p>
          </table:table-cell>
          <table:table-cell office:value-type="float" office:value="2987751300.0000005" table:style-name="ce18">
            <text:p>2987751300</text:p>
          </table:table-cell>
          <table:table-cell office:value-type="float" office:value="147078.43359259627" table:formula="of:=[.BH122]/[.BF122]" table:style-name="ce51">
            <text:p>147078</text:p>
          </table:table-cell>
          <table:table-cell office:value-type="float" office:value="754.19062236629804" table:formula="of:=[.BI122]/[.BG122]" table:style-name="ce51">
            <text:p>754</text:p>
          </table:table-cell>
          <table:table-cell office:value-type="float" office:value="65191" table:style-name="ce18">
            <text:p>65191</text:p>
          </table:table-cell>
          <table:table-cell office:value-type="float" office:value="109.57353420146507" table:style-name="ce5">
            <text:p>110</text:p>
          </table:table-cell>
          <table:table-cell office:value-type="float" office:value="5413764100.000001" table:style-name="ce18">
            <text:p>5413764100</text:p>
          </table:table-cell>
          <table:table-cell office:value-type="float" office:value="83044.654937031199" table:formula="of:=[.BM122]/[.BK122]" table:style-name="ce55">
            <text:p>83045</text:p>
          </table:table-cell>
          <table:table-cell office:value-type="float" office:value="757.8897180074789" table:formula="of:=[.BN122]/[.BL122]" table:style-name="ce55">
            <text:p>758</text:p>
          </table:table-cell>
          <table:table-cell office:value-type="float" office:value="1.8834978036259582" table:formula="of:=[.CV122]/(([.BO122]+[.BJ122])/2)" table:style-name="ce58">
            <text:p>1.88</text:p>
          </table:table-cell>
          <table:table-cell office:value-type="float" office:value="-0.6451924257510484" table:formula="of:=[.BR122]-[.BR121]" table:style-name="ce57">
            <text:p>-0.6</text:p>
          </table:table-cell>
          <table:table-cell office:value-type="float" office:value="94.098570371871531" table:style-name="ce56">
            <text:p>94</text:p>
          </table:table-cell>
          <table:table-cell office:value-type="float" office:value="26623708" table:style-name="ce26">
            <text:p>26623708</text:p>
          </table:table-cell>
          <table:table-cell office:value-type="float" office:value="160638" table:formula="of:=[.BS122]-[.BS121]" table:style-name="ce26">
            <text:p>160638</text:p>
          </table:table-cell>
          <table:table-cell office:value-type="float" office:value="77531" table:style-name="ce76">
            <text:p>77531</text:p>
          </table:table-cell>
          <table:table-cell office:value-type="float" office:value="9038" table:style-name="ce76">
            <text:p>9038</text:p>
          </table:table-cell>
          <table:table-cell office:value-type="float" office:value="1.7803980572503275" table:formula="of:=([.B122]/[.BS122])" table:style-name="ce34">
            <text:p>1.78</text:p>
          </table:table-cell>
          <table:table-cell office:value-type="float" office:value="2.5099999999999998" table:style-name="ce71">
            <text:p>2.51</text:p>
          </table:table-cell>
          <table:table-cell office:value-type="float" office:value="1.18" table:style-name="ce71">
            <text:p>1.18</text:p>
          </table:table-cell>
          <table:table-cell office:value-type="float" office:value="0.60702707584569282" table:formula="of:=([.BS122]*100/[.BS121])-100" table:style-name="ce29">
            <text:p>0.6</text:p>
          </table:table-cell>
          <table:table-cell office:value-type="float" office:value="82748" table:formula="of:=([.B122]-[.B121])" table:style-name="ce73">
            <text:p>82748</text:p>
          </table:table-cell>
          <table:table-cell office:value-type="float" office:value="0.17487618361280965" table:formula="of:=([.B122]*100/[.B121])-100" table:style-name="ce25">
            <text:p>0.17</text:p>
          </table:table-cell>
          <table:table-cell office:value-type="float" office:value="127670.66932270916" table:formula="of:=[.BT122]-([.CA122]/[.BX122])" table:style-name="ce76">
            <text:p>127671</text:p>
          </table:table-cell>
          <table:table-cell office:value-type="float" office:value="1244100" table:style-name="ce76">
            <text:p>1244100</text:p>
          </table:table-cell>
          <table:table-cell office:value-type="float" office:value="13287.560000000001" table:style-name="ce8">
            <text:p>13288</text:p>
          </table:table-cell>
          <table:table-cell office:value-type="float" office:value="11.16" table:style-name="ce18">
            <text:p>11.16</text:p>
          </table:table-cell>
          <table:table-cell office:value-type="float" office:value="78.783311999999995" table:formula="of:=100-([.CF122]+[.CH122])" table:style-name="ce25">
            <text:p>78.78</text:p>
          </table:table-cell>
          <table:table-cell office:value-type="float" office:value="10.056688000000001" table:formula="of:=(11.32*(100-[.CF122]))/100" table:style-name="ce25">
            <text:p>10.06</text:p>
          </table:table-cell>
          <table:table-cell office:value-type="float" office:value="75.2" table:style-name="ce23">
            <text:p>75.2</text:p>
          </table:table-cell>
          <table:table-cell office:value-type="float" office:value="18" table:style-name="ce23">
            <text:p>18.0</text:p>
          </table:table-cell>
          <table:table-cell office:value-type="float" office:value="6.8" table:style-name="ce23">
            <text:p>6.8</text:p>
          </table:table-cell>
          <table:table-cell office:value-type="float" office:value="110.94199999999999" table:style-name="ce78">
            <text:p>111</text:p>
          </table:table-cell>
          <table:table-cell office:value-type="float" office:value="149.32432432432432" table:formula="of:=[.CN122]*[.$CM$117]/[.$CN$117]" table:style-name="ce78">
            <text:p>149</text:p>
          </table:table-cell>
          <table:table-cell office:value-type="float" office:value="11.05" table:style-name="ce23">
            <text:p>11.1</text:p>
          </table:table-cell>
          <table:table-cell office:value-type="float" office:value="3.7558685446009292" table:formula="of:=(([.CN122]*100)/[.CN121])-100" table:style-name="ce23">
            <text:p>3.8</text:p>
          </table:table-cell>
          <table:table-cell office:value-type="float" office:value="13.10646053293112" table:formula="of:=[.CR122]/([.CN122]*12)" table:style-name="ce23">
            <text:p>13.1</text:p>
          </table:table-cell>
          <table:table-cell office:value-type="float" office:value="17.475280710574825" table:formula="of:=[.CR122]/(([.CN122]*12)*0.75)" table:style-name="ce23">
            <text:p>17.5</text:p>
          </table:table-cell>
          <table:table-cell office:value-type="float" office:value="1737.9166666666667" table:formula="of:=AVERAGE([Quarterly.E54:.E57])" table:style-name="ce8">
            <text:p>1738</text:p>
          </table:table-cell>
          <table:table-cell office:value-type="float" office:value="634.28713773456275" table:formula="of:=PMT(([.U122]/100)/12;[.X122]*12;([.CR122]*86))*-1" table:style-name="ce78">
            <text:p>634</text:p>
          </table:table-cell>
          <table:table-cell office:value-type="float" office:value="112.90060632308361" table:formula="of:=[.CR122]*[.$CT$117]/[.$CR$117]" table:style-name="ce78">
            <text:p>113</text:p>
          </table:table-cell>
          <table:table-cell office:value-type="float" office:value="950.30000000000007" table:formula="of:=[.CN122]*86" table:style-name="ce78">
            <text:p>950</text:p>
          </table:table-cell>
          <table:table-cell office:value-type="float" office:value="1424" table:style-name="ce26">
            <text:p>1424</text:p>
          </table:table-cell>
          <table:table-cell office:value-type="float" office:value="116.5675" table:style-name="ce76">
            <text:p>117</text:p>
          </table:table-cell>
          <table:table-cell office:value-type="float" office:value="127.232" table:style-name="ce76">
            <text:p>127</text:p>
          </table:table-cell>
          <table:table-cell office:value-type="float" office:value="-0.32" table:style-name="ce25">
            <text:p>-0.32</text:p>
          </table:table-cell>
          <table:table-cell office:value-type="float" office:value="209.56" table:formula="of:=[.CZ121]+[.CY122]" table:style-name="ce23">
            <text:p>209.6</text:p>
          </table:table-cell>
          <table:table-cell office:value-type="float" office:value="934.58666525000024" table:formula="of:=(([.CV122]*[.CY122])/100)+[.DA121]" table:style-name="ce23">
            <text:p>934.6</text:p>
          </table:table-cell>
          <table:table-cell office:value-type="float" office:value="489.41333474999976" table:formula="of:=[.CV122]-[.DA122]" table:style-name="ce23">
            <text:p>489.4</text:p>
          </table:table-cell>
          <table:table-cell office:value-type="float" office:value="679.51899217407902" table:formula="of:=[.CV122]/[.CZ122]*[.$CZ$87]" table:style-name="ce23">
            <text:p>679.5</text:p>
          </table:table-cell>
          <table:table-cell office:value-type="float" office:value="-8.3318181818181819E-2" table:formula="of:=([.Y122]-[.Y121])" table:style-name="ce25">
            <text:p>-0.08</text:p>
          </table:table-cell>
          <table:table-cell office:value-type="float" office:value="-0.97357440890125702" table:formula="of:=([.CV122]*100/[.CV121])-100" table:style-name="ce25">
            <text:p>-0.97</text:p>
          </table:table-cell>
          <table:table-cell office:value-type="float" office:value="-0.65357440890125695" table:formula="of:=[.DE122]-[.CY122]" table:style-name="ce25">
            <text:p>-0.65</text:p>
          </table:table-cell>
          <table:table-cell office:value-type="float" office:value="-17.43594428314394" table:formula="of:=([.F122]*100/[.F121])-100" table:style-name="ce25">
            <text:p>-17.44</text:p>
          </table:table-cell>
          <table:table-cell office:value-type="float" office:value="-7.6309678347924574" table:formula="of:=([.K122]*100/[.K121])-100" table:style-name="ce25">
            <text:p>-7.63</text:p>
          </table:table-cell>
          <table:table-cell office:value-type="float" office:value="15.53" table:style-name="ce30">
            <text:p>15.5</text:p>
          </table:table-cell>
          <table:table-cell office:value-type="float" office:value="23.206921491958848" table:formula="of:=(([.DC122]-MIN([.DC108:.DC122]))/(MAX([.DC108:.DC122])-MIN([.DC108:.DC122])))*100" table:style-name="ce128">
            <text:p>23.2</text:p>
          </table:table-cell>
          <table:table-cell office:value-type="float" office:value="0.88661783031611685" table:formula="of:=MIN(100; MAX(0; (([.K122]-([.C122]/26/2))/(([.C122]/26)-([.C122]/26/2)))*100))" table:style-name="ce128">
            <text:p>0.9</text:p>
          </table:table-cell>
          <table:table-cell office:value-type="float" office:value="25.684058209457195" table:formula="of:=MIN(100; MAX(0; (([.F122]-([.C122]/26/2))/(([.C122]/26)-([.C122]/26/2)))*100))" table:style-name="ce128">
            <text:p>25.7</text:p>
          </table:table-cell>
          <table:table-cell office:value-type="float" office:value="54.228027543898925" table:formula="of:=(([.AP122]-MIN([.$AP$2:.$AP$128]))/(MAX([.$AP$2:.$AP$128])-MIN([.$AP$2:.$AP$128])))*100" table:style-name="ce128">
            <text:p>54.2</text:p>
          </table:table-cell>
          <table:table-cell office:value-type="float" office:value="20.874450906489532" table:formula="of:=MIN(100;MAX(0;(([.BP122]-1.8)/(2.2-1.8))*100))" table:style-name="ce128">
            <text:p>20.9</text:p>
          </table:table-cell>
          <table:table-cell office:value-type="float" office:value="67.246726914013792" table:formula="of:=100-((([.CC122]-MIN([.CC93:.CC122]))/(MAX([.CC93:.CC122])-MIN([.CC93:.CC122])))*100)" table:style-name="ce128">
            <text:p>67.2</text:p>
          </table:table-cell>
          <table:table-cell office:value-type="float" office:value="75.816000000000003" table:formula="of:=MIN(100; MAX(0; ((IF(AND([.DI122]-[.DI121]&gt;=-0.3;[.DI122]-[.DI121]&lt;=0.3);100;IF(AND([.DI122]-[.DI121]&gt;-1;[.DI122]-[.DI121]&lt;-0.3);50;IF([.DI122]-[.DI121]&lt;=-1;25;75)))))-[.DI122]+(IF(([.DI122]-[.DI121])*([.DI121]-[.DI120])&lt;0;AVERAGE([.DI118:.DI122]);0))))" table:style-name="ce128">
            <text:p>75.8</text:p>
          </table:table-cell>
          <table:table-cell office:value-type="float" office:value="17" table:style-name="ce119">
            <text:p>17.0</text:p>
          </table:table-cell>
          <table:table-cell office:value-type="float" office:value="38.277543270876336" table:formula="of:=AVERAGE([.DJ122:.DP122])" table:style-name="ce128">
            <text:p>38.3</text:p>
          </table:table-cell>
          <table:table-cell office:value-type="float" office:value="429.56" table:formula="of:=-0.06*(([.A122]-1963)^2)+8.5*([.A122]-1963)+140" table:style-name="ce23">
            <text:p>429.6</text:p>
          </table:table-cell>
          <table:table-cell table:number-columns-repeated="16261"/>
        </table:table-row>
        <table:table-row table:style-name="ro2">
          <table:table-cell office:value-type="float" office:value="2021" table:style-name="ce15">
            <text:p>2021</text:p>
          </table:table-cell>
          <table:table-cell office:value-type="float" office:value="47486727" table:style-name="ce13">
            <text:p>47486727</text:p>
          </table:table-cell>
          <table:table-cell office:value-type="float" office:value="16970457" table:style-name="ce26">
            <text:p>16970457</text:p>
          </table:table-cell>
          <table:table-cell office:value-type="float" office:value="24080927" table:style-name="ce26">
            <text:p>24080927</text:p>
          </table:table-cell>
          <table:table-cell office:value-type="float" office:value="41012609" table:style-name="ce76">
            <text:p>41012609</text:p>
          </table:table-cell>
          <table:table-cell office:value-type="float" office:value="565523" table:style-name="ce26">
            <text:p>565523</text:p>
          </table:table-cell>
          <table:table-cell office:value-type="float" office:value="198939" table:style-name="ce26">
            <text:p>198939</text:p>
          </table:table-cell>
          <table:table-cell office:value-type="float" office:value="25062" table:style-name="ce31">
            <text:p>25062</text:p>
          </table:table-cell>
          <table:table-cell office:value-type="float" office:value="1500" table:style-name="ce12">
            <text:p>1500</text:p>
          </table:table-cell>
          <table:table-cell office:value-type="float" office:value="195881" table:style-name="ce31">
            <text:p>195881</text:p>
          </table:table-cell>
          <table:table-cell office:value-type="float" office:value="417501" table:style-name="ce31">
            <text:p>417501</text:p>
          </table:table-cell>
          <table:table-cell office:value-type="float" office:value="372543" table:style-name="ce31">
            <text:p>372543</text:p>
          </table:table-cell>
          <table:table-cell office:value-type="float" office:value="57582131000" table:style-name="ce84">
            <text:p>5.8E+10</text:p>
          </table:table-cell>
          <table:table-cell office:value-type="float" office:value="137920.94150672693" table:formula="of:=[.M123]/[.K123]" table:style-name="ce26">
            <text:p>137921</text:p>
          </table:table-cell>
          <table:table-cell office:value-type="float" office:value="33455" table:style-name="ce31">
            <text:p>33455</text:p>
          </table:table-cell>
          <table:table-cell office:value-type="float" office:value="10539" table:style-name="ce31">
            <text:p>10539</text:p>
          </table:table-cell>
          <table:table-cell office:value-type="float" office:value="3.1743998481829396" table:formula="of:=[.O123]/[.P123]" table:style-name="ce67">
            <text:p>3.17</text:p>
          </table:table-cell>
          <table:table-cell office:value-type="float" office:value="70.861034047549069" table:formula="of:=([.N123]*100)/([.CV123]*(([.BL123]*([.BK123]/([.BF123]+[.BK123])))+([.BG123]*([.BF123]/([.BF123]+[.BK123])))))" table:style-name="ce67">
            <text:p>70.86</text:p>
          </table:table-cell>
          <table:table-cell office:value-type="float" office:value="24.812300208196721" table:formula="of:=(([.M123]*100/[.M122])-100)-[.CY123]" table:style-name="ce28">
            <text:p>24.81</text:p>
          </table:table-cell>
          <table:table-cell office:value-type="float" office:value="511346000000" table:style-name="ce131">
            <text:p>5.11E+11</text:p>
          </table:table-cell>
          <table:table-cell office:value-type="float" office:value="1.508" table:style-name="ce28">
            <text:p>1.51</text:p>
          </table:table-cell>
          <table:table-cell office:value-type="float" office:value="62.9" table:style-name="ce28">
            <text:p>62.90</text:p>
          </table:table-cell>
          <table:table-cell office:value-type="float" office:value="37.1" table:formula="of:=100-[.V123]" table:style-name="ce28">
            <text:p>37.10</text:p>
          </table:table-cell>
          <table:table-cell office:value-type="float" office:value="25" table:style-name="ce60">
            <text:p>25</text:p>
          </table:table-cell>
          <table:table-cell office:value-type="float" office:value="-0.4896727272727272" table:style-name="ce28">
            <text:p>-0.49</text:p>
          </table:table-cell>
          <table:table-cell office:value-type="float" office:value="1.1796583333333335" table:style-name="ce72">
            <text:p>1.18</text:p>
          </table:table-cell>
          <table:table-cell office:value-type="float" office:value="15463433000000" table:style-name="ce85">
            <text:p>1.55E+13</text:p>
          </table:table-cell>
          <table:table-cell office:value-type="float" office:value="7.0187540218283573" table:formula="of:=([.AA123]*100/[.AA122])-100" table:style-name="ce70">
            <text:p>7.02</text:p>
          </table:table-cell>
          <table:table-cell office:value-type="float" office:value="39995.684733083333" table:style-name="ce68">
            <text:p>39996</text:p>
          </table:table-cell>
          <table:table-cell office:value-type="float" office:value="1518.2150000000001" table:style-name="ce75">
            <text:p>1518</text:p>
          </table:table-cell>
          <table:table-cell office:value-type="float" office:value="1235474000000" table:style-name="ce125">
            <text:p>1.23547E+12</text:p>
          </table:table-cell>
          <table:table-cell office:value-type="float" office:value="4524889319420" table:formula="of:=([.AW123]*[.AR123]*1000000)+([.CV123]*[.BS123]*86)+([.AS123]*(506006-[.AX123])*1000000)" table:style-name="ce83">
            <text:p>4.52E+12</text:p>
          </table:table-cell>
          <table:table-cell office:value-type="float" office:value="3479038510620" table:formula="of:=([.CV123]*[.BS123]*86)" table:style-name="ce125">
            <text:p>3.47904E+12</text:p>
          </table:table-cell>
          <table:table-cell office:value-type="float" office:value="779765000000" table:style-name="ce83">
            <text:p>7.80E+11</text:p>
          </table:table-cell>
          <table:table-cell office:value-type="float" office:value="19012.811401488747" table:formula="of:=[.AH123]/[.E123]" table:style-name="ce26">
            <text:p>19013</text:p>
          </table:table-cell>
          <table:table-cell office:value-type="float" office:value="17517.734492787542" table:formula="of:=[.AJ122]*(1+([.CY123]/100))" table:style-name="ce76">
            <text:p>17518</text:p>
          </table:table-cell>
          <table:table-cell office:value-type="float" office:value="23579.448910561492" table:formula="of:=[.AI123]+(12*PMT([.U123]/100/12;[.X123]*12;([.AI123]*5)*-1))" table:style-name="ce76">
            <text:p>23579</text:p>
          </table:table-cell>
          <table:table-cell office:value-type="float" office:value="22246.237947430916" table:formula="of:=[.AL122]*(1+(([.CW123]-[.CW122])/100))" table:style-name="ce76">
            <text:p>22246</text:p>
          </table:table-cell>
          <table:table-cell office:value-type="float" office:value="17579.436980520586" table:formula="of:=(([.AL123]+([.AJ123]-[.AI123])+([.AK123]-[.AI123]))-[.AI123])+[.$AI$101]" table:style-name="ce76">
            <text:p>17579</text:p>
          </table:table-cell>
          <table:table-cell office:value-type="float" office:value="114.91473913856996" table:formula="of:=[.AM123]*[.$AN$101]/[.$AM$101]" table:style-name="ce76">
            <text:p>115</text:p>
          </table:table-cell>
          <table:table-cell office:value-type="float" office:value="86.004496515118703" table:formula="of:=[.AI123]*[.$AO$101]/[.$AI$101]" table:style-name="ce76">
            <text:p>86</text:p>
          </table:table-cell>
          <table:table-cell office:value-type="float" office:value="39.655503484881294" table:formula="of:=[.CW123]-[.AO123]" table:style-name="ce118">
            <text:p>40</text:p>
          </table:table-cell>
          <table:table-cell office:value-type="float" office:value="27584.188301345384" table:formula="of:=[.N123]/5" table:style-name="ce26">
            <text:p>27584</text:p>
          </table:table-cell>
          <table:table-cell office:value-type="float" office:value="151.19999999999999" table:style-name="ce26">
            <text:p>151</text:p>
          </table:table-cell>
          <table:table-cell office:value-type="float" office:value="1.01" table:style-name="ce129">
            <text:p>1.01</text:p>
          </table:table-cell>
          <table:table-cell office:value-type="float" office:value="29826" table:style-name="ce18">
            <text:p>29826</text:p>
          </table:table-cell>
          <table:table-cell office:value-type="float" office:value="19784.41" table:style-name="ce78">
            <text:p>19784</text:p>
          </table:table-cell>
          <table:table-cell office:value-type="float" office:value="15037.550000000001" table:style-name="ce78">
            <text:p>15038</text:p>
          </table:table-cell>
          <table:table-cell office:value-type="float" office:value="3605.8" table:style-name="ce78">
            <text:p>3606</text:p>
          </table:table-cell>
          <table:table-cell office:value-type="float" office:value="10309.120000000001" table:style-name="ce78">
            <text:p>10309</text:p>
          </table:table-cell>
          <table:table-cell office:value-type="float" office:value="82647" table:style-name="ce31">
            <text:p>82647</text:p>
          </table:table-cell>
          <table:table-cell office:value-type="float" office:value="28465" table:style-name="ce31">
            <text:p>28465</text:p>
          </table:table-cell>
          <table:table-cell office:value-type="float" office:value="50560" table:style-name="ce31">
            <text:p>50560</text:p>
          </table:table-cell>
          <table:table-cell office:value-type="float" office:value="3622" table:style-name="ce31">
            <text:p>3622</text:p>
          </table:table-cell>
          <table:table-cell office:value-type="float" office:value="84329" table:style-name="ce104">
            <text:p>84329</text:p>
          </table:table-cell>
          <table:table-cell office:value-type="float" office:value="52985" table:style-name="ce104">
            <text:p>52985</text:p>
          </table:table-cell>
          <table:table-cell office:value-type="float" office:value="1461" table:style-name="ce104">
            <text:p>1461</text:p>
          </table:table-cell>
          <table:table-cell office:value-type="float" office:value="26576" table:style-name="ce31">
            <text:p>26576</text:p>
          </table:table-cell>
          <table:table-cell office:value-type="float" office:value="192.91200151575268" table:style-name="ce44">
            <text:p>193</text:p>
          </table:table-cell>
          <table:table-cell office:value-type="float" office:value="3909758900" table:style-name="ce31">
            <text:p>3909758900</text:p>
          </table:table-cell>
          <table:table-cell office:value-type="float" office:value="147116.15367248646" table:formula="of:=[.BH123]/[.BF123]" table:style-name="ce51">
            <text:p>147116</text:p>
          </table:table-cell>
          <table:table-cell office:value-type="float" office:value="762.60757504230935" table:formula="of:=[.BI123]/[.BG123]" table:style-name="ce51">
            <text:p>763</text:p>
          </table:table-cell>
          <table:table-cell office:value-type="float" office:value="81561" table:style-name="ce31">
            <text:p>81561</text:p>
          </table:table-cell>
          <table:table-cell office:value-type="float" office:value="107.58787794061321" table:style-name="ce44">
            <text:p>108</text:p>
          </table:table-cell>
          <table:table-cell office:value-type="float" office:value="6738291700" table:style-name="ce31">
            <text:p>6738291700</text:p>
          </table:table-cell>
          <table:table-cell office:value-type="float" office:value="82616.59003690489" table:formula="of:=[.BM123]/[.BK123]" table:style-name="ce55">
            <text:p>82617</text:p>
          </table:table-cell>
          <table:table-cell office:value-type="float" office:value="767.89868541238377" table:formula="of:=[.BN123]/[.BL123]" table:style-name="ce55">
            <text:p>768</text:p>
          </table:table-cell>
          <table:table-cell office:value-type="float" office:value="1.9784303261199476" table:formula="of:=[.CV123]/(([.BO123]+[.BJ123])/2)" table:style-name="ce58">
            <text:p>1.98</text:p>
          </table:table-cell>
          <table:table-cell office:value-type="float" office:value="5.9014444620346183" table:formula="of:=[.BR123]-[.BR122]" table:style-name="ce57">
            <text:p>5.9</text:p>
          </table:table-cell>
          <table:table-cell office:value-type="float" office:value="100.00001483390615" table:style-name="ce56">
            <text:p>100</text:p>
          </table:table-cell>
          <table:table-cell office:value-type="float" office:value="26719905" table:style-name="ce26">
            <text:p>26719905</text:p>
          </table:table-cell>
          <table:table-cell office:value-type="float" office:value="96197" table:formula="of:=[.BS123]-[.BS122]" table:style-name="ce26">
            <text:p>96197</text:p>
          </table:table-cell>
          <table:table-cell office:value-type="float" office:value="84091" table:style-name="ce76">
            <text:p>84091</text:p>
          </table:table-cell>
          <table:table-cell office:value-type="float" office:value="9567" table:style-name="ce76">
            <text:p>9567</text:p>
          </table:table-cell>
          <table:table-cell office:value-type="float" office:value="1.7772041854190723" table:formula="of:=([.B123]/[.BS123])" table:style-name="ce34">
            <text:p>1.78</text:p>
          </table:table-cell>
          <table:table-cell office:value-type="float" office:value="2.4900000000000002" table:style-name="ce71">
            <text:p>2.49</text:p>
          </table:table-cell>
          <table:table-cell office:value-type="float" office:value="1.181" table:style-name="ce71">
            <text:p>1.18</text:p>
          </table:table-cell>
          <table:table-cell office:value-type="float" office:value="0.36132081977461894" table:formula="of:=([.BS123]*100/[.BS122])-100" table:style-name="ce29">
            <text:p>0.4</text:p>
          </table:table-cell>
          <table:table-cell office:value-type="float" office:value="85929" table:formula="of:=([.B123]-[.B122])" table:style-name="ce73">
            <text:p>85929</text:p>
          </table:table-cell>
          <table:table-cell office:value-type="float" office:value="0.18128175816787007" table:formula="of:=([.B123]*100/[.B122])-100" table:style-name="ce25">
            <text:p>0.18</text:p>
          </table:table-cell>
          <table:table-cell office:value-type="float" office:value="61687.361445783135" table:formula="of:=[.BT123]-([.CA123]/[.BX123])" table:style-name="ce76">
            <text:p>61687</text:p>
          </table:table-cell>
          <table:table-cell office:value-type="float" office:value="1291500" table:style-name="ce76">
            <text:p>1291500</text:p>
          </table:table-cell>
          <table:table-cell office:value-type="float" office:value="14933" table:style-name="ce26">
            <text:p>14933</text:p>
          </table:table-cell>
          <table:table-cell office:value-type="float" office:value="9.44" table:style-name="ce18">
            <text:p>9.44</text:p>
          </table:table-cell>
          <table:table-cell office:value-type="float" office:value="80.779519999999991" table:formula="of:=100-([.CF123]+[.CH123])" table:style-name="ce25">
            <text:p>80.78</text:p>
          </table:table-cell>
          <table:table-cell office:value-type="float" office:value="9.7804800000000007" table:formula="of:=(10.8*(100-[.CF123]))/100" table:style-name="ce25">
            <text:p>9.78</text:p>
          </table:table-cell>
          <table:table-cell office:value-type="float" office:value="75.8" table:style-name="ce23">
            <text:p>75.8</text:p>
          </table:table-cell>
          <table:table-cell office:value-type="float" office:value="18" table:style-name="ce23">
            <text:p>18.0</text:p>
          </table:table-cell>
          <table:table-cell office:value-type="float" office:value="6.2" table:style-name="ce23">
            <text:p>6.2</text:p>
          </table:table-cell>
          <table:table-cell office:value-type="float" office:value="112.694" table:style-name="ce78">
            <text:p>113</text:p>
          </table:table-cell>
          <table:table-cell office:value-type="float" office:value="146.62162162162161" table:formula="of:=[.CN123]*[.$CM$117]/[.$CN$117]" table:style-name="ce78">
            <text:p>147</text:p>
          </table:table-cell>
          <table:table-cell office:value-type="float" office:value="10.85" table:style-name="ce23">
            <text:p>10.9</text:p>
          </table:table-cell>
          <table:table-cell office:value-type="float" office:value="-1.8099547511312295" table:formula="of:=(([.CN123]*100)/[.CN122])-100" table:style-name="ce23">
            <text:p>-1.8</text:p>
          </table:table-cell>
          <table:table-cell office:value-type="float" office:value="13.886328725038402" table:formula="of:=[.CR123]/([.CN123]*12)" table:style-name="ce23">
            <text:p>13.9</text:p>
          </table:table-cell>
          <table:table-cell office:value-type="float" office:value="18.515104966717868" table:formula="of:=[.CR123]/(([.CN123]*12)*0.75)" table:style-name="ce23">
            <text:p>18.5</text:p>
          </table:table-cell>
          <table:table-cell office:value-type="float" office:value="1807.9999999999998" table:formula="of:=AVERAGE([Quarterly.E58:.E61])" table:style-name="ce8">
            <text:p>1808</text:p>
          </table:table-cell>
          <table:table-cell office:value-type="float" office:value="622.43760975744294" table:formula="of:=PMT(([.U123]/100)/12;[.X123]*12;([.CR123]*86))*-1" table:style-name="ce78">
            <text:p>622</text:p>
          </table:table-cell>
          <table:table-cell office:value-type="float" office:value="117.45344304893892" table:formula="of:=[.CR123]*[.$CT$117]/[.$CR$117]" table:style-name="ce78">
            <text:p>117</text:p>
          </table:table-cell>
          <table:table-cell office:value-type="float" office:value="933.1" table:formula="of:=[.CN123]*86" table:style-name="ce78">
            <text:p>933</text:p>
          </table:table-cell>
          <table:table-cell office:value-type="float" office:value="1514" table:style-name="ce35">
            <text:p>1514</text:p>
          </table:table-cell>
          <table:table-cell office:value-type="float" office:value="125.66" table:style-name="ce76">
            <text:p>126</text:p>
          </table:table-cell>
          <table:table-cell office:value-type="float" office:value="131.928" table:style-name="ce35">
            <text:p>132</text:p>
          </table:table-cell>
          <table:table-cell office:value-type="float" office:value="3.09" table:style-name="ce34">
            <text:p>3.09</text:p>
          </table:table-cell>
          <table:table-cell office:value-type="float" office:value="212.65" table:formula="of:=[.CZ122]+[.CY123]" table:style-name="ce23">
            <text:p>212.7</text:p>
          </table:table-cell>
          <table:table-cell office:value-type="float" office:value="981.36926525000024" table:formula="of:=(([.CV123]*[.CY123])/100)+[.DA122]" table:style-name="ce23">
            <text:p>981.4</text:p>
          </table:table-cell>
          <table:table-cell office:value-type="float" office:value="532.63073474999976" table:formula="of:=[.CV123]-[.DA123]" table:style-name="ce29">
            <text:p>532.6</text:p>
          </table:table-cell>
          <table:table-cell office:value-type="float" office:value="711.96802257230183" table:formula="of:=[.CV123]/[.CZ123]*[.$CZ$87]" table:style-name="ce23">
            <text:p>712.0</text:p>
          </table:table-cell>
          <table:table-cell office:value-type="float" office:value="-0.18181818181818171" table:formula="of:=([.Y123]-[.Y122])" table:style-name="ce25">
            <text:p>-0.18</text:p>
          </table:table-cell>
          <table:table-cell office:value-type="float" office:value="6.3202247191011196" table:formula="of:=([.CV123]*100/[.CV122])-100" table:style-name="ce34">
            <text:p>6.32</text:p>
          </table:table-cell>
          <table:table-cell office:value-type="float" office:value="3.2302247191011197" table:formula="of:=[.DE123]-[.CY123]" table:style-name="ce25">
            <text:p>3.23</text:p>
          </table:table-cell>
          <table:table-cell office:value-type="float" office:value="36.025428865562787" table:formula="of:=([.F123]*100/[.F122])-100" table:style-name="ce25">
            <text:p>36.03</text:p>
          </table:table-cell>
          <table:table-cell office:value-type="float" office:value="25.104803113978448" table:formula="of:=([.K123]*100/[.K122])-100" table:style-name="ce25">
            <text:p>25.10</text:p>
          </table:table-cell>
          <table:table-cell office:value-type="float" office:value="14.8" table:style-name="ce29">
            <text:p>14.8</text:p>
          </table:table-cell>
          <table:table-cell office:value-type="float" office:value="33.397096738733232" table:formula="of:=(([.DC123]-MIN([.DC109:.DC123]))/(MAX([.DC109:.DC123])-MIN([.DC109:.DC123])))*100" table:style-name="ce128">
            <text:p>33.4</text:p>
          </table:table-cell>
          <table:table-cell office:value-type="float" office:value="27.928505402064303" table:formula="of:=MIN(100; MAX(0; (([.K123]-([.C123]/26/2))/(([.C123]/26)-([.C123]/26/2)))*100))" table:style-name="ce128">
            <text:p>27.9</text:p>
          </table:table-cell>
          <table:table-cell office:value-type="float" office:value="73.284644014006219" table:formula="of:=MIN(100; MAX(0; (([.F123]-([.C123]/26/2))/(([.C123]/26)-([.C123]/26/2)))*100))" table:style-name="ce128">
            <text:p>73.3</text:p>
          </table:table-cell>
          <table:table-cell office:value-type="float" office:value="62.883143061868097" table:formula="of:=(([.AP123]-MIN([.$AP$2:.$AP$128]))/(MAX([.$AP$2:.$AP$128])-MIN([.$AP$2:.$AP$128])))*100" table:style-name="ce128">
            <text:p>62.9</text:p>
          </table:table-cell>
          <table:table-cell office:value-type="float" office:value="44.607581529986881" table:formula="of:=MIN(100;MAX(0;(([.BP123]-1.8)/(2.2-1.8))*100))" table:style-name="ce128">
            <text:p>44.6</text:p>
          </table:table-cell>
          <table:table-cell office:value-type="float" office:value="82.831115627046955" table:formula="of:=100-((([.CC123]-MIN([.CC94:.CC123]))/(MAX([.CC94:.CC123])-MIN([.CC94:.CC123])))*100)" table:style-name="ce128">
            <text:p>82.8</text:p>
          </table:table-cell>
          <table:table-cell office:value-type="float" office:value="50.580000000000005" table:formula="of:=MIN(100; MAX(0; ((IF(AND([.DI123]-[.DI122]&gt;=-0.3;[.DI123]-[.DI122]&lt;=0.3);100;IF(AND([.DI123]-[.DI122]&gt;-1;[.DI123]-[.DI122]&lt;-0.3);50;IF([.DI123]-[.DI122]&lt;=-1;25;75)))))-[.DI123]+(IF(([.DI123]-[.DI122])*([.DI122]-[.DI121])&lt;0;AVERAGE([.DI119:.DI123]);0))))" table:style-name="ce128">
            <text:p>50.6</text:p>
          </table:table-cell>
          <table:table-cell office:value-type="string" table:style-name="ce118">
            <text:p>18,9</text:p>
          </table:table-cell>
          <table:table-cell office:value-type="float" office:value="53.644583767672245" table:formula="of:=AVERAGE([.DJ123:.DP123])" table:style-name="ce128">
            <text:p>53.6</text:p>
          </table:table-cell>
          <table:table-cell office:value-type="float" office:value="431.15999999999997" table:formula="of:=-0.06*(([.A123]-1963)^2)+8.5*([.A123]-1963)+140" table:style-name="ce23">
            <text:p>431.2</text:p>
          </table:table-cell>
          <table:table-cell table:number-columns-repeated="16261"/>
        </table:table-row>
        <table:table-row table:style-name="ro2">
          <table:table-cell office:value-type="float" office:value="2022" table:style-name="ce15">
            <text:p>2022</text:p>
          </table:table-cell>
          <table:table-cell office:value-type="float" office:value="48085361" table:style-name="ce13">
            <text:p>48085361</text:p>
          </table:table-cell>
          <table:table-cell office:value-type="float" office:value="17037572" table:style-name="ce26">
            <text:p>17037572</text:p>
          </table:table-cell>
          <table:table-cell office:value-type="float" office:value="24294602" table:style-name="ce26">
            <text:p>24294602</text:p>
          </table:table-cell>
          <table:table-cell office:value-type="float" office:value="41624914" table:style-name="ce76">
            <text:p>41624914</text:p>
          </table:table-cell>
          <table:table-cell office:value-type="float" office:value="649494" table:style-name="ce86">
            <text:p>649494</text:p>
          </table:table-cell>
          <table:table-cell office:value-type="float" office:value="197021" table:style-name="ce26">
            <text:p>197021</text:p>
          </table:table-cell>
          <table:table-cell office:value-type="float" office:value="22549" table:style-name="ce31">
            <text:p>22549</text:p>
          </table:table-cell>
          <table:table-cell office:value-type="float" office:value="1250" table:style-name="ce13">
            <text:p>1250</text:p>
          </table:table-cell>
          <table:table-cell office:value-type="float" office:value="194205" table:style-name="ce31">
            <text:p>194205</text:p>
          </table:table-cell>
          <table:table-cell office:value-type="float" office:value="463614" table:style-name="ce31">
            <text:p>463614</text:p>
          </table:table-cell>
          <table:table-cell office:value-type="float" office:value="394013" table:style-name="ce31">
            <text:p>394013</text:p>
          </table:table-cell>
          <table:table-cell office:value-type="float" office:value="67460681000" table:style-name="ce84">
            <text:p>6.7E+10</text:p>
          </table:table-cell>
          <table:table-cell office:value-type="float" office:value="145510.44834711635" table:formula="of:=[.M124]/[.K124]" table:style-name="ce26">
            <text:p>145510</text:p>
          </table:table-cell>
          <table:table-cell office:value-type="float" office:value="21304" table:style-name="ce31">
            <text:p>21304</text:p>
          </table:table-cell>
          <table:table-cell office:value-type="float" office:value="6221" table:style-name="ce31">
            <text:p>6221</text:p>
          </table:table-cell>
          <table:table-cell office:value-type="float" office:value="3.4245298183571773" table:formula="of:=[.O124]/[.P124]" table:style-name="ce67">
            <text:p>3.42</text:p>
          </table:table-cell>
          <table:table-cell office:value-type="float" office:value="69.914251832253768" table:formula="of:=([.N124]*100)/([.CV124]*(([.BL124]*([.BK124]/([.BF124]+[.BK124])))+([.BG124]*([.BF124]/([.BF124]+[.BK124])))))" table:style-name="ce67">
            <text:p>69.91</text:p>
          </table:table-cell>
          <table:table-cell office:value-type="float" office:value="8.7555825191672678" table:formula="of:=(([.M124]*100/[.M123])-100)-[.CY124]" table:style-name="ce65">
            <text:p>8.76</text:p>
          </table:table-cell>
          <table:table-cell office:value-type="float" office:value="510983000000" table:style-name="ce131">
            <text:p>5.11E+11</text:p>
          </table:table-cell>
          <table:table-cell office:value-type="float" office:value="2.0579999999999998" table:style-name="ce65">
            <text:p>2.06</text:p>
          </table:table-cell>
          <table:table-cell office:value-type="float" office:value="70.900000000000006" table:style-name="ce65">
            <text:p>70.90</text:p>
          </table:table-cell>
          <table:table-cell office:value-type="float" office:value="29.099999999999994" table:formula="of:=100-[.V124]" table:style-name="ce28">
            <text:p>29.10</text:p>
          </table:table-cell>
          <table:table-cell office:value-type="float" office:value="24" table:style-name="ce26">
            <text:p>24</text:p>
          </table:table-cell>
          <table:table-cell office:value-type="float" office:value="1.0880000000000001" table:style-name="ce34">
            <text:p>1.09</text:p>
          </table:table-cell>
          <table:table-cell office:value-type="float" office:value="1.052225" table:style-name="ce71">
            <text:p>1.05</text:p>
          </table:table-cell>
          <table:table-cell office:value-type="float" office:value="16083941000000" table:style-name="ce83">
            <text:p>1.61E+13</text:p>
          </table:table-cell>
          <table:table-cell office:value-type="float" office:value="4.0127441299742372" table:formula="of:=([.AA124]*100/[.AA123])-100" table:style-name="ce70">
            <text:p>4.01</text:p>
          </table:table-cell>
          <table:table-cell office:value-type="float" office:value="26159.403401916668" table:style-name="ce76">
            <text:p>26159</text:p>
          </table:table-cell>
          <table:table-cell office:value-type="float" office:value="1708.9024999999999" table:style-name="ce76">
            <text:p>1709</text:p>
          </table:table-cell>
          <table:table-cell office:value-type="float" office:value="1375863000000" table:style-name="ce125">
            <text:p>1.37586E+12</text:p>
          </table:table-cell>
          <table:table-cell office:value-type="float" office:value="4812990465122" table:formula="of:=([.AW124]*[.AR124]*1000000)+([.CV124]*[.BS124]*86)+([.AS124]*(506006-[.AX124])*1000000)" table:style-name="ce83">
            <text:p>4.81E+12</text:p>
          </table:table-cell>
          <table:table-cell office:value-type="float" office:value="3733118755922" table:formula="of:=([.CV124]*[.BS124]*86)" table:style-name="ce125">
            <text:p>3.73312E+12</text:p>
          </table:table-cell>
          <table:table-cell office:value-type="float" office:value="818935000000" table:style-name="ce83">
            <text:p>8.19E+11</text:p>
          </table:table-cell>
          <table:table-cell office:value-type="float" office:value="19674.154762217648" table:formula="of:=[.AH124]/[.E124]" table:style-name="ce26">
            <text:p>19674</text:p>
          </table:table-cell>
          <table:table-cell office:value-type="float" office:value="18989.224190181696" table:formula="of:=[.AJ123]*(1+([.CY124]/100))" table:style-name="ce76">
            <text:p>18989</text:p>
          </table:table-cell>
          <table:table-cell office:value-type="float" office:value="24871.605817491873" table:formula="of:=[.AI124]+(12*PMT([.U124]/100/12;[.X124]*12;([.AI124]*5)*-1))" table:style-name="ce76">
            <text:p>24872</text:p>
          </table:table-cell>
          <table:table-cell office:value-type="float" office:value="24348.507433463143" table:formula="of:=[.AL123]*(1+(([.CW124]-[.CW123])/100))" table:style-name="ce76">
            <text:p>24349</text:p>
          </table:table-cell>
          <table:table-cell office:value-type="float" office:value="20461.322988690648" table:formula="of:=(([.AL124]+([.AJ124]-[.AI124])+([.AK124]-[.AI124]))-[.AI124])+[.$AI$101]" table:style-name="ce76">
            <text:p>20461</text:p>
          </table:table-cell>
          <table:table-cell office:value-type="float" office:value="133.75329348037974" table:formula="of:=[.AM124]*[.$AN$101]/[.$AM$101]" table:style-name="ce76">
            <text:p>134</text:p>
          </table:table-cell>
          <table:table-cell office:value-type="float" office:value="88.996084742762505" table:formula="of:=[.AI124]*[.$AO$101]/[.$AI$101]" table:style-name="ce76">
            <text:p>89</text:p>
          </table:table-cell>
          <table:table-cell office:value-type="float" office:value="46.113915257237508" table:formula="of:=[.CW124]-[.AO124]" table:style-name="ce118">
            <text:p>46</text:p>
          </table:table-cell>
          <table:table-cell office:value-type="float" office:value="29102.089669423272" table:formula="of:=[.N124]/5" table:style-name="ce97">
            <text:p>29102</text:p>
          </table:table-cell>
          <table:table-cell office:value-type="float" office:value="158.80000000000001" table:style-name="ce26">
            <text:p>159</text:p>
          </table:table-cell>
          <table:table-cell office:value-type="float" office:value="1.02" table:style-name="ce129">
            <text:p>1.02</text:p>
          </table:table-cell>
          <table:table-cell office:value-type="float" office:value="26326" table:style-name="ce31">
            <text:p>26326</text:p>
          </table:table-cell>
          <table:table-cell office:value-type="float" office:value="19130.420000000002" table:style-name="ce76">
            <text:p>19130</text:p>
          </table:table-cell>
          <table:table-cell office:value-type="float" office:value="12227.18" table:style-name="ce76">
            <text:p>12227</text:p>
          </table:table-cell>
          <table:table-cell office:value-type="float" office:value="3616.62" table:style-name="ce76">
            <text:p>3617</text:p>
          </table:table-cell>
          <table:table-cell office:value-type="float" office:value="10366.34" table:style-name="ce76">
            <text:p>10366</text:p>
          </table:table-cell>
          <table:table-cell office:value-type="float" office:value="75426" table:style-name="ce31">
            <text:p>75426</text:p>
          </table:table-cell>
          <table:table-cell office:value-type="float" office:value="27547" table:style-name="ce31">
            <text:p>27547</text:p>
          </table:table-cell>
          <table:table-cell office:value-type="float" office:value="44833" table:style-name="ce31">
            <text:p>44833</text:p>
          </table:table-cell>
          <table:table-cell office:value-type="float" office:value="2999" table:style-name="ce31">
            <text:p>2999</text:p>
          </table:table-cell>
          <table:table-cell office:value-type="float" office:value="85213" table:style-name="ce104">
            <text:p>85213</text:p>
          </table:table-cell>
          <table:table-cell office:value-type="float" office:value="48817" table:style-name="ce104">
            <text:p>48817</text:p>
          </table:table-cell>
          <table:table-cell office:value-type="float" office:value="1814" table:style-name="ce104">
            <text:p>1814</text:p>
          </table:table-cell>
          <table:table-cell office:value-type="float" office:value="25713" table:style-name="ce26">
            <text:p>25713</text:p>
          </table:table-cell>
          <table:table-cell office:value-type="float" office:value="195.3" table:style-name="ce44">
            <text:p>195</text:p>
          </table:table-cell>
          <table:table-cell office:value-type="float" office:value="4230378400" table:style-name="ce31">
            <text:p>4230378400</text:p>
          </table:table-cell>
          <table:table-cell office:value-type="float" office:value="164522.94170264067" table:formula="of:=[.BH124]/[.BF124]" table:style-name="ce55">
            <text:p>164523</text:p>
          </table:table-cell>
          <table:table-cell office:value-type="float" office:value="842.4113758455743" table:formula="of:=[.BI124]/[.BG124]" table:style-name="ce55">
            <text:p>842</text:p>
          </table:table-cell>
          <table:table-cell office:value-type="float" office:value="83101" table:style-name="ce26">
            <text:p>83101</text:p>
          </table:table-cell>
          <table:table-cell office:value-type="float" office:value="107.9" table:style-name="ce44">
            <text:p>108</text:p>
          </table:table-cell>
          <table:table-cell office:value-type="float" office:value="7317704500" table:style-name="ce31">
            <text:p>7317704500</text:p>
          </table:table-cell>
          <table:table-cell office:value-type="float" office:value="88057.959591340652" table:formula="of:=[.BM124]/[.BK124]" table:style-name="ce55">
            <text:p>88058</text:p>
          </table:table-cell>
          <table:table-cell office:value-type="float" office:value="816.10713244986698" table:formula="of:=[.BN124]/[.BL124]" table:style-name="ce55">
            <text:p>816</text:p>
          </table:table-cell>
          <table:table-cell office:value-type="float" office:value="1.9523448088184958" table:formula="of:=[.CV124]/(([.BO124]+[.BJ124])/2)" table:style-name="ce58">
            <text:p>1.95</text:p>
          </table:table-cell>
          <table:table-cell office:value-type="float" office:value="11.380936713636757" table:formula="of:=[.BR124]-[.BR123]" table:style-name="ce57">
            <text:p>11.4</text:p>
          </table:table-cell>
          <table:table-cell office:value-type="float" office:value="111.38095154754291" table:style-name="ce88">
            <text:p>111</text:p>
          </table:table-cell>
          <table:table-cell office:value-type="float" office:value="26811833" table:style-name="ce26">
            <text:p>26811833</text:p>
          </table:table-cell>
          <table:table-cell office:value-type="float" office:value="91928" table:formula="of:=[.BS124]-[.BS123]" table:style-name="ce26">
            <text:p>91928</text:p>
          </table:table-cell>
          <table:table-cell office:value-type="float" office:value="79935" table:style-name="ce76">
            <text:p>79935</text:p>
          </table:table-cell>
          <table:table-cell office:value-type="float" office:value="9114" table:style-name="ce76">
            <text:p>9114</text:p>
          </table:table-cell>
          <table:table-cell office:value-type="float" office:value="1.7934380316332719" table:formula="of:=([.B124]/[.BS124])" table:style-name="ce34">
            <text:p>1.79</text:p>
          </table:table-cell>
          <table:table-cell office:value-type="float" office:value="2.48" table:style-name="ce71">
            <text:p>2.48</text:p>
          </table:table-cell>
          <table:table-cell office:value-type="float" office:value="1.1579999999999999" table:style-name="ce71">
            <text:p>1.16</text:p>
          </table:table-cell>
          <table:table-cell office:value-type="float" office:value="0.34404313937493214" table:formula="of:=([.BS124]*100/[.BS123])-100" table:style-name="ce29">
            <text:p>0.3</text:p>
          </table:table-cell>
          <table:table-cell office:value-type="float" office:value="598634" table:formula="of:=([.B124]-[.B123])" table:style-name="ce73">
            <text:p>598634</text:p>
          </table:table-cell>
          <table:table-cell office:value-type="float" office:value="1.2606343663146191" table:formula="of:=([.B124]*100/[.B123])-100" table:style-name="ce34">
            <text:p>1.26</text:p>
          </table:table-cell>
          <table:table-cell office:value-type="float" office:value="-149456.67741935485" table:formula="of:=[.BT124]-([.CA124]/[.BX124])" table:style-name="ce76">
            <text:p>-149457</text:p>
          </table:table-cell>
          <table:table-cell office:value-type="float" office:value="1355000" table:style-name="ce76">
            <text:p>1355000</text:p>
          </table:table-cell>
          <table:table-cell office:value-type="float" office:value="14906" table:style-name="ce26">
            <text:p>14906</text:p>
          </table:table-cell>
          <table:table-cell office:value-type="float" office:value="10.37" table:style-name="ce34">
            <text:p>10.37</text:p>
          </table:table-cell>
          <table:table-cell office:value-type="float" office:value="77.305875" table:formula="of:=100-([.CF124]+[.CH124])" table:style-name="ce34">
            <text:p>77.31</text:p>
          </table:table-cell>
          <table:table-cell office:value-type="float" office:value="12.324124999999999" table:formula="of:=(13.75*(100-[.CF124]))/100" table:style-name="ce34">
            <text:p>12.32</text:p>
          </table:table-cell>
          <table:table-cell office:value-type="float" office:value="75.900000000000006" table:style-name="ce18">
            <text:p>75.9</text:p>
          </table:table-cell>
          <table:table-cell office:value-type="float" office:value="18.100000000000001" table:style-name="ce18">
            <text:p>18.1</text:p>
          </table:table-cell>
          <table:table-cell office:value-type="float" office:value="6.1" table:style-name="ce18">
            <text:p>6.1</text:p>
          </table:table-cell>
          <table:table-cell office:value-type="float" office:value="115.684" table:style-name="ce78">
            <text:p>116</text:p>
          </table:table-cell>
          <table:table-cell office:value-type="float" office:value="149.59459459459458" table:formula="of:=[.CN124]*[.$CM$117]/[.$CN$117]" table:style-name="ce78">
            <text:p>150</text:p>
          </table:table-cell>
          <table:table-cell office:value-type="float" office:value="11.07" table:style-name="ce29">
            <text:p>11.1</text:p>
          </table:table-cell>
          <table:table-cell office:value-type="float" office:value="2.0276497695852527" table:formula="of:=(([.CN124]*100)/[.CN123])-100" table:style-name="ce29">
            <text:p>2.0</text:p>
          </table:table-cell>
          <table:table-cell office:value-type="float" office:value="13.92652815417043" table:formula="of:=[.CR124]/([.CN124]*12)" table:style-name="ce29">
            <text:p>13.9</text:p>
          </table:table-cell>
          <table:table-cell office:value-type="float" office:value="18.568704205560575" table:formula="of:=[.CR124]/(([.CN124]*12)*0.75)" table:style-name="ce29">
            <text:p>18.6</text:p>
          </table:table-cell>
          <table:table-cell office:value-type="float" office:value="1850" table:style-name="ce31">
            <text:p>1850</text:p>
          </table:table-cell>
          <table:table-cell office:value-type="float" office:value="700.50824960312934" table:formula="of:=PMT(([.U124]/100)/12;[.X124]*12;([.CR124]*86))*-1" table:style-name="ce78">
            <text:p>701</text:p>
          </table:table-cell>
          <table:table-cell office:value-type="float" office:value="120.18189692507579" table:formula="of:=[.CR124]*[.$CT$117]/[.$CR$117]" table:style-name="ce78">
            <text:p>120</text:p>
          </table:table-cell>
          <table:table-cell office:value-type="float" office:value="952.02" table:formula="of:=[.CN124]*86" table:style-name="ce78">
            <text:p>952</text:p>
          </table:table-cell>
          <table:table-cell office:value-type="float" office:value="1619" table:style-name="ce26">
            <text:p>1619</text:p>
          </table:table-cell>
          <table:table-cell office:value-type="float" office:value="135.11000000000001" table:style-name="ce76">
            <text:p>135</text:p>
          </table:table-cell>
          <table:table-cell office:value-type="float" office:value="141.67500000000001" table:style-name="ce76">
            <text:p>142</text:p>
          </table:table-cell>
          <table:table-cell office:value-type="float" office:value="8.4" table:style-name="ce34">
            <text:p>8.40</text:p>
          </table:table-cell>
          <table:table-cell office:value-type="float" office:value="221.05" table:formula="of:=[.CZ123]+[.CY124]" table:style-name="ce29">
            <text:p>221.1</text:p>
          </table:table-cell>
          <table:table-cell office:value-type="float" office:value="1117.3652652500002" table:formula="of:=(([.CV124]*[.CY124])/100)+[.DA123]" table:style-name="ce29">
            <text:p>1117.4</text:p>
          </table:table-cell>
          <table:table-cell office:value-type="float" office:value="501.63473474999978" table:formula="of:=[.CV124]-[.DA124]" table:style-name="ce29">
            <text:p>501.6</text:p>
          </table:table-cell>
          <table:table-cell office:value-type="float" office:value="732.41348111287039" table:formula="of:=[.CV124]/[.CZ124]*[.$CZ$87]" table:style-name="ce29">
            <text:p>732.4</text:p>
          </table:table-cell>
          <table:table-cell office:value-type="float" office:value="1.5776727272727273" table:formula="of:=([.Y124]-[.Y123])" table:style-name="ce25">
            <text:p>1.58</text:p>
          </table:table-cell>
          <table:table-cell office:value-type="float" office:value="6.9352708058124222" table:formula="of:=([.CV124]*100/[.CV123])-100" table:style-name="ce34">
            <text:p>6.94</text:p>
          </table:table-cell>
          <table:table-cell office:value-type="float" office:value="-1.4647291941875782" table:formula="of:=[.DE124]-[.CY124]" table:style-name="ce34">
            <text:p>-1.46</text:p>
          </table:table-cell>
          <table:table-cell office:value-type="float" office:value="14.848379287845063" table:formula="of:=([.F124]*100/[.F123])-100" table:style-name="ce34">
            <text:p>14.85</text:p>
          </table:table-cell>
          <table:table-cell office:value-type="float" office:value="11.045003485021596" table:formula="of:=([.K124]*100/[.K123])-100" table:style-name="ce34">
            <text:p>11.05</text:p>
          </table:table-cell>
          <table:table-cell office:value-type="float" office:value="12.92" table:style-name="ce87">
            <text:p>12.9</text:p>
          </table:table-cell>
          <table:table-cell office:value-type="float" office:value="44.16878136747642" table:formula="of:=(([.DC124]-MIN([.DC110:.DC124]))/(MAX([.DC110:.DC124])-MIN([.DC110:.DC124])))*100" table:style-name="ce128">
            <text:p>44.2</text:p>
          </table:table-cell>
          <table:table-cell office:value-type="float" office:value="41.498612595738408" table:formula="of:=MIN(100; MAX(0; (([.K124]-([.C124]/26/2))/(([.C124]/26)-([.C124]/26/2)))*100))" table:style-name="ce128">
            <text:p>41.5</text:p>
          </table:table-cell>
          <table:table-cell office:value-type="float" office:value="98.230639905733057" table:formula="of:=MIN(100; MAX(0; (([.F124]-([.C124]/26/2))/(([.C124]/26)-([.C124]/26/2)))*100))" table:style-name="ce128">
            <text:p>98.2</text:p>
          </table:table-cell>
          <table:table-cell office:value-type="float" office:value="73.016512893694482" table:formula="of:=(([.AP124]-MIN([.$AP$2:.$AP$128]))/(MAX([.$AP$2:.$AP$128])-MIN([.$AP$2:.$AP$128])))*100" table:style-name="ce128">
            <text:p>73.0</text:p>
          </table:table-cell>
          <table:table-cell office:value-type="float" office:value="38.08620220462393" table:formula="of:=MIN(100;MAX(0;(([.BP124]-1.8)/(2.2-1.8))*100))" table:style-name="ce128">
            <text:p>38.1</text:p>
          </table:table-cell>
          <table:table-cell office:value-type="float" office:value="100" table:formula="of:=100-((([.CC124]-MIN([.CC95:.CC124]))/(MAX([.CC95:.CC124])-MIN([.CC95:.CC124])))*100)" table:style-name="ce128">
            <text:p>100.0</text:p>
          </table:table-cell>
          <table:table-cell office:value-type="float" office:value="12.08" table:formula="of:=MIN(100; MAX(0; ((IF(AND([.DI124]-[.DI123]&gt;=-0.3;[.DI124]-[.DI123]&lt;=0.3);100;IF(AND([.DI124]-[.DI123]&gt;-1;[.DI124]-[.DI123]&lt;-0.3);50;IF([.DI124]-[.DI123]&lt;=-1;25;75)))))-[.DI124]+(IF(([.DI124]-[.DI123])*([.DI123]-[.DI122])&lt;0;AVERAGE([.DI120:.DI124]);0))))" table:style-name="ce128">
            <text:p>12.1</text:p>
          </table:table-cell>
          <table:table-cell office:value-type="string" table:style-name="ce118">
            <text:p>37,4</text:p>
          </table:table-cell>
          <table:table-cell office:value-type="float" office:value="58.154392709609468" table:formula="of:=AVERAGE([.DJ124:.DP124])" table:style-name="ce128">
            <text:p>58.2</text:p>
          </table:table-cell>
          <table:table-cell office:value-type="float" office:value="432.64" table:formula="of:=-0.06*(([.A124]-1963)^2)+8.5*([.A124]-1963)+140" table:style-name="ce23">
            <text:p>432.6</text:p>
          </table:table-cell>
          <table:table-cell table:number-columns-repeated="16261"/>
        </table:table-row>
        <table:table-row table:style-name="ro2">
          <table:table-cell office:value-type="float" office:value="2023" table:style-name="ce15">
            <text:p>2023</text:p>
          </table:table-cell>
          <table:table-cell office:value-type="float" office:value="48619695" table:style-name="ce13">
            <text:p>48619695</text:p>
          </table:table-cell>
          <table:table-cell office:value-type="float" office:value="17061797" table:style-name="ce26">
            <text:p>17061797</text:p>
          </table:table-cell>
          <table:table-cell office:value-type="float" office:value="24462100" table:style-name="ce26">
            <text:p>24462100</text:p>
          </table:table-cell>
          <table:table-cell office:value-type="float" office:value="42207683" table:style-name="ce76">
            <text:p>42207683</text:p>
          </table:table-cell>
          <table:table-cell office:value-type="float" office:value="586913" table:style-name="ce26">
            <text:p>586913</text:p>
          </table:table-cell>
          <table:table-cell office:value-type="float" office:value="199741" table:style-name="ce26">
            <text:p>199741</text:p>
          </table:table-cell>
          <table:table-cell office:value-type="float" office:value="19871" table:style-name="ce26">
            <text:p>19871</text:p>
          </table:table-cell>
          <table:table-cell office:value-type="float" office:value="1229" table:style-name="ce26">
            <text:p>1229</text:p>
          </table:table-cell>
          <table:table-cell office:value-type="float" office:value="167089" table:style-name="ce26">
            <text:p>167089</text:p>
          </table:table-cell>
          <table:table-cell office:value-type="float" office:value="381560" table:style-name="ce26">
            <text:p>381560</text:p>
          </table:table-cell>
          <table:table-cell office:value-type="float" office:value="431782" table:style-name="ce26">
            <text:p>431782</text:p>
          </table:table-cell>
          <table:table-cell office:value-type="float" office:value="54209000000" table:style-name="ce84">
            <text:p>5.4E+10</text:p>
          </table:table-cell>
          <table:table-cell office:value-type="float" office:value="142072.02012789602" table:formula="of:=[.M125]/[.K125]" table:style-name="ce26">
            <text:p>142072</text:p>
          </table:table-cell>
          <table:table-cell office:value-type="float" office:value="22343" table:style-name="ce31">
            <text:p>22343</text:p>
          </table:table-cell>
          <table:table-cell office:value-type="float" office:value="5956" table:style-name="ce31">
            <text:p>5956</text:p>
          </table:table-cell>
          <table:table-cell office:value-type="float" office:value="3.7513431833445265" table:formula="of:=[.O125]/[.P125]" table:style-name="ce71">
            <text:p>3.75</text:p>
          </table:table-cell>
          <table:table-cell office:value-type="float" office:value="67.728226422008603" table:formula="of:=([.N125]*100)/([.CV125]*(([.BL125]*([.BK125]/([.BF125]+[.BK125])))+([.BG125]*([.BF125]/([.BF125]+[.BK125])))))" table:style-name="ce71">
            <text:p>67.73</text:p>
          </table:table-cell>
          <table:table-cell office:value-type="float" office:value="-23.203562447879829" table:formula="of:=(([.M125]*100/[.M124])-100)-[.CY125]" table:style-name="ce65">
            <text:p>-23.20</text:p>
          </table:table-cell>
          <table:table-cell office:value-type="float" office:value="494986000000" table:style-name="ce131">
            <text:p>4.95E+11</text:p>
          </table:table-cell>
          <table:table-cell office:value-type="float" office:value="3.9860000000000002" table:style-name="ce65">
            <text:p>3.99</text:p>
          </table:table-cell>
          <table:table-cell office:value-type="float" office:value="60" table:style-name="ce34">
            <text:p>60.00</text:p>
          </table:table-cell>
          <table:table-cell office:value-type="float" office:value="40" table:formula="of:=100-[.V125]" table:style-name="ce28">
            <text:p>40.00</text:p>
          </table:table-cell>
          <table:table-cell office:value-type="float" office:value="24" table:style-name="ce26">
            <text:p>24</text:p>
          </table:table-cell>
          <table:table-cell office:value-type="float" office:value="3.86" table:style-name="ce34">
            <text:p>3.86</text:p>
          </table:table-cell>
          <table:table-cell office:value-type="float" office:value="1.08165" table:style-name="ce71">
            <text:p>1.08</text:p>
          </table:table-cell>
          <table:table-cell office:value-type="float" office:value="16137014000000" table:style-name="ce83">
            <text:p>1.61E+13</text:p>
          </table:table-cell>
          <table:table-cell office:value-type="float" office:value="0.32997509752118503" table:formula="of:=([.AA125]*100/[.AA124])-100" table:style-name="ce70">
            <text:p>0.33</text:p>
          </table:table-cell>
          <table:table-cell office:value-type="float" office:value="27588" table:style-name="ce76">
            <text:p>27588</text:p>
          </table:table-cell>
          <table:table-cell office:value-type="float" office:value="1795" table:style-name="ce76">
            <text:p>1795</text:p>
          </table:table-cell>
          <table:table-cell office:value-type="float" office:value="1497761000000" table:style-name="ce125">
            <text:p>1.49776E+12</text:p>
          </table:table-cell>
          <table:table-cell office:value-type="float" office:value="4840885044520" table:formula="of:=([.AW125]*[.AR125]*1000000)+([.CV125]*[.BS125]*86)+([.AS125]*(506006-[.AX125])*1000000)" table:style-name="ce83">
            <text:p>4.84E+12</text:p>
          </table:table-cell>
          <table:table-cell office:value-type="float" office:value="3794320560720" table:formula="of:=([.CV125]*[.BS125]*86)" table:style-name="ce125">
            <text:p>3.79432E+12</text:p>
          </table:table-cell>
          <table:table-cell office:value-type="float" office:value="907324000000" table:style-name="ce83">
            <text:p>9.07E+11</text:p>
          </table:table-cell>
          <table:table-cell office:value-type="float" office:value="21496.655004729826" table:formula="of:=[.AH125]/[.E125]" table:style-name="ce26">
            <text:p>21497</text:p>
          </table:table-cell>
          <table:table-cell office:value-type="float" office:value="19665.240571352166" table:formula="of:=[.AJ124]*(1+([.CY125]/100))" table:style-name="ce76">
            <text:p>19665</text:p>
          </table:table-cell>
          <table:table-cell office:value-type="float" office:value="28460.603901906608" table:formula="of:=[.AI125]+(12*PMT([.U125]/100/12;[.X125]*12;([.AI125]*5)*-1))" table:style-name="ce76">
            <text:p>28461</text:p>
          </table:table-cell>
          <table:table-cell office:value-type="float" office:value="25295.664372624859" table:formula="of:=[.AL124]*(1+(([.CW125]-[.CW124])/100))" table:style-name="ce76">
            <text:p>25296</text:p>
          </table:table-cell>
          <table:table-cell office:value-type="float" office:value="20205.993665901035" table:formula="of:=(([.AL125]+([.AJ125]-[.AI125])+([.AK125]-[.AI125]))-[.AI125])+[.$AI$101]" table:style-name="ce76">
            <text:p>20206</text:p>
          </table:table-cell>
          <table:table-cell office:value-type="float" office:value="132.08423533276621" table:formula="of:=[.AM125]*[.$AN$101]/[.$AM$101]" table:style-name="ce76">
            <text:p>132</text:p>
          </table:table-cell>
          <table:table-cell office:value-type="float" office:value="97.240168820915642" table:formula="of:=[.AI125]*[.$AO$101]/[.$AI$101]" table:style-name="ce76">
            <text:p>97</text:p>
          </table:table-cell>
          <table:table-cell office:value-type="float" office:value="41.759831179084358" table:formula="of:=[.CW125]-[.AO125]" table:style-name="ce118">
            <text:p>42</text:p>
          </table:table-cell>
          <table:table-cell office:value-type="float" office:value="28414.404025579202" table:formula="of:=[.N125]/5" table:style-name="ce26">
            <text:p>28414</text:p>
          </table:table-cell>
          <table:table-cell office:value-type="float" office:value="154" table:style-name="ce26">
            <text:p>154</text:p>
          </table:table-cell>
          <table:table-cell office:value-type="float" office:value="0.99" table:style-name="ce129">
            <text:p>0.99</text:p>
          </table:table-cell>
          <table:table-cell office:value-type="float" office:value="22387" table:style-name="ce26">
            <text:p>22387</text:p>
          </table:table-cell>
          <table:table-cell office:value-type="float" office:value="16537" table:style-name="ce118">
            <text:p>16537</text:p>
          </table:table-cell>
          <table:table-cell office:value-type="float" office:value="10600" table:style-name="ce118">
            <text:p>10600</text:p>
          </table:table-cell>
          <table:table-cell office:value-type="float" office:value="3609.94" table:style-name="ce76">
            <text:p>3610</text:p>
          </table:table-cell>
          <table:table-cell office:value-type="float" office:value="10416.379999999999" table:style-name="ce76">
            <text:p>10416</text:p>
          </table:table-cell>
          <table:table-cell office:value-type="float" office:value="71033" table:style-name="ce26">
            <text:p>71033</text:p>
          </table:table-cell>
          <table:table-cell office:value-type="float" office:value="25931" table:style-name="ce26">
            <text:p>25931</text:p>
          </table:table-cell>
          <table:table-cell office:value-type="float" office:value="42413" table:style-name="ce26">
            <text:p>42413</text:p>
          </table:table-cell>
          <table:table-cell office:value-type="float" office:value="2636" table:style-name="ce26">
            <text:p>2636</text:p>
          </table:table-cell>
          <table:table-cell office:value-type="float" office:value="89956" table:style-name="ce76">
            <text:p>89956</text:p>
          </table:table-cell>
          <table:table-cell office:value-type="float" office:value="43406" table:style-name="ce76">
            <text:p>43406</text:p>
          </table:table-cell>
          <table:table-cell office:value-type="float" office:value="1004" table:style-name="ce76">
            <text:p>1004</text:p>
          </table:table-cell>
          <table:table-cell office:value-type="float" office:value="24162" table:style-name="ce26">
            <text:p>24162</text:p>
          </table:table-cell>
          <table:table-cell office:value-type="float" office:value="195.7" table:style-name="ce44">
            <text:p>196</text:p>
          </table:table-cell>
          <table:table-cell office:value-type="float" office:value="4211456000" table:style-name="ce26">
            <text:p>4211456000</text:p>
          </table:table-cell>
          <table:table-cell office:value-type="float" office:value="174300.80291366609" table:formula="of:=[.BH125]/[.BF125]" table:style-name="ce26">
            <text:p>174301</text:p>
          </table:table-cell>
          <table:table-cell office:value-type="float" office:value="890.65305525634187" table:formula="of:=[.BI125]/[.BG125]" table:style-name="ce26">
            <text:p>891</text:p>
          </table:table-cell>
          <table:table-cell office:value-type="float" office:value="85281" table:style-name="ce26">
            <text:p>85281</text:p>
          </table:table-cell>
          <table:table-cell office:value-type="float" office:value="108.7" table:style-name="ce44">
            <text:p>109</text:p>
          </table:table-cell>
          <table:table-cell office:value-type="float" office:value="7696814000" table:style-name="ce26">
            <text:p>7696814000</text:p>
          </table:table-cell>
          <table:table-cell office:value-type="float" office:value="90252.389160539868" table:formula="of:=[.BM125]/[.BK125]" table:style-name="ce55">
            <text:p>90252</text:p>
          </table:table-cell>
          <table:table-cell office:value-type="float" office:value="830.28876872621777" table:formula="of:=[.BN125]/[.BL125]" table:style-name="ce55">
            <text:p>830</text:p>
          </table:table-cell>
          <table:table-cell office:value-type="float" office:value="1.9059331084240303" table:formula="of:=[.CV125]/(([.BO125]+[.BJ125])/2)" table:style-name="ce58">
            <text:p>1.91</text:p>
          </table:table-cell>
          <table:table-cell office:value-type="float" office:value="3.5724455627156857" table:formula="of:=[.BR125]-[.BR124]" table:style-name="ce57">
            <text:p>3.6</text:p>
          </table:table-cell>
          <table:table-cell office:value-type="float" office:value="114.95339711025859" table:style-name="ce26">
            <text:p>115</text:p>
          </table:table-cell>
          <table:table-cell office:value-type="float" office:value="26902443" table:style-name="ce26">
            <text:p>26902443</text:p>
          </table:table-cell>
          <table:table-cell office:value-type="float" office:value="90610" table:formula="of:=[.BS125]-[.BS124]" table:style-name="ce26">
            <text:p>90610</text:p>
          </table:table-cell>
          <table:table-cell office:value-type="float" office:value="80473" table:style-name="ce76">
            <text:p>80473</text:p>
          </table:table-cell>
          <table:table-cell office:value-type="float" office:value="8847" table:style-name="ce76">
            <text:p>8847</text:p>
          </table:table-cell>
          <table:table-cell office:value-type="float" office:value="1.807259474539171" table:formula="of:=([.B125]/[.BS125])" table:style-name="ce127">
            <text:p>1.81</text:p>
          </table:table-cell>
          <table:table-cell office:value-type="float" office:value="2.4700000000000002" table:style-name="ce71">
            <text:p>2.47</text:p>
          </table:table-cell>
          <table:table-cell office:value-type="float" office:value="1.119" table:style-name="ce71">
            <text:p>1.12</text:p>
          </table:table-cell>
          <table:table-cell office:value-type="float" office:value="0.3379478008832848" table:formula="of:=([.BS125]*100/[.BS124])-100" table:style-name="ce29">
            <text:p>0.3</text:p>
          </table:table-cell>
          <table:table-cell office:value-type="float" office:value="534334" table:formula="of:=([.B125]-[.B124])" table:style-name="ce73">
            <text:p>534334</text:p>
          </table:table-cell>
          <table:table-cell office:value-type="float" office:value="1.1112196911654735" table:formula="of:=([.B125]*100/[.B124])-100" table:style-name="ce34">
            <text:p>1.11</text:p>
          </table:table-cell>
          <table:table-cell office:value-type="float" office:value="-125719.55465587042" table:formula="of:=[.BT125]-([.CA125]/[.BX125])" table:style-name="ce76">
            <text:p>-125720</text:p>
          </table:table-cell>
          <table:table-cell office:value-type="float" office:value="1398000" table:style-name="ce76">
            <text:p>1398000</text:p>
          </table:table-cell>
          <table:table-cell office:value-type="float" office:value="14500" table:style-name="ce111">
            <text:p>14500</text:p>
          </table:table-cell>
          <table:table-cell office:value-type="float" office:value="10.83" table:style-name="ce34">
            <text:p>10.83</text:p>
          </table:table-cell>
          <table:table-cell office:value-type="float" office:value="75.812333999999993" table:formula="of:=100-([.CF125]+[.CH125])" table:style-name="ce34">
            <text:p>75.81</text:p>
          </table:table-cell>
          <table:table-cell office:value-type="float" office:value="13.357666000000002" table:formula="of:=(14.98*(100-[.CF125]))/100" table:style-name="ce34">
            <text:p>13.36</text:p>
          </table:table-cell>
          <table:table-cell office:value-type="float" office:value="75.099999999999994" table:style-name="ce29">
            <text:p>75.1</text:p>
          </table:table-cell>
          <table:table-cell office:value-type="float" office:value="18.7" table:style-name="ce29">
            <text:p>18.7</text:p>
          </table:table-cell>
          <table:table-cell office:value-type="float" office:value="6.1" table:style-name="ce29">
            <text:p>6.1</text:p>
          </table:table-cell>
          <table:table-cell office:value-type="float" office:value="118.727" table:style-name="ce78">
            <text:p>119</text:p>
          </table:table-cell>
          <table:table-cell office:value-type="float" office:value="157.43243243243242" table:formula="of:=[.CN125]*[.$CM$117]/[.$CN$117]" table:style-name="ce78">
            <text:p>157</text:p>
          </table:table-cell>
          <table:table-cell office:value-type="float" office:value="11.65" table:style-name="ce29">
            <text:p>11.7</text:p>
          </table:table-cell>
          <table:table-cell office:value-type="float" office:value="5.2393857271906086" table:formula="of:=(([.CN125]*100)/[.CN124])-100" table:style-name="ce29">
            <text:p>5.2</text:p>
          </table:table-cell>
          <table:table-cell office:value-type="float" office:value="14.170243204577968" table:formula="of:=[.CR125]/([.CN125]*12)" table:style-name="ce29">
            <text:p>14.2</text:p>
          </table:table-cell>
          <table:table-cell office:value-type="float" office:value="18.893657606103957" table:formula="of:=[.CR125]/(([.CN125]*12)*0.75)" table:style-name="ce29">
            <text:p>18.9</text:p>
          </table:table-cell>
          <table:table-cell office:value-type="float" office:value="1981" table:style-name="ce26">
            <text:p>1981</text:p>
          </table:table-cell>
          <table:table-cell office:value-type="float" office:value="919.84862881796914" table:formula="of:=PMT(([.U125]/100)/12;[.X125]*12;([.CR125]*86))*-1" table:style-name="ce78">
            <text:p>920</text:p>
          </table:table-cell>
          <table:table-cell office:value-type="float" office:value="128.6920744911217" table:formula="of:=[.CR125]*[.$CT$117]/[.$CR$117]" table:style-name="ce78">
            <text:p>129</text:p>
          </table:table-cell>
          <table:table-cell office:value-type="float" office:value="1001.9" table:formula="of:=[.CN125]*86" table:style-name="ce78">
            <text:p>1002</text:p>
          </table:table-cell>
          <table:table-cell office:value-type="float" office:value="1640" table:style-name="ce26">
            <text:p>1640</text:p>
          </table:table-cell>
          <table:table-cell office:value-type="float" office:value="139" table:style-name="ce76">
            <text:p>139</text:p>
          </table:table-cell>
          <table:table-cell office:value-type="float" office:value="147.28200000000001" table:style-name="ce76">
            <text:p>147</text:p>
          </table:table-cell>
          <table:table-cell office:value-type="float" office:value="3.56" table:style-name="ce34">
            <text:p>3.56</text:p>
          </table:table-cell>
          <table:table-cell office:value-type="float" office:value="224.61" table:formula="of:=[.CZ124]+[.CY125]" table:style-name="ce29">
            <text:p>224.6</text:p>
          </table:table-cell>
          <table:table-cell office:value-type="float" office:value="1175.7492652500002" table:formula="of:=(([.CV125]*[.CY125])/100)+[.DA124]" table:style-name="ce29">
            <text:p>1175.7</text:p>
          </table:table-cell>
          <table:table-cell office:value-type="float" office:value="464.25073474999976" table:formula="of:=[.CV125]-[.DA125]" table:style-name="ce29">
            <text:p>464.3</text:p>
          </table:table-cell>
          <table:table-cell office:value-type="float" office:value="730.1544900048973" table:formula="of:=[.CV125]/[.CZ125]*[.$CZ$87]" table:style-name="ce29">
            <text:p>730.2</text:p>
          </table:table-cell>
          <table:table-cell office:value-type="float" office:value="2.7719999999999998" table:formula="of:=([.Y125]-[.Y124])" table:style-name="ce34">
            <text:p>2.77</text:p>
          </table:table-cell>
          <table:table-cell office:value-type="float" office:value="1.2970969734403894" table:formula="of:=([.CV125]*100/[.CV124])-100" table:style-name="ce34">
            <text:p>1.30</text:p>
          </table:table-cell>
          <table:table-cell office:value-type="float" office:value="-2.2629030265596106" table:formula="of:=[.DE125]-[.CY125]" table:style-name="ce34">
            <text:p>-2.26</text:p>
          </table:table-cell>
          <table:table-cell office:value-type="float" office:value="-9.6353469008181776" table:formula="of:=([.F125]*100/[.F124])-100" table:style-name="ce34">
            <text:p>-9.64</text:p>
          </table:table-cell>
          <table:table-cell office:value-type="float" office:value="-17.698775274258324" table:formula="of:=([.K125]*100/[.K124])-100" table:style-name="ce34">
            <text:p>-17.70</text:p>
          </table:table-cell>
          <table:table-cell office:value-type="float" office:value="12.11" table:style-name="ce29">
            <text:p>12.1</text:p>
          </table:table-cell>
          <table:table-cell office:value-type="float" office:value="49.632035037106291" table:formula="of:=(([.DC125]-MIN([.DC111:.DC125]))/(MAX([.DC111:.DC125])-MIN([.DC111:.DC125])))*100" table:style-name="ce128">
            <text:p>49.6</text:p>
          </table:table-cell>
          <table:table-cell office:value-type="float" office:value="16.289743688780266" table:formula="of:=MIN(100; MAX(0; (([.K125]-([.C125]/26/2))/(([.C125]/26)-([.C125]/26/2)))*100))" table:style-name="ce128">
            <text:p>16.3</text:p>
          </table:table-cell>
          <table:table-cell office:value-type="float" office:value="78.876093766676519" table:formula="of:=MIN(100; MAX(0; (([.F125]-([.C125]/26/2))/(([.C125]/26)-([.C125]/26/2)))*100))" table:style-name="ce128">
            <text:p>78.9</text:p>
          </table:table-cell>
          <table:table-cell office:value-type="float" office:value="66.184872887145957" table:formula="of:=(([.AP125]-MIN([.$AP$2:.$AP$128]))/(MAX([.$AP$2:.$AP$128])-MIN([.$AP$2:.$AP$128])))*100" table:style-name="ce128">
            <text:p>66.2</text:p>
          </table:table-cell>
          <table:table-cell office:value-type="float" office:value="26.483277106007552" table:formula="of:=MIN(100;MAX(0;(([.BP125]-1.8)/(2.2-1.8))*100))" table:style-name="ce128">
            <text:p>26.5</text:p>
          </table:table-cell>
          <table:table-cell office:value-type="float" office:value="95.775152719395223" table:formula="of:=100-((([.CC125]-MIN([.CC96:.CC125]))/(MAX([.CC96:.CC125])-MIN([.CC96:.CC125])))*100)" table:style-name="ce128">
            <text:p>95.8</text:p>
          </table:table-cell>
          <table:table-cell office:value-type="float" office:value="37.89" table:formula="of:=MIN(100; MAX(0; ((IF(AND([.DI125]-[.DI124]&gt;=-0.3;[.DI125]-[.DI124]&lt;=0.3);100;IF(AND([.DI125]-[.DI124]&gt;-1;[.DI125]-[.DI124]&lt;-0.3);50;IF([.DI125]-[.DI124]&lt;=-1;25;75)))))-[.DI125]+(IF(([.DI125]-[.DI124])*([.DI124]-[.DI123])&lt;0;AVERAGE([.DI121:.DI125]);0))))" table:style-name="ce128">
            <text:p>37.9</text:p>
          </table:table-cell>
          <table:table-cell office:value-type="string" table:style-name="ce118">
            <text:p>44,8</text:p>
          </table:table-cell>
          <table:table-cell office:value-type="float" office:value="53.018739315015971" table:formula="of:=AVERAGE([.DJ125:.DP125])" table:style-name="ce128">
            <text:p>53.0</text:p>
          </table:table-cell>
          <table:table-cell office:value-type="float" office:value="434" table:formula="of:=-0.06*(([.A125]-1963)^2)+8.5*([.A125]-1963)+140" table:style-name="ce29">
            <text:p>434.0</text:p>
          </table:table-cell>
          <table:table-cell table:number-columns-repeated="16261"/>
        </table:table-row>
        <table:table-row table:style-name="ro2">
          <table:table-cell office:value-type="float" office:value="2024" table:style-name="ce15">
            <text:p>2024</text:p>
          </table:table-cell>
          <table:table-cell office:value-type="float" office:value="49128927" table:style-name="ce13">
            <text:p>49128927</text:p>
          </table:table-cell>
          <table:table-cell office:value-type="float" office:value="17086797" table:style-name="ce26">
            <text:p>17086797</text:p>
          </table:table-cell>
          <table:table-cell office:value-type="float" office:value="24605516" table:style-name="ce26">
            <text:p>24605516</text:p>
          </table:table-cell>
          <table:table-cell office:value-type="float" office:value="41167352" table:style-name="ce76">
            <text:p>41167352</text:p>
          </table:table-cell>
          <table:table-cell office:value-type="float" office:value="641919" table:style-name="ce26">
            <text:p>641919</text:p>
          </table:table-cell>
          <table:table-cell office:value-type="float" office:value="201030" table:style-name="ce26">
            <text:p>201030</text:p>
          </table:table-cell>
          <table:table-cell office:value-type="float" office:value="23090" table:style-name="ce31">
            <text:p>23090</text:p>
          </table:table-cell>
          <table:table-cell office:value-type="float" office:value="1046" table:style-name="ce13">
            <text:p>1046</text:p>
          </table:table-cell>
          <table:table-cell office:value-type="float" office:value="173477" table:style-name="ce13">
            <text:p>173477</text:p>
          </table:table-cell>
          <table:table-cell office:value-type="float" office:value="423761" table:style-name="ce26">
            <text:p>423761</text:p>
          </table:table-cell>
          <table:table-cell office:value-type="float" office:value="445390" table:style-name="ce31">
            <text:p>445390</text:p>
          </table:table-cell>
          <table:table-cell office:value-type="float" office:value="61730543000" table:style-name="ce84">
            <text:p>6.2E+10</text:p>
          </table:table-cell>
          <table:table-cell office:value-type="float" office:value="145673.01615769265" table:formula="of:=[.M126]/[.K126]" table:style-name="ce26">
            <text:p>145673</text:p>
          </table:table-cell>
          <table:table-cell office:value-type="float" office:value="14879" table:style-name="ce31">
            <text:p>14879</text:p>
          </table:table-cell>
          <table:table-cell office:value-type="float" office:value="26542" table:style-name="ce31">
            <text:p>26542</text:p>
          </table:table-cell>
          <table:table-cell office:value-type="float" office:value="0.5605832265842815" table:formula="of:=[.O126]/[.P126]" table:style-name="ce71">
            <text:p>0.56</text:p>
          </table:table-cell>
          <table:table-cell office:value-type="float" office:value="67.213623968374961" table:formula="of:=([.N126]*100)/([.CV126]*(([.BL126]*([.BK126]/([.BF126]+[.BK126])))+([.BG126]*([.BF126]/([.BF126]+[.BK126])))))" table:style-name="ce71">
            <text:p>67.21</text:p>
          </table:table-cell>
          <table:table-cell office:value-type="float" office:value="11.095081628511865" table:formula="of:=(([.M126]*100/[.M125])-100)-[.CY126]" table:style-name="ce65">
            <text:p>11.10</text:p>
          </table:table-cell>
          <table:table-cell office:value-type="float" office:value="497214000000" table:style-name="ce131">
            <text:p>4.97E+11</text:p>
          </table:table-cell>
          <table:table-cell office:value-type="float" office:value="3.66" table:style-name="ce65">
            <text:p>3.66</text:p>
          </table:table-cell>
          <table:table-cell office:value-type="float" office:value="58.8" table:style-name="ce34">
            <text:p>58.80</text:p>
          </table:table-cell>
          <table:table-cell office:value-type="float" office:value="41.2" table:style-name="ce34">
            <text:p>41.20</text:p>
          </table:table-cell>
          <table:table-cell office:value-type="float" office:value="24" table:style-name="ce26">
            <text:p>24</text:p>
          </table:table-cell>
          <table:table-cell office:value-type="float" office:value="3.27" table:style-name="ce34">
            <text:p>3.27</text:p>
          </table:table-cell>
          <table:table-cell office:value-type="float" office:value="1.0787" table:style-name="ce71">
            <text:p>1.08</text:p>
          </table:table-cell>
          <table:table-cell office:value-type="float" office:value="16726206000000" table:style-name="ce83">
            <text:p>1.67E+13</text:p>
          </table:table-cell>
          <table:table-cell office:value-type="float" office:value="3.6511835461009099" table:formula="of:=([.AA126]*100/[.AA125])-100" table:style-name="ce70">
            <text:p>3.65</text:p>
          </table:table-cell>
          <table:table-cell office:value-type="float" office:value="67768" table:style-name="ce118">
            <text:p>67768</text:p>
          </table:table-cell>
          <table:table-cell office:value-type="float" office:value="2205" table:style-name="ce118">
            <text:p>2205</text:p>
          </table:table-cell>
          <table:table-cell office:value-type="float" office:value="1594330000000" table:style-name="ce125">
            <text:p>1.59433E+12</text:p>
          </table:table-cell>
          <table:table-cell office:value-type="float" office:value="5172309203130" table:formula="of:=([.AW126]*[.AR126]*1000000)+([.CV126]*[.BS126]*86)+([.AS126]*(506006-[.AX126])*1000000)" table:style-name="ce83">
            <text:p>5.17E+12</text:p>
          </table:table-cell>
          <table:table-cell office:value-type="float" office:value="4057249903130" table:formula="of:=([.CV126]*[.BS126]*86)" table:style-name="ce125">
            <text:p>4.05725E+12</text:p>
          </table:table-cell>
          <table:table-cell office:value-type="float" office:value="987816000000" table:style-name="ce83">
            <text:p>9.88E+11</text:p>
          </table:table-cell>
          <table:table-cell office:value-type="float" office:value="23995.130898873456" table:formula="of:=[.AH126]/[.E126]" table:style-name="ce26">
            <text:p>23995</text:p>
          </table:table-cell>
          <table:table-cell office:value-type="float" office:value="20211.934259235757" table:formula="of:=[.AJ125]*(1+([.CY126]/100))" table:style-name="ce76">
            <text:p>20212</text:p>
          </table:table-cell>
          <table:table-cell office:value-type="float" office:value="31514.189830036208" table:formula="of:=[.AI126]+(12*PMT([.U126]/100/12;[.X126]*12;([.AI126]*5)*-1))" table:style-name="ce76">
            <text:p>31514</text:p>
          </table:table-cell>
          <table:table-cell office:value-type="float" office:value="28515.802447260001" table:formula="of:=[.AL125]*(1+(([.CW126]-[.CW125])/100))" table:style-name="ce76">
            <text:p>28516</text:p>
          </table:table-cell>
          <table:table-cell office:value-type="float" office:value="19530.983674118477" table:formula="of:=(([.AL126]+([.AJ126]-[.AI126])+([.AK126]-[.AI126]))-[.AI126])+[.$AI$101]" table:style-name="ce76">
            <text:p>19531</text:p>
          </table:table-cell>
          <table:table-cell office:value-type="float" office:value="127.67177336327464" table:formula="of:=[.AM126]*[.$AN$101]/[.$AM$101]" table:style-name="ce76">
            <text:p>128</text:p>
          </table:table-cell>
          <table:table-cell office:value-type="float" office:value="108.54203032858084" table:formula="of:=[.AI126]*[.$AO$101]/[.$AI$101]" table:style-name="ce76">
            <text:p>109</text:p>
          </table:table-cell>
          <table:table-cell office:value-type="float" office:value="43.187969671419154" table:formula="of:=[.CW126]-[.AO126]" table:style-name="ce118">
            <text:p>43</text:p>
          </table:table-cell>
          <table:table-cell office:value-type="float" office:value="29134.603231538531" table:formula="of:=[.N126]/5" table:style-name="ce26">
            <text:p>29135</text:p>
          </table:table-cell>
          <table:table-cell office:value-type="float" office:value="169" table:style-name="ce97">
            <text:p>169</text:p>
          </table:table-cell>
          <table:table-cell office:value-type="float" office:value="1.02" table:style-name="ce129">
            <text:p>1.02</text:p>
          </table:table-cell>
          <table:table-cell office:value-type="float" office:value="20856" table:style-name="ce97">
            <text:p>20856</text:p>
          </table:table-cell>
          <table:table-cell office:value-type="float" office:value="15779" table:style-name="ce118">
            <text:p>15779</text:p>
          </table:table-cell>
          <table:table-cell office:value-type="float" office:value="9182" table:style-name="ce118">
            <text:p>9182</text:p>
          </table:table-cell>
          <table:table-cell office:value-type="float" office:value="3607" table:style-name="ce76">
            <text:p>3607</text:p>
          </table:table-cell>
          <table:table-cell office:value-type="float" office:value="10441" table:style-name="ce31">
            <text:p>10441</text:p>
          </table:table-cell>
          <table:table-cell office:value-type="float" office:value="75778" table:style-name="ce26">
            <text:p>75778</text:p>
          </table:table-cell>
          <table:table-cell office:value-type="float" office:value="27958" table:style-name="ce26">
            <text:p>27958</text:p>
          </table:table-cell>
          <table:table-cell office:value-type="float" office:value="44978" table:style-name="ce26">
            <text:p>44978</text:p>
          </table:table-cell>
          <table:table-cell office:value-type="float" office:value="2842" table:style-name="ce26">
            <text:p>2842</text:p>
          </table:table-cell>
          <table:table-cell office:value-type="float" office:value="108777" table:style-name="ce76">
            <text:p>108777</text:p>
          </table:table-cell>
          <table:table-cell office:value-type="float" office:value="44414" table:style-name="ce76">
            <text:p>44414</text:p>
          </table:table-cell>
          <table:table-cell office:value-type="float" office:value="1166" table:style-name="ce76">
            <text:p>1166</text:p>
          </table:table-cell>
          <table:table-cell office:value-type="float" office:value="25341" table:style-name="ce26">
            <text:p>25341</text:p>
          </table:table-cell>
          <table:table-cell office:value-type="float" office:value="193.7" table:style-name="ce44">
            <text:p>194</text:p>
          </table:table-cell>
          <table:table-cell office:value-type="float" office:value="4535286000" table:style-name="ce26">
            <text:p>4535286000</text:p>
          </table:table-cell>
          <table:table-cell office:value-type="float" office:value="178970.2853083935" table:formula="of:=[.BH126]/[.BF126]" table:style-name="ce26">
            <text:p>178970</text:p>
          </table:table-cell>
          <table:table-cell office:value-type="float" office:value="923.95604186057574" table:formula="of:=[.BI126]/[.BG126]" table:style-name="ce26">
            <text:p>924</text:p>
          </table:table-cell>
          <table:table-cell office:value-type="float" office:value="102251" table:style-name="ce26">
            <text:p>102251</text:p>
          </table:table-cell>
          <table:table-cell office:value-type="float" office:value="106.8" table:style-name="ce44">
            <text:p>107</text:p>
          </table:table-cell>
          <table:table-cell office:value-type="float" office:value="9321647000" table:style-name="ce26">
            <text:p>9321647000</text:p>
          </table:table-cell>
          <table:table-cell office:value-type="float" office:value="91164.36025075549" table:formula="of:=[.BM126]/[.BK126]" table:style-name="ce55">
            <text:p>91164</text:p>
          </table:table-cell>
          <table:table-cell office:value-type="float" office:value="853.59887875239224" table:formula="of:=[.BN126]/[.BL126]" table:style-name="ce55">
            <text:p>854</text:p>
          </table:table-cell>
          <table:table-cell office:value-type="float" office:value="1.9656214047075051" table:formula="of:=[.CV126]/(([.BO126]+[.BJ126])/2)" table:style-name="ce58">
            <text:p>1.97</text:p>
          </table:table-cell>
          <table:table-cell office:value-type="float" office:value="0.81691990789181546" table:formula="of:=[.BR126]-[.BR125]" table:style-name="ce57">
            <text:p>0.8</text:p>
          </table:table-cell>
          <table:table-cell office:value-type="float" office:value="115.77031701815041" table:style-name="ce26">
            <text:p>116</text:p>
          </table:table-cell>
          <table:table-cell office:value-type="float" office:value="27004765" table:style-name="ce26">
            <text:p>27004765</text:p>
          </table:table-cell>
          <table:table-cell office:value-type="float" office:value="102322" table:formula="of:=[.BS126]-[.BS125]" table:style-name="ce26">
            <text:p>102322</text:p>
          </table:table-cell>
          <table:table-cell office:value-type="float" office:value="86609" table:style-name="ce31">
            <text:p>86609</text:p>
          </table:table-cell>
          <table:table-cell office:value-type="float" office:value="14371" table:style-name="ce31">
            <text:p>14371</text:p>
          </table:table-cell>
          <table:table-cell office:value-type="float" office:value="1.8192688216320343" table:formula="of:=([.B126]/[.BS126])" table:style-name="ce127">
            <text:p>1.82</text:p>
          </table:table-cell>
          <table:table-cell office:value-type="float" office:value="2.46" table:style-name="ce71">
            <text:p>2.46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0.38034464007598956" table:formula="of:=([.BS126]*100/[.BS125])-100" table:style-name="ce29">
            <text:p>0.4</text:p>
          </table:table-cell>
          <table:table-cell office:value-type="float" office:value="509232" table:formula="of:=([.B126]-[.B125])" table:style-name="ce73">
            <text:p>509232</text:p>
          </table:table-cell>
          <table:table-cell office:value-type="float" office:value="1.0473780224248657" table:formula="of:=([.B126]*100/[.B125])-100" table:style-name="ce34">
            <text:p>1.05</text:p>
          </table:table-cell>
          <table:table-cell office:value-type="float" office:value="-104682.87804878049" table:formula="of:=[.BT126]-([.CA126]/[.BX126])" table:style-name="ce76">
            <text:p>-104683</text:p>
          </table:table-cell>
          <table:table-cell office:value-type="float" office:value="1463800" table:style-name="ce31">
            <text:p>1463800</text:p>
          </table:table-cell>
          <table:table-cell office:value-type="float" office:value="14892" table:style-name="ce123">
            <text:p>14892</text:p>
          </table:table-cell>
          <table:table-cell office:value-type="float" office:value="10.88" table:style-name="ce34">
            <text:p>10.88</text:p>
          </table:table-cell>
          <table:table-cell office:value-type="float" office:value="76.10848" table:formula="of:=100-([.CF126]+[.CH126])" table:style-name="ce34">
            <text:p>76.11</text:p>
          </table:table-cell>
          <table:table-cell office:value-type="float" office:value="13.011520000000001" table:formula="of:=(14.6*(100-[.CF126]))/100" table:style-name="ce34">
            <text:p>13.01</text:p>
          </table:table-cell>
          <table:table-cell office:value-type="float" office:value="73.599999999999994" table:style-name="ce29">
            <text:p>73.6</text:p>
          </table:table-cell>
          <table:table-cell office:value-type="float" office:value="20.399999999999999" table:style-name="ce29">
            <text:p>20.4</text:p>
          </table:table-cell>
          <table:table-cell office:value-type="float" office:value="6.1" table:style-name="ce29">
            <text:p>6.1</text:p>
          </table:table-cell>
          <table:table-cell office:value-type="string" table:style-name="ce27">
            <text:p>null</text:p>
          </table:table-cell>
          <table:table-cell office:value-type="float" office:value="175.94594594594594" table:formula="of:=[.CN126]*[.$CM$117]/[.$CN$117]" table:style-name="ce78">
            <text:p>176</text:p>
          </table:table-cell>
          <table:table-cell office:value-type="float" office:value="13.02" table:formula="of:=13.02" table:style-name="ce29">
            <text:p>13.0</text:p>
          </table:table-cell>
          <table:table-cell office:value-type="float" office:value="11.759656652360505" table:formula="of:=(([.CN126]*100)/[.CN125])-100" table:style-name="ce29">
            <text:p>11.8</text:p>
          </table:table-cell>
          <table:table-cell office:value-type="float" office:value="13.748079877112135" table:formula="of:=[.CR126]/([.CN126]*12)" table:style-name="ce29">
            <text:p>13.7</text:p>
          </table:table-cell>
          <table:table-cell office:value-type="float" office:value="18.330773169482846" table:formula="of:=[.CR126]/(([.CN126]*12)*0.75)" table:style-name="ce29">
            <text:p>18.3</text:p>
          </table:table-cell>
          <table:table-cell office:value-type="float" office:value="2148" table:style-name="ce26">
            <text:p>2148</text:p>
          </table:table-cell>
          <table:table-cell office:value-type="float" office:value="964.76567412060808" table:formula="of:=PMT(([.U126]/100)/12;[.X126]*12;([.CR126]*86))*-1" table:style-name="ce78">
            <text:p>965</text:p>
          </table:table-cell>
          <table:table-cell office:value-type="float" office:value="139.54092680814205" table:formula="of:=[.CR126]*[.$CT$117]/[.$CR$117]" table:style-name="ce78">
            <text:p>140</text:p>
          </table:table-cell>
          <table:table-cell office:value-type="float" office:value="1119.72" table:formula="of:=[.CN126]*86" table:style-name="ce78">
            <text:p>1120</text:p>
          </table:table-cell>
          <table:table-cell office:value-type="float" office:value="1747" table:style-name="ce26">
            <text:p>1747</text:p>
          </table:table-cell>
          <table:table-cell office:value-type="float" office:value="151.72999999999999" table:style-name="ce76">
            <text:p>152</text:p>
          </table:table-cell>
          <table:table-cell office:value-type="float" office:value="159.65" table:style-name="ce76">
            <text:p>160</text:p>
          </table:table-cell>
          <table:table-cell office:value-type="float" office:value="2.78" table:style-name="ce34">
            <text:p>2.78</text:p>
          </table:table-cell>
          <table:table-cell office:value-type="float" office:value="227.39000000000001" table:formula="of:=[.CZ125]+[.CY126]" table:style-name="ce29">
            <text:p>227.4</text:p>
          </table:table-cell>
          <table:table-cell office:value-type="float" office:value="1224.3158652500003" table:formula="of:=(([.CV126]*[.CY126])/100)+[.DA125]" table:style-name="ce29">
            <text:p>1224.3</text:p>
          </table:table-cell>
          <table:table-cell office:value-type="float" office:value="522.68413474999966" table:formula="of:=[.CV126]-[.DA126]" table:style-name="ce29">
            <text:p>522.7</text:p>
          </table:table-cell>
          <table:table-cell office:value-type="float" office:value="768.28356568010895" table:formula="of:=[.CV126]/[.CZ126]*[.$CZ$87]" table:style-name="ce29">
            <text:p>768.3</text:p>
          </table:table-cell>
          <table:table-cell office:value-type="float" office:value="-0.58999999999999986" table:formula="of:=([.Y126]-[.Y125])" table:style-name="ce34">
            <text:p>-0.59</text:p>
          </table:table-cell>
          <table:table-cell office:value-type="float" office:value="6.5243902439024453" table:formula="of:=([.CV126]*100/[.CV125])-100" table:style-name="ce34">
            <text:p>6.52</text:p>
          </table:table-cell>
          <table:table-cell office:value-type="float" office:value="3.7443902439024455" table:formula="of:=[.DE126]-[.CY126]" table:style-name="ce34">
            <text:p>3.74</text:p>
          </table:table-cell>
          <table:table-cell office:value-type="float" office:value="9.3720875155261467" table:formula="of:=([.F126]*100/[.F125])-100" table:style-name="ce34">
            <text:p>9.37</text:p>
          </table:table-cell>
          <table:table-cell office:value-type="float" office:value="11.060121606038365" table:formula="of:=([.K126]*100/[.K125])-100" table:style-name="ce34">
            <text:p>11.06</text:p>
          </table:table-cell>
          <table:table-cell office:value-type="float" office:value="11.34" table:style-name="ce29">
            <text:p>11.3</text:p>
          </table:table-cell>
          <table:table-cell office:value-type="float" office:value="71.302563245363842" table:formula="of:=(([.DC126]-MIN([.DC112:.DC126]))/(MAX([.DC112:.DC126])-MIN([.DC112:.DC126])))*100" table:style-name="ce128">
            <text:p>71.3</text:p>
          </table:table-cell>
          <table:table-cell office:value-type="float" office:value="28.962566828645532" table:formula="of:=MIN(100; MAX(0; (([.K126]-([.C126]/26/2))/(([.C126]/26)-([.C126]/26/2)))*100))" table:style-name="ce128">
            <text:p>29.0</text:p>
          </table:table-cell>
          <table:table-cell office:value-type="float" office:value="95.354272658591313" table:formula="of:=MIN(100; MAX(0; (([.F126]-([.C126]/26/2))/(([.C126]/26)-([.C126]/26/2)))*100))" table:style-name="ce128">
            <text:p>95.4</text:p>
          </table:table-cell>
          <table:table-cell office:value-type="float" office:value="68.425649106438584" table:formula="of:=(([.AP126]-MIN([.$AP$2:.$AP$128]))/(MAX([.$AP$2:.$AP$128])-MIN([.$AP$2:.$AP$128])))*100" table:style-name="ce128">
            <text:p>68.4</text:p>
          </table:table-cell>
          <table:table-cell office:value-type="float" office:value="41.405351176876259" table:formula="of:=MIN(100;MAX(0;(([.BP126]-1.8)/(2.2-1.8))*100))" table:style-name="ce128">
            <text:p>41.4</text:p>
          </table:table-cell>
          <table:table-cell office:value-type="float" office:value="92.030943834350907" table:formula="of:=100-((([.CC126]-MIN([.CC97:.CC126]))/(MAX([.CC97:.CC126])-MIN([.CC97:.CC126])))*100)" table:style-name="ce128">
            <text:p>92.0</text:p>
          </table:table-cell>
          <table:table-cell office:value-type="float" office:value="38.659999999999997" table:formula="of:=MIN(100; MAX(0; ((IF(AND([.DI126]-[.DI125]&gt;=-0.3;[.DI126]-[.DI125]&lt;=0.3);100;IF(AND([.DI126]-[.DI125]&gt;-1;[.DI126]-[.DI125]&lt;-0.3);50;IF([.DI126]-[.DI125]&lt;=-1;25;75)))))-[.DI126]+(IF(([.DI126]-[.DI125])*([.DI125]-[.DI124])&lt;0;AVERAGE([.DI122:.DI126]);0))))" table:style-name="ce128">
            <text:p>38.7</text:p>
          </table:table-cell>
          <table:table-cell office:value-type="float" office:value="100" table:style-name="ce118">
            <text:p>100</text:p>
          </table:table-cell>
          <table:table-cell office:value-type="float" office:value="62.305906692895213" table:formula="of:=AVERAGE([.DJ126:.DP126])" table:style-name="ce128">
            <text:p>62.3</text:p>
          </table:table-cell>
          <table:table-cell office:value-type="float" office:value="435.24" table:formula="of:=-0.06*(([.A126]-1963)^2)+8.5*([.A126]-1963)+140" table:style-name="ce29">
            <text:p>435.2</text:p>
          </table:table-cell>
          <table:table-cell table:number-columns-repeated="16261"/>
        </table:table-row>
        <table:table-row table:style-name="ro2">
          <table:table-cell office:value-type="float" office:value="2025" table:style-name="ce15">
            <text:p>2025</text:p>
          </table:table-cell>
          <table:table-cell office:value-type="float" office:value="49538352" table:style-name="ce11">
            <text:p>49538352</text:p>
          </table:table-cell>
          <table:table-cell office:value-type="float" office:value="17088636" table:style-name="ce32">
            <text:p>17088636</text:p>
          </table:table-cell>
          <table:table-cell office:value-type="float" office:value="24710817" table:style-name="ce32">
            <text:p>24710817</text:p>
          </table:table-cell>
          <table:table-cell office:value-type="float" office:value="41710567" table:style-name="ce69">
            <text:p>41710567</text:p>
          </table:table-cell>
          <table:table-cell office:value-type="float" office:value="714101" table:style-name="ce26">
            <text:p>714101</text:p>
          </table:table-cell>
          <table:table-cell office:value-type="float" office:value="208162" table:style-name="ce26">
            <text:p>208162</text:p>
          </table:table-cell>
          <table:table-cell office:value-type="float" office:value="24443" table:style-name="ce26">
            <text:p>24443</text:p>
          </table:table-cell>
          <table:table-cell office:value-type="float" office:value="1317" table:style-name="ce13">
            <text:p>1317</text:p>
          </table:table-cell>
          <table:table-cell office:value-type="float" office:value="183708" table:style-name="ce26">
            <text:p>183708</text:p>
          </table:table-cell>
          <table:table-cell office:value-type="float" office:value="500905" table:style-name="ce31">
            <text:p>500905</text:p>
          </table:table-cell>
          <table:table-cell office:value-type="float" office:value="499783" table:style-name="ce26">
            <text:p>499783</text:p>
          </table:table-cell>
          <table:table-cell office:value-type="float" office:value="82031846000" table:style-name="ce84">
            <text:p>8.2E+10</text:p>
          </table:table-cell>
          <table:table-cell office:value-type="float" office:value="163767.27323544383" table:formula="of:=[.M127]/[.K127]" table:style-name="ce26">
            <text:p>163767</text:p>
          </table:table-cell>
          <table:table-cell office:value-type="float" office:value="9506" table:style-name="ce31">
            <text:p>9506</text:p>
          </table:table-cell>
          <table:table-cell office:value-type="float" office:value="33301" table:style-name="ce31">
            <text:p>33301</text:p>
          </table:table-cell>
          <table:table-cell office:value-type="float" office:value="0.28545689318639078" table:formula="of:=[.O127]/[.P127]" table:style-name="ce71">
            <text:p>0.29</text:p>
          </table:table-cell>
          <table:table-cell office:value-type="float" office:value="71.277230522556067" table:formula="of:=([.N127]*100)/([.CV127]*(([.BL127]*([.BK127]/([.BF127]+[.BK127])))+([.BG127]*([.BF127]/([.BF127]+[.BK127])))))" table:style-name="ce71">
            <text:p>71.28</text:p>
          </table:table-cell>
          <table:table-cell office:value-type="float" office:value="30.18696650538131" table:formula="of:=(([.M127]*100/[.M126])-100)-[.CY127]" table:style-name="ce65">
            <text:p>30.19</text:p>
          </table:table-cell>
          <table:table-cell office:value-type="float" office:value="511734000000" table:style-name="ce132">
            <text:p>5.12E+11</text:p>
          </table:table-cell>
          <table:table-cell office:value-type="float" office:value="2.823" table:style-name="ce65">
            <text:p>2.82</text:p>
          </table:table-cell>
          <table:table-cell office:value-type="float" office:value="65" table:style-name="ce71">
            <text:p>65.00</text:p>
          </table:table-cell>
          <table:table-cell office:value-type="float" office:value="35" table:style-name="ce34">
            <text:p>35.00</text:p>
          </table:table-cell>
          <table:table-cell office:value-type="float" office:value="25" table:style-name="ce26">
            <text:p>25</text:p>
          </table:table-cell>
          <table:table-cell office:value-type="float" office:value="2.2200000000000002" table:style-name="ce34">
            <text:p>2.22</text:p>
          </table:table-cell>
          <table:table-cell office:value-type="float" office:value="1.1299999999999999" table:style-name="ce71">
            <text:p>1.13</text:p>
          </table:table-cell>
          <table:table-cell office:value-type="float" office:value="17204185000000" table:style-name="ce83">
            <text:p>1.72E+13</text:p>
          </table:table-cell>
          <table:table-cell office:value-type="float" office:value="2.8576653904657121" table:formula="of:=([.AA127]*100/[.AA126])-100" table:style-name="ce70">
            <text:p>2.86</text:p>
          </table:table-cell>
          <table:table-cell office:value-type="float" office:value="89200" table:style-name="ce76">
            <text:p>89200</text:p>
          </table:table-cell>
          <table:table-cell office:value-type="float" office:value="3028" table:style-name="ce76">
            <text:p>3028</text:p>
          </table:table-cell>
          <table:table-cell office:value-type="float" office:value="1687152000000" table:style-name="ce125">
            <text:p>1.68715E+12</text:p>
          </table:table-cell>
          <table:table-cell office:value-type="float" office:value="5589608821852" table:formula="of:=([.AW127]*[.AR127]*1000000)+([.CV127]*[.BS127]*86)+([.AS127]*(506006-[.AX127])*1000000)" table:style-name="ce83">
            <text:p>5.59E+12</text:p>
          </table:table-cell>
          <table:table-cell office:value-type="float" office:value="4451955281852" table:formula="of:=([.CV127]*[.BS127]*86)" table:style-name="ce125">
            <text:p>4.45196E+12</text:p>
          </table:table-cell>
          <table:table-cell office:value-type="float" office:value="1023777000000" table:style-name="ce31">
            <text:p>1.02378E+12</text:p>
          </table:table-cell>
          <table:table-cell office:value-type="float" office:value="24544.787415620602" table:formula="of:=[.AH127]/[.E127]" table:style-name="ce26">
            <text:p>24545</text:p>
          </table:table-cell>
          <table:table-cell office:value-type="float" office:value="20757.656484235122" table:formula="of:=[.AJ126]*(1+([.CY127]/100))" table:style-name="ce76">
            <text:p>20758</text:p>
          </table:table-cell>
          <table:table-cell office:value-type="float" office:value="31393.61578770728" table:formula="of:=[.AI127]+(12*PMT([.U127]/100/12;[.X127]*12;([.AI127]*5)*-1))" table:style-name="ce76">
            <text:p>31394</text:p>
          </table:table-cell>
          <table:table-cell office:value-type="float" office:value="34963.225380585493" table:formula="of:=[.AL126]*(1+(([.CW127]-[.CW126])/100))" table:style-name="ce76">
            <text:p>34963</text:p>
          </table:table-cell>
          <table:table-cell office:value-type="float" office:value="24754.585239872962" table:formula="of:=(([.AL127]+([.AJ127]-[.AI127])+([.AK127]-[.AI127]))-[.AI127])+[.$AI$101]" table:style-name="ce76">
            <text:p>24755</text:p>
          </table:table-cell>
          <table:table-cell office:value-type="float" office:value="161.81785050770466" table:formula="of:=[.AM127]*[.$AN$101]/[.$AM$101]" table:style-name="ce76">
            <text:p>162</text:p>
          </table:table-cell>
          <table:table-cell office:value-type="float" office:value="111.02840285817899" table:formula="of:=[.AI127]*[.$AO$101]/[.$AI$101]" table:style-name="ce76">
            <text:p>111</text:p>
          </table:table-cell>
          <table:table-cell office:value-type="float" office:value="63.311597141821011" table:formula="of:=[.CW127]-[.AO127]" table:style-name="ce118">
            <text:p>63</text:p>
          </table:table-cell>
          <table:table-cell office:value-type="float" office:value="32753.454647088765" table:formula="of:=[.N127]/5" table:style-name="ce26">
            <text:p>32753</text:p>
          </table:table-cell>
          <table:table-cell office:value-type="float" office:value="174" table:style-name="ce32">
            <text:p>174</text:p>
          </table:table-cell>
          <table:table-cell office:value-type="float" office:value="1.03" table:style-name="ce89">
            <text:p>1.03</text:p>
          </table:table-cell>
          <table:table-cell office:value-type="float" office:value="28447" table:style-name="ce27">
            <text:p>28447</text:p>
          </table:table-cell>
          <table:table-cell office:value-type="float" office:value="18525" table:style-name="ce27">
            <text:p>18525</text:p>
          </table:table-cell>
          <table:table-cell office:value-type="float" office:value="9921" table:style-name="ce27">
            <text:p>9921</text:p>
          </table:table-cell>
          <table:table-cell office:value-type="float" office:value="3605" table:style-name="ce27">
            <text:p>3605</text:p>
          </table:table-cell>
          <table:table-cell office:value-type="float" office:value="10488" table:style-name="ce27">
            <text:p>10488</text:p>
          </table:table-cell>
          <table:table-cell office:value-type="float" office:value="77420" table:style-name="ce31">
            <text:p>77420</text:p>
          </table:table-cell>
          <table:table-cell office:value-type="float" office:value="28936" table:style-name="ce31">
            <text:p>28936</text:p>
          </table:table-cell>
          <table:table-cell office:value-type="float" office:value="45504" table:style-name="ce31">
            <text:p>45504</text:p>
          </table:table-cell>
          <table:table-cell office:value-type="float" office:value="2980" table:style-name="ce31">
            <text:p>2980</text:p>
          </table:table-cell>
          <table:table-cell office:value-type="float" office:value="119606" table:style-name="ce31">
            <text:p>119606</text:p>
          </table:table-cell>
          <table:table-cell office:value-type="float" office:value="44465" table:style-name="ce31">
            <text:p>44465</text:p>
          </table:table-cell>
          <table:table-cell office:value-type="float" office:value="2355" table:style-name="ce31">
            <text:p>2355</text:p>
          </table:table-cell>
          <table:table-cell office:value-type="float" office:value="26430" table:style-name="ce26">
            <text:p>26430</text:p>
          </table:table-cell>
          <table:table-cell office:value-type="float" office:value="190" table:style-name="ce26">
            <text:p>190</text:p>
          </table:table-cell>
          <table:table-cell office:value-type="float" office:value="4780066000" table:style-name="ce26">
            <text:p>4780066000</text:p>
          </table:table-cell>
          <table:table-cell office:value-type="float" office:value="180857.5860764283" table:formula="of:=[.BH127]/[.BF127]" table:style-name="ce26">
            <text:p>180858</text:p>
          </table:table-cell>
          <table:table-cell office:value-type="float" office:value="951.88203198120152" table:formula="of:=[.BI127]/[.BG127]" table:style-name="ce26">
            <text:p>952</text:p>
          </table:table-cell>
          <table:table-cell office:value-type="float" office:value="112533" table:style-name="ce26">
            <text:p>112533</text:p>
          </table:table-cell>
          <table:table-cell office:value-type="float" office:value="104" table:style-name="ce26">
            <text:p>104</text:p>
          </table:table-cell>
          <table:table-cell office:value-type="float" office:value="10620558000" table:style-name="ce26">
            <text:p>10620558000</text:p>
          </table:table-cell>
          <table:table-cell office:value-type="float" office:value="94377.275999040285" table:formula="of:=[.BM127]/[.BK127]" table:style-name="ce55">
            <text:p>94377</text:p>
          </table:table-cell>
          <table:table-cell office:value-type="float" office:value="907.47380768307971" table:formula="of:=[.BN127]/[.BL127]" table:style-name="ce55">
            <text:p>907</text:p>
          </table:table-cell>
          <table:table-cell office:value-type="float" office:value="2.0533993109621043" table:formula="of:=[.CV127]/(([.BO127]+[.BJ127])/2)" table:style-name="ce58">
            <text:p>2.05</text:p>
          </table:table-cell>
          <table:table-cell office:value-type="float" office:value="2.7296829818495922" table:formula="of:=[.BR127]-[.BR126]" table:style-name="ce57">
            <text:p>2.7</text:p>
          </table:table-cell>
          <table:table-cell office:value-type="float" office:value="118.5" table:style-name="ce26">
            <text:p>119</text:p>
          </table:table-cell>
          <table:table-cell office:value-type="float" office:value="27117298" table:formula="of:=[.BS126]+[.BT127]" table:style-name="ce32">
            <text:p>27117298</text:p>
          </table:table-cell>
          <table:table-cell office:value-type="float" office:value="112533" table:style-name="ce32">
            <text:p>112533</text:p>
          </table:table-cell>
          <table:table-cell office:value-type="float" office:value="101000" table:style-name="ce32">
            <text:p>101000</text:p>
          </table:table-cell>
          <table:table-cell office:value-type="float" office:value="11533" table:formula="of:=[.BT127]-[.BU127]" table:style-name="ce32">
            <text:p>11533</text:p>
          </table:table-cell>
          <table:table-cell office:value-type="float" office:value="1.8268174063654867" table:formula="of:=([.B127]/[.BS127])" table:style-name="ce36">
            <text:p>1.83</text:p>
          </table:table-cell>
          <table:table-cell office:value-type="float" office:value="2.46" table:style-name="ce89">
            <text:p>2.46</text:p>
          </table:table-cell>
          <table:table-cell office:value-type="float" office:value="1.0900000000000001" table:style-name="ce27">
            <text:p>1.09</text:p>
          </table:table-cell>
          <table:table-cell office:value-type="float" office:value="0.41671534634720331" table:formula="of:=([.BS127]*100/[.BS126])-100" table:style-name="ce33">
            <text:p>0.4</text:p>
          </table:table-cell>
          <table:table-cell office:value-type="float" office:value="409425" table:formula="of:=([.B127]-[.B126])" table:style-name="ce106">
            <text:p>409425</text:p>
          </table:table-cell>
          <table:table-cell office:value-type="float" office:value="0.83336849591687212" table:formula="of:=([.B127]*100/[.B126])-100" table:style-name="ce36">
            <text:p>0.83</text:p>
          </table:table-cell>
          <table:table-cell office:value-type="float" office:value="-53899.926829268283" table:formula="of:=[.BT127]-([.CA127]/[.BX127])" table:style-name="ce69">
            <text:p>-53900</text:p>
          </table:table-cell>
          <table:table-cell office:value-type="float" office:value="1530000" table:style-name="ce31">
            <text:p>1530000</text:p>
          </table:table-cell>
          <table:table-cell office:value-type="float" office:value="16652" table:style-name="ce123">
            <text:p>16652</text:p>
          </table:table-cell>
          <table:table-cell office:value-type="float" office:value="11.33" table:style-name="ce31">
            <text:p>11.33</text:p>
          </table:table-cell>
          <table:table-cell office:value-type="float" office:value="76.415806000000003" table:formula="of:=100-([.CF127]+[.CH127])" table:style-name="ce34">
            <text:p>76.42</text:p>
          </table:table-cell>
          <table:table-cell office:value-type="float" office:value="12.254194" table:formula="of:=(13.82*(100-[.CF127]))/100" table:style-name="ce34">
            <text:p>12.25</text:p>
          </table:table-cell>
          <table:table-cell office:value-type="float" office:value="73.3" table:style-name="ce29">
            <text:p>73.3</text:p>
          </table:table-cell>
          <table:table-cell office:value-type="float" office:value="20.2" table:style-name="ce29">
            <text:p>20.2</text:p>
          </table:table-cell>
          <table:table-cell office:value-type="float" office:value="6.5" table:style-name="ce29">
            <text:p>6.5</text:p>
          </table:table-cell>
          <table:table-cell office:value-type="string" table:style-name="ce27">
            <text:p>null</text:p>
          </table:table-cell>
          <table:table-cell office:value-type="float" office:value="194.32432432432432" table:formula="of:=[.CN127]*[.$CM$117]/[.$CN$117]" table:style-name="ce76">
            <text:p>194</text:p>
          </table:table-cell>
          <table:table-cell office:value-type="float" office:value="14.38" table:style-name="ce29">
            <text:p>14.4</text:p>
          </table:table-cell>
          <table:table-cell office:value-type="float" office:value="10.445468509984636" table:formula="of:=(([.CN127]*100)/[.CN126])-100" table:style-name="ce29">
            <text:p>10.4</text:p>
          </table:table-cell>
          <table:table-cell office:value-type="float" office:value="14.140009272137227" table:formula="of:=[.CR127]/([.CN127]*12)" table:style-name="ce29">
            <text:p>14.1</text:p>
          </table:table-cell>
          <table:table-cell office:value-type="float" office:value="18.853345696182966" table:formula="of:=[.CR127]/(([.CN127]*12)*0.75)" table:style-name="ce29">
            <text:p>18.9</text:p>
          </table:table-cell>
          <table:table-cell office:value-type="float" office:value="2440" table:style-name="ce26">
            <text:p>2440</text:p>
          </table:table-cell>
          <table:table-cell office:value-type="float" office:value="975.8746472065211" table:formula="of:=PMT(([.U127]/100)/12;[.X127]*12;([.CR127]*86))*-1" table:style-name="ce76">
            <text:p>976</text:p>
          </table:table-cell>
          <table:table-cell office:value-type="float" office:value="158.51017756604591" table:formula="of:=[.CR127]*[.$CT$117]/[.$CR$117]" table:style-name="ce76">
            <text:p>159</text:p>
          </table:table-cell>
          <table:table-cell office:value-type="float" office:value="1236.68" table:formula="of:=[.CN127]*86" table:style-name="ce76">
            <text:p>1237</text:p>
          </table:table-cell>
          <table:table-cell office:value-type="float" office:value="1909" table:style-name="ce26">
            <text:p>1909</text:p>
          </table:table-cell>
          <table:table-cell office:value-type="float" office:value="174.34" table:style-name="ce76">
            <text:p>174</text:p>
          </table:table-cell>
          <table:table-cell office:value-type="float" office:value="179.9" table:style-name="ce118">
            <text:p>180</text:p>
          </table:table-cell>
          <table:table-cell office:value-type="float" office:value="2.7" table:style-name="ce127">
            <text:p>2.70</text:p>
          </table:table-cell>
          <table:table-cell office:value-type="float" office:value="230.09" table:formula="of:=[.CZ126]+[.CY127]" table:style-name="ce133">
            <text:p>230.1</text:p>
          </table:table-cell>
          <table:table-cell office:value-type="float" office:value="1275.8588652500002" table:formula="of:=(([.CV127]*[.CY127])/100)+[.DA126]" table:style-name="ce133">
            <text:p>1275.9</text:p>
          </table:table-cell>
          <table:table-cell office:value-type="float" office:value="633.14113474999976" table:formula="of:=[.CV127]-[.DA127]" table:style-name="ce133">
            <text:p>633.1</text:p>
          </table:table-cell>
          <table:table-cell office:value-type="float" office:value="829.67534443044019" table:formula="of:=[.CV127]/[.CZ127]*[.$CZ$87]" table:style-name="ce133">
            <text:p>829.7</text:p>
          </table:table-cell>
          <table:table-cell office:value-type="float" office:value="-1.0499999999999998" table:formula="of:=([.Y127]-[.Y126])" table:style-name="ce127">
            <text:p>-1.05</text:p>
          </table:table-cell>
          <table:table-cell office:value-type="float" office:value="9.2730394962793383" table:formula="of:=([.CV127]*100/[.CV126])-100" table:style-name="ce127">
            <text:p>9.27</text:p>
          </table:table-cell>
          <table:table-cell office:value-type="float" office:value="6.5730394962793381" table:formula="of:=[.DE127]-[.CY127]" table:style-name="ce127">
            <text:p>6.57</text:p>
          </table:table-cell>
          <table:table-cell office:value-type="float" office:value="11.244720907154957" table:formula="of:=([.F127]*100/[.F126])-100" table:style-name="ce127">
            <text:p>11.24</text:p>
          </table:table-cell>
          <table:table-cell office:value-type="float" office:value="18.204601178494485" table:formula="of:=([.K127]*100/[.K126])-100" table:style-name="ce127">
            <text:p>18.20</text:p>
          </table:table-cell>
          <table:table-cell office:value-type="float" office:value="10.5" table:style-name="ce133">
            <text:p>10.5</text:p>
          </table:table-cell>
          <table:table-cell office:value-type="float" office:value="100" table:formula="of:=(([.DC127]-MIN([.DC113:.DC127]))/(MAX([.DC113:.DC127])-MIN([.DC113:.DC127])))*100" table:style-name="ce128">
            <text:p>100.0</text:p>
          </table:table-cell>
          <table:table-cell office:value-type="float" office:value="52.423282934928217" table:formula="of:=MIN(100; MAX(0; (([.K127]-([.C127]/26/2))/(([.C127]/26)-([.C127]/26/2)))*100))" table:style-name="ce128">
            <text:p>52.4</text:p>
          </table:table-cell>
          <table:table-cell office:value-type="float" office:value="100" table:formula="of:=MIN(100; MAX(0; (([.F127]-([.C127]/26/2))/(([.C127]/26)-([.C127]/26/2)))*100))" table:style-name="ce128">
            <text:p>100.0</text:p>
          </table:table-cell>
          <table:table-cell office:value-type="float" office:value="100" table:formula="of:=(([.AP127]-MIN([.$AP$2:.$AP$128]))/(MAX([.$AP$2:.$AP$128])-MIN([.$AP$2:.$AP$128])))*100" table:style-name="ce128">
            <text:p>100.0</text:p>
          </table:table-cell>
          <table:table-cell office:value-type="float" office:value="63.349827740526031" table:formula="of:=MIN(100;MAX(0;(([.BP127]-1.8)/(2.2-1.8))*100))" table:style-name="ce128">
            <text:p>63.3</text:p>
          </table:table-cell>
          <table:table-cell office:value-type="float" office:value="82.992349919721519" table:formula="of:=100-((([.CC127]-MIN([.CC98:.CC127]))/(MAX([.CC98:.CC127])-MIN([.CC98:.CC127])))*100)" table:style-name="ce128">
            <text:p>83.0</text:p>
          </table:table-cell>
          <table:table-cell office:value-type="float" office:value="39.5" table:formula="of:=MIN(100; MAX(0; ((IF(AND([.DI127]-[.DI126]&gt;=-0.3;[.DI127]-[.DI126]&lt;=0.3);100;IF(AND([.DI127]-[.DI126]&gt;-1;[.DI127]-[.DI126]&lt;-0.3);50;IF([.DI127]-[.DI126]&lt;=-1;25;75)))))-[.DI127]+(IF(([.DI127]-[.DI126])*([.DI126]-[.DI125])&lt;0;AVERAGE([.DI123:.DI127]);0))))" table:style-name="ce128">
            <text:p>39.5</text:p>
          </table:table-cell>
          <table:table-cell office:value-type="float" office:value="100" table:style-name="ce76">
            <text:p>100</text:p>
          </table:table-cell>
          <table:table-cell office:value-type="float" office:value="76.895065799310828" table:formula="of:=AVERAGE([.DJ127:.DP127])" table:style-name="ce128">
            <text:p>76.9</text:p>
          </table:table-cell>
          <table:table-cell office:value-type="float" office:value="436.36" table:formula="of:=-0.06*(([.A127]-1963)^2)+8.5*([.A127]-1963)+140" table:style-name="ce29">
            <text:p>436.4</text:p>
          </table:table-cell>
          <table:table-cell table:number-columns-repeated="16261"/>
        </table:table-row>
        <table:table-row table:style-name="ro2">
          <table:table-cell office:value-type="float" office:value="2026" table:style-name="ce15">
            <text:p>2026</text:p>
          </table:table-cell>
          <table:table-cell office:value-type="float" office:value="49984197.167999998" table:formula="of:=[.B127]*1.009" table:style-name="ce69">
            <text:p>49984197</text:p>
          </table:table-cell>
          <table:table-cell office:value-type="float" office:value="17242433.723999999" table:formula="of:=[.C127]*1.009" table:style-name="ce69">
            <text:p>17242434</text:p>
          </table:table-cell>
          <table:table-cell office:value-type="float" office:value="24933214.352999996" table:formula="of:=[.D127]*1.009" table:style-name="ce69">
            <text:p>24933214</text:p>
          </table:table-cell>
          <table:table-cell office:value-type="float" office:value="42085962.102999993" table:formula="of:=[.E127]*1.009" table:style-name="ce69">
            <text:p>42085962</text:p>
          </table:table-cell>
          <table:table-cell office:value-type="float" office:value="689868" table:style-name="ce32">
            <text:p>689868</text:p>
          </table:table-cell>
          <table:table-cell office:value-type="float" office:value="192624" table:style-name="ce27">
            <text:p>192624</text:p>
          </table:table-cell>
          <table:table-cell office:value-type="float" office:value="24120" table:style-name="ce27">
            <text:p>24120</text:p>
          </table:table-cell>
          <table:table-cell office:value-type="float" office:value="1416" table:style-name="ce11">
            <text:p>1416</text:p>
          </table:table-cell>
          <table:table-cell office:value-type="float" office:value="175788" table:style-name="ce27">
            <text:p>175788</text:p>
          </table:table-cell>
          <table:table-cell office:value-type="float" office:value="483276" table:style-name="ce27">
            <text:p>483276</text:p>
          </table:table-cell>
          <table:table-cell office:value-type="float" office:value="514656" table:style-name="ce27">
            <text:p>514656</text:p>
          </table:table-cell>
          <table:table-cell office:value-type="float" office:value="80067000000" table:style-name="ce120">
            <text:p>8.0E+10</text:p>
          </table:table-cell>
          <table:table-cell office:value-type="float" office:value="165675.51461276785" table:formula="of:=[.M128]/[.K128]" table:style-name="ce32">
            <text:p>165676</text:p>
          </table:table-cell>
          <table:table-cell office:value-type="float" office:value="17820" table:style-name="ce27">
            <text:p>17820</text:p>
          </table:table-cell>
          <table:table-cell office:value-type="float" office:value="29928" table:style-name="ce27">
            <text:p>29928</text:p>
          </table:table-cell>
          <table:table-cell office:value-type="float" office:value="0.59542902967121092" table:formula="of:=[.O128]/[.P128]" table:style-name="ce89">
            <text:p>0.60</text:p>
          </table:table-cell>
          <table:table-cell office:value-type="float" office:value="73.393896739828094" table:formula="of:=([.N128]*100)/([.CV128]*(([.BL128]*([.BK128]/([.BF128]+[.BK128])))+([.BG128]*([.BF128]/([.BF128]+[.BK128])))))" table:style-name="ce89">
            <text:p>73.39</text:p>
          </table:table-cell>
          <table:table-cell office:value-type="float" office:value="-5.0052234355423337" table:formula="of:=(([.M128]*100/[.M127])-100)-[.CY128]" table:style-name="ce59">
            <text:p>-5.01</text:p>
          </table:table-cell>
          <table:table-cell office:value-type="string" table:style-name="ce27">
            <text:p>null</text:p>
          </table:table-cell>
          <table:table-cell office:value-type="float" office:value="2.79" table:style-name="ce59">
            <text:p>2.79</text:p>
          </table:table-cell>
          <table:table-cell office:value-type="float" office:value="66.7" table:style-name="ce89">
            <text:p>66.70</text:p>
          </table:table-cell>
          <table:table-cell office:value-type="float" office:value="33.299999999999997" table:style-name="ce36">
            <text:p>33.30</text:p>
          </table:table-cell>
          <table:table-cell office:value-type="float" office:value="25" table:style-name="ce27">
            <text:p>25</text:p>
          </table:table-cell>
          <table:table-cell office:value-type="float" office:value="2.34" table:style-name="ce36">
            <text:p>2.34</text:p>
          </table:table-cell>
          <table:table-cell office:value-type="float" office:value="1.17" table:style-name="ce36">
            <text:p>1.17</text:p>
          </table:table-cell>
          <table:table-cell office:value-type="float" office:value="17369529000000" table:style-name="ce82">
            <text:p>1.74E+13</text:p>
          </table:table-cell>
          <table:table-cell office:value-type="float" office:value="0.96106848420892277" table:formula="of:=([.AA128]*100/[.AA127])-100" table:style-name="ce90">
            <text:p>0.96</text:p>
          </table:table-cell>
          <table:table-cell office:value-type="float" office:value="60000" table:style-name="ce27">
            <text:p>60000</text:p>
          </table:table-cell>
          <table:table-cell office:value-type="float" office:value="4100" table:style-name="ce27">
            <text:p>4100</text:p>
          </table:table-cell>
          <table:table-cell office:value-type="float" office:value="1720895040000" table:formula="of:=[.AE127]*1.02" table:style-name="ce27">
            <text:p>1.7209E+12</text:p>
          </table:table-cell>
          <table:table-cell office:value-type="float" office:value="5977422424980" table:formula="of:=([.AW128]*[.AR128]*1000000)+([.CV128]*[.BS128]*86)+([.AS128]*(506006-[.AW128]-[.AX128])*1000000)" table:style-name="ce82">
            <text:p>5.98E+12</text:p>
          </table:table-cell>
          <table:table-cell office:value-type="float" office:value="4839899694980" table:formula="of:=([.CV128]*[.BS128]*86)" table:style-name="ce27">
            <text:p>4.8399E+12</text:p>
          </table:table-cell>
          <table:table-cell office:value-type="float" office:value="1083777000000" table:style-name="ce27">
            <text:p>1.08378E+12</text:p>
          </table:table-cell>
          <table:table-cell office:value-type="float" office:value="25751.508242762629" table:formula="of:=[.AH128]/[.E128]" table:style-name="ce32">
            <text:p>25752</text:p>
          </table:table-cell>
          <table:table-cell office:value-type="float" office:value="21299.43131847366" table:formula="of:=[.AJ127]*(1+([.CY128]/100))" table:style-name="ce69">
            <text:p>21299</text:p>
          </table:table-cell>
          <table:table-cell office:value-type="float" office:value="32910.856709922547" table:formula="of:=[.AI128]+(12*PMT([.U128]/100/12;[.X128]*12;([.AI128]*5)*-1))" table:style-name="ce69">
            <text:p>32911</text:p>
          </table:table-cell>
          <table:table-cell office:value-type="float" office:value="36592.511683320772" table:formula="of:=[.AL127]*(1+(([.CW128]-[.CW127])/100))" table:style-name="ce69">
            <text:p>36593</text:p>
          </table:table-cell>
          <table:table-cell office:value-type="float" office:value="24822.724817635972" table:formula="of:=(([.AL128]+([.AJ128]-[.AI128])+([.AK128]-[.AI128]))-[.AI128])+[.$AI$101]" table:style-name="ce69">
            <text:p>24823</text:p>
          </table:table-cell>
          <table:table-cell office:value-type="float" office:value="162.26327101874409" table:formula="of:=[.AM128]*[.$AN$101]/[.$AM$101]" table:style-name="ce69">
            <text:p>162</text:p>
          </table:table-cell>
          <table:table-cell office:value-type="float" office:value="116.48700732130069" table:formula="of:=[.AI128]*[.$AO$101]/[.$AI$101]" table:style-name="ce69">
            <text:p>116</text:p>
          </table:table-cell>
          <table:table-cell office:value-type="float" office:value="62.512992678699305" table:formula="of:=[.CW128]-[.AO128]" table:style-name="ce69">
            <text:p>63</text:p>
          </table:table-cell>
          <table:table-cell office:value-type="float" office:value="33135.102922553568" table:formula="of:=[.N128]/5" table:style-name="ce32">
            <text:p>33135</text:p>
          </table:table-cell>
          <table:table-cell office:value-type="float" office:value="175" table:style-name="ce27">
            <text:p>175</text:p>
          </table:table-cell>
          <table:table-cell office:value-type="float" office:value="1.03" table:style-name="ce89">
            <text:p>1.03</text:p>
          </table:table-cell>
          <table:table-cell office:value-type="float" office:value="29356" table:style-name="ce27">
            <text:p>29356</text:p>
          </table:table-cell>
          <table:table-cell office:value-type="float" office:value="19080" table:style-name="ce27">
            <text:p>19080</text:p>
          </table:table-cell>
          <table:table-cell office:value-type="float" office:value="10218" table:style-name="ce27">
            <text:p>10218</text:p>
          </table:table-cell>
          <table:table-cell office:value-type="float" office:value="3605" table:style-name="ce27">
            <text:p>3605</text:p>
          </table:table-cell>
          <table:table-cell office:value-type="float" office:value="10510" table:style-name="ce27">
            <text:p>10510</text:p>
          </table:table-cell>
          <table:table-cell office:value-type="float" office:value="70500" table:style-name="ce27">
            <text:p>70500</text:p>
          </table:table-cell>
          <table:table-cell office:value-type="float" office:value="27228" table:style-name="ce27">
            <text:p>27228</text:p>
          </table:table-cell>
          <table:table-cell office:value-type="float" office:value="40644" table:style-name="ce27">
            <text:p>40644</text:p>
          </table:table-cell>
          <table:table-cell office:value-type="float" office:value="2628" table:style-name="ce27">
            <text:p>2628</text:p>
          </table:table-cell>
          <table:table-cell office:value-type="float" office:value="145404" table:style-name="ce27">
            <text:p>145404</text:p>
          </table:table-cell>
          <table:table-cell office:value-type="float" office:value="41498" table:style-name="ce27">
            <text:p>41498</text:p>
          </table:table-cell>
          <table:table-cell office:value-type="float" office:value="1308" table:style-name="ce27">
            <text:p>1308</text:p>
          </table:table-cell>
          <table:table-cell office:value-type="float" office:value="26052" table:style-name="ce27">
            <text:p>26052</text:p>
          </table:table-cell>
          <table:table-cell office:value-type="float" office:value="184" table:style-name="ce27">
            <text:p>184</text:p>
          </table:table-cell>
          <table:table-cell office:value-type="float" office:value="4795331000" table:style-name="ce27">
            <text:p>4795331000</text:p>
          </table:table-cell>
          <table:table-cell office:value-type="float" office:value="184067.67234761248" table:formula="of:=[.BH128]/[.BF128]" table:style-name="ce32">
            <text:p>184068</text:p>
          </table:table-cell>
          <table:table-cell office:value-type="float" office:value="1000.3677844978939" table:formula="of:=[.BI128]/[.BG128]" table:style-name="ce32">
            <text:p>1000</text:p>
          </table:table-cell>
          <table:table-cell office:value-type="float" office:value="135924" table:style-name="ce27">
            <text:p>135924</text:p>
          </table:table-cell>
          <table:table-cell office:value-type="float" office:value="95" table:style-name="ce27">
            <text:p>95</text:p>
          </table:table-cell>
          <table:table-cell office:value-type="float" office:value="11920046000" table:style-name="ce27">
            <text:p>11920046000</text:p>
          </table:table-cell>
          <table:table-cell office:value-type="float" office:value="87696.403872752417" table:formula="of:=[.BM128]/[.BK128]" table:style-name="ce99">
            <text:p>87696</text:p>
          </table:table-cell>
          <table:table-cell office:value-type="float" office:value="923.12004076581491" table:formula="of:=[.BN128]/[.BL128]" table:style-name="ce99">
            <text:p>923</text:p>
          </table:table-cell>
          <table:table-cell office:value-type="float" office:value="2.1471412221877619" table:formula="of:=[.CV128]/(([.BO128]+[.BJ128])/2)" table:style-name="ce100">
            <text:p>2.15</text:p>
          </table:table-cell>
          <table:table-cell office:value-type="float" office:value="2.5" table:formula="of:=[.BR128]-[.BR127]" table:style-name="ce98">
            <text:p>2.5</text:p>
          </table:table-cell>
          <table:table-cell office:value-type="float" office:value="121" table:style-name="ce32">
            <text:p>121</text:p>
          </table:table-cell>
          <table:table-cell office:value-type="float" office:value="27253222" table:formula="of:=[.BS127]+[.BT128]" table:style-name="ce32">
            <text:p>27253222</text:p>
          </table:table-cell>
          <table:table-cell office:value-type="float" office:value="135924" table:style-name="ce27">
            <text:p>135924</text:p>
          </table:table-cell>
          <table:table-cell office:value-type="float" office:value="122000" table:style-name="ce32">
            <text:p>122000</text:p>
          </table:table-cell>
          <table:table-cell office:value-type="float" office:value="13924" table:formula="of:=[.BT128]-[.BU128]" table:style-name="ce32">
            <text:p>13924</text:p>
          </table:table-cell>
          <table:table-cell office:value-type="float" office:value="1.8340656076554911" table:formula="of:=([.B128]/[.BS128])" table:style-name="ce36">
            <text:p>1.83</text:p>
          </table:table-cell>
          <table:table-cell office:value-type="float" office:value="2.46" table:style-name="ce89">
            <text:p>2.46</text:p>
          </table:table-cell>
          <table:table-cell office:value-type="float" office:value="1.05" table:style-name="ce27">
            <text:p>1.05</text:p>
          </table:table-cell>
          <table:table-cell office:value-type="float" office:value="0.50124462990376628" table:formula="of:=([.BS128]*100/[.BS127])-100" table:style-name="ce33">
            <text:p>0.5</text:p>
          </table:table-cell>
          <table:table-cell office:value-type="float" office:value="445845.16799999774" table:formula="of:=([.B128]-[.B127])" table:style-name="ce106">
            <text:p>445845</text:p>
          </table:table-cell>
          <table:table-cell office:value-type="float" office:value="0.90000000000000568" table:formula="of:=([.B128]*100/[.B127])-100" table:style-name="ce36">
            <text:p>0.90</text:p>
          </table:table-cell>
          <table:table-cell office:value-type="float" office:value="-45313.873170730803" table:formula="of:=[.BT128]-([.CA128]/[.BX128])" table:style-name="ce69">
            <text:p>-45314</text:p>
          </table:table-cell>
          <table:table-cell office:value-type="float" office:value="1550000" table:style-name="ce27">
            <text:p>1550000</text:p>
          </table:table-cell>
          <table:table-cell office:value-type="float" office:value="16100" table:style-name="ce27">
            <text:p>16100</text:p>
          </table:table-cell>
          <table:table-cell office:value-type="float" office:value="11.5" table:style-name="ce27">
            <text:p>11.5</text:p>
          </table:table-cell>
          <table:table-cell office:value-type="float" office:value="76.11" table:formula="of:=100-([.CF128]+[.CH128])" table:style-name="ce36">
            <text:p>76.11</text:p>
          </table:table-cell>
          <table:table-cell office:value-type="float" office:value="12.39" table:formula="of:=(14*(100-[.CF128]))/100" table:style-name="ce36">
            <text:p>12.39</text:p>
          </table:table-cell>
          <table:table-cell office:value-type="float" office:value="72.400000000000006" table:style-name="ce27">
            <text:p>72.4</text:p>
          </table:table-cell>
          <table:table-cell office:value-type="float" office:value="21.5" table:style-name="ce27">
            <text:p>21.5</text:p>
          </table:table-cell>
          <table:table-cell office:value-type="float" office:value="6.1" table:style-name="ce27">
            <text:p>6.1</text:p>
          </table:table-cell>
          <table:table-cell office:value-type="string" table:style-name="ce27">
            <text:p>null</text:p>
          </table:table-cell>
          <table:table-cell office:value-type="float" office:value="202.70270270270268" table:formula="of:=[.CN128]*[.$CM$117]/[.$CN$117]" table:style-name="ce69">
            <text:p>203</text:p>
          </table:table-cell>
          <table:table-cell office:value-type="float" office:value="15" table:style-name="ce27">
            <text:p>15</text:p>
          </table:table-cell>
          <table:table-cell office:value-type="float" office:value="4.3115438108483914" table:formula="of:=(([.CN128]*100)/[.CN127])-100" table:style-name="ce33">
            <text:p>4.3</text:p>
          </table:table-cell>
          <table:table-cell office:value-type="float" office:value="14.872222222222222" table:formula="of:=[.CR128]/([.CN128]*12)" table:style-name="ce33">
            <text:p>14.9</text:p>
          </table:table-cell>
          <table:table-cell office:value-type="float" office:value="19.829629629629629" table:formula="of:=[.CR128]/(([.CN128]*12)*0.75)" table:style-name="ce33">
            <text:p>19.8</text:p>
          </table:table-cell>
          <table:table-cell office:value-type="float" office:value="2677" table:style-name="ce27">
            <text:p>2677</text:p>
          </table:table-cell>
          <table:table-cell office:value-type="float" office:value="1066.759214818497" table:formula="of:=PMT(([.U128]/100)/12;[.X128]*12;([.CR128]*86))*-1" table:style-name="ce69">
            <text:p>1067</text:p>
          </table:table-cell>
          <table:table-cell office:value-type="float" office:value="173.90645300996104" table:formula="of:=[.CR128]*[.$CT$117]/[.$CR$117]" table:style-name="ce69">
            <text:p>174</text:p>
          </table:table-cell>
          <table:table-cell office:value-type="float" office:value="1290" table:formula="of:=[.CN128]*86" table:style-name="ce69">
            <text:p>1290</text:p>
          </table:table-cell>
          <table:table-cell office:value-type="float" office:value="2065" table:style-name="ce27">
            <text:p>2065</text:p>
          </table:table-cell>
          <table:table-cell office:value-type="float" office:value="179" table:style-name="ce27">
            <text:p>179</text:p>
          </table:table-cell>
          <table:table-cell office:value-type="float" office:value="183" table:style-name="ce27">
            <text:p>183</text:p>
          </table:table-cell>
          <table:table-cell office:value-type="float" office:value="2.61" table:style-name="ce27">
            <text:p>2.61</text:p>
          </table:table-cell>
          <table:table-cell office:value-type="float" office:value="232.70000000000002" table:formula="of:=[.CZ127]+[.CY128]" table:style-name="ce33">
            <text:p>232.7</text:p>
          </table:table-cell>
          <table:table-cell office:value-type="float" office:value="1329.7553652500003" table:formula="of:=(([.CV128]*[.CY128])/100)+[.DA127]" table:style-name="ce33">
            <text:p>1329.8</text:p>
          </table:table-cell>
          <table:table-cell office:value-type="float" office:value="735.2446347499997" table:formula="of:=[.CV128]-[.DA128]" table:style-name="ce33">
            <text:p>735.2</text:p>
          </table:table-cell>
          <table:table-cell office:value-type="float" office:value="887.40868070476995" table:formula="of:=[.CV128]/[.CZ128]*[.$CZ$87]" table:style-name="ce33">
            <text:p>887.4</text:p>
          </table:table-cell>
          <table:table-cell office:value-type="float" office:value="0.11999999999999966" table:formula="of:=([.Y128]-[.Y127])" table:style-name="ce36">
            <text:p>0.12</text:p>
          </table:table-cell>
          <table:table-cell office:value-type="float" office:value="8.1718177056050223" table:formula="of:=([.CV128]*100/[.CV127])-100" table:style-name="ce36">
            <text:p>8.17</text:p>
          </table:table-cell>
          <table:table-cell office:value-type="float" office:value="5.5618177056050229" table:formula="of:=[.DE128]-[.CY128]" table:style-name="ce36">
            <text:p>5.56</text:p>
          </table:table-cell>
          <table:table-cell office:value-type="float" office:value="-3.3934975584686242" table:formula="of:=([.F128]*100/[.F127])-100" table:style-name="ce36">
            <text:p>-3.39</text:p>
          </table:table-cell>
          <table:table-cell office:value-type="float" office:value="-3.5194298320040787" table:formula="of:=([.K128]*100/[.K127])-100" table:style-name="ce36">
            <text:p>-3.52</text:p>
          </table:table-cell>
          <table:table-cell office:value-type="float" office:value="9.9" table:style-name="ce27">
            <text:p>9.9</text:p>
          </table:table-cell>
          <table:table-cell office:value-type="float" office:value="100" table:formula="of:=(([.DC128]-MIN([.DC114:.DC128]))/(MAX([.DC114:.DC128])-MIN([.DC114:.DC128])))*100" table:style-name="ce92">
            <text:p>100.0</text:p>
          </table:table-cell>
          <table:table-cell office:value-type="float" office:value="45.747128289788293" table:formula="of:=MIN(100; MAX(0; (([.K128]-([.C128]/26/2))/(([.C128]/26)-([.C128]/26/2)))*100))" table:style-name="ce92">
            <text:p>45.7</text:p>
          </table:table-cell>
          <table:table-cell office:value-type="float" office:value="100" table:formula="of:=MIN(100; MAX(0; (([.F128]-([.C128]/26/2))/(([.C128]/26)-([.C128]/26/2)))*100))" table:style-name="ce92">
            <text:p>100.0</text:p>
          </table:table-cell>
          <table:table-cell office:value-type="float" office:value="98.746974541202576" table:formula="of:=(([.AP128]-MIN([.$AP$2:.$AP$128]))/(MAX([.$AP$2:.$AP$128])-MIN([.$AP$2:.$AP$128])))*100" table:style-name="ce92">
            <text:p>98.7</text:p>
          </table:table-cell>
          <table:table-cell office:value-type="float" office:value="86.785305546940435" table:formula="of:=MIN(100;MAX(0;(([.BP128]-1.8)/(2.2-1.8))*100))" table:style-name="ce92">
            <text:p>86.8</text:p>
          </table:table-cell>
          <table:table-cell office:value-type="float" office:value="81.464162792248715" table:formula="of:=100-((([.CC128]-MIN([.CC99:.CC128]))/(MAX([.CC99:.CC128])-MIN([.CC99:.CC128])))*100)" table:style-name="ce92">
            <text:p>81.5</text:p>
          </table:table-cell>
          <table:table-cell office:value-type="float" office:value="40.1" table:formula="of:=MIN(100; MAX(0; ((IF(AND([.DI128]-[.DI127]&gt;=-0.3;[.DI128]-[.DI127]&lt;=0.3);100;IF(AND([.DI128]-[.DI127]&gt;-1;[.DI128]-[.DI127]&lt;-0.3);50;IF([.DI128]-[.DI127]&lt;=-1;25;75)))))-[.DI128]+(IF(([.DI128]-[.DI127])*([.DI127]-[.DI126])&lt;0;AVERAGE([.DI124:.DI128]);0))))" table:style-name="ce92">
            <text:p>40.1</text:p>
          </table:table-cell>
          <table:table-cell office:value-type="float" office:value="100" table:style-name="ce69">
            <text:p>100</text:p>
          </table:table-cell>
          <table:table-cell office:value-type="float" office:value="78.977653024311437" table:formula="of:=AVERAGE([.DJ128:.DP128])" table:style-name="ce92">
            <text:p>79.0</text:p>
          </table:table-cell>
          <table:table-cell office:value-type="float" office:value="437.36" table:formula="of:=-0.06*(([.A128]-1963)^2)+8.5*([.A128]-1963)+140" table:style-name="ce33">
            <text:p>437.4</text:p>
          </table:table-cell>
          <table:table-cell table:number-columns-repeated="16261"/>
        </table:table-row>
        <table:table-row table:style-name="ro2">
          <table:table-cell office:value-type="float" office:value="2027" table:style-name="ce15">
            <text:p>202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8.24" table:formula="of:=-0.06*(([.A129]-1963)^2)+8.5*([.A129]-1963)+140" table:style-name="ce33">
            <text:p>438.2</text:p>
          </table:table-cell>
          <table:table-cell table:number-columns-repeated="16261"/>
        </table:table-row>
        <table:table-row table:style-name="ro2">
          <table:table-cell office:value-type="float" office:value="2028" table:style-name="ce15">
            <text:p>202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9" table:formula="of:=-0.06*(([.A130]-1963)^2)+8.5*([.A130]-1963)+140" table:style-name="ce33">
            <text:p>439.0</text:p>
          </table:table-cell>
          <table:table-cell table:number-columns-repeated="16261"/>
        </table:table-row>
        <table:table-row table:style-name="ro2">
          <table:table-cell office:value-type="float" office:value="2029" table:style-name="ce15">
            <text:p>202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9.64" table:formula="of:=-0.06*(([.A131]-1963)^2)+8.5*([.A131]-1963)+140" table:style-name="ce33">
            <text:p>439.6</text:p>
          </table:table-cell>
          <table:table-cell table:number-columns-repeated="16261"/>
        </table:table-row>
        <table:table-row table:style-name="ro2">
          <table:table-cell office:value-type="float" office:value="2030" table:style-name="ce15">
            <text:p>203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0.16" table:formula="of:=-0.06*(([.A132]-1963)^2)+8.5*([.A132]-1963)+140" table:style-name="ce33">
            <text:p>440.2</text:p>
          </table:table-cell>
          <table:table-cell table:number-columns-repeated="16261"/>
        </table:table-row>
        <table:table-row table:style-name="ro2">
          <table:table-cell office:value-type="float" office:value="2031" table:style-name="ce15">
            <text:p>203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0.56" table:formula="of:=-0.06*(([.A133]-1963)^2)+8.5*([.A133]-1963)+140" table:style-name="ce33">
            <text:p>440.6</text:p>
          </table:table-cell>
          <table:table-cell table:number-columns-repeated="16261"/>
        </table:table-row>
        <table:table-row table:style-name="ro2">
          <table:table-cell office:value-type="float" office:value="2032" table:style-name="ce15">
            <text:p>203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0.84000000000003" table:formula="of:=-0.06*(([.A134]-1963)^2)+8.5*([.A134]-1963)+140" table:style-name="ce33">
            <text:p>440.8</text:p>
          </table:table-cell>
          <table:table-cell table:number-columns-repeated="16261"/>
        </table:table-row>
        <table:table-row table:style-name="ro2">
          <table:table-cell office:value-type="float" office:value="2033" table:style-name="ce15">
            <text:p>203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1" table:formula="of:=-0.06*(([.A135]-1963)^2)+8.5*([.A135]-1963)+140" table:style-name="ce33">
            <text:p>441.0</text:p>
          </table:table-cell>
          <table:table-cell table:number-columns-repeated="16261"/>
        </table:table-row>
        <table:table-row table:style-name="ro2">
          <table:table-cell office:value-type="float" office:value="2034" table:style-name="ce15">
            <text:p>203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1.04" table:formula="of:=-0.06*(([.A136]-1963)^2)+8.5*([.A136]-1963)+140" table:style-name="ce33">
            <text:p>441.0</text:p>
          </table:table-cell>
          <table:table-cell table:number-columns-repeated="16261"/>
        </table:table-row>
        <table:table-row table:style-name="ro2">
          <table:table-cell office:value-type="float" office:value="2035" table:style-name="ce15">
            <text:p>203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0.96000000000004" table:formula="of:=-0.06*(([.A137]-1963)^2)+8.5*([.A137]-1963)+140" table:style-name="ce33">
            <text:p>441.0</text:p>
          </table:table-cell>
          <table:table-cell table:number-columns-repeated="16261"/>
        </table:table-row>
        <table:table-row table:style-name="ro2">
          <table:table-cell office:value-type="float" office:value="2036" table:style-name="ce15">
            <text:p>203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0.76" table:formula="of:=-0.06*(([.A138]-1963)^2)+8.5*([.A138]-1963)+140" table:style-name="ce33">
            <text:p>440.8</text:p>
          </table:table-cell>
          <table:table-cell table:number-columns-repeated="16261"/>
        </table:table-row>
        <table:table-row table:style-name="ro2">
          <table:table-cell office:value-type="float" office:value="2037" table:style-name="ce15">
            <text:p>203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0.44" table:formula="of:=-0.06*(([.A139]-1963)^2)+8.5*([.A139]-1963)+140" table:style-name="ce33">
            <text:p>440.4</text:p>
          </table:table-cell>
          <table:table-cell table:number-columns-repeated="16261"/>
        </table:table-row>
        <table:table-row table:style-name="ro2">
          <table:table-cell office:value-type="float" office:value="2038" table:style-name="ce15">
            <text:p>203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40" table:formula="of:=-0.06*(([.A140]-1963)^2)+8.5*([.A140]-1963)+140" table:style-name="ce33">
            <text:p>440.0</text:p>
          </table:table-cell>
          <table:table-cell table:number-columns-repeated="16261"/>
        </table:table-row>
        <table:table-row table:style-name="ro2">
          <table:table-cell office:value-type="float" office:value="2039" table:style-name="ce15">
            <text:p>203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9.44" table:formula="of:=-0.06*(([.A141]-1963)^2)+8.5*([.A141]-1963)+140" table:style-name="ce33">
            <text:p>439.4</text:p>
          </table:table-cell>
          <table:table-cell table:number-columns-repeated="16261"/>
        </table:table-row>
        <table:table-row table:style-name="ro2">
          <table:table-cell office:value-type="float" office:value="2040" table:style-name="ce15">
            <text:p>204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8.76" table:formula="of:=-0.06*(([.A142]-1963)^2)+8.5*([.A142]-1963)+140" table:style-name="ce33">
            <text:p>438.8</text:p>
          </table:table-cell>
          <table:table-cell table:number-columns-repeated="16261"/>
        </table:table-row>
        <table:table-row table:style-name="ro2">
          <table:table-cell office:value-type="float" office:value="2041" table:style-name="ce15">
            <text:p>204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7.96000000000004" table:formula="of:=-0.06*(([.A143]-1963)^2)+8.5*([.A143]-1963)+140" table:style-name="ce33">
            <text:p>438.0</text:p>
          </table:table-cell>
          <table:table-cell table:number-columns-repeated="16261"/>
        </table:table-row>
        <table:table-row table:style-name="ro2">
          <table:table-cell office:value-type="float" office:value="2042" table:style-name="ce15">
            <text:p>204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7.04" table:formula="of:=-0.06*(([.A144]-1963)^2)+8.5*([.A144]-1963)+140" table:style-name="ce33">
            <text:p>437.0</text:p>
          </table:table-cell>
          <table:table-cell table:number-columns-repeated="16261"/>
        </table:table-row>
        <table:table-row table:style-name="ro2">
          <table:table-cell office:value-type="float" office:value="2043" table:style-name="ce15">
            <text:p>204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6" table:formula="of:=-0.06*(([.A145]-1963)^2)+8.5*([.A145]-1963)+140" table:style-name="ce33">
            <text:p>436.0</text:p>
          </table:table-cell>
          <table:table-cell table:number-columns-repeated="16261"/>
        </table:table-row>
        <table:table-row table:style-name="ro2">
          <table:table-cell office:value-type="float" office:value="2044" table:style-name="ce15">
            <text:p>204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4.84000000000003" table:formula="of:=-0.06*(([.A146]-1963)^2)+8.5*([.A146]-1963)+140" table:style-name="ce33">
            <text:p>434.8</text:p>
          </table:table-cell>
          <table:table-cell table:number-columns-repeated="16261"/>
        </table:table-row>
        <table:table-row table:style-name="ro2">
          <table:table-cell office:value-type="float" office:value="2045" table:style-name="ce15">
            <text:p>204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3.56" table:formula="of:=-0.06*(([.A147]-1963)^2)+8.5*([.A147]-1963)+140" table:style-name="ce33">
            <text:p>433.6</text:p>
          </table:table-cell>
          <table:table-cell table:number-columns-repeated="16261"/>
        </table:table-row>
        <table:table-row table:style-name="ro2">
          <table:table-cell office:value-type="float" office:value="2046" table:style-name="ce15">
            <text:p>204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2.16" table:formula="of:=-0.06*(([.A148]-1963)^2)+8.5*([.A148]-1963)+140" table:style-name="ce33">
            <text:p>432.2</text:p>
          </table:table-cell>
          <table:table-cell table:number-columns-repeated="16261"/>
        </table:table-row>
        <table:table-row table:style-name="ro2">
          <table:table-cell office:value-type="float" office:value="2047" table:style-name="ce15">
            <text:p>204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30.64000000000004" table:formula="of:=-0.06*(([.A149]-1963)^2)+8.5*([.A149]-1963)+140" table:style-name="ce33">
            <text:p>430.6</text:p>
          </table:table-cell>
          <table:table-cell table:number-columns-repeated="16261"/>
        </table:table-row>
        <table:table-row table:style-name="ro2">
          <table:table-cell office:value-type="float" office:value="2048" table:style-name="ce15">
            <text:p>204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29" table:formula="of:=-0.06*(([.A150]-1963)^2)+8.5*([.A150]-1963)+140" table:style-name="ce33">
            <text:p>429.0</text:p>
          </table:table-cell>
          <table:table-cell table:number-columns-repeated="16261"/>
        </table:table-row>
        <table:table-row table:style-name="ro2">
          <table:table-cell office:value-type="float" office:value="2049" table:style-name="ce15">
            <text:p>204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27.24" table:formula="of:=-0.06*(([.A151]-1963)^2)+8.5*([.A151]-1963)+140" table:style-name="ce33">
            <text:p>427.2</text:p>
          </table:table-cell>
          <table:table-cell table:number-columns-repeated="16261"/>
        </table:table-row>
        <table:table-row table:style-name="ro2">
          <table:table-cell office:value-type="float" office:value="2050" table:style-name="ce15">
            <text:p>205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25.36" table:formula="of:=-0.06*(([.A152]-1963)^2)+8.5*([.A152]-1963)+140" table:style-name="ce33">
            <text:p>425.4</text:p>
          </table:table-cell>
          <table:table-cell table:number-columns-repeated="16261"/>
        </table:table-row>
        <table:table-row table:style-name="ro2">
          <table:table-cell office:value-type="float" office:value="2051" table:style-name="ce15">
            <text:p>205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23.36" table:formula="of:=-0.06*(([.A153]-1963)^2)+8.5*([.A153]-1963)+140" table:style-name="ce33">
            <text:p>423.4</text:p>
          </table:table-cell>
          <table:table-cell table:number-columns-repeated="16261"/>
        </table:table-row>
        <table:table-row table:style-name="ro2">
          <table:table-cell office:value-type="float" office:value="2052" table:style-name="ce15">
            <text:p>205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21.24" table:formula="of:=-0.06*(([.A154]-1963)^2)+8.5*([.A154]-1963)+140" table:style-name="ce33">
            <text:p>421.2</text:p>
          </table:table-cell>
          <table:table-cell table:number-columns-repeated="16261"/>
        </table:table-row>
        <table:table-row table:style-name="ro2">
          <table:table-cell office:value-type="float" office:value="2053" table:style-name="ce15">
            <text:p>205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19" table:formula="of:=-0.06*(([.A155]-1963)^2)+8.5*([.A155]-1963)+140" table:style-name="ce33">
            <text:p>419.0</text:p>
          </table:table-cell>
          <table:table-cell table:number-columns-repeated="16261"/>
        </table:table-row>
        <table:table-row table:style-name="ro2">
          <table:table-cell office:value-type="float" office:value="2054" table:style-name="ce15">
            <text:p>205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16.64000000000004" table:formula="of:=-0.06*(([.A156]-1963)^2)+8.5*([.A156]-1963)+140" table:style-name="ce33">
            <text:p>416.6</text:p>
          </table:table-cell>
          <table:table-cell table:number-columns-repeated="16261"/>
        </table:table-row>
        <table:table-row table:style-name="ro2">
          <table:table-cell office:value-type="float" office:value="2055" table:style-name="ce15">
            <text:p>205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14.16" table:formula="of:=-0.06*(([.A157]-1963)^2)+8.5*([.A157]-1963)+140" table:style-name="ce33">
            <text:p>414.2</text:p>
          </table:table-cell>
          <table:table-cell table:number-columns-repeated="16261"/>
        </table:table-row>
        <table:table-row table:style-name="ro2">
          <table:table-cell office:value-type="float" office:value="2056" table:style-name="ce15">
            <text:p>205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11.56000000000006" table:formula="of:=-0.06*(([.A158]-1963)^2)+8.5*([.A158]-1963)+140" table:style-name="ce33">
            <text:p>411.6</text:p>
          </table:table-cell>
          <table:table-cell table:number-columns-repeated="16261"/>
        </table:table-row>
        <table:table-row table:style-name="ro2">
          <table:table-cell office:value-type="float" office:value="2057" table:style-name="ce15">
            <text:p>205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08.84000000000003" table:formula="of:=-0.06*(([.A159]-1963)^2)+8.5*([.A159]-1963)+140" table:style-name="ce33">
            <text:p>408.8</text:p>
          </table:table-cell>
          <table:table-cell table:number-columns-repeated="16261"/>
        </table:table-row>
        <table:table-row table:style-name="ro2">
          <table:table-cell office:value-type="float" office:value="2058" table:style-name="ce15">
            <text:p>205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06" table:formula="of:=-0.06*(([.A160]-1963)^2)+8.5*([.A160]-1963)+140" table:style-name="ce33">
            <text:p>406.0</text:p>
          </table:table-cell>
          <table:table-cell table:number-columns-repeated="16261"/>
        </table:table-row>
        <table:table-row table:style-name="ro2">
          <table:table-cell office:value-type="float" office:value="2059" table:style-name="ce15">
            <text:p>205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403.03999999999996" table:formula="of:=-0.06*(([.A161]-1963)^2)+8.5*([.A161]-1963)+140" table:style-name="ce33">
            <text:p>403.0</text:p>
          </table:table-cell>
          <table:table-cell table:number-columns-repeated="16261"/>
        </table:table-row>
        <table:table-row table:style-name="ro2">
          <table:table-cell office:value-type="float" office:value="2060" table:style-name="ce15">
            <text:p>206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99.96000000000004" table:formula="of:=-0.06*(([.A162]-1963)^2)+8.5*([.A162]-1963)+140" table:style-name="ce33">
            <text:p>400.0</text:p>
          </table:table-cell>
          <table:table-cell table:number-columns-repeated="16261"/>
        </table:table-row>
        <table:table-row table:style-name="ro2">
          <table:table-cell office:value-type="float" office:value="2061" table:style-name="ce15">
            <text:p>2061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96.76" table:formula="of:=-0.06*(([.A163]-1963)^2)+8.5*([.A163]-1963)+140" table:style-name="ce33">
            <text:p>396.8</text:p>
          </table:table-cell>
          <table:table-cell table:number-columns-repeated="16261"/>
        </table:table-row>
        <table:table-row table:style-name="ro2">
          <table:table-cell office:value-type="float" office:value="2062" table:style-name="ce15">
            <text:p>2062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93.44000000000005" table:formula="of:=-0.06*(([.A164]-1963)^2)+8.5*([.A164]-1963)+140" table:style-name="ce33">
            <text:p>393.4</text:p>
          </table:table-cell>
          <table:table-cell table:number-columns-repeated="16261"/>
        </table:table-row>
        <table:table-row table:style-name="ro2">
          <table:table-cell office:value-type="float" office:value="2063" table:style-name="ce15">
            <text:p>2063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90" table:formula="of:=-0.06*(([.A165]-1963)^2)+8.5*([.A165]-1963)+140" table:style-name="ce33">
            <text:p>390.0</text:p>
          </table:table-cell>
          <table:table-cell table:number-columns-repeated="16261"/>
        </table:table-row>
        <table:table-row table:style-name="ro2">
          <table:table-cell office:value-type="float" office:value="2064" table:style-name="ce15">
            <text:p>2064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86.44000000000005" table:formula="of:=-0.06*(([.A166]-1963)^2)+8.5*([.A166]-1963)+140" table:style-name="ce33">
            <text:p>386.4</text:p>
          </table:table-cell>
          <table:table-cell table:number-columns-repeated="16261"/>
        </table:table-row>
        <table:table-row table:style-name="ro2">
          <table:table-cell office:value-type="float" office:value="2065" table:style-name="ce15">
            <text:p>2065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82.76" table:formula="of:=-0.06*(([.A167]-1963)^2)+8.5*([.A167]-1963)+140" table:style-name="ce33">
            <text:p>382.8</text:p>
          </table:table-cell>
          <table:table-cell table:number-columns-repeated="16261"/>
        </table:table-row>
        <table:table-row table:style-name="ro2">
          <table:table-cell office:value-type="float" office:value="2066" table:style-name="ce15">
            <text:p>2066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78.96000000000004" table:formula="of:=-0.06*(([.A168]-1963)^2)+8.5*([.A168]-1963)+140" table:style-name="ce33">
            <text:p>379.0</text:p>
          </table:table-cell>
          <table:table-cell table:number-columns-repeated="16261"/>
        </table:table-row>
        <table:table-row table:style-name="ro2">
          <table:table-cell office:value-type="float" office:value="2067" table:style-name="ce15">
            <text:p>2067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75.04000000000008" table:formula="of:=-0.06*(([.A169]-1963)^2)+8.5*([.A169]-1963)+140" table:style-name="ce33">
            <text:p>375.0</text:p>
          </table:table-cell>
          <table:table-cell table:number-columns-repeated="16261"/>
        </table:table-row>
        <table:table-row table:style-name="ro2">
          <table:table-cell office:value-type="float" office:value="2068" table:style-name="ce15">
            <text:p>2068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71" table:formula="of:=-0.06*(([.A170]-1963)^2)+8.5*([.A170]-1963)+140" table:style-name="ce33">
            <text:p>371.0</text:p>
          </table:table-cell>
          <table:table-cell table:number-columns-repeated="16261"/>
        </table:table-row>
        <table:table-row table:style-name="ro2">
          <table:table-cell office:value-type="float" office:value="2069" table:style-name="ce15">
            <text:p>2069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66.84000000000003" table:formula="of:=-0.06*(([.A171]-1963)^2)+8.5*([.A171]-1963)+140" table:style-name="ce33">
            <text:p>366.8</text:p>
          </table:table-cell>
          <table:table-cell table:number-columns-repeated="16261"/>
        </table:table-row>
        <table:table-row table:style-name="ro2">
          <table:table-cell office:value-type="float" office:value="2070" table:style-name="ce15">
            <text:p>2070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97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table:style-name="ce135"/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18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string" table:style-name="ce125">
            <text:p>null</text:p>
          </table:table-cell>
          <table:table-cell office:value-type="float" office:value="362.56000000000006" table:formula="of:=-0.06*(([.A172]-1963)^2)+8.5*([.A172]-1963)+140" table:style-name="ce33">
            <text:p>362.6</text:p>
          </table:table-cell>
          <table:table-cell table:number-columns-repeated="16261"/>
        </table:table-row>
        <table:table-row table:number-rows-repeated="1048404" table:style-name="ro3">
          <table:table-cell table:number-columns-repeated="16384"/>
        </table:table-row>
      </table:table>
      <table:table table:name="Quarterly" table:style-name="ta2">
        <table:table-column table:style-name="co27" table:default-cell-style-name="ce43"/>
        <table:table-column table:style-name="co43" table:default-cell-style-name="ce1"/>
        <table:table-column table:style-name="co46" table:default-cell-style-name="ce1"/>
        <table:table-column table:style-name="co41" table:default-cell-style-name="ce1"/>
        <table:table-column table:style-name="co47" table:default-cell-style-name="ce1"/>
        <table:table-column table:style-name="co39" table:default-cell-style-name="ce1"/>
        <table:table-column table:style-name="co48" table:number-columns-repeated="2" table:default-cell-style-name="ce1"/>
        <table:table-column table:style-name="co7" table:default-cell-style-name="ce1"/>
        <table:table-column table:style-name="co43" table:number-columns-repeated="3" table:default-cell-style-name="ce1"/>
        <table:table-column table:style-name="co7" table:default-cell-style-name="ce1"/>
        <table:table-column table:style-name="co43" table:number-columns-repeated="16371" table:default-cell-style-name="ce1"/>
        <table:table-row table:style-name="ro4">
          <table:table-cell office:value-type="string" table:style-name="ce14">
            <text:p>Quarter</text:p>
          </table:table-cell>
          <table:table-cell office:value-type="string" table:style-name="ce66">
            <text:p>HPI</text:p>
          </table:table-cell>
          <table:table-cell office:value-type="string" table:style-name="ce66">
            <text:p>Unemployment</text:p>
          </table:table-cell>
          <table:table-cell office:value-type="string" table:style-name="ce66">
            <text:p>Sales</text:p>
          </table:table-cell>
          <table:table-cell office:value-type="string" table:style-name="ce66">
            <text:p>Price_idealista</text:p>
          </table:table-cell>
          <table:table-cell office:value-type="string" table:style-name="ce66">
            <text:p>Price_notaries</text:p>
          </table:table-cell>
          <table:table-cell office:value-type="string" table:style-name="ce66">
            <text:p>Spread</text:p>
          </table:table-cell>
          <table:table-cell office:value-type="string" table:style-name="ce66">
            <text:p>Av_Spread</text:p>
          </table:table-cell>
          <table:table-cell office:value-type="string" table:style-name="ce66">
            <text:p>Sharp_change</text:p>
          </table:table-cell>
          <table:table-cell office:value-type="string" table:style-name="ce40">
            <text:p>Ide_1</text:p>
          </table:table-cell>
          <table:table-cell office:value-type="string" table:style-name="ce40">
            <text:p>Ide_2</text:p>
          </table:table-cell>
          <table:table-cell office:value-type="string" table:style-name="ce40">
            <text:p>Ide_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1">
            <text:p>2007T1</text:p>
          </table:table-cell>
          <table:table-cell office:value-type="float" office:value="145.935" table:style-name="ce5">
            <text:p>146</text:p>
          </table:table-cell>
          <table:table-cell office:value-type="float" office:value="8.42" table:style-name="ce6">
            <text:p>8.4</text:p>
          </table:table-cell>
          <table:table-cell office:value-type="float" office:value="230023" table:style-name="ce5">
            <text:p>230023</text:p>
          </table:table-cell>
          <table:table-cell office:value-type="float" office:value="1995.6666666666667" table:formula="of:=AVERAGE([.J2:.L2])" table:style-name="ce5">
            <text:p>1996</text:p>
          </table:table-cell>
          <table:table-cell office:value-type="float" office:value="1756" table:style-name="ce44">
            <text:p>1756</text:p>
          </table:table-cell>
          <table:table-cell office:value-type="float" office:value="12.009353599465513" table:formula="of:=ABS((([.F2]*100/[.E2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995.6666666666667" table:formula="of:=[.E2]" table:style-name="ce5">
            <text:p>1996</text:p>
          </table:table-cell>
          <table:table-cell office:value-type="float" office:value="1980" table:style-name="ce38">
            <text:p>1980</text:p>
          </table:table-cell>
          <table:table-cell office:value-type="float" office:value="1984" table:style-name="ce38">
            <text:p>1984</text:p>
          </table:table-cell>
          <table:table-cell office:value-type="float" office:value="2023" table:style-name="ce39">
            <text:p>202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07T2</text:p>
          </table:table-cell>
          <table:table-cell office:value-type="float" office:value="150.10300000000001" table:style-name="ce5">
            <text:p>150</text:p>
          </table:table-cell>
          <table:table-cell office:value-type="float" office:value="7.93" table:style-name="ce6">
            <text:p>7.9</text:p>
          </table:table-cell>
          <table:table-cell office:value-type="float" office:value="202585" table:style-name="ce5">
            <text:p>202585</text:p>
          </table:table-cell>
          <table:table-cell office:value-type="float" office:value="2037.3333333333333" table:formula="of:=AVERAGE([.J3:.L3])" table:style-name="ce5">
            <text:p>2037</text:p>
          </table:table-cell>
          <table:table-cell office:value-type="float" office:value="1810.0966666666666" table:style-name="ce44">
            <text:p>1810</text:p>
          </table:table-cell>
          <table:table-cell office:value-type="float" office:value="11.153632198952877" table:formula="of:=ABS((([.F3]*100/[.E3])-100)*-1)" table:style-name="ce5">
            <text:p>11</text:p>
          </table:table-cell>
          <table:table-cell office:value-type="float" office:value="16" table:style-name="ce94">
            <text:p>16</text:p>
          </table:table-cell>
          <table:table-cell office:value-type="float" office:value="2091.4299999999998" table:formula="of:=[.E3]+([.F3]-[.F2])" table:style-name="ce5">
            <text:p>2091</text:p>
          </table:table-cell>
          <table:table-cell office:value-type="float" office:value="2015" table:style-name="ce38">
            <text:p>2015</text:p>
          </table:table-cell>
          <table:table-cell office:value-type="float" office:value="2044" table:style-name="ce38">
            <text:p>2044</text:p>
          </table:table-cell>
          <table:table-cell office:value-type="float" office:value="2053" table:style-name="ce39">
            <text:p>2053</text:p>
          </table:table-cell>
          <table:table-cell table:number-columns-repeated="2" table:style-name="ce1"/>
          <table:table-cell table:style-name="ce101"/>
          <table:table-cell table:number-columns-repeated="16369"/>
        </table:table-row>
        <table:table-row table:style-name="ro2">
          <table:table-cell office:value-type="string" table:style-name="ce42">
            <text:p>2007T3</text:p>
          </table:table-cell>
          <table:table-cell office:value-type="float" office:value="151.71899999999999" table:style-name="ce5">
            <text:p>152</text:p>
          </table:table-cell>
          <table:table-cell office:value-type="float" office:value="8.01" table:style-name="ce6">
            <text:p>8.0</text:p>
          </table:table-cell>
          <table:table-cell office:value-type="float" office:value="184326" table:style-name="ce5">
            <text:p>184326</text:p>
          </table:table-cell>
          <table:table-cell office:value-type="float" office:value="2031" table:formula="of:=AVERAGE([.J4:.L4])" table:style-name="ce5">
            <text:p>2031</text:p>
          </table:table-cell>
          <table:table-cell office:value-type="float" office:value="1782.9466666666667" table:style-name="ce44">
            <text:p>1783</text:p>
          </table:table-cell>
          <table:table-cell office:value-type="float" office:value="12.213359592975536" table:formula="of:=ABS((([.F4]*100/[.E4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2003.8500000000001" table:formula="of:=[.E4]+([.F4]-[.F3])" table:style-name="ce5">
            <text:p>2004</text:p>
          </table:table-cell>
          <table:table-cell office:value-type="float" office:value="2045" table:style-name="ce38">
            <text:p>2045</text:p>
          </table:table-cell>
          <table:table-cell office:value-type="float" office:value="2026" table:style-name="ce38">
            <text:p>2026</text:p>
          </table:table-cell>
          <table:table-cell office:value-type="float" office:value="2022" table:style-name="ce39">
            <text:p>2022</text:p>
          </table:table-cell>
          <table:table-cell table:number-columns-repeated="2" table:style-name="ce1"/>
          <table:table-cell table:style-name="ce101"/>
          <table:table-cell table:number-columns-repeated="16369"/>
        </table:table-row>
        <table:table-row table:style-name="ro2">
          <table:table-cell office:value-type="string" table:style-name="ce42">
            <text:p>2007T4</text:p>
          </table:table-cell>
          <table:table-cell office:value-type="float" office:value="150.63999999999999" table:style-name="ce5">
            <text:p>151</text:p>
          </table:table-cell>
          <table:table-cell office:value-type="float" office:value="8.57" table:style-name="ce6">
            <text:p>8.6</text:p>
          </table:table-cell>
          <table:table-cell office:value-type="float" office:value="158366" table:style-name="ce5">
            <text:p>158366</text:p>
          </table:table-cell>
          <table:table-cell office:value-type="float" office:value="2036" table:formula="of:=AVERAGE([.J5:.L5])" table:style-name="ce5">
            <text:p>2036</text:p>
          </table:table-cell>
          <table:table-cell office:value-type="float" office:value="1812.3799999999999" table:style-name="ce44">
            <text:p>1812</text:p>
          </table:table-cell>
          <table:table-cell office:value-type="float" office:value="10.983300589390964" table:formula="of:=ABS((([.F5]*100/[.E5])-100)*-1)" table:style-name="ce5">
            <text:p>11</text:p>
          </table:table-cell>
          <table:table-cell office:value-type="float" office:value="16" table:style-name="ce94">
            <text:p>16</text:p>
          </table:table-cell>
          <table:table-cell office:value-type="float" office:value="2065.4333333333334" table:formula="of:=[.E5]+([.F5]-[.F4])" table:style-name="ce5">
            <text:p>2065</text:p>
          </table:table-cell>
          <table:table-cell office:value-type="float" office:value="2039" table:style-name="ce38">
            <text:p>2039</text:p>
          </table:table-cell>
          <table:table-cell office:value-type="float" office:value="2046" table:style-name="ce38">
            <text:p>2046</text:p>
          </table:table-cell>
          <table:table-cell office:value-type="float" office:value="2023" table:style-name="ce39">
            <text:p>2023</text:p>
          </table:table-cell>
          <table:table-cell table:number-columns-repeated="2" table:style-name="ce1"/>
          <table:table-cell table:style-name="ce101"/>
          <table:table-cell table:number-columns-repeated="16369"/>
        </table:table-row>
        <table:table-row table:style-name="ro2">
          <table:table-cell office:value-type="string" table:style-name="ce42">
            <text:p>2008T1</text:p>
          </table:table-cell>
          <table:table-cell office:value-type="float" office:value="150.08199999999999" table:style-name="ce5">
            <text:p>150</text:p>
          </table:table-cell>
          <table:table-cell office:value-type="float" office:value="9.6" table:style-name="ce6">
            <text:p>9.6</text:p>
          </table:table-cell>
          <table:table-cell office:value-type="float" office:value="162267" table:style-name="ce5">
            <text:p>162267</text:p>
          </table:table-cell>
          <table:table-cell office:value-type="float" office:value="2013" table:formula="of:=AVERAGE([.J6:.L6])" table:style-name="ce5">
            <text:p>2013</text:p>
          </table:table-cell>
          <table:table-cell office:value-type="float" office:value="1779.1966666666667" table:style-name="ce44">
            <text:p>1779</text:p>
          </table:table-cell>
          <table:table-cell office:value-type="float" office:value="11.614671303195877" table:formula="of:=ABS((([.F6]*100/[.E6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979.8166666666668" table:formula="of:=[.E6]+([.F6]-[.F5])" table:style-name="ce5">
            <text:p>1980</text:p>
          </table:table-cell>
          <table:table-cell office:value-type="float" office:value="2011" table:style-name="ce38">
            <text:p>2011</text:p>
          </table:table-cell>
          <table:table-cell office:value-type="float" office:value="2009" table:style-name="ce38">
            <text:p>2009</text:p>
          </table:table-cell>
          <table:table-cell office:value-type="float" office:value="2019" table:style-name="ce39">
            <text:p>2019</text:p>
          </table:table-cell>
          <table:table-cell table:number-columns-repeated="2" table:style-name="ce1"/>
          <table:table-cell table:style-name="ce101"/>
          <table:table-cell table:number-columns-repeated="16369"/>
        </table:table-row>
        <table:table-row table:style-name="ro2">
          <table:table-cell office:value-type="string" table:style-name="ce42">
            <text:p>2008T2</text:p>
          </table:table-cell>
          <table:table-cell office:value-type="float" office:value="149.61799999999999" table:style-name="ce5">
            <text:p>150</text:p>
          </table:table-cell>
          <table:table-cell office:value-type="float" office:value="10.36" table:style-name="ce6">
            <text:p>10.4</text:p>
          </table:table-cell>
          <table:table-cell office:value-type="float" office:value="150981" table:style-name="ce5">
            <text:p>150981</text:p>
          </table:table-cell>
          <table:table-cell office:value-type="float" office:value="2014.6666666666667" table:formula="of:=AVERAGE([.J7:.L7])" table:style-name="ce5">
            <text:p>2015</text:p>
          </table:table-cell>
          <table:table-cell office:value-type="float" office:value="1788.04" table:style-name="ce44">
            <text:p>1788</text:p>
          </table:table-cell>
          <table:table-cell office:value-type="float" office:value="11.248841826604902" table:formula="of:=ABS((([.F7]*100/[.E7])-100)*-1)" table:style-name="ce5">
            <text:p>11</text:p>
          </table:table-cell>
          <table:table-cell office:value-type="float" office:value="16" table:style-name="ce94">
            <text:p>16</text:p>
          </table:table-cell>
          <table:table-cell office:value-type="float" office:value="2023.51" table:formula="of:=[.E7]+([.F7]-[.F6])" table:style-name="ce5">
            <text:p>2024</text:p>
          </table:table-cell>
          <table:table-cell office:value-type="float" office:value="2023" table:style-name="ce38">
            <text:p>2023</text:p>
          </table:table-cell>
          <table:table-cell office:value-type="float" office:value="2013" table:style-name="ce38">
            <text:p>2013</text:p>
          </table:table-cell>
          <table:table-cell office:value-type="float" office:value="2008" table:style-name="ce39">
            <text:p>2008</text:p>
          </table:table-cell>
          <table:table-cell table:number-columns-repeated="2" table:style-name="ce1"/>
          <table:table-cell table:style-name="ce101"/>
          <table:table-cell table:number-columns-repeated="16369"/>
        </table:table-row>
        <table:table-row table:style-name="ro2">
          <table:table-cell office:value-type="string" table:style-name="ce42">
            <text:p>2008T3</text:p>
          </table:table-cell>
          <table:table-cell office:value-type="float" office:value="147.13399999999999" table:style-name="ce5">
            <text:p>147</text:p>
          </table:table-cell>
          <table:table-cell office:value-type="float" office:value="11.23" table:style-name="ce6">
            <text:p>11.2</text:p>
          </table:table-cell>
          <table:table-cell office:value-type="float" office:value="128773" table:style-name="ce5">
            <text:p>128773</text:p>
          </table:table-cell>
          <table:table-cell office:value-type="float" office:value="1959.3333333333333" table:formula="of:=AVERAGE([.J8:.L8])" table:style-name="ce5">
            <text:p>1959</text:p>
          </table:table-cell>
          <table:table-cell office:value-type="float" office:value="1730.74" table:style-name="ce44">
            <text:p>1731</text:p>
          </table:table-cell>
          <table:table-cell office:value-type="float" office:value="11.666893501190884" table:formula="of:=ABS((([.F8]*100/[.E8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902.0333333333333" table:formula="of:=[.E8]+([.F8]-[.F7])" table:style-name="ce5">
            <text:p>1902</text:p>
          </table:table-cell>
          <table:table-cell office:value-type="float" office:value="1979" table:style-name="ce38">
            <text:p>1979</text:p>
          </table:table-cell>
          <table:table-cell office:value-type="float" office:value="1953" table:style-name="ce38">
            <text:p>1953</text:p>
          </table:table-cell>
          <table:table-cell office:value-type="float" office:value="1946" table:style-name="ce39">
            <text:p>1946</text:p>
          </table:table-cell>
          <table:table-cell table:style-name="ce102"/>
          <table:table-cell table:style-name="ce1"/>
          <table:table-cell table:style-name="ce101"/>
          <table:table-cell table:number-columns-repeated="16369"/>
        </table:table-row>
        <table:table-row table:style-name="ro2">
          <table:table-cell office:value-type="string" table:style-name="ce42">
            <text:p>2008T4</text:p>
          </table:table-cell>
          <table:table-cell office:value-type="float" office:value="142.511" table:style-name="ce5">
            <text:p>143</text:p>
          </table:table-cell>
          <table:table-cell office:value-type="float" office:value="13.79" table:style-name="ce6">
            <text:p>13.8</text:p>
          </table:table-cell>
          <table:table-cell office:value-type="float" office:value="110059" table:style-name="ce5">
            <text:p>110059</text:p>
          </table:table-cell>
          <table:table-cell office:value-type="float" office:value="1934" table:formula="of:=AVERAGE([.J9:.L9])" table:style-name="ce5">
            <text:p>1934</text:p>
          </table:table-cell>
          <table:table-cell office:value-type="float" office:value="1736.1933333333334" table:style-name="ce44">
            <text:p>1736</text:p>
          </table:table-cell>
          <table:table-cell office:value-type="float" office:value="10.22785246466735" table:formula="of:=ABS((([.F9]*100/[.E9])-100)*-1)" table:style-name="ce5">
            <text:p>10</text:p>
          </table:table-cell>
          <table:table-cell office:value-type="float" office:value="16" table:style-name="ce94">
            <text:p>16</text:p>
          </table:table-cell>
          <table:table-cell office:value-type="float" office:value="1939.4533333333334" table:formula="of:=[.E9]+([.F9]-[.F8])" table:style-name="ce5">
            <text:p>1939</text:p>
          </table:table-cell>
          <table:table-cell office:value-type="float" office:value="1938" table:style-name="ce38">
            <text:p>1938</text:p>
          </table:table-cell>
          <table:table-cell office:value-type="float" office:value="1943" table:style-name="ce38">
            <text:p>1943</text:p>
          </table:table-cell>
          <table:table-cell office:value-type="float" office:value="1921" table:style-name="ce39">
            <text:p>192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09T1</text:p>
          </table:table-cell>
          <table:table-cell office:value-type="float" office:value="138.69300000000001" table:style-name="ce5">
            <text:p>139</text:p>
          </table:table-cell>
          <table:table-cell office:value-type="float" office:value="17.239999999999998" table:style-name="ce6">
            <text:p>17.2</text:p>
          </table:table-cell>
          <table:table-cell office:value-type="float" office:value="106523" table:style-name="ce5">
            <text:p>106523</text:p>
          </table:table-cell>
          <table:table-cell office:value-type="float" office:value="1922" table:formula="of:=AVERAGE([.J10:.L10])" table:style-name="ce5">
            <text:p>1922</text:p>
          </table:table-cell>
          <table:table-cell office:value-type="float" office:value="1695.5100000000002" table:style-name="ce44">
            <text:p>1696</text:p>
          </table:table-cell>
          <table:table-cell office:value-type="float" office:value="11.784079084287185" table:formula="of:=ABS((([.F10]*100/[.E10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881.3166666666668" table:formula="of:=[.E10]+([.F10]-[.F9])" table:style-name="ce5">
            <text:p>1881</text:p>
          </table:table-cell>
          <table:table-cell office:value-type="float" office:value="1921" table:style-name="ce38">
            <text:p>1921</text:p>
          </table:table-cell>
          <table:table-cell office:value-type="float" office:value="1918" table:style-name="ce38">
            <text:p>1918</text:p>
          </table:table-cell>
          <table:table-cell office:value-type="float" office:value="1927" table:style-name="ce39">
            <text:p>1927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09T2</text:p>
          </table:table-cell>
          <table:table-cell office:value-type="float" office:value="138.08199999999999" table:style-name="ce5">
            <text:p>138</text:p>
          </table:table-cell>
          <table:table-cell office:value-type="float" office:value="17.77" table:style-name="ce6">
            <text:p>17.8</text:p>
          </table:table-cell>
          <table:table-cell office:value-type="float" office:value="97788" table:style-name="ce5">
            <text:p>97788</text:p>
          </table:table-cell>
          <table:table-cell office:value-type="float" office:value="1911.6666666666667" table:formula="of:=AVERAGE([.J11:.L11])" table:style-name="ce5">
            <text:p>1912</text:p>
          </table:table-cell>
          <table:table-cell office:value-type="float" office:value="1700.39" table:style-name="ce44">
            <text:p>1700</text:p>
          </table:table-cell>
          <table:table-cell office:value-type="float" office:value="11.051961639058419" table:formula="of:=ABS((([.F11]*100/[.E11])-100)*-1)" table:style-name="ce5">
            <text:p>11</text:p>
          </table:table-cell>
          <table:table-cell office:value-type="float" office:value="16" table:style-name="ce94">
            <text:p>16</text:p>
          </table:table-cell>
          <table:table-cell office:value-type="float" office:value="1916.5466666666666" table:formula="of:=[.E11]+([.F11]-[.F10])" table:style-name="ce5">
            <text:p>1917</text:p>
          </table:table-cell>
          <table:table-cell office:value-type="float" office:value="1921" table:style-name="ce38">
            <text:p>1921</text:p>
          </table:table-cell>
          <table:table-cell office:value-type="float" office:value="1913" table:style-name="ce38">
            <text:p>1913</text:p>
          </table:table-cell>
          <table:table-cell office:value-type="float" office:value="1901" table:style-name="ce39">
            <text:p>19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09T3</text:p>
          </table:table-cell>
          <table:table-cell office:value-type="float" office:value="136.845" table:style-name="ce5">
            <text:p>137</text:p>
          </table:table-cell>
          <table:table-cell office:value-type="float" office:value="17.75" table:style-name="ce6">
            <text:p>17.8</text:p>
          </table:table-cell>
          <table:table-cell office:value-type="float" office:value="109084" table:style-name="ce5">
            <text:p>109084</text:p>
          </table:table-cell>
          <table:table-cell office:value-type="float" office:value="1886" table:formula="of:=AVERAGE([.J12:.L12])" table:style-name="ce5">
            <text:p>1886</text:p>
          </table:table-cell>
          <table:table-cell office:value-type="float" office:value="1666.6266666666668" table:style-name="ce44">
            <text:p>1667</text:p>
          </table:table-cell>
          <table:table-cell office:value-type="float" office:value="11.631671968893585" table:formula="of:=ABS((([.F12]*100/[.E12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852.2366666666667" table:formula="of:=[.E12]+([.F12]-[.F11])" table:style-name="ce5">
            <text:p>1852</text:p>
          </table:table-cell>
          <table:table-cell office:value-type="float" office:value="1897" table:style-name="ce38">
            <text:p>1897</text:p>
          </table:table-cell>
          <table:table-cell office:value-type="float" office:value="1883" table:style-name="ce38">
            <text:p>1883</text:p>
          </table:table-cell>
          <table:table-cell office:value-type="float" office:value="1878" table:style-name="ce39">
            <text:p>187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09T4</text:p>
          </table:table-cell>
          <table:table-cell office:value-type="float" office:value="136.31299999999999" table:style-name="ce5">
            <text:p>136</text:p>
          </table:table-cell>
          <table:table-cell office:value-type="float" office:value="18.66" table:style-name="ce6">
            <text:p>18.7</text:p>
          </table:table-cell>
          <table:table-cell office:value-type="float" office:value="99998" table:style-name="ce5">
            <text:p>99998</text:p>
          </table:table-cell>
          <table:table-cell office:value-type="float" office:value="1876.6666666666667" table:formula="of:=AVERAGE([.J13:.L13])" table:style-name="ce5">
            <text:p>1877</text:p>
          </table:table-cell>
          <table:table-cell office:value-type="float" office:value="1687.4466666666667" table:style-name="ce44">
            <text:p>1687</text:p>
          </table:table-cell>
          <table:table-cell office:value-type="float" office:value="10.08277087033747" table:formula="of:=ABS((([.F13]*100/[.E13])-100)*-1)" table:style-name="ce5">
            <text:p>10</text:p>
          </table:table-cell>
          <table:table-cell office:value-type="float" office:value="16" table:style-name="ce94">
            <text:p>16</text:p>
          </table:table-cell>
          <table:table-cell office:value-type="float" office:value="1897.4866666666667" table:formula="of:=[.E13]+([.F13]-[.F12])" table:style-name="ce5">
            <text:p>1897</text:p>
          </table:table-cell>
          <table:table-cell office:value-type="float" office:value="1878" table:style-name="ce38">
            <text:p>1878</text:p>
          </table:table-cell>
          <table:table-cell office:value-type="float" office:value="1879" table:style-name="ce38">
            <text:p>1879</text:p>
          </table:table-cell>
          <table:table-cell office:value-type="float" office:value="1873" table:style-name="ce39">
            <text:p>18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0T1</text:p>
          </table:table-cell>
          <table:table-cell office:value-type="float" office:value="134.626" table:style-name="ce5">
            <text:p>135</text:p>
          </table:table-cell>
          <table:table-cell office:value-type="float" office:value="19.84" table:style-name="ce6">
            <text:p>19.8</text:p>
          </table:table-cell>
          <table:table-cell office:value-type="float" office:value="116483" table:style-name="ce5">
            <text:p>116483</text:p>
          </table:table-cell>
          <table:table-cell office:value-type="float" office:value="1877.3333333333333" table:formula="of:=AVERAGE([.J14:.L14])" table:style-name="ce5">
            <text:p>1877</text:p>
          </table:table-cell>
          <table:table-cell office:value-type="float" office:value="1685.6233333333332" table:style-name="ce44">
            <text:p>1686</text:p>
          </table:table-cell>
          <table:table-cell office:value-type="float" office:value="10.211825284090921" table:formula="of:=ABS((([.F14]*100/[.E14])-100)*-1)" table:style-name="ce5">
            <text:p>10</text:p>
          </table:table-cell>
          <table:table-cell office:value-type="float" office:value="16" table:style-name="ce94">
            <text:p>16</text:p>
          </table:table-cell>
          <table:table-cell office:value-type="float" office:value="1875.5099999999998" table:formula="of:=[.E14]+([.F14]-[.F13])" table:style-name="ce5">
            <text:p>1876</text:p>
          </table:table-cell>
          <table:table-cell office:value-type="float" office:value="1873" table:style-name="ce38">
            <text:p>1873</text:p>
          </table:table-cell>
          <table:table-cell office:value-type="float" office:value="1871" table:style-name="ce38">
            <text:p>1871</text:p>
          </table:table-cell>
          <table:table-cell office:value-type="float" office:value="1888" table:style-name="ce39">
            <text:p>188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0T2</text:p>
          </table:table-cell>
          <table:table-cell office:value-type="float" office:value="136.79" table:style-name="ce5">
            <text:p>137</text:p>
          </table:table-cell>
          <table:table-cell office:value-type="float" office:value="19.89" table:style-name="ce6">
            <text:p>19.9</text:p>
          </table:table-cell>
          <table:table-cell office:value-type="float" office:value="109139" table:style-name="ce5">
            <text:p>109139</text:p>
          </table:table-cell>
          <table:table-cell office:value-type="float" office:value="1905.6666666666667" table:formula="of:=AVERAGE([.J15:.L15])" table:style-name="ce5">
            <text:p>1906</text:p>
          </table:table-cell>
          <table:table-cell office:value-type="float" office:value="1701.6766666666665" table:style-name="ce44">
            <text:p>1702</text:p>
          </table:table-cell>
          <table:table-cell office:value-type="float" office:value="10.704390414553103" table:formula="of:=ABS((([.F15]*100/[.E15])-100)*-1)" table:style-name="ce5">
            <text:p>11</text:p>
          </table:table-cell>
          <table:table-cell office:value-type="float" office:value="16" table:style-name="ce94">
            <text:p>16</text:p>
          </table:table-cell>
          <table:table-cell office:value-type="float" office:value="1921.72" table:formula="of:=[.E15]+([.F15]-[.F14])" table:style-name="ce5">
            <text:p>1922</text:p>
          </table:table-cell>
          <table:table-cell office:value-type="float" office:value="1898" table:style-name="ce38">
            <text:p>1898</text:p>
          </table:table-cell>
          <table:table-cell office:value-type="float" office:value="1909" table:style-name="ce38">
            <text:p>1909</text:p>
          </table:table-cell>
          <table:table-cell office:value-type="float" office:value="1910" table:style-name="ce39">
            <text:p>191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0T3</text:p>
          </table:table-cell>
          <table:table-cell office:value-type="float" office:value="133.846" table:style-name="ce5">
            <text:p>134</text:p>
          </table:table-cell>
          <table:table-cell office:value-type="float" office:value="19.59" table:style-name="ce6">
            <text:p>19.6</text:p>
          </table:table-cell>
          <table:table-cell office:value-type="float" office:value="123241" table:style-name="ce5">
            <text:p>123241</text:p>
          </table:table-cell>
          <table:table-cell office:value-type="float" office:value="1927.3333333333333" table:formula="of:=AVERAGE([.J16:.L16])" table:style-name="ce5">
            <text:p>1927</text:p>
          </table:table-cell>
          <table:table-cell office:value-type="float" office:value="1576.0966666666666" table:style-name="ce44">
            <text:p>1576</text:p>
          </table:table-cell>
          <table:table-cell office:value-type="float" office:value="18.223970944309926" table:formula="of:=ABS((([.F16]*100/[.E16])-100)*-1)" table:style-name="ce5">
            <text:p>18</text:p>
          </table:table-cell>
          <table:table-cell office:value-type="float" office:value="16" table:style-name="ce94">
            <text:p>16</text:p>
          </table:table-cell>
          <table:table-cell office:value-type="float" office:value="1801.7533333333333" table:formula="of:=[.E16]+([.F16]-[.F15])" table:style-name="ce5">
            <text:p>1802</text:p>
          </table:table-cell>
          <table:table-cell office:value-type="float" office:value="1931" table:style-name="ce38">
            <text:p>1931</text:p>
          </table:table-cell>
          <table:table-cell office:value-type="float" office:value="1924" table:style-name="ce38">
            <text:p>1924</text:p>
          </table:table-cell>
          <table:table-cell office:value-type="float" office:value="1927" table:style-name="ce39">
            <text:p>1927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0T4</text:p>
          </table:table-cell>
          <table:table-cell office:value-type="float" office:value="133.71799999999999" table:style-name="ce5">
            <text:p>134</text:p>
          </table:table-cell>
          <table:table-cell office:value-type="float" office:value="20.11" table:style-name="ce6">
            <text:p>20.1</text:p>
          </table:table-cell>
          <table:table-cell office:value-type="float" office:value="90728" table:style-name="ce5">
            <text:p>90728</text:p>
          </table:table-cell>
          <table:table-cell office:value-type="float" office:value="1955.3333333333333" table:formula="of:=AVERAGE([.J17:.L17])" table:style-name="ce5">
            <text:p>1955</text:p>
          </table:table-cell>
          <table:table-cell office:value-type="float" office:value="1624.0633333333335" table:style-name="ce44">
            <text:p>1624</text:p>
          </table:table-cell>
          <table:table-cell office:value-type="float" office:value="16.941868394135696" table:formula="of:=ABS((([.F17]*100/[.E17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2003.3000000000002" table:formula="of:=[.E17]+([.F17]-[.F16])" table:style-name="ce5">
            <text:p>2003</text:p>
          </table:table-cell>
          <table:table-cell office:value-type="float" office:value="1943" table:style-name="ce38">
            <text:p>1943</text:p>
          </table:table-cell>
          <table:table-cell office:value-type="float" office:value="1960" table:style-name="ce38">
            <text:p>1960</text:p>
          </table:table-cell>
          <table:table-cell office:value-type="float" office:value="1963" table:style-name="ce39">
            <text:p>196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1T1</text:p>
          </table:table-cell>
          <table:table-cell office:value-type="float" office:value="129.059" table:style-name="ce5">
            <text:p>129</text:p>
          </table:table-cell>
          <table:table-cell office:value-type="float" office:value="21.08" table:style-name="ce6">
            <text:p>21.1</text:p>
          </table:table-cell>
          <table:table-cell office:value-type="float" office:value="122933" table:style-name="ce5">
            <text:p>122933</text:p>
          </table:table-cell>
          <table:table-cell office:value-type="float" office:value="1970" table:formula="of:=AVERAGE([.J18:.L18])" table:style-name="ce5">
            <text:p>1970</text:p>
          </table:table-cell>
          <table:table-cell office:value-type="float" office:value="1563.7700000000002" table:style-name="ce44">
            <text:p>1564</text:p>
          </table:table-cell>
          <table:table-cell office:value-type="float" office:value="20.620812182741105" table:formula="of:=ABS((([.F18]*100/[.E18])-100)*-1)" table:style-name="ce5">
            <text:p>21</text:p>
          </table:table-cell>
          <table:table-cell office:value-type="float" office:value="16" table:style-name="ce94">
            <text:p>16</text:p>
          </table:table-cell>
          <table:table-cell office:value-type="float" office:value="1909.7066666666667" table:formula="of:=[.E18]+([.F18]-[.F17])" table:style-name="ce5">
            <text:p>1910</text:p>
          </table:table-cell>
          <table:table-cell office:value-type="float" office:value="1963" table:style-name="ce38">
            <text:p>1963</text:p>
          </table:table-cell>
          <table:table-cell office:value-type="float" office:value="1963" table:style-name="ce38">
            <text:p>1963</text:p>
          </table:table-cell>
          <table:table-cell office:value-type="float" office:value="1984" table:style-name="ce39">
            <text:p>198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1T2</text:p>
          </table:table-cell>
          <table:table-cell office:value-type="float" office:value="127.52800000000001" table:style-name="ce5">
            <text:p>128</text:p>
          </table:table-cell>
          <table:table-cell office:value-type="float" office:value="20.64" table:style-name="ce6">
            <text:p>20.6</text:p>
          </table:table-cell>
          <table:table-cell office:value-type="float" office:value="83440" table:style-name="ce5">
            <text:p>83440</text:p>
          </table:table-cell>
          <table:table-cell office:value-type="float" office:value="1983" table:formula="of:=AVERAGE([.J19:.L19])" table:style-name="ce5">
            <text:p>1983</text:p>
          </table:table-cell>
          <table:table-cell office:value-type="float" office:value="1555.29" table:style-name="ce44">
            <text:p>1555</text:p>
          </table:table-cell>
          <table:table-cell office:value-type="float" office:value="21.568835098335853" table:formula="of:=ABS((([.F19]*100/[.E19])-100)*-1)" table:style-name="ce5">
            <text:p>22</text:p>
          </table:table-cell>
          <table:table-cell office:value-type="float" office:value="16" table:style-name="ce94">
            <text:p>16</text:p>
          </table:table-cell>
          <table:table-cell office:value-type="float" office:value="1974.5199999999998" table:formula="of:=[.E19]+([.F19]-[.F18])" table:style-name="ce5">
            <text:p>1975</text:p>
          </table:table-cell>
          <table:table-cell office:value-type="float" office:value="1983" table:style-name="ce38">
            <text:p>1983</text:p>
          </table:table-cell>
          <table:table-cell office:value-type="float" office:value="1984" table:style-name="ce38">
            <text:p>1984</text:p>
          </table:table-cell>
          <table:table-cell office:value-type="float" office:value="1982" table:style-name="ce39">
            <text:p>198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1T3</text:p>
          </table:table-cell>
          <table:table-cell office:value-type="float" office:value="123.94799999999999" table:style-name="ce5">
            <text:p>124</text:p>
          </table:table-cell>
          <table:table-cell office:value-type="float" office:value="21.28" table:style-name="ce6">
            <text:p>21.3</text:p>
          </table:table-cell>
          <table:table-cell office:value-type="float" office:value="80736" table:style-name="ce5">
            <text:p>80736</text:p>
          </table:table-cell>
          <table:table-cell office:value-type="float" office:value="1961" table:formula="of:=AVERAGE([.J20:.L20])" table:style-name="ce5">
            <text:p>1961</text:p>
          </table:table-cell>
          <table:table-cell office:value-type="float" office:value="1507.0066666666664" table:style-name="ce44">
            <text:p>1507</text:p>
          </table:table-cell>
          <table:table-cell office:value-type="float" office:value="23.151113377528475" table:formula="of:=ABS((([.F20]*100/[.E20])-100)*-1)" table:style-name="ce5">
            <text:p>23</text:p>
          </table:table-cell>
          <table:table-cell office:value-type="float" office:value="16" table:style-name="ce94">
            <text:p>16</text:p>
          </table:table-cell>
          <table:table-cell office:value-type="float" office:value="1912.7166666666665" table:formula="of:=[.E20]+([.F20]-[.F19])" table:style-name="ce5">
            <text:p>1913</text:p>
          </table:table-cell>
          <table:table-cell office:value-type="float" office:value="1976" table:style-name="ce38">
            <text:p>1976</text:p>
          </table:table-cell>
          <table:table-cell office:value-type="float" office:value="1965" table:style-name="ce38">
            <text:p>1965</text:p>
          </table:table-cell>
          <table:table-cell office:value-type="float" office:value="1942" table:style-name="ce39">
            <text:p>19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1T4</text:p>
          </table:table-cell>
          <table:table-cell office:value-type="float" office:value="118.782" table:style-name="ce5">
            <text:p>119</text:p>
          </table:table-cell>
          <table:table-cell office:value-type="float" office:value="22.56" table:style-name="ce6">
            <text:p>22.6</text:p>
          </table:table-cell>
          <table:table-cell office:value-type="float" office:value="72715" table:style-name="ce5">
            <text:p>72715</text:p>
          </table:table-cell>
          <table:table-cell office:value-type="float" office:value="1929.3333333333333" table:formula="of:=AVERAGE([.J21:.L21])" table:style-name="ce5">
            <text:p>1929</text:p>
          </table:table-cell>
          <table:table-cell office:value-type="float" office:value="1501.37" table:style-name="ce44">
            <text:p>1501</text:p>
          </table:table-cell>
          <table:table-cell office:value-type="float" office:value="22.181928127159637" table:formula="of:=ABS((([.F21]*100/[.E21])-100)*-1)" table:style-name="ce5">
            <text:p>22</text:p>
          </table:table-cell>
          <table:table-cell office:value-type="float" office:value="16" table:style-name="ce94">
            <text:p>16</text:p>
          </table:table-cell>
          <table:table-cell office:value-type="float" office:value="1923.6966666666667" table:formula="of:=[.E21]+([.F21]-[.F20])" table:style-name="ce5">
            <text:p>1924</text:p>
          </table:table-cell>
          <table:table-cell office:value-type="float" office:value="1940" table:style-name="ce38">
            <text:p>1940</text:p>
          </table:table-cell>
          <table:table-cell office:value-type="float" office:value="1935" table:style-name="ce38">
            <text:p>1935</text:p>
          </table:table-cell>
          <table:table-cell office:value-type="float" office:value="1913" table:style-name="ce39">
            <text:p>191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2T1</text:p>
          </table:table-cell>
          <table:table-cell office:value-type="float" office:value="112.861" table:style-name="ce5">
            <text:p>113</text:p>
          </table:table-cell>
          <table:table-cell office:value-type="float" office:value="24.19" table:style-name="ce6">
            <text:p>24.2</text:p>
          </table:table-cell>
          <table:table-cell office:value-type="float" office:value="88884" table:style-name="ce5">
            <text:p>88884</text:p>
          </table:table-cell>
          <table:table-cell office:value-type="float" office:value="1879" table:formula="of:=AVERAGE([.J22:.L22])" table:style-name="ce5">
            <text:p>1879</text:p>
          </table:table-cell>
          <table:table-cell office:value-type="float" office:value="1379.1233333333332" table:style-name="ce44">
            <text:p>1379</text:p>
          </table:table-cell>
          <table:table-cell office:value-type="float" office:value="26.6033351073266" table:formula="of:=ABS((([.F22]*100/[.E22])-100)*-1)" table:style-name="ce5">
            <text:p>27</text:p>
          </table:table-cell>
          <table:table-cell office:value-type="float" office:value="16" table:style-name="ce94">
            <text:p>16</text:p>
          </table:table-cell>
          <table:table-cell office:value-type="float" office:value="1756.7533333333333" table:formula="of:=[.E22]+([.F22]-[.F21])" table:style-name="ce5">
            <text:p>1757</text:p>
          </table:table-cell>
          <table:table-cell office:value-type="float" office:value="1902" table:style-name="ce38">
            <text:p>1902</text:p>
          </table:table-cell>
          <table:table-cell office:value-type="float" office:value="1877" table:style-name="ce38">
            <text:p>1877</text:p>
          </table:table-cell>
          <table:table-cell office:value-type="float" office:value="1858" table:style-name="ce39">
            <text:p>185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2T2</text:p>
          </table:table-cell>
          <table:table-cell office:value-type="float" office:value="109.187" table:style-name="ce5">
            <text:p>109</text:p>
          </table:table-cell>
          <table:table-cell office:value-type="float" office:value="24.4" table:style-name="ce6">
            <text:p>24.4</text:p>
          </table:table-cell>
          <table:table-cell office:value-type="float" office:value="73857" table:style-name="ce5">
            <text:p>73857</text:p>
          </table:table-cell>
          <table:table-cell office:value-type="float" office:value="1830" table:formula="of:=AVERAGE([.J23:.L23])" table:style-name="ce5">
            <text:p>1830</text:p>
          </table:table-cell>
          <table:table-cell office:value-type="float" office:value="1373.6200000000001" table:style-name="ce44">
            <text:p>1374</text:p>
          </table:table-cell>
          <table:table-cell office:value-type="float" office:value="24.938797814207646" table:formula="of:=ABS((([.F23]*100/[.E23])-100)*-1)" table:style-name="ce5">
            <text:p>25</text:p>
          </table:table-cell>
          <table:table-cell office:value-type="float" office:value="16" table:style-name="ce94">
            <text:p>16</text:p>
          </table:table-cell>
          <table:table-cell office:value-type="float" office:value="1824.4966666666669" table:formula="of:=[.E23]+([.F23]-[.F22])" table:style-name="ce5">
            <text:p>1824</text:p>
          </table:table-cell>
          <table:table-cell office:value-type="float" office:value="1846" table:style-name="ce38">
            <text:p>1846</text:p>
          </table:table-cell>
          <table:table-cell office:value-type="float" office:value="1828" table:style-name="ce38">
            <text:p>1828</text:p>
          </table:table-cell>
          <table:table-cell office:value-type="float" office:value="1816" table:style-name="ce39">
            <text:p>181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2T3</text:p>
          </table:table-cell>
          <table:table-cell office:value-type="float" office:value="105.07299999999999" table:style-name="ce5">
            <text:p>105</text:p>
          </table:table-cell>
          <table:table-cell office:value-type="float" office:value="24.79" table:style-name="ce6">
            <text:p>24.8</text:p>
          </table:table-cell>
          <table:table-cell office:value-type="float" office:value="80964" table:style-name="ce5">
            <text:p>80964</text:p>
          </table:table-cell>
          <table:table-cell office:value-type="float" office:value="1770.3333333333333" table:formula="of:=AVERAGE([.J24:.L24])" table:style-name="ce5">
            <text:p>1770</text:p>
          </table:table-cell>
          <table:table-cell office:value-type="float" office:value="1336.68" table:style-name="ce44">
            <text:p>1337</text:p>
          </table:table-cell>
          <table:table-cell office:value-type="float" office:value="24.495575221238937" table:formula="of:=ABS((([.F24]*100/[.E24])-100)*-1)" table:style-name="ce5">
            <text:p>24</text:p>
          </table:table-cell>
          <table:table-cell office:value-type="float" office:value="16" table:style-name="ce94">
            <text:p>16</text:p>
          </table:table-cell>
          <table:table-cell office:value-type="float" office:value="1733.3933333333332" table:formula="of:=[.E24]+([.F24]-[.F23])" table:style-name="ce5">
            <text:p>1733</text:p>
          </table:table-cell>
          <table:table-cell office:value-type="float" office:value="1800" table:style-name="ce38">
            <text:p>1800</text:p>
          </table:table-cell>
          <table:table-cell office:value-type="float" office:value="1771" table:style-name="ce38">
            <text:p>1771</text:p>
          </table:table-cell>
          <table:table-cell office:value-type="float" office:value="1740" table:style-name="ce39">
            <text:p>174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2T4</text:p>
          </table:table-cell>
          <table:table-cell office:value-type="float" office:value="103.593" table:style-name="ce5">
            <text:p>104</text:p>
          </table:table-cell>
          <table:table-cell office:value-type="float" office:value="25.77" table:style-name="ce6">
            <text:p>25.8</text:p>
          </table:table-cell>
          <table:table-cell office:value-type="float" office:value="74829" table:style-name="ce5">
            <text:p>74829</text:p>
          </table:table-cell>
          <table:table-cell office:value-type="float" office:value="1729.3333333333333" table:formula="of:=AVERAGE([.J25:.L25])" table:style-name="ce5">
            <text:p>1729</text:p>
          </table:table-cell>
          <table:table-cell office:value-type="float" office:value="1344.37" table:style-name="ce44">
            <text:p>1344</text:p>
          </table:table-cell>
          <table:table-cell office:value-type="float" office:value="22.260794140323824" table:formula="of:=ABS((([.F25]*100/[.E25])-100)*-1)" table:style-name="ce5">
            <text:p>22</text:p>
          </table:table-cell>
          <table:table-cell office:value-type="float" office:value="16" table:style-name="ce94">
            <text:p>16</text:p>
          </table:table-cell>
          <table:table-cell office:value-type="float" office:value="1737.0233333333331" table:formula="of:=[.E25]+([.F25]-[.F24])" table:style-name="ce5">
            <text:p>1737</text:p>
          </table:table-cell>
          <table:table-cell office:value-type="float" office:value="1742" table:style-name="ce38">
            <text:p>1742</text:p>
          </table:table-cell>
          <table:table-cell office:value-type="float" office:value="1734" table:style-name="ce38">
            <text:p>1734</text:p>
          </table:table-cell>
          <table:table-cell office:value-type="float" office:value="1712" table:style-name="ce39">
            <text:p>171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3T1</text:p>
          </table:table-cell>
          <table:table-cell office:value-type="float" office:value="96.768000000000001" table:style-name="ce5">
            <text:p>97</text:p>
          </table:table-cell>
          <table:table-cell office:value-type="float" office:value="26.94" table:style-name="ce6">
            <text:p>26.9</text:p>
          </table:table-cell>
          <table:table-cell office:value-type="float" office:value="97473" table:style-name="ce5">
            <text:p>97473</text:p>
          </table:table-cell>
          <table:table-cell office:value-type="float" office:value="1681.6666666666667" table:formula="of:=AVERAGE([.J26:.L26])" table:style-name="ce5">
            <text:p>1682</text:p>
          </table:table-cell>
          <table:table-cell office:value-type="float" office:value="1226.9333333333334" table:style-name="ce44">
            <text:p>1227</text:p>
          </table:table-cell>
          <table:table-cell office:value-type="float" office:value="27.0406342913776" table:formula="of:=ABS((([.F26]*100/[.E26])-100)*-1)" table:style-name="ce5">
            <text:p>27</text:p>
          </table:table-cell>
          <table:table-cell office:value-type="float" office:value="16" table:style-name="ce94">
            <text:p>16</text:p>
          </table:table-cell>
          <table:table-cell office:value-type="float" office:value="1564.2300000000002" table:formula="of:=[.E26]+([.F26]-[.F25])" table:style-name="ce5">
            <text:p>1564</text:p>
          </table:table-cell>
          <table:table-cell office:value-type="float" office:value="1687" table:style-name="ce38">
            <text:p>1687</text:p>
          </table:table-cell>
          <table:table-cell office:value-type="float" office:value="1682" table:style-name="ce38">
            <text:p>1682</text:p>
          </table:table-cell>
          <table:table-cell office:value-type="float" office:value="1676" table:style-name="ce39">
            <text:p>167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3T2</text:p>
          </table:table-cell>
          <table:table-cell office:value-type="float" office:value="96.040999999999997" table:style-name="ce5">
            <text:p>96</text:p>
          </table:table-cell>
          <table:table-cell office:value-type="float" office:value="26.06" table:style-name="ce6">
            <text:p>26.1</text:p>
          </table:table-cell>
          <table:table-cell office:value-type="float" office:value="74373" table:style-name="ce5">
            <text:p>74373</text:p>
          </table:table-cell>
          <table:table-cell office:value-type="float" office:value="1656.3333333333333" table:formula="of:=AVERAGE([.J27:.L27])" table:style-name="ce5">
            <text:p>1656</text:p>
          </table:table-cell>
          <table:table-cell office:value-type="float" office:value="1250.3999999999999" table:style-name="ce44">
            <text:p>1250</text:p>
          </table:table-cell>
          <table:table-cell office:value-type="float" office:value="24.507949285570547" table:formula="of:=ABS((([.F27]*100/[.E27])-100)*-1)" table:style-name="ce5">
            <text:p>25</text:p>
          </table:table-cell>
          <table:table-cell office:value-type="float" office:value="16" table:style-name="ce94">
            <text:p>16</text:p>
          </table:table-cell>
          <table:table-cell office:value-type="float" office:value="1679.7999999999997" table:formula="of:=[.E27]+([.F27]-[.F26])" table:style-name="ce5">
            <text:p>1680</text:p>
          </table:table-cell>
          <table:table-cell office:value-type="float" office:value="1663" table:style-name="ce38">
            <text:p>1663</text:p>
          </table:table-cell>
          <table:table-cell office:value-type="float" office:value="1658" table:style-name="ce38">
            <text:p>1658</text:p>
          </table:table-cell>
          <table:table-cell office:value-type="float" office:value="1648" table:style-name="ce39">
            <text:p>164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3T3</text:p>
          </table:table-cell>
          <table:table-cell office:value-type="float" office:value="96.742000000000004" table:style-name="ce5">
            <text:p>97</text:p>
          </table:table-cell>
          <table:table-cell office:value-type="float" office:value="25.65" table:style-name="ce6">
            <text:p>25.7</text:p>
          </table:table-cell>
          <table:table-cell office:value-type="float" office:value="73373" table:style-name="ce5">
            <text:p>73373</text:p>
          </table:table-cell>
          <table:table-cell office:value-type="float" office:value="1632.3333333333333" table:formula="of:=AVERAGE([.J28:.L28])" table:style-name="ce5">
            <text:p>1632</text:p>
          </table:table-cell>
          <table:table-cell office:value-type="float" office:value="1246.6133333333335" table:style-name="ce44">
            <text:p>1247</text:p>
          </table:table-cell>
          <table:table-cell office:value-type="float" office:value="23.629977537267706" table:formula="of:=ABS((([.F28]*100/[.E28])-100)*-1)" table:style-name="ce5">
            <text:p>24</text:p>
          </table:table-cell>
          <table:table-cell office:value-type="float" office:value="16" table:style-name="ce94">
            <text:p>16</text:p>
          </table:table-cell>
          <table:table-cell office:value-type="float" office:value="1628.5466666666669" table:formula="of:=[.E28]+([.F28]-[.F27])" table:style-name="ce5">
            <text:p>1629</text:p>
          </table:table-cell>
          <table:table-cell office:value-type="float" office:value="1644" table:style-name="ce38">
            <text:p>1644</text:p>
          </table:table-cell>
          <table:table-cell office:value-type="float" office:value="1630" table:style-name="ce38">
            <text:p>1630</text:p>
          </table:table-cell>
          <table:table-cell office:value-type="float" office:value="1623" table:style-name="ce39">
            <text:p>1623</text:p>
          </table:table-cell>
          <table:table-cell table:number-columns-repeated="3" table:style-name="ce37"/>
          <table:table-cell table:number-columns-repeated="16369"/>
        </table:table-row>
        <table:table-row table:style-name="ro2">
          <table:table-cell office:value-type="string" table:style-name="ce42">
            <text:p>2013T4</text:p>
          </table:table-cell>
          <table:table-cell office:value-type="float" office:value="95.512" table:style-name="ce5">
            <text:p>96</text:p>
          </table:table-cell>
          <table:table-cell office:value-type="float" office:value="25.73" table:style-name="ce6">
            <text:p>25.7</text:p>
          </table:table-cell>
          <table:table-cell office:value-type="float" office:value="67374" table:style-name="ce5">
            <text:p>67374</text:p>
          </table:table-cell>
          <table:table-cell office:value-type="float" office:value="1608.3333333333333" table:formula="of:=AVERAGE([.J29:.L29])" table:style-name="ce5">
            <text:p>1608</text:p>
          </table:table-cell>
          <table:table-cell office:value-type="float" office:value="1250.2166666666667" table:style-name="ce44">
            <text:p>1250</text:p>
          </table:table-cell>
          <table:table-cell office:value-type="float" office:value="22.266321243523308" table:formula="of:=ABS((([.F29]*100/[.E29])-100)*-1)" table:style-name="ce5">
            <text:p>22</text:p>
          </table:table-cell>
          <table:table-cell office:value-type="float" office:value="16" table:style-name="ce94">
            <text:p>16</text:p>
          </table:table-cell>
          <table:table-cell office:value-type="float" office:value="1611.9366666666665" table:formula="of:=[.E29]+([.F29]-[.F28])" table:style-name="ce5">
            <text:p>1612</text:p>
          </table:table-cell>
          <table:table-cell office:value-type="float" office:value="1611" table:style-name="ce38">
            <text:p>1611</text:p>
          </table:table-cell>
          <table:table-cell office:value-type="float" office:value="1608" table:style-name="ce38">
            <text:p>1608</text:p>
          </table:table-cell>
          <table:table-cell office:value-type="float" office:value="1606" table:style-name="ce39">
            <text:p>160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4T1</text:p>
          </table:table-cell>
          <table:table-cell office:value-type="float" office:value="95.207999999999998" table:style-name="ce5">
            <text:p>95</text:p>
          </table:table-cell>
          <table:table-cell office:value-type="float" office:value="25.93" table:style-name="ce6">
            <text:p>25.9</text:p>
          </table:table-cell>
          <table:table-cell office:value-type="float" office:value="82940" table:style-name="ce5">
            <text:p>82940</text:p>
          </table:table-cell>
          <table:table-cell office:value-type="float" office:value="1593" table:formula="of:=AVERAGE([.J30:.L30])" table:style-name="ce5">
            <text:p>1593</text:p>
          </table:table-cell>
          <table:table-cell office:value-type="float" office:value="1280.5033333333333" table:style-name="ce44">
            <text:p>1281</text:p>
          </table:table-cell>
          <table:table-cell office:value-type="float" office:value="19.616865453023649" table:formula="of:=ABS((([.F30]*100/[.E30])-100)*-1)" table:style-name="ce5">
            <text:p>20</text:p>
          </table:table-cell>
          <table:table-cell office:value-type="float" office:value="16" table:style-name="ce94">
            <text:p>16</text:p>
          </table:table-cell>
          <table:table-cell office:value-type="float" office:value="1623.2866666666666" table:formula="of:=[.E30]+([.F30]-[.F29])" table:style-name="ce5">
            <text:p>1623</text:p>
          </table:table-cell>
          <table:table-cell office:value-type="float" office:value="1603" table:style-name="ce38">
            <text:p>1603</text:p>
          </table:table-cell>
          <table:table-cell office:value-type="float" office:value="1602" table:style-name="ce38">
            <text:p>1602</text:p>
          </table:table-cell>
          <table:table-cell office:value-type="float" office:value="1574" table:style-name="ce39">
            <text:p>157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4T2</text:p>
          </table:table-cell>
          <table:table-cell office:value-type="float" office:value="96.805000000000007" table:style-name="ce5">
            <text:p>97</text:p>
          </table:table-cell>
          <table:table-cell office:value-type="float" office:value="24.47" table:style-name="ce6">
            <text:p>24.5</text:p>
          </table:table-cell>
          <table:table-cell office:value-type="float" office:value="78814" table:style-name="ce5">
            <text:p>78814</text:p>
          </table:table-cell>
          <table:table-cell office:value-type="float" office:value="1561.6666666666667" table:formula="of:=AVERAGE([.J31:.L31])" table:style-name="ce5">
            <text:p>1562</text:p>
          </table:table-cell>
          <table:table-cell office:value-type="float" office:value="1252.5166666666667" table:style-name="ce44">
            <text:p>1253</text:p>
          </table:table-cell>
          <table:table-cell office:value-type="float" office:value="19.796157950907158" table:formula="of:=ABS((([.F31]*100/[.E31])-100)*-1)" table:style-name="ce5">
            <text:p>20</text:p>
          </table:table-cell>
          <table:table-cell office:value-type="float" office:value="16" table:style-name="ce94">
            <text:p>16</text:p>
          </table:table-cell>
          <table:table-cell office:value-type="float" office:value="1533.68" table:formula="of:=[.E31]+([.F31]-[.F30])" table:style-name="ce5">
            <text:p>1534</text:p>
          </table:table-cell>
          <table:table-cell office:value-type="float" office:value="1555" table:style-name="ce38">
            <text:p>1555</text:p>
          </table:table-cell>
          <table:table-cell office:value-type="float" office:value="1567" table:style-name="ce38">
            <text:p>1567</text:p>
          </table:table-cell>
          <table:table-cell office:value-type="float" office:value="1563" table:style-name="ce39">
            <text:p>156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4T3</text:p>
          </table:table-cell>
          <table:table-cell office:value-type="float" office:value="97.001999999999995" table:style-name="ce5">
            <text:p>97</text:p>
          </table:table-cell>
          <table:table-cell office:value-type="float" office:value="23.67" table:style-name="ce6">
            <text:p>23.7</text:p>
          </table:table-cell>
          <table:table-cell office:value-type="float" office:value="79356" table:style-name="ce5">
            <text:p>79356</text:p>
          </table:table-cell>
          <table:table-cell office:value-type="float" office:value="1551.6666666666667" table:formula="of:=AVERAGE([.J32:.L32])" table:style-name="ce5">
            <text:p>1552</text:p>
          </table:table-cell>
          <table:table-cell office:value-type="float" office:value="1221.8433333333335" table:style-name="ce44">
            <text:p>1222</text:p>
          </table:table-cell>
          <table:table-cell office:value-type="float" office:value="21.256068743286789" table:formula="of:=ABS((([.F32]*100/[.E32])-100)*-1)" table:style-name="ce5">
            <text:p>21</text:p>
          </table:table-cell>
          <table:table-cell office:value-type="float" office:value="16" table:style-name="ce94">
            <text:p>16</text:p>
          </table:table-cell>
          <table:table-cell office:value-type="float" office:value="1520.9933333333336" table:formula="of:=[.E32]+([.F32]-[.F31])" table:style-name="ce5">
            <text:p>1521</text:p>
          </table:table-cell>
          <table:table-cell office:value-type="float" office:value="1562" table:style-name="ce38">
            <text:p>1562</text:p>
          </table:table-cell>
          <table:table-cell office:value-type="float" office:value="1550" table:style-name="ce38">
            <text:p>1550</text:p>
          </table:table-cell>
          <table:table-cell office:value-type="float" office:value="1543" table:style-name="ce39">
            <text:p>154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4T4</text:p>
          </table:table-cell>
          <table:table-cell office:value-type="float" office:value="97.194000000000003" table:style-name="ce5">
            <text:p>97</text:p>
          </table:table-cell>
          <table:table-cell office:value-type="float" office:value="23.7" table:style-name="ce6">
            <text:p>23.7</text:p>
          </table:table-cell>
          <table:table-cell office:value-type="float" office:value="77720" table:style-name="ce5">
            <text:p>77720</text:p>
          </table:table-cell>
          <table:table-cell office:value-type="float" office:value="1556" table:formula="of:=AVERAGE([.J33:.L33])" table:style-name="ce5">
            <text:p>1556</text:p>
          </table:table-cell>
          <table:table-cell office:value-type="float" office:value="1245.4933333333331" table:style-name="ce44">
            <text:p>1245</text:p>
          </table:table-cell>
          <table:table-cell office:value-type="float" office:value="19.955441302485013" table:formula="of:=ABS((([.F33]*100/[.E33])-100)*-1)" table:style-name="ce5">
            <text:p>20</text:p>
          </table:table-cell>
          <table:table-cell office:value-type="float" office:value="16" table:style-name="ce94">
            <text:p>16</text:p>
          </table:table-cell>
          <table:table-cell office:value-type="float" office:value="1579.6499999999996" table:formula="of:=[.E33]+([.F33]-[.F32])" table:style-name="ce5">
            <text:p>1580</text:p>
          </table:table-cell>
          <table:table-cell office:value-type="float" office:value="1546" table:style-name="ce38">
            <text:p>1546</text:p>
          </table:table-cell>
          <table:table-cell office:value-type="float" office:value="1559" table:style-name="ce38">
            <text:p>1559</text:p>
          </table:table-cell>
          <table:table-cell office:value-type="float" office:value="1563" table:style-name="ce39">
            <text:p>1563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5T1</text:p>
          </table:table-cell>
          <table:table-cell office:value-type="float" office:value="96.650999999999996" table:style-name="ce5">
            <text:p>97</text:p>
          </table:table-cell>
          <table:table-cell office:value-type="float" office:value="23.78" table:style-name="ce6">
            <text:p>23.8</text:p>
          </table:table-cell>
          <table:table-cell office:value-type="float" office:value="90748" table:style-name="ce5">
            <text:p>90748</text:p>
          </table:table-cell>
          <table:table-cell office:value-type="float" office:value="1551.3333333333333" table:formula="of:=AVERAGE([.J34:.L34])" table:style-name="ce5">
            <text:p>1551</text:p>
          </table:table-cell>
          <table:table-cell office:value-type="float" office:value="1246.6166666666666" table:style-name="ce44">
            <text:p>1247</text:p>
          </table:table-cell>
          <table:table-cell office:value-type="float" office:value="19.642243231628711" table:formula="of:=ABS((([.F34]*100/[.E34])-100)*-1)" table:style-name="ce5">
            <text:p>20</text:p>
          </table:table-cell>
          <table:table-cell office:value-type="float" office:value="16" table:style-name="ce94">
            <text:p>16</text:p>
          </table:table-cell>
          <table:table-cell office:value-type="float" office:value="1552.4566666666667" table:formula="of:=[.E34]+([.F34]-[.F33])" table:style-name="ce5">
            <text:p>1552</text:p>
          </table:table-cell>
          <table:table-cell office:value-type="float" office:value="1554" table:style-name="ce38">
            <text:p>1554</text:p>
          </table:table-cell>
          <table:table-cell office:value-type="float" office:value="1549" table:style-name="ce38">
            <text:p>1549</text:p>
          </table:table-cell>
          <table:table-cell office:value-type="float" office:value="1551" table:style-name="ce39">
            <text:p>1551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5T2</text:p>
          </table:table-cell>
          <table:table-cell office:value-type="float" office:value="100.687" table:style-name="ce5">
            <text:p>101</text:p>
          </table:table-cell>
          <table:table-cell office:value-type="float" office:value="22.37" table:style-name="ce6">
            <text:p>22.4</text:p>
          </table:table-cell>
          <table:table-cell office:value-type="float" office:value="87612" table:style-name="ce5">
            <text:p>87612</text:p>
          </table:table-cell>
          <table:table-cell office:value-type="float" office:value="1549" table:formula="of:=AVERAGE([.J35:.L35])" table:style-name="ce5">
            <text:p>1549</text:p>
          </table:table-cell>
          <table:table-cell office:value-type="float" office:value="1301.2366666666667" table:style-name="ce44">
            <text:p>1301</text:p>
          </table:table-cell>
          <table:table-cell office:value-type="float" office:value="15.995050570260375" table:formula="of:=ABS((([.F35]*100/[.E35])-100)*-1)" table:style-name="ce5">
            <text:p>16</text:p>
          </table:table-cell>
          <table:table-cell office:value-type="float" office:value="16" table:style-name="ce94">
            <text:p>16</text:p>
          </table:table-cell>
          <table:table-cell office:value-type="float" office:value="1603.6200000000001" table:formula="of:=[.E35]+([.F35]-[.F34])" table:style-name="ce5">
            <text:p>1604</text:p>
          </table:table-cell>
          <table:table-cell office:value-type="float" office:value="1548" table:style-name="ce38">
            <text:p>1548</text:p>
          </table:table-cell>
          <table:table-cell office:value-type="float" office:value="1552" table:style-name="ce38">
            <text:p>1552</text:p>
          </table:table-cell>
          <table:table-cell office:value-type="float" office:value="1547" table:style-name="ce39">
            <text:p>1547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5T3</text:p>
          </table:table-cell>
          <table:table-cell office:value-type="float" office:value="101.358" table:style-name="ce5">
            <text:p>101</text:p>
          </table:table-cell>
          <table:table-cell office:value-type="float" office:value="21.18" table:style-name="ce6">
            <text:p>21.2</text:p>
          </table:table-cell>
          <table:table-cell office:value-type="float" office:value="93115" table:style-name="ce5">
            <text:p>93115</text:p>
          </table:table-cell>
          <table:table-cell office:value-type="float" office:value="1530.6666666666667" table:formula="of:=AVERAGE([.J36:.L36])" table:style-name="ce5">
            <text:p>1531</text:p>
          </table:table-cell>
          <table:table-cell office:value-type="float" office:value="1254.8799999999999" table:style-name="ce44">
            <text:p>1255</text:p>
          </table:table-cell>
          <table:table-cell office:value-type="float" office:value="18.017421602787465" table:formula="of:=ABS((([.F36]*100/[.E36])-100)*-1)" table:style-name="ce5">
            <text:p>18</text:p>
          </table:table-cell>
          <table:table-cell office:value-type="float" office:value="16" table:style-name="ce94">
            <text:p>16</text:p>
          </table:table-cell>
          <table:table-cell office:value-type="float" office:value="1484.31" table:formula="of:=[.E36]+([.F36]-[.F35])" table:style-name="ce5">
            <text:p>1484</text:p>
          </table:table-cell>
          <table:table-cell office:value-type="float" office:value="1544" table:style-name="ce38">
            <text:p>1544</text:p>
          </table:table-cell>
          <table:table-cell office:value-type="float" office:value="1526" table:style-name="ce38">
            <text:p>1526</text:p>
          </table:table-cell>
          <table:table-cell office:value-type="float" office:value="1522" table:style-name="ce39">
            <text:p>1522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5T4</text:p>
          </table:table-cell>
          <table:table-cell office:value-type="float" office:value="101.30500000000001" table:style-name="ce5">
            <text:p>101</text:p>
          </table:table-cell>
          <table:table-cell office:value-type="float" office:value="20.9" table:style-name="ce6">
            <text:p>20.9</text:p>
          </table:table-cell>
          <table:table-cell office:value-type="float" office:value="84081" table:style-name="ce5">
            <text:p>84081</text:p>
          </table:table-cell>
          <table:table-cell office:value-type="float" office:value="1526.3333333333333" table:formula="of:=AVERAGE([.J37:.L37])" table:style-name="ce5">
            <text:p>1526</text:p>
          </table:table-cell>
          <table:table-cell office:value-type="float" office:value="1283.5133333333333" table:style-name="ce44">
            <text:p>1284</text:p>
          </table:table-cell>
          <table:table-cell office:value-type="float" office:value="15.908713692946051" table:formula="of:=ABS((([.F37]*100/[.E37])-100)*-1)" table:style-name="ce5">
            <text:p>16</text:p>
          </table:table-cell>
          <table:table-cell office:value-type="float" office:value="16" table:style-name="ce94">
            <text:p>16</text:p>
          </table:table-cell>
          <table:table-cell office:value-type="float" office:value="1554.9666666666667" table:formula="of:=[.E37]+([.F37]-[.F36])" table:style-name="ce5">
            <text:p>1555</text:p>
          </table:table-cell>
          <table:table-cell office:value-type="float" office:value="1525" table:style-name="ce38">
            <text:p>1525</text:p>
          </table:table-cell>
          <table:table-cell office:value-type="float" office:value="1526" table:style-name="ce38">
            <text:p>1526</text:p>
          </table:table-cell>
          <table:table-cell office:value-type="float" office:value="1528" table:style-name="ce39">
            <text:p>1528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6T1</text:p>
          </table:table-cell>
          <table:table-cell office:value-type="float" office:value="102.77500000000001" table:style-name="ce5">
            <text:p>103</text:p>
          </table:table-cell>
          <table:table-cell office:value-type="float" office:value="21" table:style-name="ce6">
            <text:p>21.0</text:p>
          </table:table-cell>
          <table:table-cell office:value-type="float" office:value="99620" table:style-name="ce5">
            <text:p>99620</text:p>
          </table:table-cell>
          <table:table-cell office:value-type="float" office:value="1525.6666666666667" table:formula="of:=AVERAGE([.J38:.L38])" table:style-name="ce5">
            <text:p>1526</text:p>
          </table:table-cell>
          <table:table-cell office:value-type="float" office:value="1299.5466666666664" table:style-name="ce44">
            <text:p>1300</text:p>
          </table:table-cell>
          <table:table-cell office:value-type="float" office:value="14.821061830893612" table:formula="of:=ABS((([.F38]*100/[.E38])-100)*-1)" table:style-name="ce5">
            <text:p>15</text:p>
          </table:table-cell>
          <table:table-cell office:value-type="float" office:value="16" table:style-name="ce94">
            <text:p>16</text:p>
          </table:table-cell>
          <table:table-cell office:value-type="float" office:value="1541.6999999999998" table:formula="of:=[.E38]+([.F38]-[.F37])" table:style-name="ce5">
            <text:p>1542</text:p>
          </table:table-cell>
          <table:table-cell office:value-type="float" office:value="1524" table:style-name="ce38">
            <text:p>1524</text:p>
          </table:table-cell>
          <table:table-cell office:value-type="float" office:value="1526" table:style-name="ce38">
            <text:p>1526</text:p>
          </table:table-cell>
          <table:table-cell office:value-type="float" office:value="1527" table:style-name="ce39">
            <text:p>1527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6T2</text:p>
          </table:table-cell>
          <table:table-cell office:value-type="float" office:value="104.601" table:style-name="ce5">
            <text:p>105</text:p>
          </table:table-cell>
          <table:table-cell office:value-type="float" office:value="20" table:style-name="ce6">
            <text:p>20.0</text:p>
          </table:table-cell>
          <table:table-cell office:value-type="float" office:value="108662" table:style-name="ce5">
            <text:p>108662</text:p>
          </table:table-cell>
          <table:table-cell office:value-type="float" office:value="1518.3333333333333" table:formula="of:=AVERAGE([.J39:.L39])" table:style-name="ce5">
            <text:p>1518</text:p>
          </table:table-cell>
          <table:table-cell office:value-type="float" office:value="1319.3233333333335" table:style-name="ce44">
            <text:p>1319</text:p>
          </table:table-cell>
          <table:table-cell office:value-type="float" office:value="13.107135016465406" table:formula="of:=ABS((([.F39]*100/[.E39])-100)*-1)" table:style-name="ce5">
            <text:p>13</text:p>
          </table:table-cell>
          <table:table-cell office:value-type="float" office:value="16" table:style-name="ce94">
            <text:p>16</text:p>
          </table:table-cell>
          <table:table-cell office:value-type="float" office:value="1538.1100000000004" table:formula="of:=[.E39]+([.F39]-[.F38])" table:style-name="ce5">
            <text:p>1538</text:p>
          </table:table-cell>
          <table:table-cell office:value-type="float" office:value="1524" table:style-name="ce38">
            <text:p>1524</text:p>
          </table:table-cell>
          <table:table-cell office:value-type="float" office:value="1516" table:style-name="ce38">
            <text:p>1516</text:p>
          </table:table-cell>
          <table:table-cell office:value-type="float" office:value="1515" table:style-name="ce39">
            <text:p>1515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6T3</text:p>
          </table:table-cell>
          <table:table-cell office:value-type="float" office:value="105.431" table:style-name="ce5">
            <text:p>105</text:p>
          </table:table-cell>
          <table:table-cell office:value-type="float" office:value="18.91" table:style-name="ce6">
            <text:p>18.9</text:p>
          </table:table-cell>
          <table:table-cell office:value-type="float" office:value="103640" table:style-name="ce5">
            <text:p>103640</text:p>
          </table:table-cell>
          <table:table-cell office:value-type="float" office:value="1506" table:formula="of:=AVERAGE([.J40:.L40])" table:style-name="ce5">
            <text:p>1506</text:p>
          </table:table-cell>
          <table:table-cell office:value-type="float" office:value="1265.42" table:style-name="ce44">
            <text:p>1265</text:p>
          </table:table-cell>
          <table:table-cell office:value-type="float" office:value="15.974767596281538" table:formula="of:=ABS((([.F40]*100/[.E40])-100)*-1)" table:style-name="ce5">
            <text:p>16</text:p>
          </table:table-cell>
          <table:table-cell office:value-type="float" office:value="16" table:style-name="ce94">
            <text:p>16</text:p>
          </table:table-cell>
          <table:table-cell office:value-type="float" office:value="1452.0966666666666" table:formula="of:=[.E40]+([.F40]-[.F39])" table:style-name="ce5">
            <text:p>1452</text:p>
          </table:table-cell>
          <table:table-cell office:value-type="float" office:value="1509" table:style-name="ce38">
            <text:p>1509</text:p>
          </table:table-cell>
          <table:table-cell office:value-type="float" office:value="1512" table:style-name="ce38">
            <text:p>1512</text:p>
          </table:table-cell>
          <table:table-cell office:value-type="float" office:value="1497" table:style-name="ce39">
            <text:p>1497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6T4</text:p>
          </table:table-cell>
          <table:table-cell office:value-type="float" office:value="105.848" table:style-name="ce5">
            <text:p>106</text:p>
          </table:table-cell>
          <table:table-cell office:value-type="float" office:value="18.63" table:style-name="ce6">
            <text:p>18.6</text:p>
          </table:table-cell>
          <table:table-cell office:value-type="float" office:value="93463" table:style-name="ce5">
            <text:p>93463</text:p>
          </table:table-cell>
          <table:table-cell office:value-type="float" office:value="1507.6666666666667" table:formula="of:=AVERAGE([.J41:.L41])" table:style-name="ce5">
            <text:p>1508</text:p>
          </table:table-cell>
          <table:table-cell office:value-type="float" office:value="1332.8966666666668" table:style-name="ce44">
            <text:p>1333</text:p>
          </table:table-cell>
          <table:table-cell office:value-type="float" office:value="11.592084899403048" table:formula="of:=ABS((([.F41]*100/[.E41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575.1433333333334" table:formula="of:=[.E41]+([.F41]-[.F40])" table:style-name="ce5">
            <text:p>1575</text:p>
          </table:table-cell>
          <table:table-cell office:value-type="float" office:value="1496" table:style-name="ce38">
            <text:p>1496</text:p>
          </table:table-cell>
          <table:table-cell office:value-type="float" office:value="1506" table:style-name="ce38">
            <text:p>1506</text:p>
          </table:table-cell>
          <table:table-cell office:value-type="float" office:value="1521" table:style-name="ce39">
            <text:p>1521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7T1</text:p>
          </table:table-cell>
          <table:table-cell office:value-type="float" office:value="108.239" table:style-name="ce5">
            <text:p>108</text:p>
          </table:table-cell>
          <table:table-cell office:value-type="float" office:value="18.75" table:style-name="ce6">
            <text:p>18.8</text:p>
          </table:table-cell>
          <table:table-cell office:value-type="float" office:value="114965" table:style-name="ce5">
            <text:p>114965</text:p>
          </table:table-cell>
          <table:table-cell office:value-type="float" office:value="1525.3333333333333" table:formula="of:=AVERAGE([.J42:.L42])" table:style-name="ce5">
            <text:p>1525</text:p>
          </table:table-cell>
          <table:table-cell office:value-type="float" office:value="1354.97" table:style-name="ce44">
            <text:p>1355</text:p>
          </table:table-cell>
          <table:table-cell office:value-type="float" office:value="11.168924825174827" table:formula="of:=ABS((([.F42]*100/[.E42])-100)*-1)" table:style-name="ce5">
            <text:p>11</text:p>
          </table:table-cell>
          <table:table-cell office:value-type="float" office:value="16" table:style-name="ce94">
            <text:p>16</text:p>
          </table:table-cell>
          <table:table-cell office:value-type="float" office:value="1547.4066666666665" table:formula="of:=[.E42]+([.F42]-[.F41])" table:style-name="ce5">
            <text:p>1547</text:p>
          </table:table-cell>
          <table:table-cell office:value-type="float" office:value="1524" table:style-name="ce38">
            <text:p>1524</text:p>
          </table:table-cell>
          <table:table-cell office:value-type="float" office:value="1522" table:style-name="ce38">
            <text:p>1522</text:p>
          </table:table-cell>
          <table:table-cell office:value-type="float" office:value="1530" table:style-name="ce39">
            <text:p>1530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7T2</text:p>
          </table:table-cell>
          <table:table-cell office:value-type="float" office:value="110.41" table:style-name="ce5">
            <text:p>110</text:p>
          </table:table-cell>
          <table:table-cell office:value-type="float" office:value="17.22" table:style-name="ce6">
            <text:p>17.2</text:p>
          </table:table-cell>
          <table:table-cell office:value-type="float" office:value="121395" table:style-name="ce5">
            <text:p>121395</text:p>
          </table:table-cell>
          <table:table-cell office:value-type="float" office:value="1538.3333333333333" table:formula="of:=AVERAGE([.J43:.L43])" table:style-name="ce5">
            <text:p>1538</text:p>
          </table:table-cell>
          <table:table-cell office:value-type="float" office:value="1390.4066666666668" table:style-name="ce44">
            <text:p>1390</text:p>
          </table:table-cell>
          <table:table-cell office:value-type="float" office:value="9.6160346695557735" table:formula="of:=ABS((([.F43]*100/[.E43])-100)*-1)" table:style-name="ce5">
            <text:p>10</text:p>
          </table:table-cell>
          <table:table-cell office:value-type="float" office:value="16" table:style-name="ce94">
            <text:p>16</text:p>
          </table:table-cell>
          <table:table-cell office:value-type="float" office:value="1573.77" table:formula="of:=[.E43]+([.F43]-[.F42])" table:style-name="ce5">
            <text:p>1574</text:p>
          </table:table-cell>
          <table:table-cell office:value-type="float" office:value="1537" table:style-name="ce38">
            <text:p>1537</text:p>
          </table:table-cell>
          <table:table-cell office:value-type="float" office:value="1535" table:style-name="ce38">
            <text:p>1535</text:p>
          </table:table-cell>
          <table:table-cell office:value-type="float" office:value="1543" table:style-name="ce39">
            <text:p>1543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7T3</text:p>
          </table:table-cell>
          <table:table-cell office:value-type="float" office:value="112.44199999999999" table:style-name="ce5">
            <text:p>112</text:p>
          </table:table-cell>
          <table:table-cell office:value-type="float" office:value="16.38" table:style-name="ce6">
            <text:p>16.4</text:p>
          </table:table-cell>
          <table:table-cell office:value-type="float" office:value="120069" table:style-name="ce5">
            <text:p>120069</text:p>
          </table:table-cell>
          <table:table-cell office:value-type="float" office:value="1549.6666666666667" table:formula="of:=AVERAGE([.J44:.L44])" table:style-name="ce5">
            <text:p>1550</text:p>
          </table:table-cell>
          <table:table-cell office:value-type="float" office:value="1353.1233333333332" table:style-name="ce44">
            <text:p>1353</text:p>
          </table:table-cell>
          <table:table-cell office:value-type="float" office:value="12.68294256829428" table:formula="of:=ABS((([.F44]*100/[.E44])-100)*-1)" table:style-name="ce5">
            <text:p>13</text:p>
          </table:table-cell>
          <table:table-cell office:value-type="float" office:value="16" table:style-name="ce94">
            <text:p>16</text:p>
          </table:table-cell>
          <table:table-cell office:value-type="float" office:value="1512.3833333333332" table:formula="of:=[.E44]+([.F44]-[.F43])" table:style-name="ce5">
            <text:p>1512</text:p>
          </table:table-cell>
          <table:table-cell office:value-type="float" office:value="1564" table:style-name="ce38">
            <text:p>1564</text:p>
          </table:table-cell>
          <table:table-cell office:value-type="float" office:value="1551" table:style-name="ce38">
            <text:p>1551</text:p>
          </table:table-cell>
          <table:table-cell office:value-type="float" office:value="1534" table:style-name="ce39">
            <text:p>1534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7T4</text:p>
          </table:table-cell>
          <table:table-cell office:value-type="float" office:value="113.45699999999999" table:style-name="ce5">
            <text:p>113</text:p>
          </table:table-cell>
          <table:table-cell office:value-type="float" office:value="16.55" table:style-name="ce6">
            <text:p>16.6</text:p>
          </table:table-cell>
          <table:table-cell office:value-type="float" office:value="111215" table:style-name="ce5">
            <text:p>111215</text:p>
          </table:table-cell>
          <table:table-cell office:value-type="float" office:value="1552" table:formula="of:=AVERAGE([.J45:.L45])" table:style-name="ce5">
            <text:p>1552</text:p>
          </table:table-cell>
          <table:table-cell office:value-type="float" office:value="1369.5666666666666" table:style-name="ce44">
            <text:p>1370</text:p>
          </table:table-cell>
          <table:table-cell office:value-type="float" office:value="11.754725085910664" table:formula="of:=ABS((([.F45]*100/[.E45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568.4433333333334" table:formula="of:=[.E45]+([.F45]-[.F44])" table:style-name="ce5">
            <text:p>1568</text:p>
          </table:table-cell>
          <table:table-cell office:value-type="float" office:value="1544" table:style-name="ce38">
            <text:p>1544</text:p>
          </table:table-cell>
          <table:table-cell office:value-type="float" office:value="1555" table:style-name="ce38">
            <text:p>1555</text:p>
          </table:table-cell>
          <table:table-cell office:value-type="float" office:value="1557" table:style-name="ce39">
            <text:p>1557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8T1</text:p>
          </table:table-cell>
          <table:table-cell office:value-type="float" office:value="114.994" table:style-name="ce5">
            <text:p>115</text:p>
          </table:table-cell>
          <table:table-cell office:value-type="float" office:value="16.739999999999998" table:style-name="ce6">
            <text:p>16.7</text:p>
          </table:table-cell>
          <table:table-cell office:value-type="float" office:value="129164" table:style-name="ce5">
            <text:p>129164</text:p>
          </table:table-cell>
          <table:table-cell office:value-type="float" office:value="1589" table:formula="of:=AVERAGE([.J46:.L46])" table:style-name="ce5">
            <text:p>1589</text:p>
          </table:table-cell>
          <table:table-cell office:value-type="float" office:value="1372.1333333333332" table:style-name="ce44">
            <text:p>1372</text:p>
          </table:table-cell>
          <table:table-cell office:value-type="float" office:value="13.64799664359137" table:formula="of:=ABS((([.F46]*100/[.E46])-100)*-1)" table:style-name="ce5">
            <text:p>14</text:p>
          </table:table-cell>
          <table:table-cell office:value-type="float" office:value="16" table:style-name="ce94">
            <text:p>16</text:p>
          </table:table-cell>
          <table:table-cell office:value-type="float" office:value="1591.5666666666666" table:formula="of:=[.E46]+([.F46]-[.F45])" table:style-name="ce5">
            <text:p>1592</text:p>
          </table:table-cell>
          <table:table-cell office:value-type="float" office:value="1570" table:style-name="ce38">
            <text:p>1570</text:p>
          </table:table-cell>
          <table:table-cell office:value-type="float" office:value="1590" table:style-name="ce38">
            <text:p>1590</text:p>
          </table:table-cell>
          <table:table-cell office:value-type="float" office:value="1607" table:style-name="ce39">
            <text:p>1607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8T2</text:p>
          </table:table-cell>
          <table:table-cell office:value-type="float" office:value="117.941" table:style-name="ce5">
            <text:p>118</text:p>
          </table:table-cell>
          <table:table-cell office:value-type="float" office:value="15.28" table:style-name="ce6">
            <text:p>15.3</text:p>
          </table:table-cell>
          <table:table-cell office:value-type="float" office:value="134405" table:style-name="ce5">
            <text:p>134405</text:p>
          </table:table-cell>
          <table:table-cell office:value-type="float" office:value="1622" table:formula="of:=AVERAGE([.J47:.L47])" table:style-name="ce5">
            <text:p>1622</text:p>
          </table:table-cell>
          <table:table-cell office:value-type="float" office:value="1413.0166666666667" table:style-name="ce44">
            <text:p>1413</text:p>
          </table:table-cell>
          <table:table-cell office:value-type="float" office:value="12.88429921907111" table:formula="of:=ABS((([.F47]*100/[.E47])-100)*-1)" table:style-name="ce5">
            <text:p>13</text:p>
          </table:table-cell>
          <table:table-cell office:value-type="float" office:value="16" table:style-name="ce94">
            <text:p>16</text:p>
          </table:table-cell>
          <table:table-cell office:value-type="float" office:value="1662.8833333333334" table:formula="of:=[.E47]+([.F47]-[.F46])" table:style-name="ce5">
            <text:p>1663</text:p>
          </table:table-cell>
          <table:table-cell office:value-type="float" office:value="1612" table:style-name="ce38">
            <text:p>1612</text:p>
          </table:table-cell>
          <table:table-cell office:value-type="float" office:value="1619" table:style-name="ce38">
            <text:p>1619</text:p>
          </table:table-cell>
          <table:table-cell office:value-type="float" office:value="1635" table:style-name="ce39">
            <text:p>1635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8T3</text:p>
          </table:table-cell>
          <table:table-cell office:value-type="float" office:value="120.491" table:style-name="ce5">
            <text:p>120</text:p>
          </table:table-cell>
          <table:table-cell office:value-type="float" office:value="14.55" table:style-name="ce6">
            <text:p>14.6</text:p>
          </table:table-cell>
          <table:table-cell office:value-type="float" office:value="134156" table:style-name="ce5">
            <text:p>134156</text:p>
          </table:table-cell>
          <table:table-cell office:value-type="float" office:value="1659" table:formula="of:=AVERAGE([.J48:.L48])" table:style-name="ce5">
            <text:p>1659</text:p>
          </table:table-cell>
          <table:table-cell office:value-type="float" office:value="1403.5733333333335" table:style-name="ce44">
            <text:p>1404</text:p>
          </table:table-cell>
          <table:table-cell office:value-type="float" office:value="15.396423548322275" table:formula="of:=ABS((([.F48]*100/[.E48])-100)*-1)" table:style-name="ce5">
            <text:p>15</text:p>
          </table:table-cell>
          <table:table-cell office:value-type="float" office:value="16" table:style-name="ce94">
            <text:p>16</text:p>
          </table:table-cell>
          <table:table-cell office:value-type="float" office:value="1649.5566666666668" table:formula="of:=[.E48]+([.F48]-[.F47])" table:style-name="ce5">
            <text:p>1650</text:p>
          </table:table-cell>
          <table:table-cell office:value-type="float" office:value="1650" table:style-name="ce38">
            <text:p>1650</text:p>
          </table:table-cell>
          <table:table-cell office:value-type="float" office:value="1661" table:style-name="ce38">
            <text:p>1661</text:p>
          </table:table-cell>
          <table:table-cell office:value-type="float" office:value="1666" table:style-name="ce39">
            <text:p>1666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18T4</text:p>
          </table:table-cell>
          <table:table-cell office:value-type="float" office:value="120.95399999999999" table:style-name="ce5">
            <text:p>121</text:p>
          </table:table-cell>
          <table:table-cell office:value-type="float" office:value="14.45" table:style-name="ce6">
            <text:p>14.5</text:p>
          </table:table-cell>
          <table:table-cell office:value-type="float" office:value="120259" table:style-name="ce5">
            <text:p>120259</text:p>
          </table:table-cell>
          <table:table-cell office:value-type="float" office:value="1678.3333333333333" table:formula="of:=AVERAGE([.J49:.L49])" table:style-name="ce5">
            <text:p>1678</text:p>
          </table:table-cell>
          <table:table-cell office:value-type="float" office:value="1422.2366666666667" table:style-name="ce44">
            <text:p>1422</text:p>
          </table:table-cell>
          <table:table-cell office:value-type="float" office:value="15.258987090367427" table:formula="of:=ABS((([.F49]*100/[.E49])-100)*-1)" table:style-name="ce5">
            <text:p>15</text:p>
          </table:table-cell>
          <table:table-cell office:value-type="float" office:value="16" table:style-name="ce94">
            <text:p>16</text:p>
          </table:table-cell>
          <table:table-cell office:value-type="float" office:value="1696.9966666666664" table:formula="of:=[.E49]+([.F49]-[.F48])" table:style-name="ce5">
            <text:p>1697</text:p>
          </table:table-cell>
          <table:table-cell office:value-type="float" office:value="1666" table:style-name="ce38">
            <text:p>1666</text:p>
          </table:table-cell>
          <table:table-cell office:value-type="float" office:value="1684" table:style-name="ce38">
            <text:p>1684</text:p>
          </table:table-cell>
          <table:table-cell office:value-type="float" office:value="1685" table:style-name="ce39">
            <text:p>1685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9T1</text:p>
          </table:table-cell>
          <table:table-cell office:value-type="float" office:value="122.758" table:style-name="ce5">
            <text:p>123</text:p>
          </table:table-cell>
          <table:table-cell office:value-type="float" office:value="14.7" table:style-name="ce6">
            <text:p>14.7</text:p>
          </table:table-cell>
          <table:table-cell office:value-type="float" office:value="135031" table:style-name="ce5">
            <text:p>135031</text:p>
          </table:table-cell>
          <table:table-cell office:value-type="float" office:value="1694.3333333333333" table:formula="of:=AVERAGE([.J50:.L50])" table:style-name="ce5">
            <text:p>1694</text:p>
          </table:table-cell>
          <table:table-cell office:value-type="float" office:value="1421.96" table:style-name="ce44">
            <text:p>1422</text:p>
          </table:table-cell>
          <table:table-cell office:value-type="float" office:value="16.07554593743852" table:formula="of:=ABS((([.F50]*100/[.E50])-100)*-1)" table:style-name="ce5">
            <text:p>16</text:p>
          </table:table-cell>
          <table:table-cell office:value-type="float" office:value="16" table:style-name="ce94">
            <text:p>16</text:p>
          </table:table-cell>
          <table:table-cell office:value-type="float" office:value="1694.0566666666666" table:formula="of:=[.E50]+([.F50]-[.F49])" table:style-name="ce5">
            <text:p>1694</text:p>
          </table:table-cell>
          <table:table-cell office:value-type="float" office:value="1686" table:style-name="ce38">
            <text:p>1686</text:p>
          </table:table-cell>
          <table:table-cell office:value-type="float" office:value="1694" table:style-name="ce38">
            <text:p>1694</text:p>
          </table:table-cell>
          <table:table-cell office:value-type="float" office:value="1703" table:style-name="ce39">
            <text:p>170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9T2</text:p>
          </table:table-cell>
          <table:table-cell office:value-type="float" office:value="124.175" table:style-name="ce5">
            <text:p>124</text:p>
          </table:table-cell>
          <table:table-cell office:value-type="float" office:value="14.02" table:style-name="ce6">
            <text:p>14.0</text:p>
          </table:table-cell>
          <table:table-cell office:value-type="float" office:value="130987" table:style-name="ce5">
            <text:p>130987</text:p>
          </table:table-cell>
          <table:table-cell office:value-type="float" office:value="1718" table:formula="of:=AVERAGE([.J51:.L51])" table:style-name="ce5">
            <text:p>1718</text:p>
          </table:table-cell>
          <table:table-cell office:value-type="float" office:value="1425.34" table:style-name="ce44">
            <text:p>1425</text:p>
          </table:table-cell>
          <table:table-cell office:value-type="float" office:value="17.034924330617002" table:formula="of:=ABS((([.F51]*100/[.E51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1721.3799999999999" table:formula="of:=[.E51]+([.F51]-[.F50])" table:style-name="ce5">
            <text:p>1721</text:p>
          </table:table-cell>
          <table:table-cell office:value-type="float" office:value="1709" table:style-name="ce38">
            <text:p>1709</text:p>
          </table:table-cell>
          <table:table-cell office:value-type="float" office:value="1712" table:style-name="ce38">
            <text:p>1712</text:p>
          </table:table-cell>
          <table:table-cell office:value-type="float" office:value="1733" table:style-name="ce39">
            <text:p>173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9T3</text:p>
          </table:table-cell>
          <table:table-cell office:value-type="float" office:value="126.13500000000001" table:style-name="ce5">
            <text:p>126</text:p>
          </table:table-cell>
          <table:table-cell office:value-type="float" office:value="13.92" table:style-name="ce6">
            <text:p>13.9</text:p>
          </table:table-cell>
          <table:table-cell office:value-type="float" office:value="121256" table:style-name="ce5">
            <text:p>121256</text:p>
          </table:table-cell>
          <table:table-cell office:value-type="float" office:value="1740.6666666666667" table:formula="of:=AVERAGE([.J52:.L52])" table:style-name="ce5">
            <text:p>1741</text:p>
          </table:table-cell>
          <table:table-cell office:value-type="float" office:value="1449.3566666666666" table:style-name="ce44">
            <text:p>1449</text:p>
          </table:table-cell>
          <table:table-cell office:value-type="float" office:value="16.735541937954821" table:formula="of:=ABS((([.F52]*100/[.E52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1764.6833333333334" table:formula="of:=[.E52]+([.F52]-[.F51])" table:style-name="ce5">
            <text:p>1765</text:p>
          </table:table-cell>
          <table:table-cell office:value-type="float" office:value="1738" table:style-name="ce38">
            <text:p>1738</text:p>
          </table:table-cell>
          <table:table-cell office:value-type="float" office:value="1749" table:style-name="ce38">
            <text:p>1749</text:p>
          </table:table-cell>
          <table:table-cell office:value-type="float" office:value="1735" table:style-name="ce39">
            <text:p>1735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19T4</text:p>
          </table:table-cell>
          <table:table-cell office:value-type="float" office:value="125.32" table:style-name="ce5">
            <text:p>125</text:p>
          </table:table-cell>
          <table:table-cell office:value-type="float" office:value="13.78" table:style-name="ce6">
            <text:p>13.8</text:p>
          </table:table-cell>
          <table:table-cell office:value-type="float" office:value="116272" table:style-name="ce5">
            <text:p>116272</text:p>
          </table:table-cell>
          <table:table-cell office:value-type="float" office:value="1755" table:formula="of:=AVERAGE([.J53:.L53])" table:style-name="ce5">
            <text:p>1755</text:p>
          </table:table-cell>
          <table:table-cell office:value-type="float" office:value="1449.9433333333334" table:style-name="ce44">
            <text:p>1450</text:p>
          </table:table-cell>
          <table:table-cell office:value-type="float" office:value="17.382146248812916" table:formula="of:=ABS((([.F53]*100/[.E53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1755.5866666666668" table:formula="of:=[.E53]+([.F53]-[.F52])" table:style-name="ce5">
            <text:p>1756</text:p>
          </table:table-cell>
          <table:table-cell office:value-type="float" office:value="1741" table:style-name="ce38">
            <text:p>1741</text:p>
          </table:table-cell>
          <table:table-cell office:value-type="float" office:value="1761" table:style-name="ce38">
            <text:p>1761</text:p>
          </table:table-cell>
          <table:table-cell office:value-type="float" office:value="1763" table:style-name="ce39">
            <text:p>176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0T1</text:p>
          </table:table-cell>
          <table:table-cell office:value-type="float" office:value="126.69499999999999" table:style-name="ce5">
            <text:p>127</text:p>
          </table:table-cell>
          <table:table-cell office:value-type="float" office:value="14.41" table:style-name="ce6">
            <text:p>14.4</text:p>
          </table:table-cell>
          <table:table-cell office:value-type="float" office:value="125837" table:style-name="ce5">
            <text:p>125837</text:p>
          </table:table-cell>
          <table:table-cell office:value-type="float" office:value="1756" table:formula="of:=AVERAGE([.J54:.L54])" table:style-name="ce5">
            <text:p>1756</text:p>
          </table:table-cell>
          <table:table-cell office:value-type="float" office:value="1460.38" table:style-name="ce44">
            <text:p>1460</text:p>
          </table:table-cell>
          <table:table-cell office:value-type="float" office:value="16.834851936218683" table:formula="of:=ABS((([.F54]*100/[.E54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1766.4366666666667" table:formula="of:=[.E54]+([.F54]-[.F53])" table:style-name="ce5">
            <text:p>1766</text:p>
          </table:table-cell>
          <table:table-cell office:value-type="float" office:value="1758" table:style-name="ce38">
            <text:p>1758</text:p>
          </table:table-cell>
          <table:table-cell office:value-type="float" office:value="1752" table:style-name="ce38">
            <text:p>1752</text:p>
          </table:table-cell>
          <table:table-cell office:value-type="float" office:value="1758" table:style-name="ce39">
            <text:p>175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0T2</text:p>
          </table:table-cell>
          <table:table-cell office:value-type="float" office:value="126.79900000000001" table:style-name="ce5">
            <text:p>127</text:p>
          </table:table-cell>
          <table:table-cell office:value-type="float" office:value="15.33" table:style-name="ce6">
            <text:p>15.3</text:p>
          </table:table-cell>
          <table:table-cell office:value-type="float" office:value="74657" table:style-name="ce5">
            <text:p>74657</text:p>
          </table:table-cell>
          <table:table-cell office:value-type="float" office:value="1711" table:formula="of:=AVERAGE([.J55:.L55])" table:style-name="ce5">
            <text:p>1711</text:p>
          </table:table-cell>
          <table:table-cell office:value-type="float" office:value="1477.6666666666667" table:style-name="ce44">
            <text:p>1478</text:p>
          </table:table-cell>
          <table:table-cell office:value-type="float" office:value="13.637249172024141" table:formula="of:=ABS((([.F55]*100/[.E55])-100)*-1)" table:style-name="ce5">
            <text:p>14</text:p>
          </table:table-cell>
          <table:table-cell office:value-type="float" office:value="16" table:style-name="ce94">
            <text:p>16</text:p>
          </table:table-cell>
          <table:table-cell office:value-type="float" office:value="1728.2866666666666" table:formula="of:=[.E55]+([.F55]-[.F54])" table:style-name="ce5">
            <text:p>1728</text:p>
          </table:table-cell>
          <table:table-cell office:value-type="float" office:value="1753" table:style-name="ce38">
            <text:p>1753</text:p>
          </table:table-cell>
          <table:table-cell office:value-type="float" office:value="1730" table:style-name="ce38">
            <text:p>1730</text:p>
          </table:table-cell>
          <table:table-cell office:value-type="float" office:value="1650" table:style-name="ce39">
            <text:p>165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0T3</text:p>
          </table:table-cell>
          <table:table-cell office:value-type="float" office:value="128.255" table:style-name="ce5">
            <text:p>128</text:p>
          </table:table-cell>
          <table:table-cell office:value-type="float" office:value="16.260000000000002" table:style-name="ce6">
            <text:p>16.3</text:p>
          </table:table-cell>
          <table:table-cell office:value-type="float" office:value="101887" table:style-name="ce5">
            <text:p>101887</text:p>
          </table:table-cell>
          <table:table-cell office:value-type="float" office:value="1718" table:formula="of:=AVERAGE([.J56:.L56])" table:style-name="ce5">
            <text:p>1718</text:p>
          </table:table-cell>
          <table:table-cell office:value-type="float" office:value="1369.3333333333333" table:style-name="ce44">
            <text:p>1369</text:p>
          </table:table-cell>
          <table:table-cell office:value-type="float" office:value="20.294916569654646" table:formula="of:=ABS((([.F56]*100/[.E56])-100)*-1)" table:style-name="ce5">
            <text:p>20</text:p>
          </table:table-cell>
          <table:table-cell office:value-type="float" office:value="16" table:style-name="ce94">
            <text:p>16</text:p>
          </table:table-cell>
          <table:table-cell office:value-type="float" office:value="1609.6666666666665" table:formula="of:=[.E56]+([.F56]-[.F55])" table:style-name="ce5">
            <text:p>1610</text:p>
          </table:table-cell>
          <table:table-cell office:value-type="float" office:value="1677" table:style-name="ce38">
            <text:p>1677</text:p>
          </table:table-cell>
          <table:table-cell office:value-type="float" office:value="1735" table:style-name="ce38">
            <text:p>1735</text:p>
          </table:table-cell>
          <table:table-cell office:value-type="float" office:value="1742" table:style-name="ce39">
            <text:p>17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0T4</text:p>
          </table:table-cell>
          <table:table-cell office:value-type="float" office:value="127.179" table:style-name="ce5">
            <text:p>127</text:p>
          </table:table-cell>
          <table:table-cell office:value-type="float" office:value="16.13" table:style-name="ce6">
            <text:p>16.1</text:p>
          </table:table-cell>
          <table:table-cell office:value-type="float" office:value="113367" table:style-name="ce5">
            <text:p>113367</text:p>
          </table:table-cell>
          <table:table-cell office:value-type="float" office:value="1766.6666666666667" table:formula="of:=AVERAGE([.J57:.L57])" table:style-name="ce5">
            <text:p>1767</text:p>
          </table:table-cell>
          <table:table-cell office:value-type="float" office:value="1409.6666666666667" table:style-name="ce44">
            <text:p>1410</text:p>
          </table:table-cell>
          <table:table-cell office:value-type="float" office:value="20.207547169811306" table:formula="of:=ABS((([.F57]*100/[.E57])-100)*-1)" table:style-name="ce5">
            <text:p>20</text:p>
          </table:table-cell>
          <table:table-cell office:value-type="float" office:value="16" table:style-name="ce94">
            <text:p>16</text:p>
          </table:table-cell>
          <table:table-cell office:value-type="float" office:value="1807.0000000000002" table:formula="of:=[.E57]+([.F57]-[.F56])" table:style-name="ce5">
            <text:p>1807</text:p>
          </table:table-cell>
          <table:table-cell office:value-type="float" office:value="1752" table:style-name="ce38">
            <text:p>1752</text:p>
          </table:table-cell>
          <table:table-cell office:value-type="float" office:value="1769" table:style-name="ce38">
            <text:p>1769</text:p>
          </table:table-cell>
          <table:table-cell office:value-type="float" office:value="1779" table:style-name="ce39">
            <text:p>177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1T1</text:p>
          </table:table-cell>
          <table:table-cell office:value-type="float" office:value="127.831" table:style-name="ce5">
            <text:p>128</text:p>
          </table:table-cell>
          <table:table-cell office:value-type="float" office:value="15.98" table:style-name="ce6">
            <text:p>16.0</text:p>
          </table:table-cell>
          <table:table-cell office:value-type="float" office:value="130270" table:style-name="ce5">
            <text:p>130270</text:p>
          </table:table-cell>
          <table:table-cell office:value-type="float" office:value="1780.3333333333333" table:formula="of:=AVERAGE([.J58:.L58])" table:style-name="ce5">
            <text:p>1780</text:p>
          </table:table-cell>
          <table:table-cell office:value-type="float" office:value="1457.6666666666667" table:style-name="ce44">
            <text:p>1458</text:p>
          </table:table-cell>
          <table:table-cell office:value-type="float" office:value="18.123946826436978" table:formula="of:=ABS((([.F58]*100/[.E58])-100)*-1)" table:style-name="ce5">
            <text:p>18</text:p>
          </table:table-cell>
          <table:table-cell office:value-type="float" office:value="16" table:style-name="ce94">
            <text:p>16</text:p>
          </table:table-cell>
          <table:table-cell office:value-type="float" office:value="1828.3333333333333" table:formula="of:=[.E58]+([.F58]-[.F57])" table:style-name="ce5">
            <text:p>1828</text:p>
          </table:table-cell>
          <table:table-cell office:value-type="float" office:value="1786" table:style-name="ce38">
            <text:p>1786</text:p>
          </table:table-cell>
          <table:table-cell office:value-type="float" office:value="1771" table:style-name="ce38">
            <text:p>1771</text:p>
          </table:table-cell>
          <table:table-cell office:value-type="float" office:value="1784" table:style-name="ce38">
            <text:p>1784</text:p>
          </table:table-cell>
          <table:table-cell table:style-name="ce122"/>
          <table:table-cell table:number-columns-repeated="16371"/>
        </table:table-row>
        <table:table-row table:style-name="ro2">
          <table:table-cell office:value-type="string" table:style-name="ce42">
            <text:p>2021T2</text:p>
          </table:table-cell>
          <table:table-cell office:value-type="float" office:value="130.9" table:style-name="ce5">
            <text:p>131</text:p>
          </table:table-cell>
          <table:table-cell office:value-type="float" office:value="15.26" table:style-name="ce6">
            <text:p>15.3</text:p>
          </table:table-cell>
          <table:table-cell office:value-type="float" office:value="137445" table:style-name="ce5">
            <text:p>137445</text:p>
          </table:table-cell>
          <table:table-cell office:value-type="float" office:value="1805" table:formula="of:=AVERAGE([.J59:.L59])" table:style-name="ce5">
            <text:p>1805</text:p>
          </table:table-cell>
          <table:table-cell office:value-type="float" office:value="1500" table:style-name="ce44">
            <text:p>1500</text:p>
          </table:table-cell>
          <table:table-cell office:value-type="float" office:value="16.89750692520775" table:formula="of:=ABS((([.F59]*100/[.E59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1847.3333333333333" table:formula="of:=[.E59]+([.F59]-[.F58])" table:style-name="ce5">
            <text:p>1847</text:p>
          </table:table-cell>
          <table:table-cell office:value-type="float" office:value="1794" table:style-name="ce38">
            <text:p>1794</text:p>
          </table:table-cell>
          <table:table-cell office:value-type="float" office:value="1805" table:style-name="ce38">
            <text:p>1805</text:p>
          </table:table-cell>
          <table:table-cell office:value-type="float" office:value="1816" table:style-name="ce38">
            <text:p>181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1T3</text:p>
          </table:table-cell>
          <table:table-cell office:value-type="float" office:value="133.6" table:style-name="ce5">
            <text:p>134</text:p>
          </table:table-cell>
          <table:table-cell office:value-type="float" office:value="14.57" table:style-name="ce6">
            <text:p>14.6</text:p>
          </table:table-cell>
          <table:table-cell office:value-type="float" office:value="153552" table:style-name="ce5">
            <text:p>153552</text:p>
          </table:table-cell>
          <table:table-cell office:value-type="float" office:value="1821.3333333333333" table:formula="of:=AVERAGE([.J60:.L60])" table:style-name="ce5">
            <text:p>1821</text:p>
          </table:table-cell>
          <table:table-cell office:value-type="float" office:value="1515.6666666666667" table:style-name="ce44">
            <text:p>1516</text:p>
          </table:table-cell>
          <table:table-cell office:value-type="float" office:value="16.782576866764259" table:formula="of:=ABS((([.F60]*100/[.E60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1837" table:formula="of:=[.E60]+([.F60]-[.F59])" table:style-name="ce5">
            <text:p>1837</text:p>
          </table:table-cell>
          <table:table-cell office:value-type="float" office:value="1826" table:style-name="ce38">
            <text:p>1826</text:p>
          </table:table-cell>
          <table:table-cell office:value-type="float" office:value="1825" table:style-name="ce38">
            <text:p>1825</text:p>
          </table:table-cell>
          <table:table-cell office:value-type="float" office:value="1813" table:style-name="ce38">
            <text:p>181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1T4</text:p>
          </table:table-cell>
          <table:table-cell office:value-type="float" office:value="135.291" table:style-name="ce5">
            <text:p>135</text:p>
          </table:table-cell>
          <table:table-cell office:value-type="float" office:value="13.33" table:style-name="ce6">
            <text:p>13.3</text:p>
          </table:table-cell>
          <table:table-cell office:value-type="float" office:value="144256" table:style-name="ce5">
            <text:p>144256</text:p>
          </table:table-cell>
          <table:table-cell office:value-type="float" office:value="1825.3333333333333" table:formula="of:=AVERAGE([.J61:.L61])" table:style-name="ce5">
            <text:p>1825</text:p>
          </table:table-cell>
          <table:table-cell office:value-type="float" office:value="1553" table:style-name="ce44">
            <text:p>1553</text:p>
          </table:table-cell>
          <table:table-cell office:value-type="float" office:value="14.919649379108833" table:formula="of:=ABS((([.F61]*100/[.E61])-100)*-1)" table:style-name="ce5">
            <text:p>15</text:p>
          </table:table-cell>
          <table:table-cell office:value-type="float" office:value="16" table:style-name="ce94">
            <text:p>16</text:p>
          </table:table-cell>
          <table:table-cell office:value-type="float" office:value="1862.6666666666665" table:formula="of:=[.E61]+([.F61]-[.F60])" table:style-name="ce5">
            <text:p>1863</text:p>
          </table:table-cell>
          <table:table-cell office:value-type="float" office:value="1816" table:style-name="ce38">
            <text:p>1816</text:p>
          </table:table-cell>
          <table:table-cell office:value-type="float" office:value="1831" table:style-name="ce38">
            <text:p>1831</text:p>
          </table:table-cell>
          <table:table-cell office:value-type="float" office:value="1829" table:style-name="ce38">
            <text:p>182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2T1</text:p>
          </table:table-cell>
          <table:table-cell office:value-type="float" office:value="138.74" table:style-name="ce44">
            <text:p>139</text:p>
          </table:table-cell>
          <table:table-cell office:value-type="float" office:value="13.65" table:style-name="ce45">
            <text:p>13.7</text:p>
          </table:table-cell>
          <table:table-cell office:value-type="float" office:value="165579" table:style-name="ce44">
            <text:p>165579</text:p>
          </table:table-cell>
          <table:table-cell office:value-type="float" office:value="1806" table:formula="of:=AVERAGE([.J62:.L62])" table:style-name="ce44">
            <text:p>1806</text:p>
          </table:table-cell>
          <table:table-cell office:value-type="float" office:value="1617" table:style-name="ce44">
            <text:p>1617</text:p>
          </table:table-cell>
          <table:table-cell office:value-type="float" office:value="10.465116279069761" table:formula="of:=ABS((([.F62]*100/[.E62])-100)*-1)" table:style-name="ce5">
            <text:p>10</text:p>
          </table:table-cell>
          <table:table-cell office:value-type="float" office:value="16" table:style-name="ce94">
            <text:p>16</text:p>
          </table:table-cell>
          <table:table-cell office:value-type="float" office:value="1870" table:formula="of:=[.E62]+([.F62]-[.F61])" table:style-name="ce5">
            <text:p>1870</text:p>
          </table:table-cell>
          <table:table-cell office:value-type="float" office:value="1807" table:style-name="ce38">
            <text:p>1807</text:p>
          </table:table-cell>
          <table:table-cell office:value-type="float" office:value="1801" table:style-name="ce38">
            <text:p>1801</text:p>
          </table:table-cell>
          <table:table-cell office:value-type="float" office:value="1810" table:style-name="ce38">
            <text:p>181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2T2</text:p>
          </table:table-cell>
          <table:table-cell office:value-type="float" office:value="141.43299999999999" table:style-name="ce44">
            <text:p>141</text:p>
          </table:table-cell>
          <table:table-cell office:value-type="float" office:value="12.48" table:style-name="ce45">
            <text:p>12.5</text:p>
          </table:table-cell>
          <table:table-cell office:value-type="float" office:value="165418" table:style-name="ce44">
            <text:p>165418</text:p>
          </table:table-cell>
          <table:table-cell office:value-type="float" office:value="1840.6666666666667" table:formula="of:=AVERAGE([.J63:.L63])" table:style-name="ce44">
            <text:p>1841</text:p>
          </table:table-cell>
          <table:table-cell office:value-type="float" office:value="1618.3333333333333" table:style-name="ce44">
            <text:p>1618</text:p>
          </table:table-cell>
          <table:table-cell office:value-type="float" office:value="12.07895689967404" table:formula="of:=ABS((([.F63]*100/[.E63])-100)*-1)" table:style-name="ce5">
            <text:p>12</text:p>
          </table:table-cell>
          <table:table-cell office:value-type="float" office:value="16" table:style-name="ce94">
            <text:p>16</text:p>
          </table:table-cell>
          <table:table-cell office:value-type="float" office:value="1842" table:formula="of:=[.E63]+([.F63]-[.F62])" table:style-name="ce5">
            <text:p>1842</text:p>
          </table:table-cell>
          <table:table-cell office:value-type="float" office:value="1829" table:style-name="ce38">
            <text:p>1829</text:p>
          </table:table-cell>
          <table:table-cell office:value-type="float" office:value="1844" table:style-name="ce38">
            <text:p>1844</text:p>
          </table:table-cell>
          <table:table-cell office:value-type="float" office:value="1849" table:style-name="ce38">
            <text:p>184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2T3</text:p>
          </table:table-cell>
          <table:table-cell office:value-type="float" office:value="143.86000000000001" table:style-name="ce5">
            <text:p>144</text:p>
          </table:table-cell>
          <table:table-cell office:value-type="float" office:value="12.67" table:style-name="ce6">
            <text:p>12.7</text:p>
          </table:table-cell>
          <table:table-cell office:value-type="float" office:value="168380" table:style-name="ce5">
            <text:p>168380</text:p>
          </table:table-cell>
          <table:table-cell office:value-type="float" office:value="1866.3333333333333" table:formula="of:=AVERAGE([.J64:.L64])" table:style-name="ce5">
            <text:p>1866</text:p>
          </table:table-cell>
          <table:table-cell office:value-type="float" office:value="1617" table:style-name="ce44">
            <text:p>1617</text:p>
          </table:table-cell>
          <table:table-cell office:value-type="float" office:value="13.359528487229852" table:formula="of:=ABS((([.F64]*100/[.E64])-100)*-1)" table:style-name="ce5">
            <text:p>13</text:p>
          </table:table-cell>
          <table:table-cell office:value-type="float" office:value="16" table:style-name="ce94">
            <text:p>16</text:p>
          </table:table-cell>
          <table:table-cell office:value-type="float" office:value="1865" table:formula="of:=[.E64]+([.F64]-[.F63])" table:style-name="ce5">
            <text:p>1865</text:p>
          </table:table-cell>
          <table:table-cell office:value-type="float" office:value="1862" table:style-name="ce38">
            <text:p>1862</text:p>
          </table:table-cell>
          <table:table-cell office:value-type="float" office:value="1870" table:style-name="ce38">
            <text:p>1870</text:p>
          </table:table-cell>
          <table:table-cell office:value-type="float" office:value="1867" table:style-name="ce38">
            <text:p>1867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2">
            <text:p>2022T4</text:p>
          </table:table-cell>
          <table:table-cell office:value-type="float" office:value="142.666" table:style-name="ce5">
            <text:p>143</text:p>
          </table:table-cell>
          <table:table-cell office:value-type="float" office:value="12.87" table:style-name="ce6">
            <text:p>12.9</text:p>
          </table:table-cell>
          <table:table-cell office:value-type="float" office:value="150117" table:style-name="ce5">
            <text:p>150117</text:p>
          </table:table-cell>
          <table:table-cell office:value-type="float" office:value="1888.3333333333333" table:formula="of:=AVERAGE([.J65:.L65])" table:style-name="ce5">
            <text:p>1888</text:p>
          </table:table-cell>
          <table:table-cell office:value-type="float" office:value="1608.3333333333333" table:style-name="ce44">
            <text:p>1608</text:p>
          </table:table-cell>
          <table:table-cell office:value-type="float" office:value="14.827890556045901" table:formula="of:=ABS((([.F65]*100/[.E65])-100)*-1)" table:style-name="ce5">
            <text:p>15</text:p>
          </table:table-cell>
          <table:table-cell office:value-type="float" office:value="16" table:style-name="ce94">
            <text:p>16</text:p>
          </table:table-cell>
          <table:table-cell office:value-type="float" office:value="1879.6666666666665" table:formula="of:=[.E65]+([.F65]-[.F64])" table:style-name="ce5">
            <text:p>1880</text:p>
          </table:table-cell>
          <table:table-cell office:value-type="float" office:value="1883" table:style-name="ce38">
            <text:p>1883</text:p>
          </table:table-cell>
          <table:table-cell office:value-type="float" office:value="1894" table:style-name="ce38">
            <text:p>1894</text:p>
          </table:table-cell>
          <table:table-cell office:value-type="float" office:value="1888" table:style-name="ce38">
            <text:p>1888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3T1</text:p>
          </table:table-cell>
          <table:table-cell office:value-type="float" office:value="143.58000000000001" table:style-name="ce5">
            <text:p>144</text:p>
          </table:table-cell>
          <table:table-cell office:value-type="float" office:value="13.26" table:style-name="ce6">
            <text:p>13.3</text:p>
          </table:table-cell>
          <table:table-cell office:value-type="float" office:value="159837" table:style-name="ce5">
            <text:p>159837</text:p>
          </table:table-cell>
          <table:table-cell office:value-type="float" office:value="1918.3333333333333" table:formula="of:=AVERAGE([.J66:.L66])" table:style-name="ce5">
            <text:p>1918</text:p>
          </table:table-cell>
          <table:table-cell office:value-type="float" office:value="1615" table:style-name="ce44">
            <text:p>1615</text:p>
          </table:table-cell>
          <table:table-cell office:value-type="float" office:value="15.81233709817549" table:formula="of:=ABS((([.F66]*100/[.E66])-100)*-1)" table:style-name="ce5">
            <text:p>16</text:p>
          </table:table-cell>
          <table:table-cell office:value-type="float" office:value="16" table:style-name="ce94">
            <text:p>16</text:p>
          </table:table-cell>
          <table:table-cell office:value-type="float" office:value="1925" table:formula="of:=[.E66]+([.F66]-[.F65])" table:style-name="ce5">
            <text:p>1925</text:p>
          </table:table-cell>
          <table:table-cell office:value-type="float" office:value="1894" table:style-name="ce38">
            <text:p>1894</text:p>
          </table:table-cell>
          <table:table-cell office:value-type="float" office:value="1918" table:style-name="ce38">
            <text:p>1918</text:p>
          </table:table-cell>
          <table:table-cell office:value-type="float" office:value="1943" table:style-name="ce38">
            <text:p>1943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3T2</text:p>
          </table:table-cell>
          <table:table-cell office:value-type="float" office:value="146.583" table:style-name="ce5">
            <text:p>147</text:p>
          </table:table-cell>
          <table:table-cell office:value-type="float" office:value="11.6" table:style-name="ce6">
            <text:p>11.6</text:p>
          </table:table-cell>
          <table:table-cell office:value-type="float" office:value="129933" table:style-name="ce5">
            <text:p>129933</text:p>
          </table:table-cell>
          <table:table-cell office:value-type="float" office:value="1976.3333333333333" table:formula="of:=AVERAGE([.J67:.L67])" table:style-name="ce5">
            <text:p>1976</text:p>
          </table:table-cell>
          <table:table-cell office:value-type="float" office:value="1658.6666666666667" table:style-name="ce44">
            <text:p>1659</text:p>
          </table:table-cell>
          <table:table-cell office:value-type="float" office:value="16.073536852757613" table:formula="of:=ABS((([.F67]*100/[.E67])-100)*-1)" table:style-name="ce5">
            <text:p>16</text:p>
          </table:table-cell>
          <table:table-cell office:value-type="float" office:value="16" table:style-name="ce94">
            <text:p>16</text:p>
          </table:table-cell>
          <table:table-cell office:value-type="float" office:value="2020" table:formula="of:=[.E67]+([.F67]-[.F66])" table:style-name="ce5">
            <text:p>2020</text:p>
          </table:table-cell>
          <table:table-cell office:value-type="float" office:value="1963" table:style-name="ce38">
            <text:p>1963</text:p>
          </table:table-cell>
          <table:table-cell office:value-type="float" office:value="1976" table:style-name="ce38">
            <text:p>1976</text:p>
          </table:table-cell>
          <table:table-cell office:value-type="float" office:value="1990" table:style-name="ce38">
            <text:p>1990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3T3</text:p>
          </table:table-cell>
          <table:table-cell office:value-type="float" office:value="150.273" table:style-name="ce5">
            <text:p>150</text:p>
          </table:table-cell>
          <table:table-cell office:value-type="float" office:value="11.84" table:style-name="ce6">
            <text:p>11.8</text:p>
          </table:table-cell>
          <table:table-cell office:value-type="float" office:value="141641" table:style-name="ce5">
            <text:p>141641</text:p>
          </table:table-cell>
          <table:table-cell office:value-type="float" office:value="2002.3333333333333" table:formula="of:=AVERAGE([.J68:.L68])" table:style-name="ce5">
            <text:p>2002</text:p>
          </table:table-cell>
          <table:table-cell office:value-type="float" office:value="1633" table:style-name="ce44">
            <text:p>1633</text:p>
          </table:table-cell>
          <table:table-cell office:value-type="float" office:value="18.445147328117187" table:formula="of:=ABS((([.F68]*100/[.E68])-100)*-1)" table:style-name="ce5">
            <text:p>18</text:p>
          </table:table-cell>
          <table:table-cell office:value-type="float" office:value="16" table:style-name="ce94">
            <text:p>16</text:p>
          </table:table-cell>
          <table:table-cell office:value-type="float" office:value="1976.6666666666665" table:formula="of:=[.E68]+([.F68]-[.F67])" table:style-name="ce5">
            <text:p>1977</text:p>
          </table:table-cell>
          <table:table-cell office:value-type="float" office:value="1996" table:style-name="ce38">
            <text:p>1996</text:p>
          </table:table-cell>
          <table:table-cell office:value-type="float" office:value="2004" table:style-name="ce38">
            <text:p>2004</text:p>
          </table:table-cell>
          <table:table-cell office:value-type="float" office:value="2007" table:style-name="ce38">
            <text:p>2007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3T4</text:p>
          </table:table-cell>
          <table:table-cell office:value-type="float" office:value="148.69" table:style-name="ce5">
            <text:p>149</text:p>
          </table:table-cell>
          <table:table-cell office:value-type="float" office:value="11.76" table:style-name="ce6">
            <text:p>11.8</text:p>
          </table:table-cell>
          <table:table-cell office:value-type="float" office:value="137709" table:style-name="ce5">
            <text:p>137709</text:p>
          </table:table-cell>
          <table:table-cell office:value-type="float" office:value="2028.3333333333333" table:formula="of:=AVERAGE([.J69:.L69])" table:style-name="ce5">
            <text:p>2028</text:p>
          </table:table-cell>
          <table:table-cell office:value-type="float" office:value="1654" table:style-name="ce44">
            <text:p>1654</text:p>
          </table:table-cell>
          <table:table-cell office:value-type="float" office:value="18.455217748562035" table:formula="of:=ABS((([.F69]*100/[.E69])-100)*-1)" table:style-name="ce5">
            <text:p>18</text:p>
          </table:table-cell>
          <table:table-cell office:value-type="float" office:value="16" table:style-name="ce94">
            <text:p>16</text:p>
          </table:table-cell>
          <table:table-cell office:value-type="float" office:value="2049.333333333333" table:formula="of:=[.E69]+([.F69]-[.F68])" table:style-name="ce5">
            <text:p>2049</text:p>
          </table:table-cell>
          <table:table-cell office:value-type="float" office:value="2016" table:style-name="ce38">
            <text:p>2016</text:p>
          </table:table-cell>
          <table:table-cell office:value-type="float" office:value="2027" table:style-name="ce38">
            <text:p>2027</text:p>
          </table:table-cell>
          <table:table-cell office:value-type="float" office:value="2042" table:style-name="ce38">
            <text:p>2042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4T1</text:p>
          </table:table-cell>
          <table:table-cell office:value-type="float" office:value="152.61000000000001" table:style-name="ce5">
            <text:p>153</text:p>
          </table:table-cell>
          <table:table-cell office:value-type="float" office:value="12.29" table:style-name="ce6">
            <text:p>12.3</text:p>
          </table:table-cell>
          <table:table-cell office:value-type="float" office:value="152020" table:style-name="ce94">
            <text:p>152020</text:p>
          </table:table-cell>
          <table:table-cell office:value-type="float" office:value="2061.3333333333335" table:formula="of:=AVERAGE([.J70:.L70])" table:style-name="ce5">
            <text:p>2061</text:p>
          </table:table-cell>
          <table:table-cell office:value-type="float" office:value="1713" table:style-name="ce44">
            <text:p>1713</text:p>
          </table:table-cell>
          <table:table-cell office:value-type="float" office:value="16.898447606727046" table:formula="of:=ABS((([.F70]*100/[.E70])-100)*-1)" table:style-name="ce5">
            <text:p>17</text:p>
          </table:table-cell>
          <table:table-cell office:value-type="float" office:value="16" table:style-name="ce94">
            <text:p>16</text:p>
          </table:table-cell>
          <table:table-cell office:value-type="float" office:value="2120.3333333333335" table:formula="of:=[.E70]+([.F70]-[.F69])" table:style-name="ce5">
            <text:p>2120</text:p>
          </table:table-cell>
          <table:table-cell office:value-type="float" office:value="2049" table:style-name="ce105">
            <text:p>2049</text:p>
          </table:table-cell>
          <table:table-cell office:value-type="float" office:value="2056" table:style-name="ce105">
            <text:p>2056</text:p>
          </table:table-cell>
          <table:table-cell office:value-type="float" office:value="2079" table:style-name="ce105">
            <text:p>2079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4T2</text:p>
          </table:table-cell>
          <table:table-cell office:value-type="float" office:value="158.08000000000001" table:style-name="ce94">
            <text:p>158</text:p>
          </table:table-cell>
          <table:table-cell office:value-type="float" office:value="11.27" table:style-name="ce91">
            <text:p>11.3</text:p>
          </table:table-cell>
          <table:table-cell office:value-type="float" office:value="147203" table:style-name="ce94">
            <text:p>147203</text:p>
          </table:table-cell>
          <table:table-cell office:value-type="float" office:value="2118.6666666666665" table:formula="of:=AVERAGE([.J71:.L71])" table:style-name="ce94">
            <text:p>2119</text:p>
          </table:table-cell>
          <table:table-cell office:value-type="float" office:value="1736.6666666666667" table:style-name="ce44">
            <text:p>1737</text:p>
          </table:table-cell>
          <table:table-cell office:value-type="float" office:value="18.030207677784759" table:formula="of:=ABS((([.F71]*100/[.E71])-100)*-1)" table:style-name="ce5">
            <text:p>18</text:p>
          </table:table-cell>
          <table:table-cell office:value-type="float" office:value="16" table:style-name="ce94">
            <text:p>16</text:p>
          </table:table-cell>
          <table:table-cell office:value-type="float" office:value="2142.333333333333" table:formula="of:=[.E71]+([.F71]-[.F70])" table:style-name="ce5">
            <text:p>2142</text:p>
          </table:table-cell>
          <table:table-cell office:value-type="float" office:value="2098" table:style-name="ce105">
            <text:p>2098</text:p>
          </table:table-cell>
          <table:table-cell office:value-type="float" office:value="2120" table:style-name="ce105">
            <text:p>2120</text:p>
          </table:table-cell>
          <table:table-cell office:value-type="float" office:value="2138" table:style-name="ce105">
            <text:p>2138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4T3</text:p>
          </table:table-cell>
          <table:table-cell office:value-type="float" office:value="162.52000000000001" table:style-name="ce94">
            <text:p>163</text:p>
          </table:table-cell>
          <table:table-cell office:value-type="float" office:value="11.21" table:style-name="ce91">
            <text:p>11.2</text:p>
          </table:table-cell>
          <table:table-cell office:value-type="float" office:value="168642" table:style-name="ce94">
            <text:p>168642</text:p>
          </table:table-cell>
          <table:table-cell office:value-type="float" office:value="2170.3333333333335" table:formula="of:=AVERAGE([.J72:.L72])" table:style-name="ce94">
            <text:p>2170</text:p>
          </table:table-cell>
          <table:table-cell office:value-type="float" office:value="1760" table:style-name="ce134">
            <text:p>1760</text:p>
          </table:table-cell>
          <table:table-cell office:value-type="float" office:value="18.906465980648136" table:formula="of:=ABS((([.F72]*100/[.E72])-100)*-1)" table:style-name="ce5">
            <text:p>19</text:p>
          </table:table-cell>
          <table:table-cell office:value-type="float" office:value="16" table:style-name="ce94">
            <text:p>16</text:p>
          </table:table-cell>
          <table:table-cell office:value-type="float" office:value="2193.666666666667" table:formula="of:=[.E72]+([.F72]-[.F71])" table:style-name="ce5">
            <text:p>2194</text:p>
          </table:table-cell>
          <table:table-cell office:value-type="float" office:value="2153" table:style-name="ce105">
            <text:p>2153</text:p>
          </table:table-cell>
          <table:table-cell office:value-type="float" office:value="2176" table:style-name="ce105">
            <text:p>2176</text:p>
          </table:table-cell>
          <table:table-cell office:value-type="float" office:value="2182" table:style-name="ce105">
            <text:p>2182</text:p>
          </table:table-cell>
          <table:table-cell table:number-columns-repeated="16372"/>
        </table:table-row>
        <table:table-row table:style-name="ro2">
          <table:table-cell office:value-type="string" table:style-name="ce42">
            <text:p>2024T4</text:p>
          </table:table-cell>
          <table:table-cell office:value-type="float" office:value="165.43" table:style-name="ce78">
            <text:p>165</text:p>
          </table:table-cell>
          <table:table-cell office:value-type="float" office:value="10.61" table:style-name="ce95">
            <text:p>10.6</text:p>
          </table:table-cell>
          <table:table-cell office:value-type="float" office:value="174054" table:style-name="ce78">
            <text:p>174054</text:p>
          </table:table-cell>
          <table:table-cell office:value-type="float" office:value="2241.3333333333335" table:formula="of:=AVERAGE([.J73:.L73])" table:style-name="ce78">
            <text:p>2241</text:p>
          </table:table-cell>
          <table:table-cell office:value-type="float" office:value="1807" table:style-name="ce76">
            <text:p>1807</text:p>
          </table:table-cell>
          <table:table-cell office:value-type="float" office:value="19.378346222486627" table:formula="of:=ABS((([.F73]*100/[.E73])-100)*-1)" table:style-name="ce5">
            <text:p>19</text:p>
          </table:table-cell>
          <table:table-cell office:value-type="float" office:value="16" table:style-name="ce78">
            <text:p>16</text:p>
          </table:table-cell>
          <table:table-cell office:value-type="float" office:value="2288.3333333333335" table:formula="of:=[.E73]+([.F73]-[.F72])" table:style-name="ce5">
            <text:p>2288</text:p>
          </table:table-cell>
          <table:table-cell office:value-type="float" office:value="2209" table:style-name="ce126">
            <text:p>2209</text:p>
          </table:table-cell>
          <table:table-cell office:value-type="float" office:value="2244" table:style-name="ce126">
            <text:p>2244</text:p>
          </table:table-cell>
          <table:table-cell office:value-type="float" office:value="2271" table:style-name="ce126">
            <text:p>2271</text:p>
          </table:table-cell>
          <table:table-cell table:number-columns-repeated="16372"/>
        </table:table-row>
        <table:table-row table:style-name="ro2">
          <table:table-cell office:value-type="string" table:style-name="ce121">
            <text:p>2025T1</text:p>
          </table:table-cell>
          <table:table-cell office:value-type="float" office:value="170.858" table:style-name="ce78">
            <text:p>171</text:p>
          </table:table-cell>
          <table:table-cell office:value-type="float" office:value="11.36" table:style-name="ce95">
            <text:p>11.4</text:p>
          </table:table-cell>
          <table:table-cell office:value-type="float" office:value="183140" table:style-name="ce78">
            <text:p>183140</text:p>
          </table:table-cell>
          <table:table-cell office:value-type="float" office:value="2273" table:formula="of:=AVERAGE([.J74:.L74])" table:style-name="ce78">
            <text:p>2273</text:p>
          </table:table-cell>
          <table:table-cell office:value-type="float" office:value="1882" table:style-name="ce76">
            <text:p>1882</text:p>
          </table:table-cell>
          <table:table-cell office:value-type="float" office:value="17.20193576770788" table:formula="of:=ABS((([.F74]*100/[.E74])-100)*-1)" table:style-name="ce5">
            <text:p>17</text:p>
          </table:table-cell>
          <table:table-cell office:value-type="float" office:value="16" table:style-name="ce78">
            <text:p>16</text:p>
          </table:table-cell>
          <table:table-cell office:value-type="float" office:value="2348" table:formula="of:=[.E74]+([.F74]-[.F73])" table:style-name="ce5">
            <text:p>2348</text:p>
          </table:table-cell>
          <table:table-cell office:value-type="float" office:value="2237" table:style-name="ce126">
            <text:p>2237</text:p>
          </table:table-cell>
          <table:table-cell office:value-type="float" office:value="2271" table:style-name="ce126">
            <text:p>2271</text:p>
          </table:table-cell>
          <table:table-cell office:value-type="float" office:value="2311" table:style-name="ce126">
            <text:p>2311</text:p>
          </table:table-cell>
          <table:table-cell table:number-columns-repeated="16372"/>
        </table:table-row>
        <table:table-row table:style-name="ro2">
          <table:table-cell office:value-type="string" table:style-name="ce121">
            <text:p>2025T2</text:p>
          </table:table-cell>
          <table:table-cell office:value-type="float" office:value="177.50399999999999" table:style-name="ce78">
            <text:p>178</text:p>
          </table:table-cell>
          <table:table-cell office:value-type="float" office:value="10.29" table:style-name="ce95">
            <text:p>10.3</text:p>
          </table:table-cell>
          <table:table-cell office:value-type="float" office:value="174393" table:style-name="ce78">
            <text:p>174393</text:p>
          </table:table-cell>
          <table:table-cell office:value-type="float" office:value="2393" table:formula="of:=AVERAGE([.J75:.L75])" table:style-name="ce78">
            <text:p>2393</text:p>
          </table:table-cell>
          <table:table-cell office:value-type="float" office:value="1898" table:style-name="ce76">
            <text:p>1898</text:p>
          </table:table-cell>
          <table:table-cell office:value-type="float" office:value="20.685332218972007" table:formula="of:=ABS((([.F75]*100/[.E75])-100)*-1)" table:style-name="ce5">
            <text:p>21</text:p>
          </table:table-cell>
          <table:table-cell office:value-type="float" office:value="16" table:style-name="ce78">
            <text:p>16</text:p>
          </table:table-cell>
          <table:table-cell office:value-type="float" office:value="2409" table:formula="of:=[.E75]+([.F75]-[.F74])" table:style-name="ce5">
            <text:p>2409</text:p>
          </table:table-cell>
          <table:table-cell office:value-type="float" office:value="2350" table:style-name="ce126">
            <text:p>2350</text:p>
          </table:table-cell>
          <table:table-cell office:value-type="float" office:value="2391" table:style-name="ce126">
            <text:p>2391</text:p>
          </table:table-cell>
          <table:table-cell office:value-type="float" office:value="2438" table:style-name="ce126">
            <text:p>2438</text:p>
          </table:table-cell>
          <table:table-cell table:number-columns-repeated="16372"/>
        </table:table-row>
        <table:table-row table:style-name="ro2">
          <table:table-cell office:value-type="string" table:style-name="ce121">
            <text:p>2025T3</text:p>
          </table:table-cell>
          <table:table-cell office:value-type="float" office:value="182.37200000000001" table:style-name="ce78">
            <text:p>182</text:p>
          </table:table-cell>
          <table:table-cell office:value-type="float" office:value="10.45" table:style-name="ce95">
            <text:p>10.5</text:p>
          </table:table-cell>
          <table:table-cell office:value-type="float" office:value="176221" table:style-name="ce78">
            <text:p>176221</text:p>
          </table:table-cell>
          <table:table-cell office:value-type="float" office:value="2495.3333333333335" table:formula="of:=AVERAGE([.J76:.L76])" table:style-name="ce78">
            <text:p>2495</text:p>
          </table:table-cell>
          <table:table-cell office:value-type="float" office:value="1908" table:style-name="ce78">
            <text:p>1908</text:p>
          </table:table-cell>
          <table:table-cell office:value-type="float" office:value="23.537269569863753" table:formula="of:=ABS((([.F76]*100/[.E76])-100)*-1)" table:style-name="ce5">
            <text:p>24</text:p>
          </table:table-cell>
          <table:table-cell office:value-type="float" office:value="16" table:style-name="ce78">
            <text:p>16</text:p>
          </table:table-cell>
          <table:table-cell office:value-type="float" office:value="2505.3333333333335" table:formula="of:=[.E76]+([.F76]-[.F75])" table:style-name="ce5">
            <text:p>2505</text:p>
          </table:table-cell>
          <table:table-cell office:value-type="float" office:value="2471" table:style-name="ce126">
            <text:p>2471</text:p>
          </table:table-cell>
          <table:table-cell office:value-type="float" office:value="2498" table:style-name="ce126">
            <text:p>2498</text:p>
          </table:table-cell>
          <table:table-cell office:value-type="float" office:value="2517" table:style-name="ce126">
            <text:p>2517</text:p>
          </table:table-cell>
          <table:table-cell table:number-columns-repeated="16372"/>
        </table:table-row>
        <table:table-row table:style-name="ro2">
          <table:table-cell office:value-type="string" table:style-name="ce121">
            <text:p>2025T4</text:p>
          </table:table-cell>
          <table:table-cell office:value-type="float" office:value="185.917" table:style-name="ce78">
            <text:p>186</text:p>
          </table:table-cell>
          <table:table-cell office:value-type="float" office:value="9.93" table:style-name="ce95">
            <text:p>9.9</text:p>
          </table:table-cell>
          <table:table-cell office:value-type="float" office:value="180492" table:style-name="ce78">
            <text:p>180492</text:p>
          </table:table-cell>
          <table:table-cell office:value-type="float" office:value="2599.6666666666665" table:formula="of:=AVERAGE([.J77:.L77])" table:style-name="ce78">
            <text:p>2600</text:p>
          </table:table-cell>
          <table:table-cell office:value-type="float" office:value="1949" table:style-name="ce78">
            <text:p>1949</text:p>
          </table:table-cell>
          <table:table-cell office:value-type="float" office:value="25.028849852545193" table:formula="of:=ABS((([.F77]*100/[.E77])-100)*-1)" table:style-name="ce5">
            <text:p>25</text:p>
          </table:table-cell>
          <table:table-cell office:value-type="float" office:value="16" table:style-name="ce78">
            <text:p>16</text:p>
          </table:table-cell>
          <table:table-cell office:value-type="float" office:value="2640.6666666666665" table:formula="of:=[.E77]+([.F77]-[.F76])" table:style-name="ce5">
            <text:p>2641</text:p>
          </table:table-cell>
          <table:table-cell office:value-type="float" office:value="2555" table:style-name="ce126">
            <text:p>2555</text:p>
          </table:table-cell>
          <table:table-cell office:value-type="float" office:value="2605" table:style-name="ce126">
            <text:p>2605</text:p>
          </table:table-cell>
          <table:table-cell office:value-type="float" office:value="2639" table:style-name="ce126">
            <text:p>2639</text:p>
          </table:table-cell>
          <table:table-cell table:number-columns-repeated="16372"/>
        </table:table-row>
        <table:table-row table:style-name="ro2">
          <table:table-cell office:value-type="string" table:style-name="ce121">
            <text:p>2026T1</text:p>
          </table:table-cell>
          <table:table-cell office:value-type="string" table:style-name="ce78">
            <text:p>null</text:p>
          </table:table-cell>
          <table:table-cell office:value-type="string" table:style-name="ce78">
            <text:p>null</text:p>
          </table:table-cell>
          <table:table-cell office:value-type="float" office:value="172476" table:style-name="ce78">
            <text:p>172476</text:p>
          </table:table-cell>
          <table:table-cell office:value-type="float" office:value="2677.3333333333335" table:formula="of:=AVERAGE([.J78:.L78])" table:style-name="ce78">
            <text:p>2677</text:p>
          </table:table-cell>
          <table:table-cell office:value-type="float" office:value="2065" table:style-name="ce78">
            <text:p>2065</text:p>
          </table:table-cell>
          <table:table-cell office:value-type="float" office:value="22.871015936254977" table:formula="of:=ABS((([.F78]*100/[.E78])-100)*-1)" table:style-name="ce5">
            <text:p>23</text:p>
          </table:table-cell>
          <table:table-cell office:value-type="float" office:value="16" table:style-name="ce78">
            <text:p>16</text:p>
          </table:table-cell>
          <table:table-cell office:value-type="float" office:value="2793.3333333333335" table:formula="of:=[.E78]+([.F78]-[.F77])" table:style-name="ce5">
            <text:p>2793</text:p>
          </table:table-cell>
          <table:table-cell office:value-type="float" office:value="2650" table:style-name="ce126">
            <text:p>2650</text:p>
          </table:table-cell>
          <table:table-cell office:value-type="float" office:value="2673" table:style-name="ce126">
            <text:p>2673</text:p>
          </table:table-cell>
          <table:table-cell office:value-type="float" office:value="2709" table:style-name="ce126">
            <text:p>2709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table:style-name="ce43"/>
          <table:table-cell table:style-name="ce1"/>
          <table:table-cell table:style-name="ce52"/>
          <table:table-cell table:style-name="ce1"/>
          <table:table-cell table:number-columns-repeated="2" table:style-name="ce122"/>
          <table:table-cell table:number-columns-repeated="16378" table:style-name="ce1"/>
        </table:table-row>
        <table:table-row table:number-rows-repeated="1048496" table:style-name="ro3">
          <table:table-cell table:number-columns-repeated="16384"/>
        </table:table-row>
      </table:table>
      <table:table table:name="Notes" table:style-name="ta2">
        <table:table-column table:style-name="co43" table:number-columns-repeated="16384" table:default-cell-style-name="ce1"/>
        <table:table-row table:style-name="ro5">
          <table:table-cell office:value-type="string" table:style-name="ce46">
            <text:p>Cells in pink imply that the data are past projections or estimations.</text:p>
          </table:table-cell>
          <table:table-cell table:number-columns-repeated="8" table:style-name="ce46"/>
          <table:table-cell table:style-name="ce48"/>
          <table:table-cell table:number-columns-repeated="16374" table:style-name="ce49"/>
        </table:table-row>
        <table:table-row table:style-name="ro5">
          <table:table-cell office:value-type="string" table:style-name="ce47">
            <text:p>Cells in red implies that the data is provisional or future projections.</text:p>
          </table:table-cell>
          <table:table-cell table:number-columns-repeated="8" table:style-name="ce47"/>
          <table:table-cell table:style-name="ce50"/>
          <table:table-cell table:number-columns-repeated="16374" table:style-name="ce49"/>
        </table:table-row>
        <table:table-row table:style-name="ro3">
          <table:table-cell table:number-columns-repeated="16384"/>
        </table:table-row>
        <table:table-row table:number-rows-repeated="5" table:style-name="ro3">
          <table:table-cell table:number-columns-repeated="2" table:style-name="ce1"/>
          <table:table-cell table:style-name="ce4"/>
          <table:table-cell table:style-name="ce117"/>
          <table:table-cell table:number-columns-repeated="3" table:style-name="ce9"/>
          <table:table-cell table:style-name="ce4"/>
          <table:table-cell table:number-columns-repeated="2" table:style-name="ce114"/>
          <table:table-cell table:number-columns-repeated="16374" table:style-name="ce1"/>
        </table:table-row>
        <table:table-row table:style-name="ro3">
          <table:table-cell table:number-columns-repeated="2" table:style-name="ce1"/>
          <table:table-cell table:style-name="ce4"/>
          <table:table-cell table:style-name="ce117"/>
          <table:table-cell table:number-columns-repeated="3" table:style-name="ce9"/>
          <table:table-cell table:style-name="ce4"/>
          <table:table-cell table:number-columns-repeated="2" table:style-name="ce114"/>
          <table:table-cell table:number-columns-repeated="11" table:style-name="ce112"/>
          <table:table-cell table:number-columns-repeated="16363"/>
        </table:table-row>
        <table:table-row table:style-name="ro3">
          <table:table-cell table:number-columns-repeated="2" table:style-name="ce1"/>
          <table:table-cell table:style-name="ce4"/>
          <table:table-cell table:style-name="ce117"/>
          <table:table-cell table:number-columns-repeated="3" table:style-name="ce9"/>
          <table:table-cell table:style-name="ce4"/>
          <table:table-cell table:number-columns-repeated="2" table:style-name="ce114"/>
          <table:table-cell table:number-columns-repeated="16374" table:style-name="ce1"/>
        </table:table-row>
        <table:table-row table:number-rows-repeated="5" table:style-name="ro3">
          <table:table-cell table:number-columns-repeated="2" table:style-name="ce1"/>
          <table:table-cell table:style-name="ce4"/>
          <table:table-cell table:style-name="ce117"/>
          <table:table-cell table:number-columns-repeated="3" table:style-name="ce9"/>
          <table:table-cell table:style-name="ce4"/>
          <table:table-cell table:number-columns-repeated="2" table:style-name="ce114"/>
          <table:table-cell table:number-columns-repeated="2" table:style-name="ce4"/>
          <table:table-cell table:number-columns-repeated="16372" table:style-name="ce1"/>
        </table:table-row>
        <table:table-row table:style-name="ro3">
          <table:table-cell table:number-columns-repeated="3" table:style-name="ce1"/>
          <table:table-cell table:style-name="ce116"/>
          <table:table-cell table:style-name="ce115"/>
          <table:table-cell table:number-columns-repeated="3" table:style-name="ce1"/>
          <table:table-cell table:number-columns-repeated="4" table:style-name="ce4"/>
          <table:table-cell table:number-columns-repeated="16372" table:style-name="ce1"/>
        </table:table-row>
        <table:table-row table:style-name="ro3">
          <table:table-cell table:number-columns-repeated="4"/>
          <table:table-cell table:style-name="ce112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4"/>
          <table:table-cell table:style-name="ce112"/>
          <table:table-cell table:style-name="ce1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3">
          <table:table-cell table:number-columns-repeated="4"/>
          <table:table-cell table:style-name="ce112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4"/>
          <table:table-cell table:style-name="ce112"/>
          <table:table-cell table:style-name="ce1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3">
          <table:table-cell table:number-columns-repeated="4"/>
          <table:table-cell table:style-name="ce112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4"/>
          <table:table-cell table:style-name="ce112"/>
          <table:table-cell table:style-name="ce1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4"/>
          <table:table-cell table:style-name="ce112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number-rows-repeated="2" table:style-name="ro3">
          <table:table-cell table:number-columns-repeated="4"/>
          <table:table-cell table:number-columns-repeated="4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4"/>
          <table:table-cell table:number-columns-repeated="2" table:style-name="ce1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2" table:style-name="ro3">
          <table:table-cell table:number-columns-repeated="4"/>
          <table:table-cell table:number-columns-repeated="4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6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3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6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3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6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3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6"/>
          <table:table-cell table:style-name="ce113"/>
          <table:table-cell table:style-name="ce1"/>
          <table:table-cell table:number-columns-repeated="4" table:style-name="ce4"/>
          <table:table-cell table:number-columns-repeated="16372"/>
        </table:table-row>
        <table:table-row table:style-name="ro3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6"/>
          <table:table-cell table:style-name="ce113"/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6"/>
          <table:table-cell table:style-name="ce113"/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  <table:database-ranges>
        <table:database-range table:target-range-address="Notes.F12:Notes.G23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22">
      <number:month number:textual="true"/>
      <number:text>-</number:text>
      <number:year/>
    </number:date-style>
    <number:number-style style:name="N36">
      <number:number number:decimal-places="1" number:min-decimal-places="1" number:min-integer-digits="1"/>
    </number:number-style>
    <number:number-style style:name="N37P0" number:language="en" number:country="US">
      <number:number number:decimal-places="0" number:min-decimal-places="0" number:min-integer-digits="1" number:grouping="true"/>
    </number:number-style>
    <number:number-style style:name="N37">
      <number:text>-</number:text>
      <number:number number:decimal-places="0" number:min-decimal-places="0" number:min-integer-digits="1" number:grouping="true"/>
      <style:map style:condition="value()&gt;=0" style:apply-style-name="N37P0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39">
      <number:number number:decimal-places="4" number:min-decimal-places="4" number:min-integer-digits="1"/>
    </number:number-style>
    <number:number-style style:name="N40">
      <number:number number:decimal-places="4" number:min-decimal-places="4" number:min-integer-digits="1" number:grouping="true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title>Spain Housing</dc:title>
    <dc:description>@HousingSpanish, spainhousing.eu</dc:description>
    <dc:subject>Spanish housing market</dc:subject>
    <meta:keyword>Spain</meta:keyword>
    <meta:keyword> Housing</meta:keyword>
    <meta:initial-creator/>
    <dc:creator/>
    <meta:creation-date>2021-01-04T22:15:51Z</meta:creation-date>
    <dc:date>2026-05-01T10:30:07Z</dc:date>
    <meta:template xlink:href="" xlink:type="simple"/>
    <meta:editing-cycles>1</meta:editing-cycles>
    <meta:editing-duration>PT0S</meta:editing-duration>
  </office:meta>
</office:document-meta>
</file>